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35"/>
    <style:style style:name="P2" style:family="paragraph" style:parent-style-name="Text_20_body" style:list-style-name="L25"/>
    <style:style style:name="P3" style:family="paragraph" style:parent-style-name="Text_20_body" style:list-style-name="L25">
      <style:paragraph-properties fo:margin-top="0cm" fo:margin-bottom="0cm" style:contextual-spacing="false"/>
    </style:style>
    <style:style style:name="P4" style:family="paragraph" style:parent-style-name="Text_20_body" style:list-style-name="L26"/>
    <style:style style:name="P5" style:family="paragraph" style:parent-style-name="Text_20_body" style:list-style-name="L26">
      <style:paragraph-properties fo:margin-top="0cm" fo:margin-bottom="0cm" style:contextual-spacing="false"/>
    </style:style>
    <style:style style:name="P6" style:family="paragraph" style:parent-style-name="Text_20_body" style:list-style-name="L27"/>
    <style:style style:name="P7" style:family="paragraph" style:parent-style-name="Text_20_body" style:list-style-name="L27">
      <style:paragraph-properties fo:margin-top="0cm" fo:margin-bottom="0cm" style:contextual-spacing="false"/>
    </style:style>
    <style:style style:name="P8" style:family="paragraph" style:parent-style-name="Text_20_body" style:list-style-name="L28"/>
    <style:style style:name="P9" style:family="paragraph" style:parent-style-name="Text_20_body" style:list-style-name="L28">
      <style:paragraph-properties fo:margin-top="0cm" fo:margin-bottom="0cm" style:contextual-spacing="false"/>
    </style:style>
    <style:style style:name="P10" style:family="paragraph" style:parent-style-name="Text_20_body" style:list-style-name="L29"/>
    <style:style style:name="P11" style:family="paragraph" style:parent-style-name="Text_20_body" style:list-style-name="L29">
      <style:paragraph-properties fo:margin-top="0cm" fo:margin-bottom="0cm" style:contextual-spacing="false"/>
    </style:style>
    <style:style style:name="P12" style:family="paragraph" style:parent-style-name="Text_20_body" style:list-style-name="L30"/>
    <style:style style:name="P13" style:family="paragraph" style:parent-style-name="Text_20_body" style:list-style-name="L30">
      <style:paragraph-properties fo:margin-top="0cm" fo:margin-bottom="0cm" style:contextual-spacing="false"/>
    </style:style>
    <style:style style:name="P14" style:family="paragraph" style:parent-style-name="Text_20_body" style:list-style-name="L31"/>
    <style:style style:name="P15" style:family="paragraph" style:parent-style-name="Text_20_body" style:list-style-name="L31">
      <style:paragraph-properties fo:margin-top="0cm" fo:margin-bottom="0cm" style:contextual-spacing="false"/>
    </style:style>
    <style:style style:name="P16" style:family="paragraph" style:parent-style-name="Text_20_body" style:list-style-name="L32"/>
    <style:style style:name="P17" style:family="paragraph" style:parent-style-name="Text_20_body" style:list-style-name="L32">
      <style:paragraph-properties fo:margin-top="0cm" fo:margin-bottom="0cm" style:contextual-spacing="false"/>
    </style:style>
    <style:style style:name="P18" style:family="paragraph" style:parent-style-name="Text_20_body" style:list-style-name="L33"/>
    <style:style style:name="P19" style:family="paragraph" style:parent-style-name="Text_20_body" style:list-style-name="L33">
      <style:paragraph-properties fo:margin-top="0cm" fo:margin-bottom="0cm" style:contextual-spacing="false"/>
    </style:style>
    <style:style style:name="P20" style:family="paragraph" style:parent-style-name="Text_20_body" style:list-style-name="L34"/>
    <style:style style:name="P21" style:family="paragraph" style:parent-style-name="Text_20_body" style:list-style-name="L34">
      <style:paragraph-properties fo:margin-top="0cm" fo:margin-bottom="0cm" style:contextual-spacing="false"/>
    </style:style>
    <style:style style:name="P22" style:family="paragraph" style:parent-style-name="Text_20_body" style:list-style-name="L35"/>
    <style:style style:name="P23" style:family="paragraph" style:parent-style-name="Text_20_body" style:list-style-name="L35">
      <style:paragraph-properties fo:margin-top="0cm" fo:margin-bottom="0cm" style:contextual-spacing="false"/>
    </style:style>
    <style:style style:name="P24" style:family="paragraph" style:parent-style-name="Text_20_body" style:list-style-name="L36"/>
    <style:style style:name="P25" style:family="paragraph" style:parent-style-name="Text_20_body" style:list-style-name="L3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CUADERNO DE ESTUDIO: LECCIÓN 2 (PARTE 2)</text:h>
      <text:h text:style-name="Heading_20_2" text:outline-level="2">El Entendimiento Básico de la Biblia: Autoría, Enseñanzas y la Guerra Espiritual</text:h>
      <text:p text:style-name="Horizontal_20_Line"/>
      <text:h text:style-name="Heading_20_2" text:outline-level="2">🔄 1. Repaso Inicial: Preguntas de Reflexión</text:h>
      <text:p text:style-name="Text_20_body"><text:span text:style-name="Emphasis">(A cargo del Evangelista Christian Howard)</text:span></text:p>
      <text:p text:style-name="Text_20_body">Antes de comenzar, ponemos a prueba lo aprendido en la Parte 1 sobre los pactos y el propósito de Dios:</text:p>
      <text:list text:style-name="L25">
        <text:list-item>
          <text:p text:style-name="P3"><text:span text:style-name="Strong_20_Emphasis">¿Cuál es el propósito de Dios según 1 Timoteo 2:4?</text:span></text:p>
          <text:list>
            <text:list-item>
              <text:p text:style-name="P3"><text:span text:style-name="Emphasis">Respuesta:</text:span> <text:span text:style-name="Strong_20_Emphasis">Que todos sean salvos y conozcan la verdad</text:span>. (No solo creer, sino entender la verdad y ponerla en el corazón). </text:p>
            </text:list-item>
          </text:list>
        </text:list-item>
        <text:list-item>
          <text:p text:style-name="P3"><text:span text:style-name="Strong_20_Emphasis">Según Apocalipsis 1:3, ¿quién es bienaventurado?</text:span></text:p>
          <text:list>
            <text:list-item>
              <text:p text:style-name="P3"><text:span text:style-name="Emphasis">Respuesta:</text:span> <text:span text:style-name="Strong_20_Emphasis">El que lee, oye y guarda la profecía</text:span>. (Guardar significa hacerla parte de uno mismo). </text:p>
            </text:list-item>
          </text:list>
        </text:list-item>
        <text:list-item>
          <text:p text:style-name="P3"><text:span text:style-name="Strong_20_Emphasis">¿Qué promesa hizo Dios a Israel en Éxodo 19:5-6?</text:span></text:p>
          <text:list>
            <text:list-item>
              <text:p text:style-name="P3"><text:span text:style-name="Emphasis">Respuesta:</text:span> Serían un <text:span text:style-name="Strong_20_Emphasis">reino de sacerdotes y nación santa</text:span>, <text:span text:style-name="Emphasis">siempre y cuando</text:span> guardaran Su pacto al 100%. </text:p>
            </text:list-item>
          </text:list>
        </text:list-item>
        <text:list-item>
          <text:p text:style-name="P3"><text:span text:style-name="Strong_20_Emphasis">¿Quiénes forman el Israel espiritual según el Nuevo Testamento?</text:span></text:p>
          <text:list>
            <text:list-item>
              <text:p text:style-name="P3"><text:span text:style-name="Emphasis">Respuesta:</text:span> <text:span text:style-name="Strong_20_Emphasis">Los creyentes (cristianos)</text:span> que reciben y creen en Jesús, no por linaje de sangre, sino por recibir Su semilla (la Palabra). </text:p>
            </text:list-item>
          </text:list>
        </text:list-item>
        <text:list-item>
          <text:p text:style-name="P3"><text:span text:style-name="Strong_20_Emphasis">¿Por qué Israel tuvo dificultades para guardar el pacto?</text:span></text:p>
          <text:list>
            <text:list-item>
              <text:p text:style-name="P3"><text:span text:style-name="Emphasis">Respuesta:</text:span> Porque <text:span text:style-name="Strong_20_Emphasis">malentendieron las palabras de la profecía y el cumplimiento</text:span>. </text:p>
            </text:list-item>
          </text:list>
        </text:list-item>
        <text:list-item>
          <text:p text:style-name="P3"><text:span text:style-name="Strong_20_Emphasis">Reflexión:</text:span> <text:span text:style-name="Emphasis">¿Cómo podemos evitar cometer el mismo error que los judíos al no reconocer a Jesús?</text:span></text:p>
          <text:list>
            <text:list-item>
              <text:p text:style-name="P2"><text:span text:style-name="Emphasis">Conclusión:</text:span> Escuchando la Palabra, probando los espíritus y revisando siempre la Biblia, que es la fuente. </text:p>
            </text:list-item>
          </text:list>
        </text:list-item>
      </text:list>
      <text:p text:style-name="Text_20_body"><text:span text:style-name="Strong_20_Emphasis">Oración de apertura:</text:span></text:p>
      <text:p text:style-name="Quotations"><text:span text:style-name="Emphasis">"Santísimo Padre Dios, gracias por este día, guiándonos aquí a entender más sobre ti, a aprender de tu pacto y tu promesa. Gracias por enseñarnos todo esto que no entendíamos siendo cristianos por muchos años. Dios, manda a tu Espíritu Santo a ayudar a los estudiantes que no han podido venir por problemas de electricidad o compromisos, y a los que están aquí, hambrientos de tu palabra. Oramos todo esto en tu hijo precioso Jesucristo. Amén."</text:span></text:p>
      <text:p text:style-name="Horizontal_20_Line"/>
      <text:h text:style-name="Heading_20_2" text:outline-level="2"><text:soft-page-break/>🍞 2. Introducción: La Biblia como Alimento Diario</text:h>
      <text:p text:style-name="Text_20_body"><text:span text:style-name="Emphasis">(A cargo del Instructor Sibiani)</text:span></text:p>
      <text:h text:style-name="Heading_20_3" text:outline-level="3">📌 La Analogía del Alimento</text:h>
      <text:p text:style-name="Text_20_body">Cuando nos disponemos a ver las palabras de Dios, debemos entender que <text:span text:style-name="Strong_20_Emphasis">la Biblia es como un alimento</text:span>.</text:p>
      <text:list text:style-name="L26">
        <text:list-item>
          <text:p text:style-name="P5">Así como comemos físicamente todos los días (mínimo tres veces) para que nuestro cuerpo viva, debemos "comer" la Palabra de Dios diariamente para que <text:span text:style-name="Strong_20_Emphasis">nuestro espíritu pueda vivir</text:span>. </text:p>
        </text:list-item>
        <text:list-item>
          <text:p text:style-name="P4">No es algo para leer esporádicamente; es una dieta espiritual esencial. </text:p>
        </text:list-item>
      </text:list>
      <text:p text:style-name="Horizontal_20_Line"/>
      <text:h text:style-name="Heading_20_2" text:outline-level="2">✍️ 3. La Autoría de la Biblia: Dios y sus Instrumentos</text:h>
      <text:p text:style-name="Text_20_body"><text:span text:style-name="Strong_20_Emphasis">2 Timoteo 3:16</text:span></text:p>
      <text:p text:style-name="Quotations"><text:span text:style-name="Emphasis">"Toda la Escritura es inspirada por Dios, y útil para enseñar, para redargüir, para corregir, para instruir en justicia".</text:span></text:p>
      <text:h text:style-name="Heading_20_3" text:outline-level="3">🖋️ El Autor y los "Bolígrafos"</text:h>
      <text:list text:style-name="L27">
        <text:list-item>
          <text:p text:style-name="P7"><text:span text:style-name="Strong_20_Emphasis">El Autor Principal:</text:span> <text:span text:style-name="Strong_20_Emphasis">Dios</text:span>. La Biblia no es un libro de pensamientos humanos; es la escritura del Espíritu. </text:p>
        </text:list-item>
        <text:list-item>
          <text:p text:style-name="P7"><text:span text:style-name="Strong_20_Emphasis">Los Instrumentos (Los Escritores):</text:span> Dios utilizó a aproximadamente <text:span text:style-name="Strong_20_Emphasis">35 a 40 personas</text:span> a lo largo de 1,500 años (profetas, reyes, discípulos, Pablo). </text:p>
        </text:list-item>
        <text:list-item>
          <text:p text:style-name="P6"><text:span text:style-name="Strong_20_Emphasis">La Inspiración:</text:span> <text:span text:style-name="Strong_20_Emphasis">2 Pedro 1:21</text:span> nos dice que los santos hombres de Dios hablaron <text:span text:style-name="Emphasis">siendo inspirados por el Espíritu Santo</text:span>. Dios es el autor, y los humanos fueron como los "bolígrafos" o plumas que escribieron lo que el Espíritu les reveló. </text:p>
        </text:list-item>
      </text:list>
      <text:p text:style-name="Horizontal_20_Line"/>
      <text:h text:style-name="Heading_20_2" text:outline-level="2">⚖️ 4. Dos Tipos de Enseñanzas: El Hombre vs. El Espíritu</text:h>
      <text:p text:style-name="Text_20_body"><text:span text:style-name="Strong_20_Emphasis">1 Corintios 2:10</text:span></text:p>
      <text:p text:style-name="Quotations"><text:span text:style-name="Emphasis">"Pero Dios nos las reveló a nosotros por el Espíritu. Porque el Espíritu todo lo escudriña, aun lo profundo de Dios".</text:span></text:p>
      <text:h text:style-name="Heading_20_3" text:outline-level="3">❌ Las Enseñanzas del Hombre (El Libro Sellado)</text:h>
      <text:p text:style-name="Text_20_body">El hombre tiende a enseñar lo que él mismo piensa o imagina, creando "mandamientos de hombres".</text:p>
      <text:list text:style-name="L28">
        <text:list-item>
          <text:p text:style-name="P9"><text:span text:style-name="Strong_20_Emphasis">La Analogía del Libro Sellado (Isaías 29 / Apocalipsis 5):</text:span> Juan vio un libro en la mano derecha de Dios, sellado con 7 sellos. Nadie podía abrirlo ni entenderlo. </text:p>
        </text:list-item>
        <text:list-item>
          <text:p text:style-name="P9"><text:span text:style-name="Strong_20_Emphasis">El Error Humano:</text:span> El hombre lee el libro sellado y, sin entenderlo, dice: <text:span text:style-name="Emphasis">"Yo creo que esto significa esto otro"</text:span>. <text:span text:style-name="Strong_20_Emphasis">Enseña sin saber</text:span>. </text:p>
        </text:list-item>
        <text:list-item>
          <text:p text:style-name="P8"><text:soft-page-break/><text:span text:style-name="Strong_20_Emphasis">El Ejemplo de la Primera Venida (Marcos 7):</text:span> Los fariseos criticaban a Jesús porque Sus discípulos no se lavaban las manos (una tradición humana). Jesús los llamó hipócritas porque dejaban los mandamientos de Dios por seguir sus propias tradiciones. </text:p>
        </text:list-item>
      </text:list>
      <text:h text:style-name="Heading_20_3" text:outline-level="3">✅ Las Enseñanzas de Dios (La Revelación)</text:h>
      <text:p text:style-name="Text_20_body">Las cosas profundas de Dios (misterios, parábolas, profecías) no se pueden descubrir con inteligencia humana o títulos académicos; <text:span text:style-name="Strong_20_Emphasis">requieren revelación del Espíritu Santo</text:span>.</text:p>
      <text:list text:style-name="L29">
        <text:list-item>
          <text:p text:style-name="P11"><text:span text:style-name="Strong_20_Emphasis">Gálatas 1:11-12:</text:span> Pablo aclara que el evangelio que predicó <text:span text:style-name="Strong_20_Emphasis">no lo recibió de ningún hombre</text:span>, sino por <text:span text:style-name="Strong_20_Emphasis">revelación de Jesucristo</text:span>. </text:p>
        </text:list-item>
        <text:list-item>
          <text:p text:style-name="P10"><text:span text:style-name="Strong_20_Emphasis">La Promesa de Abrir el Libro (Juan 16:25):</text:span> Jesús prometió que, aunque habló en parábolas (alegorías), llegaría la hora en que <text:span text:style-name="Strong_20_Emphasis">ya no hablaría por figuras, sino que claramente anunciaría acerca del Padre</text:span>. El libro sellado se abre por revelación. </text:p>
        </text:list-item>
      </text:list>
      <text:p text:style-name="Horizontal_20_Line"/>
      <text:h text:style-name="Heading_20_2" text:outline-level="2">📚 5. Los 4 Contenidos Principales de la Biblia</text:h>
      <text:p text:style-name="Text_20_body">La Biblia no es un solo bloque de texto; se divide en cuatro contenidos vitales. ¿Para qué sirve cada uno?</text:p>
      <text:h text:style-name="Heading_20_3" text:outline-level="3">1️⃣ Historia (Ejemplos y Advertencias)</text:h>
      <text:list text:style-name="L30">
        <text:list-item>
          <text:p text:style-name="P13"><text:span text:style-name="Strong_20_Emphasis">Propósito:</text:span> Mostrarnos lo que le pasó al pueblo de Dios en el pasado para que no cometamos los mismos errores. </text:p>
        </text:list-item>
        <text:list-item>
          <text:p text:style-name="P13"><text:span text:style-name="Strong_20_Emphasis">1 Corintios 10:11:</text:span> <text:span text:style-name="Emphasis">"Y estas cosas les acontecieron como ejemplo, y están escritas para amonestarnos a nosotros"</text:span>. </text:p>
        </text:list-item>
        <text:list-item>
          <text:p text:style-name="P12"><text:span text:style-name="Emphasis">Ejemplo:</text:span> El maná y la roca en el desierto no fueron solo eventos físicos, sino sombras de un alimento espiritual (Cristo). </text:p>
        </text:list-item>
      </text:list>
      <text:h text:style-name="Heading_20_3" text:outline-level="3">2️⃣ Enseñanzas Morales (Corrección)</text:h>
      <text:list text:style-name="L31">
        <text:list-item>
          <text:p text:style-name="P15"><text:span text:style-name="Strong_20_Emphasis">Propósito:</text:span> Volvernos a la imagen original de Dios. </text:p>
        </text:list-item>
        <text:list-item>
          <text:p text:style-name="P14"><text:span text:style-name="Strong_20_Emphasis">2 Timoteo 3:16:</text:span> La Palabra es útil para <text:span text:style-name="Emphasis">redargüir y corregir</text:span>. A nadie le gusta que lo corrijan, pero Dios lo hace para que estemos "enteramente preparados para toda buena obra". </text:p>
        </text:list-item>
      </text:list>
      <text:h text:style-name="Heading_20_3" text:outline-level="3">3️⃣ Profecía (La Base de la Fe)</text:h>
      <text:list text:style-name="L32">
        <text:list-item>
          <text:p text:style-name="P17"><text:span text:style-name="Strong_20_Emphasis">Propósito:</text:span> Servir como testimonio para que <text:span text:style-name="Strong_20_Emphasis">creamos</text:span> cuando el evento suceda. </text:p>
        </text:list-item>
        <text:list-item>
          <text:p text:style-name="P17"><text:span text:style-name="Strong_20_Emphasis">Juan 14:29:</text:span> <text:span text:style-name="Emphasis">"Y ahora os lo he dicho antes que suceda, para que cuando suceda, creáis"</text:span>. </text:p>
        </text:list-item>
        <text:list-item>
          <text:p text:style-name="P16"><text:span text:style-name="Emphasis">Reflexión:</text:span> La fe verdadera no es un sentimiento ciego; es creer en la promesa (profecía) y creer en su cumplimiento (realidad). </text:p>
        </text:list-item>
      </text:list>
      <text:h text:style-name="Heading_20_3" text:outline-level="3">4️⃣ Cumplimiento / Realidad (La Experiencia)</text:h>
      <text:list text:style-name="L33">
        <text:list-item>
          <text:p text:style-name="P19"><text:span text:style-name="Strong_20_Emphasis">Propósito:</text:span> Es la materialización de la profecía. Cuando Dios cumple, aparece la "realidad". </text:p>
        </text:list-item>
        <text:list-item>
          <text:p text:style-name="P19"><text:span text:style-name="Strong_20_Emphasis">Apocalipsis 21:6:</text:span> <text:span text:style-name="Emphasis">"Hecho está. Yo soy el Alfa y la Omega, el principio y el fin"</text:span>. </text:p>
        </text:list-item>
        <text:list-item>
          <text:p text:style-name="P18"><text:soft-page-break/><text:span text:style-name="Emphasis">Reflexión:</text:span> Dios es el Alfa (el que promete/profetiza) y la Omega (el que cumple/termina). Cuando aparece la realidad, nuestros propios pensamientos e imaginaciones deben desaparecer para someterse a lo que Dios hizo. </text:p>
        </text:list-item>
      </text:list>
      <text:p text:style-name="Horizontal_20_Line"/>
      <text:h text:style-name="Heading_20_2" text:outline-level="2">⚔️ 6. El Tema Central de la Biblia: Guerra y Recreación</text:h>
      <text:p text:style-name="Text_20_body">Si tuviéramos que resumir los 66 libros de la Biblia en un solo tema, sería: <text:span text:style-name="Strong_20_Emphasis">Una historia de guerra</text:span>.</text:p>
      <text:h text:style-name="Heading_20_3" text:outline-level="3">🛡️ La Guerra Espiritual</text:h>
      <text:p text:style-name="Text_20_body"><text:span text:style-name="Strong_20_Emphasis">Efesios 6:12</text:span></text:p>
      <text:p text:style-name="Quotations"><text:span text:style-name="Emphasis">"Porque no tenemos lucha contra sangre y carne, sino contra principados, contra potestades, contra los gobernadores de las tinieblas de este siglo, contra huestes espirituales de maldad en las regiones celestes".</text:span></text:p>
      <text:list text:style-name="L34">
        <text:list-item>
          <text:p text:style-name="P21"><text:span text:style-name="Strong_20_Emphasis">No es una guerra física</text:span> (contra países o políticas), es una guerra espiritual que dura 6,000 años (desde Adán). </text:p>
        </text:list-item>
        <text:list-item>
          <text:p text:style-name="P21"><text:span text:style-name="Strong_20_Emphasis">El Lado de Dios:</text:span> Lucha para <text:span text:style-name="Strong_20_Emphasis">restaurar</text:span> Su creación, que fue arrebatada por Satanás. </text:p>
        </text:list-item>
        <text:list-item>
          <text:p text:style-name="P20"><text:span text:style-name="Strong_20_Emphasis">El Lado de Satanás:</text:span> Lucha para <text:span text:style-name="Strong_20_Emphasis">mantener</text:span> el mundo engañado, usando mentiras, calumnias y falsos rumores. </text:p>
        </text:list-item>
      </text:list>
      <text:h text:style-name="Heading_20_3" text:outline-level="3">🗡️ Las Armas de la Guerra</text:h>
      <text:list text:style-name="L35">
        <text:list-item>
          <text:p text:style-name="P23"><text:span text:style-name="Strong_20_Emphasis">Arma de Satanás:</text:span> La mentira, la tergiversación de la Palabra y la persecución. </text:p>
        </text:list-item>
        <text:list-item>
          <text:p text:style-name="P22"><text:span text:style-name="Strong_20_Emphasis">Arma del Pueblo de Dios:</text:span> <text:span text:style-name="Strong_20_Emphasis">Apocalipsis 12:11</text:span></text:p>
          <text:p text:style-name="P1"><text:span text:style-name="Emphasis">"Y ellos le han vencido por medio de la sangre del Cordero y de la palabra del testimonio de ellos"</text:span>.</text:p>
        </text:list-item>
        <text:list-item>
          <text:p text:style-name="P22"><text:span text:style-name="Emphasis">¿Cuál es el testimonio?</text:span> Es la verdad de <text:span text:style-name="Strong_20_Emphasis">cómo se están cumpliendo las profecías</text:span>. No lo que el hombre piensa, sino lo que Dios está haciendo en la realidad. </text:p>
        </text:list-item>
      </text:list>
      <text:p text:style-name="Horizontal_20_Line"/>
      <text:h text:style-name="Heading_20_2" text:outline-level="2">🔄 7. Repaso Final y Oración de Cierre</text:h>
      <text:p text:style-name="Text_20_body"><text:span text:style-name="Emphasis">(A cargo del Evangelista Christian Howard)</text:span></text:p>
      <text:p text:style-name="Text_20_body"><text:span text:style-name="Strong_20_Emphasis">Resumen de los Puntos Clave:</text:span></text:p>
      <text:list text:style-name="L36">
        <text:list-item>
          <text:p text:style-name="P25"><text:span text:style-name="Strong_20_Emphasis">Autoría:</text:span> Dios usó a 35-40 personas, inspiradas por el Espíritu Santo. </text:p>
        </text:list-item>
        <text:list-item>
          <text:p text:style-name="P25"><text:span text:style-name="Strong_20_Emphasis">Contenidos:</text:span> Historia, Enseñanzas, Profecía y Cumplimiento. (Las dos últimas son las más importantes para verificar que Dios está vivo y obrando). </text:p>
        </text:list-item>
        <text:list-item>
          <text:p text:style-name="P24"><text:span text:style-name="Strong_20_Emphasis">El Centro de la Biblia:</text:span> La guerra entre Dios y Satanás. Dios quiere restaurar Su creación y nosotros debemos saber de qué lado estamos luchando. </text:p>
        </text:list-item>
      </text:list>
      <text:p text:style-name="Text_20_body"><text:span text:style-name="Strong_20_Emphasis">Oración de Cierre (El Padre Nuestro):</text:span></text:p>
      <text:p text:style-name="Quotations"><text:span text:style-name="Emphasis">"Padre nuestro que estás en los cielos, santificado sea tu nombre. Venga a nosotros tu reino, hágase tu voluntad en la tierra como en el cielo. Danos hoy nuestro pan de cada </text:span><text:soft-page-break/><text:span text:style-name="Emphasis">día. Perdona nuestras ofensas, como también nosotros perdonamos a los que nos ofenden. No nos dejes caer en la tentación, mas líbranos del mal. Porque tuyo es el reino, el poder y la gloria por todos los siglos. Amén."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14:23:42.100848662</meta:creation-date>
    <dc:date>2026-06-11T14:30:48.612737316</dc:date>
    <meta:editing-duration>PT7M7S</meta:editing-duration>
    <meta:editing-cycles>1</meta:editing-cycles>
    <meta:document-statistic meta:table-count="0" meta:image-count="0" meta:object-count="0" meta:page-count="5" meta:paragraph-count="82" meta:word-count="1373" meta:character-count="7989" meta:non-whitespace-character-count="6706"/>
    <meta:generator>LibreOffice/24.2.7.2$Linux_X86_64 LibreOffice_project/420$Build-2</meta:generator>
  </office:meta>
</office:document-meta>
</file>