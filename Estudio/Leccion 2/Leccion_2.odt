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dauk Book" svg:font-family="'Padauk Book'" style:font-pitch="variable"/>
  </office:font-face-decls>
  <office:automatic-styles>
    <style:style style:name="P1" style:family="paragraph" style:parent-style-name="Heading_20_1">
      <style:text-properties style:font-name="Padauk Book"/>
    </style:style>
    <style:style style:name="P2" style:family="paragraph" style:parent-style-name="Heading_20_2">
      <style:text-properties style:font-name="Padauk Book"/>
    </style:style>
    <style:style style:name="P3" style:family="paragraph" style:parent-style-name="Heading_20_3">
      <style:text-properties style:font-name="Padauk Book"/>
    </style:style>
    <style:style style:name="P4" style:family="paragraph" style:parent-style-name="Horizontal_20_Line">
      <style:text-properties style:font-name="Padauk Book"/>
    </style:style>
    <style:style style:name="P5" style:family="paragraph" style:parent-style-name="Quotations" style:list-style-name="L11"/>
    <style:style style:name="P6" style:family="paragraph" style:parent-style-name="Standard">
      <style:text-properties style:font-name="Padauk Book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>
      <style:text-properties style:font-name="Padauk Book"/>
    </style:style>
    <style:style style:name="P31" style:family="paragraph" style:parent-style-name="Text_20_body" style:list-style-name="L2">
      <style:text-properties style:font-name="Padauk Book"/>
    </style:style>
    <style:style style:name="T1" style:family="text">
      <style:text-properties style:font-name="Padauk Book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📖 CUADERNO DE ESTUDIO: LECCIÓN 2 (PARTE 2)</text:h>
      <text:h text:style-name="P2" text:outline-level="2">El Entendimiento Básico de la Biblia: Autoría, Enseñanzas y la Guerra Espiritual</text:h>
      <text:p text:style-name="P4"/>
      <text:h text:style-name="P2" text:outline-level="2">🔄 1. Repaso Inicial: Preguntas de Reflexión</text:h>
      <text:p text:style-name="Text_20_body"><text:span text:style-name="Emphasis"><text:span text:style-name="T1">(A cargo del Evangelista Christian Howard)</text:span></text:span></text:p>
      <text:p text:style-name="P30">Antes de comenzar, ponemos a prueba lo aprendido en la Parte 1 sobre los pactos y el propósito de Dios:</text:p>
      <text:list text:style-name="L1">
        <text:list-item>
          <text:p text:style-name="P8"><text:span text:style-name="Strong_20_Emphasis"><text:span text:style-name="T1">¿Cuál es el propósito de Dios según 1 Timoteo 2:4?</text:span></text:span></text:p>
          <text:list>
            <text:list-item>
              <text:p text:style-name="P8"><text:span text:style-name="Emphasis"><text:span text:style-name="T1">Respuesta:</text:span></text:span><text:span text:style-name="T1"> </text:span><text:span text:style-name="Strong_20_Emphasis"><text:span text:style-name="T1">Que todos sean salvos y conozcan la verdad</text:span></text:span><text:span text:style-name="T1">. (No solo creer, sino entender la verdad y ponerla en el corazón). </text:span></text:p>
            </text:list-item>
          </text:list>
        </text:list-item>
        <text:list-item>
          <text:p text:style-name="P8"><text:span text:style-name="Strong_20_Emphasis"><text:span text:style-name="T1">Según Apocalipsis 1:3, ¿quién es bienaventurado?</text:span></text:span></text:p>
          <text:list>
            <text:list-item>
              <text:p text:style-name="P8"><text:span text:style-name="Emphasis"><text:span text:style-name="T1">Respuesta:</text:span></text:span><text:span text:style-name="T1"> </text:span><text:span text:style-name="Strong_20_Emphasis"><text:span text:style-name="T1">El que lee, oye y guarda la profecía</text:span></text:span><text:span text:style-name="T1">. (Guardar significa hacerla parte de uno mismo). </text:span></text:p>
            </text:list-item>
          </text:list>
        </text:list-item>
        <text:list-item>
          <text:p text:style-name="P8"><text:span text:style-name="Strong_20_Emphasis"><text:span text:style-name="T1">¿Qué promesa hizo Dios a Israel en Éxodo 19:5-6?</text:span></text:span></text:p>
          <text:list>
            <text:list-item>
              <text:p text:style-name="P8"><text:span text:style-name="Emphasis"><text:span text:style-name="T1">Respuesta:</text:span></text:span><text:span text:style-name="T1"> Serían un </text:span><text:span text:style-name="Strong_20_Emphasis"><text:span text:style-name="T1">reino de sacerdotes y nación santa</text:span></text:span><text:span text:style-name="T1">, </text:span><text:span text:style-name="Emphasis"><text:span text:style-name="T1">siempre y cuando</text:span></text:span><text:span text:style-name="T1"> guardaran Su pacto al 100%. </text:span></text:p>
            </text:list-item>
          </text:list>
        </text:list-item>
        <text:list-item>
          <text:p text:style-name="P8"><text:span text:style-name="Strong_20_Emphasis"><text:span text:style-name="T1">¿Quiénes forman el Israel espiritual según el Nuevo Testamento?</text:span></text:span></text:p>
          <text:list>
            <text:list-item>
              <text:p text:style-name="P8"><text:span text:style-name="Emphasis"><text:span text:style-name="T1">Respuesta:</text:span></text:span><text:span text:style-name="T1"> </text:span><text:span text:style-name="Strong_20_Emphasis"><text:span text:style-name="T1">Los creyentes (cristianos)</text:span></text:span><text:span text:style-name="T1"> que reciben y creen en Jesús, no por linaje de sangre, sino por recibir Su semilla (la Palabra). </text:span></text:p>
            </text:list-item>
          </text:list>
        </text:list-item>
        <text:list-item>
          <text:p text:style-name="P8"><text:span text:style-name="Strong_20_Emphasis"><text:span text:style-name="T1">¿Por qué Israel tuvo dificultades para guardar el pacto?</text:span></text:span></text:p>
          <text:list>
            <text:list-item>
              <text:p text:style-name="P8"><text:span text:style-name="Emphasis"><text:span text:style-name="T1">Respuesta:</text:span></text:span><text:span text:style-name="T1"> Porque </text:span><text:span text:style-name="Strong_20_Emphasis"><text:span text:style-name="T1">malentendieron las palabras de la profecía y el cumplimiento</text:span></text:span><text:span text:style-name="T1">. </text:span></text:p>
            </text:list-item>
          </text:list>
        </text:list-item>
        <text:list-item>
          <text:p text:style-name="P8"><text:span text:style-name="Strong_20_Emphasis"><text:span text:style-name="T1">Reflexión:</text:span></text:span><text:span text:style-name="T1"> </text:span><text:span text:style-name="Emphasis"><text:span text:style-name="T1">¿Cómo podemos evitar cometer el mismo error que los judíos al no reconocer a Jesús?</text:span></text:span></text:p>
          <text:list>
            <text:list-item>
              <text:p text:style-name="P7"><text:span text:style-name="Emphasis"><text:span text:style-name="T1">Conclusión:</text:span></text:span><text:span text:style-name="T1"> Escuchando la Palabra, probando los espíritus y revisando siempre la Biblia, que es la fuente. </text:span></text:p>
            </text:list-item>
          </text:list>
        </text:list-item>
      </text:list>
      <text:p text:style-name="Text_20_body"><text:span text:style-name="Strong_20_Emphasis"><text:span text:style-name="T1">Oración de apertura:</text:span></text:span></text:p>
      <text:p text:style-name="Quotations"><text:soft-page-break/><text:span text:style-name="Emphasis"><text:span text:style-name="T1">"Santísimo Padre Dios, gracias por este día, guiándonos aquí a entender más sobre ti, a aprender de tu pacto y tu promesa. Gracias por enseñarnos todo esto que no entendíamos siendo cristianos por muchos años. Dios, manda a tu Espíritu Santo a ayudar a los estudiantes que no han podido venir por problemas de electricidad o compromisos, y a los que están aquí, hambrientos de tu palabra. Oramos todo esto en tu hijo precioso Jesucristo. Amén."</text:span></text:span></text:p>
      <text:p text:style-name="P4"/>
      <text:h text:style-name="P2" text:outline-level="2">🍞 2. Introducción: La Biblia como Alimento Diario</text:h>
      <text:p text:style-name="Text_20_body"><text:span text:style-name="Emphasis"><text:span text:style-name="T1">(A cargo del Instructor Sibiani)</text:span></text:span></text:p>
      <text:h text:style-name="P3" text:outline-level="3">📌 La Analogía del Alimento</text:h>
      <text:p text:style-name="Text_20_body"><text:span text:style-name="T1">Cuando nos disponemos a ver las palabras de Dios, debemos entender que </text:span><text:span text:style-name="Strong_20_Emphasis"><text:span text:style-name="T1">la Biblia es como un alimento</text:span></text:span><text:span text:style-name="T1">.</text:span></text:p>
      <text:list text:style-name="L2">
        <text:list-item>
          <text:p text:style-name="P9"><text:span text:style-name="T1">Así como comemos físicamente todos los días (mínimo tres veces) para que nuestro cuerpo viva, debemos "comer" la Palabra de Dios diariamente para que </text:span><text:span text:style-name="Strong_20_Emphasis"><text:span text:style-name="T1">nuestro espíritu pueda vivir</text:span></text:span><text:span text:style-name="T1">. </text:span></text:p>
        </text:list-item>
        <text:list-item>
          <text:p text:style-name="P31">No es algo para leer esporádicamente; es una dieta espiritual esencial. </text:p>
        </text:list-item>
      </text:list>
      <text:p text:style-name="P4"/>
      <text:h text:style-name="P2" text:outline-level="2">✍️ 3. La Autoría de la Biblia: Dios y sus Instrumentos</text:h>
      <text:p text:style-name="Text_20_body"><text:span text:style-name="Strong_20_Emphasis"><text:span text:style-name="T1">2 Timoteo 3:16</text:span></text:span></text:p>
      <text:p text:style-name="Quotations"><text:span text:style-name="Emphasis"><text:span text:style-name="T1">"Toda la Escritura es inspirada por Dios, y útil para enseñar, para redargüir, para corregir, para instruir en justicia".</text:span></text:span></text:p>
      <text:h text:style-name="P3" text:outline-level="3">🖋️ El Autor y los "Bolígrafos"</text:h>
      <text:list text:style-name="L3">
        <text:list-item>
          <text:p text:style-name="P11"><text:span text:style-name="Strong_20_Emphasis"><text:span text:style-name="T1">El Autor Principal:</text:span></text:span><text:span text:style-name="T1"> </text:span><text:span text:style-name="Strong_20_Emphasis"><text:span text:style-name="T1">Dios</text:span></text:span><text:span text:style-name="T1">. La Biblia no es un libro de pensamientos humanos; es la escritura del Espíritu. </text:span></text:p>
        </text:list-item>
        <text:list-item>
          <text:p text:style-name="P11"><text:span text:style-name="Strong_20_Emphasis"><text:span text:style-name="T1">Los Instrumentos (Los Escritores):</text:span></text:span><text:span text:style-name="T1"> Dios utilizó a aproximadamente </text:span><text:span text:style-name="Strong_20_Emphasis"><text:span text:style-name="T1">35 a 40 personas</text:span></text:span><text:span text:style-name="T1"> a lo largo de 1,500 años (profetas, reyes, discípulos, Pablo). </text:span></text:p>
        </text:list-item>
        <text:list-item>
          <text:p text:style-name="P10"><text:span text:style-name="Strong_20_Emphasis"><text:span text:style-name="T1">La Inspiración:</text:span></text:span><text:span text:style-name="T1"> </text:span><text:span text:style-name="Strong_20_Emphasis"><text:span text:style-name="T1">2 Pedro 1:21</text:span></text:span><text:span text:style-name="T1"> nos dice que los santos hombres de Dios hablaron </text:span><text:span text:style-name="Emphasis"><text:span text:style-name="T1">siendo inspirados por el Espíritu Santo</text:span></text:span><text:span text:style-name="T1">. Dios es el autor, y los humanos fueron como los "bolígrafos" o plumas que escribieron lo que el Espíritu les reveló. </text:span></text:p>
        </text:list-item>
      </text:list>
      <text:p text:style-name="P4"/>
      <text:h text:style-name="P2" text:outline-level="2"><text:soft-page-break/>⚖️ 4. Dos Tipos de Enseñanzas: El Hombre vs. El Espíritu</text:h>
      <text:p text:style-name="Text_20_body"><text:span text:style-name="Strong_20_Emphasis"><text:span text:style-name="T1">1 Corintios 2:10</text:span></text:span></text:p>
      <text:p text:style-name="Quotations"><text:span text:style-name="Emphasis"><text:span text:style-name="T1">"Pero Dios nos las reveló a nosotros por el Espíritu. Porque el Espíritu todo lo escudriña, aun lo profundo de Dios".</text:span></text:span></text:p>
      <text:h text:style-name="P3" text:outline-level="3">❌ Las Enseñanzas del Hombre (El Libro Sellado)</text:h>
      <text:p text:style-name="P30">El hombre tiende a enseñar lo que él mismo piensa o imagina, creando "mandamientos de hombres".</text:p>
      <text:list text:style-name="L4">
        <text:list-item>
          <text:p text:style-name="P13"><text:span text:style-name="Strong_20_Emphasis"><text:span text:style-name="T1">La Analogía del Libro Sellado (Isaías 29 / Apocalipsis 5):</text:span></text:span><text:span text:style-name="T1"> Juan vio un libro en la mano derecha de Dios, sellado con 7 sellos. Nadie podía abrirlo ni entenderlo. </text:span></text:p>
        </text:list-item>
        <text:list-item>
          <text:p text:style-name="P13"><text:span text:style-name="Strong_20_Emphasis"><text:span text:style-name="T1">El Error Humano:</text:span></text:span><text:span text:style-name="T1"> El hombre lee el libro sellado y, sin entenderlo, dice: </text:span><text:span text:style-name="Emphasis"><text:span text:style-name="T1">"Yo creo que esto significa esto otro"</text:span></text:span><text:span text:style-name="T1">. </text:span><text:span text:style-name="Strong_20_Emphasis"><text:span text:style-name="T1">Enseña sin saber</text:span></text:span><text:span text:style-name="T1">. </text:span></text:p>
        </text:list-item>
        <text:list-item>
          <text:p text:style-name="P12"><text:span text:style-name="Strong_20_Emphasis"><text:span text:style-name="T1">El Ejemplo de la Primera Venida (Marcos 7):</text:span></text:span><text:span text:style-name="T1"> Los fariseos criticaban a Jesús porque Sus discípulos no se lavaban las manos (una tradición humana). Jesús los llamó hipócritas porque dejaban los mandamientos de Dios por seguir sus propias tradiciones. </text:span></text:p>
        </text:list-item>
      </text:list>
      <text:h text:style-name="P3" text:outline-level="3">✅ Las Enseñanzas de Dios (La Revelación)</text:h>
      <text:p text:style-name="Text_20_body"><text:span text:style-name="T1">Las cosas profundas de Dios (misterios, parábolas, profecías) no se pueden descubrir con inteligencia humana o títulos académicos; </text:span><text:span text:style-name="Strong_20_Emphasis"><text:span text:style-name="T1">requieren revelación del Espíritu Santo</text:span></text:span><text:span text:style-name="T1">.</text:span></text:p>
      <text:list text:style-name="L5">
        <text:list-item>
          <text:p text:style-name="P15"><text:span text:style-name="Strong_20_Emphasis"><text:span text:style-name="T1">Gálatas 1:11-12:</text:span></text:span><text:span text:style-name="T1"> Pablo aclara que el evangelio que predicó </text:span><text:span text:style-name="Strong_20_Emphasis"><text:span text:style-name="T1">no lo recibió de ningún hombre</text:span></text:span><text:span text:style-name="T1">, sino por </text:span><text:span text:style-name="Strong_20_Emphasis"><text:span text:style-name="T1">revelación de Jesucristo</text:span></text:span><text:span text:style-name="T1">. </text:span></text:p>
        </text:list-item>
        <text:list-item>
          <text:p text:style-name="P14"><text:span text:style-name="Strong_20_Emphasis"><text:span text:style-name="T1">La Promesa de Abrir el Libro (Juan 16:25):</text:span></text:span><text:span text:style-name="T1"> Jesús prometió que, aunque habló en parábolas (alegorías), llegaría la hora en que </text:span><text:span text:style-name="Strong_20_Emphasis"><text:span text:style-name="T1">ya no hablaría por figuras, sino que claramente anunciaría acerca del Padre</text:span></text:span><text:span text:style-name="T1">. El libro sellado se abre por revelación. </text:span></text:p>
        </text:list-item>
      </text:list>
      <text:p text:style-name="P4"/>
      <text:h text:style-name="P2" text:outline-level="2">📚 5. Los 4 Contenidos Principales de la Biblia</text:h>
      <text:p text:style-name="P30">La Biblia no es un solo bloque de texto; se divide en cuatro contenidos vitales. ¿Para qué sirve cada uno?</text:p>
      <text:h text:style-name="P3" text:outline-level="3"><text:soft-page-break/>1️⃣ Historia (Ejemplos y Advertencias)</text:h>
      <text:list text:style-name="L6">
        <text:list-item>
          <text:p text:style-name="P17"><text:span text:style-name="Strong_20_Emphasis"><text:span text:style-name="T1">Propósito:</text:span></text:span><text:span text:style-name="T1"> Mostrarnos lo que le pasó al pueblo de Dios en el pasado para que no cometamos los mismos errores. </text:span></text:p>
        </text:list-item>
        <text:list-item>
          <text:p text:style-name="P17"><text:span text:style-name="Strong_20_Emphasis"><text:span text:style-name="T1">1 Corintios 10:11:</text:span></text:span><text:span text:style-name="T1"> </text:span><text:span text:style-name="Emphasis"><text:span text:style-name="T1">"Y estas cosas les acontecieron como ejemplo, y están escritas para amonestarnos a nosotros"</text:span></text:span><text:span text:style-name="T1">. </text:span></text:p>
        </text:list-item>
        <text:list-item>
          <text:p text:style-name="P16"><text:span text:style-name="Emphasis"><text:span text:style-name="T1">Ejemplo:</text:span></text:span><text:span text:style-name="T1"> El maná y la roca en el desierto no fueron solo eventos físicos, sino sombras de un alimento espiritual (Cristo). </text:span></text:p>
        </text:list-item>
      </text:list>
      <text:h text:style-name="P3" text:outline-level="3">2️⃣ Enseñanzas Morales (Corrección)</text:h>
      <text:list text:style-name="L7">
        <text:list-item>
          <text:p text:style-name="P19"><text:span text:style-name="Strong_20_Emphasis"><text:span text:style-name="T1">Propósito:</text:span></text:span><text:span text:style-name="T1"> Volvernos a la imagen original de Dios. </text:span></text:p>
        </text:list-item>
        <text:list-item>
          <text:p text:style-name="P18"><text:span text:style-name="Strong_20_Emphasis"><text:span text:style-name="T1">2 Timoteo 3:16:</text:span></text:span><text:span text:style-name="T1"> La Palabra es útil para </text:span><text:span text:style-name="Emphasis"><text:span text:style-name="T1">redargüir y corregir</text:span></text:span><text:span text:style-name="T1">. A nadie le gusta que lo corrijan, pero Dios lo hace para que estemos "enteramente preparados para toda buena obra". </text:span></text:p>
        </text:list-item>
      </text:list>
      <text:h text:style-name="P3" text:outline-level="3">3️⃣ Profecía (La Base de la Fe)</text:h>
      <text:list text:style-name="L8">
        <text:list-item>
          <text:p text:style-name="P21"><text:span text:style-name="Strong_20_Emphasis"><text:span text:style-name="T1">Propósito:</text:span></text:span><text:span text:style-name="T1"> Servir como testimonio para que </text:span><text:span text:style-name="Strong_20_Emphasis"><text:span text:style-name="T1">creamos</text:span></text:span><text:span text:style-name="T1"> cuando el evento suceda. </text:span></text:p>
        </text:list-item>
        <text:list-item>
          <text:p text:style-name="P21"><text:span text:style-name="Strong_20_Emphasis"><text:span text:style-name="T1">Juan 14:29:</text:span></text:span><text:span text:style-name="T1"> </text:span><text:span text:style-name="Emphasis"><text:span text:style-name="T1">"Y ahora os lo he dicho antes que suceda, para que cuando suceda, creáis"</text:span></text:span><text:span text:style-name="T1">. </text:span></text:p>
        </text:list-item>
        <text:list-item>
          <text:p text:style-name="P20"><text:span text:style-name="Emphasis"><text:span text:style-name="T1">Reflexión:</text:span></text:span><text:span text:style-name="T1"> La fe verdadera no es un sentimiento ciego; es creer en la promesa (profecía) y creer en su cumplimiento (realidad). </text:span></text:p>
        </text:list-item>
      </text:list>
      <text:h text:style-name="P3" text:outline-level="3">4️⃣ Cumplimiento / Realidad (La Experiencia)</text:h>
      <text:list text:style-name="L9">
        <text:list-item>
          <text:p text:style-name="P23"><text:span text:style-name="Strong_20_Emphasis"><text:span text:style-name="T1">Propósito:</text:span></text:span><text:span text:style-name="T1"> Es la materialización de la profecía. Cuando Dios cumple, aparece la "realidad". </text:span></text:p>
        </text:list-item>
        <text:list-item>
          <text:p text:style-name="P23"><text:span text:style-name="Strong_20_Emphasis"><text:span text:style-name="T1">Apocalipsis 21:6:</text:span></text:span><text:span text:style-name="T1"> </text:span><text:span text:style-name="Emphasis"><text:span text:style-name="T1">"Hecho está. Yo soy el Alfa y la Omega, el principio y el fin"</text:span></text:span><text:span text:style-name="T1">. </text:span></text:p>
        </text:list-item>
        <text:list-item>
          <text:p text:style-name="P22"><text:span text:style-name="Emphasis"><text:span text:style-name="T1">Reflexión:</text:span></text:span><text:span text:style-name="T1"> Dios es el Alfa (el que promete/profetiza) y la Omega (el que cumple/termina). Cuando aparece la realidad, nuestros propios pensamientos e imaginaciones deben desaparecer para someterse a lo que Dios hizo. </text:span></text:p>
        </text:list-item>
      </text:list>
      <text:p text:style-name="P4"/>
      <text:h text:style-name="P2" text:outline-level="2">⚔️ 6. El Tema Central de la Biblia: Guerra y Recreación</text:h>
      <text:p text:style-name="Text_20_body"><text:span text:style-name="T1">Si tuviéramos que resumir los 66 libros de la Biblia en un solo tema, sería: </text:span><text:span text:style-name="Strong_20_Emphasis"><text:span text:style-name="T1">Una historia de guerra</text:span></text:span><text:span text:style-name="T1">.</text:span></text:p>
      <text:h text:style-name="P3" text:outline-level="3"><text:soft-page-break/>🛡️ La Guerra Espiritual</text:h>
      <text:p text:style-name="Text_20_body"><text:span text:style-name="Strong_20_Emphasis"><text:span text:style-name="T1">Efesios 6:12</text:span></text:span></text:p>
      <text:p text:style-name="Quotations"><text:span text:style-name="Emphasis"><text:span text:style-name="T1">"Porque no tenemos lucha contra sangre y carne, sino contra principados, contra potestades, contra los gobernadores de las tinieblas de este siglo, contra huestes espirituales de maldad en las regiones celestes".</text:span></text:span></text:p>
      <text:list text:style-name="L10">
        <text:list-item>
          <text:p text:style-name="P25"><text:span text:style-name="Strong_20_Emphasis"><text:span text:style-name="T1">No es una guerra física</text:span></text:span><text:span text:style-name="T1"> (contra países o políticas), es una guerra espiritual que dura 6,000 años (desde Adán). </text:span></text:p>
        </text:list-item>
        <text:list-item>
          <text:p text:style-name="P25"><text:span text:style-name="Strong_20_Emphasis"><text:span text:style-name="T1">El Lado de Dios:</text:span></text:span><text:span text:style-name="T1"> Lucha para </text:span><text:span text:style-name="Strong_20_Emphasis"><text:span text:style-name="T1">restaurar</text:span></text:span><text:span text:style-name="T1"> Su creación, que fue arrebatada por Satanás. </text:span></text:p>
        </text:list-item>
        <text:list-item>
          <text:p text:style-name="P24"><text:span text:style-name="Strong_20_Emphasis"><text:span text:style-name="T1">El Lado de Satanás:</text:span></text:span><text:span text:style-name="T1"> Lucha para </text:span><text:span text:style-name="Strong_20_Emphasis"><text:span text:style-name="T1">mantener</text:span></text:span><text:span text:style-name="T1"> el mundo engañado, usando mentiras, calumnias y falsos rumores. </text:span></text:p>
        </text:list-item>
      </text:list>
      <text:h text:style-name="P3" text:outline-level="3">🗡️ Las Armas de la Guerra</text:h>
      <text:list text:style-name="L11">
        <text:list-item>
          <text:p text:style-name="P27"><text:span text:style-name="Strong_20_Emphasis"><text:span text:style-name="T1">Arma de Satanás:</text:span></text:span><text:span text:style-name="T1"> La mentira, la tergiversación de la Palabra y la persecución. </text:span></text:p>
        </text:list-item>
        <text:list-item>
          <text:p text:style-name="P26"><text:span text:style-name="Strong_20_Emphasis"><text:span text:style-name="T1">Arma del Pueblo de Dios:</text:span></text:span><text:span text:style-name="T1"> </text:span><text:span text:style-name="Strong_20_Emphasis"><text:span text:style-name="T1">Apocalipsis 12:11</text:span></text:span></text:p>
          <text:p text:style-name="P5"><text:span text:style-name="Emphasis"><text:span text:style-name="T1">"Y ellos le han vencido por medio de la sangre del Cordero y de la palabra del testimonio de ellos"</text:span></text:span><text:span text:style-name="T1">.</text:span></text:p>
        </text:list-item>
        <text:list-item>
          <text:p text:style-name="P26"><text:span text:style-name="Emphasis"><text:span text:style-name="T1">¿Cuál es el testimonio?</text:span></text:span><text:span text:style-name="T1"> Es la verdad de </text:span><text:span text:style-name="Strong_20_Emphasis"><text:span text:style-name="T1">cómo se están cumpliendo las profecías</text:span></text:span><text:span text:style-name="T1">. No lo que el hombre piensa, sino lo que Dios está haciendo en la realidad. </text:span></text:p>
        </text:list-item>
      </text:list>
      <text:p text:style-name="P4"/>
      <text:h text:style-name="P2" text:outline-level="2">🔄 7. Repaso Final y Oración de Cierre</text:h>
      <text:p text:style-name="Text_20_body"><text:span text:style-name="Emphasis"><text:span text:style-name="T1">(A cargo del Evangelista Christian Howard)</text:span></text:span></text:p>
      <text:p text:style-name="Text_20_body"><text:span text:style-name="Strong_20_Emphasis"><text:span text:style-name="T1">Resumen de los Puntos Clave:</text:span></text:span></text:p>
      <text:list text:style-name="L12">
        <text:list-item>
          <text:p text:style-name="P29"><text:span text:style-name="Strong_20_Emphasis"><text:span text:style-name="T1">Autoría:</text:span></text:span><text:span text:style-name="T1"> Dios usó a 35-40 personas, inspiradas por el Espíritu Santo. </text:span></text:p>
        </text:list-item>
        <text:list-item>
          <text:p text:style-name="P29"><text:span text:style-name="Strong_20_Emphasis"><text:span text:style-name="T1">Contenidos:</text:span></text:span><text:span text:style-name="T1"> Historia, Enseñanzas, Profecía y Cumplimiento. (Las dos últimas son las más importantes para verificar que Dios está vivo y obrando). </text:span></text:p>
        </text:list-item>
        <text:list-item>
          <text:p text:style-name="P28"><text:span text:style-name="Strong_20_Emphasis"><text:span text:style-name="T1">El Centro de la Biblia:</text:span></text:span><text:span text:style-name="T1"> La guerra entre Dios y Satanás. Dios quiere restaurar Su creación y nosotros debemos saber de qué lado estamos luchando. </text:span></text:p>
        </text:list-item>
      </text:list>
      <text:p text:style-name="Text_20_body"><text:span text:style-name="Strong_20_Emphasis"><text:span text:style-name="T1">Oración de Cierre (El Padre Nuestro):</text:span></text:span></text:p>
      <text:p text:style-name="Quotations"><text:span text:style-name="Emphasis"><text:span text:style-name="T1">"Padre nuestro que estás en los cielos, santificado sea tu nombre. Venga a nosotros tu reino, hágase tu voluntad en la tierra como en el cielo. Danos hoy nuestro pan de cada día. Perdona nuestras ofensas, como también nosotros </text:span></text:span><text:soft-page-break/><text:span text:style-name="Emphasis"><text:span text:style-name="T1">perdonamos a los que nos ofenden. No nos dejes caer en la tentación, mas líbranos del mal. Porque tuyo es el reino, el poder y la gloria por todos los siglos. Amén."</text:span>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dauk Book" svg:font-family="'Padauk Book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14:23:42.100848662</meta:creation-date>
    <dc:date>2026-07-02T08:58:42.861648318</dc:date>
    <meta:editing-duration>PT7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82" meta:word-count="1373" meta:character-count="7989" meta:non-whitespace-character-count="6706"/>
  </office:meta>
</office:document-meta>
</file>