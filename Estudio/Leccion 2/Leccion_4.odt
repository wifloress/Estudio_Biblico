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Quotations" style:list-style-name="L10"/>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CUADERNO DE ESTUDIO: LECCIÓN 2 (PARTE 4)</text:h>
      <text:h text:style-name="Heading_20_2" text:outline-level="2">El Entendimiento Básico de la Biblia: La Fe, los Tiempos y el Propósito de Dios</text:h>
      <text:p text:style-name="Horizontal_20_Line"/>
      <text:h text:style-name="Heading_20_2" text:outline-level="2">🔄 1. Repaso Inicial: Profecía, Cumplimiento y Confianza</text:h>
      <text:p text:style-name="Text_20_body"><text:span text:style-name="Emphasis">(A cargo del Evangelista Christian Howard)</text:span></text:p>
      <text:p text:style-name="Text_20_body">Antes de iniciar la última parte de esta lección, ponemos a prueba lo aprendido sobre la metodología de Dios:</text:p>
      <text:p text:style-name="Text_20_body"><text:span text:style-name="Strong_20_Emphasis">Preguntas de Reflexión y Respuestas:</text:span></text:p>
      <text:list text:style-name="L1">
        <text:list-item>
          <text:p text:style-name="P3"><text:span text:style-name="Strong_20_Emphasis">¿Cuál fue el tema principal de la lección anterior?</text:span></text:p>
          <text:list>
            <text:list-item>
              <text:p text:style-name="P3"><text:span text:style-name="Emphasis">Respuesta:</text:span> <text:span text:style-name="Strong_20_Emphasis">La importancia de la profecía y su cumplimiento</text:span>. (La Biblia es el único libro que no solo tiene profecías, sino que demuestra su cumplimiento histórico). </text:p>
            </text:list-item>
          </text:list>
        </text:list-item>
        <text:list-item>
          <text:p text:style-name="P3"><text:span text:style-name="Strong_20_Emphasis">¿Qué demuestra el cumplimiento de las profecías?</text:span></text:p>
          <text:list>
            <text:list-item>
              <text:p text:style-name="P3"><text:span text:style-name="Emphasis">Respuesta:</text:span> Que <text:span text:style-name="Strong_20_Emphasis">Dios es vivo y Su palabra es verdadera</text:span>. No es un Dios pasivo; está activo y todo lo que Él dice es verdad. </text:p>
            </text:list-item>
          </text:list>
        </text:list-item>
        <text:list-item>
          <text:p text:style-name="P3"><text:span text:style-name="Strong_20_Emphasis">Según Lucas 24, ¿de quién dice que se tenía que cumplir todo lo escrito?</text:span></text:p>
          <text:list>
            <text:list-item>
              <text:p text:style-name="P3"><text:span text:style-name="Emphasis">Respuesta:</text:span> De <text:span text:style-name="Strong_20_Emphasis">Jesús</text:span>. Todo lo escrito en los Salmos y los profetas testificaba sobre Él. </text:p>
            </text:list-item>
          </text:list>
        </text:list-item>
        <text:list-item>
          <text:p text:style-name="P3"><text:span text:style-name="Strong_20_Emphasis">Pregunta Extra (Isaías 14:24):</text:span> ¿Qué nos enseña este versículo sobre Dios?</text:p>
          <text:list>
            <text:list-item>
              <text:p text:style-name="P2"><text:span text:style-name="Emphasis">Respuesta:</text:span> Que <text:span text:style-name="Strong_20_Emphasis">todo lo que Dios planea, se cumple</text:span>. <text:span text:style-name="Emphasis">"Ciertamente se hará de la manera que lo he pensado"</text:span>. </text:p>
            </text:list-item>
          </text:list>
        </text:list-item>
      </text:list>
      <text:p text:style-name="Text_20_body"><text:span text:style-name="Strong_20_Emphasis">Reflexión:</text:span> Si Dios cumplió todas las profecías del pasado, ¿no nos da esto la confianza absoluta de que Él cumplirá todo lo que ha prometido para el futuro?</text:p>
      <text:p text:style-name="Text_20_body"><text:span text:style-name="Strong_20_Emphasis">Oración de apertura:</text:span></text:p>
      <text:p text:style-name="Quotations"><text:span text:style-name="Emphasis">"Santísimo Padre Dios, gracias por este día. Aunque estamos aprendiendo las cosas más básicas, son la fundación de nuestra fe. Dios, oramos por los estudiantes que no han podido venir por circunstancias, pero también por los que están aquí hambrientos de tu palabra. Manda tu Espíritu Santo para que abran sus corazones y sean humildes para escuchar lo que tú quieres que sepan. Manda tu Espíritu Santo al instructor Sibiani para que solo hable cosas de ti. En el nombre de Jesucristo. Amén."</text:span></text:p>
      <text:p text:style-name="Horizontal_20_Line"/>
      <text:h text:style-name="Heading_20_2" text:outline-level="2">🏫 2. La Verdadera Fe: Creer en la Realidad</text:h>
      <text:p text:style-name="Text_20_body"><text:span text:style-name="Emphasis">(A cargo del Instructor Sibiani)</text:span></text:p>
      <text:h text:style-name="Heading_20_3" text:outline-level="3"><text:soft-page-break/>📌 La Base de Nuestra Fe</text:h>
      <text:p text:style-name="Text_20_body">Hoy terminamos la cuarta parte del entendimiento básico. Durante las partes 2 y 3 vimos que la metodología de Dios es <text:span text:style-name="Strong_20_Emphasis">Profecía y Cumplimiento (Realidad)</text:span>. </text:p>
      <text:list text:style-name="L2">
        <text:list-item>
          <text:p text:style-name="P5"><text:span text:style-name="Strong_20_Emphasis">Dios es el Alfa y la Omega:</text:span> Él es el principio (el que promete/profetiza) y el fin (el que cumple/termina). </text:p>
        </text:list-item>
        <text:list-item>
          <text:p text:style-name="P4">Cuando Dios cumple Sus promesas, aparece una <text:span text:style-name="Strong_20_Emphasis">Realidad</text:span> que podemos ver, escuchar y experimentar. </text:p>
        </text:list-item>
      </text:list>
      <text:h text:style-name="Heading_20_3" text:outline-level="3">🗝️ ¿Qué Significaba "Creer" en la Primera Venida?</text:h>
      <text:p text:style-name="Text_20_body"><text:span text:style-name="Strong_20_Emphasis">Hechos 16:30-32</text:span></text:p>
      <text:p text:style-name="Quotations"><text:span text:style-name="Emphasis">"Y sacándolos, les dijo: 'Señores, ¿qué debo hacer para ser salvo?' Ellos dijeron: 'Cree en el Señor Jesucristo y serás salvo, tú y tu casa'. Y le hablaron la palabra del Señor a él y a todos los que estaban en su casa".</text:span></text:p>
      <text:list text:style-name="L3">
        <text:list-item>
          <text:p text:style-name="P7"><text:span text:style-name="Strong_20_Emphasis">El Contexto:</text:span> El carcelero pregunta cómo ser salvo. Pablo y Silas le dicen: <text:span text:style-name="Emphasis">"Cree en el Señor Jesús"</text:span>. </text:p>
        </text:list-item>
        <text:list-item>
          <text:p text:style-name="P7"><text:span text:style-name="Strong_20_Emphasis">La Aplicación Espiritual:</text:span> En aquel entonces, "creer en Jesús" significaba <text:span text:style-name="Strong_20_Emphasis">creer en la Realidad</text:span>. Significaba entender las profecías del Antiguo Testamento y ver que Jesús era el cumplimiento exacto de ellas. </text:p>
        </text:list-item>
        <text:list-item>
          <text:p text:style-name="P6"><text:span text:style-name="Strong_20_Emphasis">La Lección:</text:span> Para creer en la realidad, hay que entender bien la palabra (la profecía). Por eso Pablo <text:span text:style-name="Emphasis">"le habló la palabra del Señor"</text:span>. No basta con decir "creo"; hay que entender <text:span text:style-name="Emphasis">en qué</text:span> y <text:span text:style-name="Emphasis">en quién</text:span> estamos creyendo. </text:p>
        </text:list-item>
      </text:list>
      <text:h text:style-name="Heading_20_3" text:outline-level="3">📜 La Certeza de la Palabra</text:h>
      <text:list text:style-name="L4">
        <text:list-item>
          <text:p text:style-name="P9"><text:span text:style-name="Strong_20_Emphasis">Mateo 24:34-35:</text:span> <text:span text:style-name="Emphasis">"El cielo y la tierra pasarán, pero mis palabras no pasarán"</text:span>. Todo lo que se profetizó sobre la Segunda Venida tiene que cumplirse tal y como está escrito. </text:p>
        </text:list-item>
        <text:list-item>
          <text:p text:style-name="P9"><text:span text:style-name="Strong_20_Emphasis">Juan 14:29:</text:span> <text:span text:style-name="Emphasis">"Y ahora os lo he dicho antes que suceda, para que cuando suceda, creáis"</text:span>. Dios nos da la profecía para que, cuando aparezca la realidad, nuestra fe se active. </text:p>
        </text:list-item>
        <text:list-item>
          <text:p text:style-name="P8"><text:span text:style-name="Strong_20_Emphasis">Apocalipsis 21:6:</text:span> <text:span text:style-name="Emphasis">"Hecho está. Yo soy el Alfa y la Omega, principio y el fin"</text:span>. Cuando Dios obra y cumple, todo llega a su conclusión exacta. </text:p>
        </text:list-item>
      </text:list>
      <text:p text:style-name="Text_20_body"><text:span text:style-name="Strong_20_Emphasis">La Fe Verdadera:</text:span> No es una emoción superficial. Es una fe basada en la promesa (profecía) y en los hechos cumplidos (realidad). Si aparece el cumplimiento y lo rechazamos porque no se ajusta a nuestros pensamientos, no estamos creyendo en la palabra de Dios.</text:p>
      <text:p text:style-name="Horizontal_20_Line"/>
      <text:h text:style-name="Heading_20_2" text:outline-level="2">⏳ 3. Discernir los Tiempos Espirituales</text:h>
      <text:p text:style-name="Text_20_body"><text:span text:style-name="Strong_20_Emphasis">Lucas 12:54-57</text:span></text:p>
      <text:p text:style-name="Quotations"><text:span text:style-name="Emphasis">"Hipócritas, sabéis distinguir el aspecto del cielo y de la tierra; ¿y cómo no distinguís este tiempo? ¿Y por qué no juzgáis por vosotros mismos lo que es justo?"</text:span></text:p>
      <text:h text:style-name="Heading_20_3" text:outline-level="3"><text:soft-page-break/>🌦️ Conocer el Clima vs. Conocer a Dios</text:h>
      <text:p text:style-name="Text_20_body">Jesús criticó a los líderes de Su tiempo porque sabían predecir el clima (si las nubes subían, llovería; si el viento soplaba, hacía calor). Eran expertos en los <text:span text:style-name="Strong_20_Emphasis">tiempos físicos</text:span>.</text:p>
      <text:list text:style-name="L5">
        <text:list-item>
          <text:p text:style-name="P11">Sin embargo, eran "hipócritas" porque <text:span text:style-name="Strong_20_Emphasis">no sabían distinguir los tiempos espirituales</text:span>. </text:p>
        </text:list-item>
        <text:list-item>
          <text:p text:style-name="P11">No pudieron discernir que estaban viviendo en el <text:span text:style-name="Strong_20_Emphasis">tiempo del cumplimiento</text:span>, el tiempo de la Realidad (la Primera Venida del Mesías). </text:p>
        </text:list-item>
        <text:list-item>
          <text:p text:style-name="P10"><text:span text:style-name="Strong_20_Emphasis">Advertencia para nosotros:</text:span> No debemos ser tan expertos en las noticias, el clima o la física, y tan ignorantes en saber en qué tiempo espiritual estamos viviendo hoy (2026). </text:p>
        </text:list-item>
      </text:list>
      <text:p text:style-name="Horizontal_20_Line"/>
      <text:h text:style-name="Heading_20_2" text:outline-level="2">📜 4. Las 7 Eras de la Historia Bíblica</text:h>
      <text:p text:style-name="Text_20_body">Para ubicarnos en el plan de Dios, recordemos brevemente las 7 eras o tiempos espirituales de la Biblia:</text:p>
      <text:list text:style-name="L6">
        <text:list-item>
          <text:p text:style-name="P13"><text:span text:style-name="Strong_20_Emphasis">Era de la Creación (Adán):</text:span> Dios da el aliento de vida y un pacto (no comer del árbol prohibido). Adán traiciona el pacto y es expulsado. La humanidad se corrompe y Dios envía el diluvio (juicio). </text:p>
        </text:list-item>
        <text:list-item>
          <text:p text:style-name="P13"><text:span text:style-name="Strong_20_Emphasis">Era del Éxodo y la Ley (Abraham y Moisés):</text:span> Dios cumple la promesa a Abraham (400 años de esclavitud). Saca al pueblo por medio de Moisés y establece un pacto condicional en el Monte Sinaí (Los 10 Mandamientos). El pueblo se queja constantemente. </text:p>
        </text:list-item>
        <text:list-item>
          <text:p text:style-name="P13"><text:span text:style-name="Strong_20_Emphasis">Era de los Jueces:</text:span> El pueblo quiere líderes humanos fuertes como las naciones gentiles, desconfiando del poder de Dios. Dios les da Jueces para salvarlos, pero el ciclo de pecado se repite. </text:p>
        </text:list-item>
        <text:list-item>
          <text:p text:style-name="P13"><text:span text:style-name="Strong_20_Emphasis">Era de los Reyes:</text:span> El pueblo exige un rey. Dios les da a Saúl, luego a David, y luego a Salomón. Sin embargo, Salomón se deja influenciar por sus mujeres gentiles y cae en la idolatría, dividiendo el reino y enojando a Dios. </text:p>
        </text:list-item>
        <text:list-item>
          <text:p text:style-name="P13"><text:span text:style-name="Strong_20_Emphasis">Era de los Profetas (Isaías a Malaquías):</text:span> Israel está destruida. Dios envía profetas para advertir sobre la venida del Mesías. <text:span text:style-name="Strong_20_Emphasis">El error del pueblo:</text:span> Estaban tan aferrados a la Ley de Moisés que cuando los profetas hablaban de un <text:span text:style-name="Emphasis">nuevo</text:span> cumplimiento (el Mesías), no lo entendieron y terminaron matando a los profetas. </text:p>
        </text:list-item>
        <text:list-item>
          <text:p text:style-name="P13"><text:span text:style-name="Strong_20_Emphasis">Era del Evangelio del Reino (Jesús):</text:span> Jesús cumple todas las profecías del Antiguo Testamento. Predica el reino de los cielos y, antes de irse, <text:span text:style-name="Strong_20_Emphasis">profetiza las señales de Su Segunda Venida</text:span> (Mateo 24:14). </text:p>
        </text:list-item>
        <text:list-item>
          <text:p text:style-name="P12"><text:span text:style-name="Strong_20_Emphasis">Era de la Recreación (La Era Actual):</text:span> Dios promete recrear los cielos y la tierra (Apocalipsis). Estamos en el tiempo donde Dios va a restaurar lo que Satanás arrebató. <text:span text:style-name="Strong_20_Emphasis">Nuestro deber:</text:span> Entender nuestro pacto y las profecías de Apocalipsis para creer en la Realidad cuando aparezca. </text:p>
        </text:list-item>
      </text:list>
      <text:p text:style-name="Horizontal_20_Line"/>
      <text:h text:style-name="Heading_20_2" text:outline-level="2">⚙️ 5. El Orden del Cumplimiento: ¡Cuidado con el Engaño!</text:h>
      <text:p text:style-name="Text_20_body">Cuando Dios cumple Sus promesas, no lo hace de forma desordenada. Hay un proceso establecido.</text:p>
      <text:p text:style-name="Text_20_body"><text:span text:style-name="Strong_20_Emphasis">2 Tesalonicenses 2:1-3</text:span></text:p>
      <text:p text:style-name="Quotations"><text:soft-page-break/><text:span text:style-name="Emphasis">"Nadie os engañe en ninguna manera, porque no vendrá [el día del Señor] sin que antes venga la apostasía, y se manifieste el hombre de pecado, el hijo de perdición".</text:span></text:p>
      <text:h text:style-name="Heading_20_3" text:outline-level="3">🛑 Los 3 Pasos Previos a la Salvación (La Segunda Venida):</text:h>
      <text:list text:style-name="L7">
        <text:list-item>
          <text:p text:style-name="P15"><text:span text:style-name="Strong_20_Emphasis">Evento de Traición (Apostasía):</text:span> Una caída y traición dentro del pueblo de Dios. </text:p>
        </text:list-item>
        <text:list-item>
          <text:p text:style-name="P15"><text:span text:style-name="Strong_20_Emphasis">Evento de Destrucción (El Hombre de Pecado):</text:span> La manifestación del enemigo que destruye y engaña. </text:p>
        </text:list-item>
        <text:list-item>
          <text:p text:style-name="P14"><text:span text:style-name="Strong_20_Emphasis">Evento de Salvación (La Venida del Señor):</text:span> Cristo viene y nos reunimos con Él. </text:p>
        </text:list-item>
      </text:list>
      <text:p text:style-name="Text_20_body"><text:span text:style-name="Strong_20_Emphasis">¿Por qué es vital saber este orden?</text:span> Para <text:span text:style-name="Strong_20_Emphasis">no ser engañados</text:span>. Si alguien aparece diciendo "¡Ya vino Jesús!" o "¡Este es el Mesías!", pero en el mundo espiritual y físico no se han cumplido primero las profecías de la traición y la destrucción según la Palabra, <text:span text:style-name="Strong_20_Emphasis">sabemos que es falso</text:span>. Dios nos dio este orden para que no nos dejemos mover fácilmente por falsos rumores, cartas o supuestos milagros.</text:p>
      <text:p text:style-name="Horizontal_20_Line"/>
      <text:h text:style-name="Heading_20_2" text:outline-level="2">🎯 6. El Propósito de Dios: Salvación y Conocimiento</text:h>
      <text:p text:style-name="Text_20_body">Desde el Génesis, el pecado trajo la muerte (Romanos 6:23). El mundo está arruinado, pero Dios ha estado obrando durante 6,000 años para solucionar esto.</text:p>
      <text:h text:style-name="Heading_20_3" text:outline-level="3">📖 La Voluntad de Dios</text:h>
      <text:p text:style-name="Text_20_body"><text:span text:style-name="Strong_20_Emphasis">1 Timoteo 2:4</text:span></text:p>
      <text:p text:style-name="Quotations"><text:span text:style-name="Emphasis">"El cual quiere que todos los hombres sean salvos y vengan al conocimiento de la verdad".</text:span></text:p>
      <text:list text:style-name="L8">
        <text:list-item>
          <text:p text:style-name="P17">Dios no se complace en la aflicción. Su voluntad es <text:span text:style-name="Strong_20_Emphasis">salvarnos y darnos vida eterna</text:span>. </text:p>
        </text:list-item>
        <text:list-item>
          <text:p text:style-name="P17"><text:span text:style-name="Strong_20_Emphasis">¿Cómo se logra?</text:span> No es solo "creer" a ciegas. Es venir al <text:span text:style-name="Strong_20_Emphasis">conocimiento de la verdad</text:span>. </text:p>
        </text:list-item>
        <text:list-item>
          <text:p text:style-name="P16">En la Primera Venida, la "Verdad" era Jesús (la Realidad). En la Segunda Venida, la "Verdad" es el cumplimiento de las profecías de Apocalipsis. </text:p>
        </text:list-item>
      </text:list>
      <text:h text:style-name="Heading_20_3" text:outline-level="3">🔍 Escudriñar las Escrituras vs. Ver la Realidad</text:h>
      <text:p text:style-name="Text_20_body"><text:span text:style-name="Strong_20_Emphasis">Juan 5:39</text:span></text:p>
      <text:p text:style-name="Quotations"><text:span text:style-name="Emphasis">"Escudriñad las Escrituras; porque a vosotros os parece que en ellas tenéis la vida eterna; y ellas son las que dan testimonio de mí".</text:span></text:p>
      <text:list text:style-name="L9">
        <text:list-item>
          <text:p text:style-name="P19">Jesús habló con los fariseos, que memorizaban la Biblia. Ellos creían que por tener el libro ya tenían vida eterna. </text:p>
        </text:list-item>
        <text:list-item>
          <text:p text:style-name="P19"><text:span text:style-name="Strong_20_Emphasis">El Error:</text:span> Estudiar el libro pero <text:span text:style-name="Strong_20_Emphasis">no reconocer a la Persona</text:span> de la que el libro está hablando. </text:p>
        </text:list-item>
        <text:list-item>
          <text:p text:style-name="P18"><text:span text:style-name="Strong_20_Emphasis">La Lección:</text:span> No estudiemos Apocalipsis solo por curiosidad intelectual. El libro <text:span text:style-name="Emphasis">da testimonio</text:span> de una Realidad. Si estudiamos el libro pero rechazamos a la Realidad cuando aparece, cometemos el mismo error que los fariseos. </text:p>
        </text:list-item>
      </text:list>
      <text:p text:style-name="Horizontal_20_Line"/>
      <text:h text:style-name="Heading_20_2" text:outline-level="2"><text:soft-page-break/>🛡️ 7. Conclusiones Finales de la Lección 2</text:h>
      <text:list text:style-name="L10">
        <text:list-item>
          <text:p text:style-name="P21"><text:span text:style-name="Strong_20_Emphasis">La Biblia es un libro de Pactos:</text:span> Dios hace un pacto con Su pueblo escogido. Si guardamos el pacto, recibimos vida eterna. Si lo quebrantamos, hay condenación. </text:p>
        </text:list-item>
        <text:list-item>
          <text:p text:style-name="P21"><text:span text:style-name="Strong_20_Emphasis">Debemos conocer el contenido de nuestro Pacto:</text:span> ¿Cuál era el pacto del Antiguo Testamento? Creer en el Mesías. ¿Cuál es nuestro pacto hoy? <text:span text:style-name="Strong_20_Emphasis">Creer en el cumplimiento de la Segunda Venida (Apocalipsis)</text:span>. Si no lo entendemos, no podemos guardarlo. </text:p>
        </text:list-item>
        <text:list-item>
          <text:p text:style-name="P21"><text:span text:style-name="Strong_20_Emphasis">La Biblia tiene 4 contenidos:</text:span> Historia (ejemplos), Enseñanzas Morales (corrección), Profecía (para creer) y Cumplimiento (la realidad). </text:p>
        </text:list-item>
        <text:list-item>
          <text:p text:style-name="P20"><text:span text:style-name="Strong_20_Emphasis">El Peligro de la Ignorancia:</text:span> </text:p>
          <text:p text:style-name="P1"><text:span text:style-name="Emphasis">"Mi pueblo fue destruido, porque le faltó conocimiento"</text:span> — <text:span text:style-name="Strong_20_Emphasis">Oseas 4:6</text:span>. No importa cuántos años llevemos en la iglesia; si malentendemos o ignoramos el pacto de estos tiempos, pereceremos espiritualmente.</text:p>
        </text:list-item>
        <text:list-item>
          <text:p text:style-name="P20"><text:span text:style-name="Strong_20_Emphasis">Hacer la Voluntad del Padre:</text:span> </text:p>
          <text:p text:style-name="P1"><text:span text:style-name="Emphasis">"No todo el que me dice: Señor, Señor, entrará en el reino de los cielos, sino el que hace la voluntad de mi Padre"</text:span> — <text:span text:style-name="Strong_20_Emphasis">Mateo 7:21</text:span>. Hacer Su voluntad significa entender Su palabra en el contexto actual y obedecerla.</text:p>
        </text:list-item>
      </text:list>
      <text:p text:style-name="Horizontal_20_Line"/>
      <text:h text:style-name="Heading_20_2" text:outline-level="2">🔄 8. Repaso Final y Oración de Cierre</text:h>
      <text:p text:style-name="Text_20_body"><text:span text:style-name="Emphasis">(A cargo del Evangelista Christian Howard)</text:span></text:p>
      <text:p text:style-name="Text_20_body"><text:span text:style-name="Strong_20_Emphasis">Resumen Interactivo de la Lección Completa:</text:span></text:p>
      <text:list text:style-name="L11">
        <text:list-item>
          <text:p text:style-name="P23"><text:span text:style-name="Strong_20_Emphasis">¿De qué es libro la Biblia?</text:span> Un libro de <text:span text:style-name="Strong_20_Emphasis">Pactos</text:span> (Dios y Su pueblo). </text:p>
        </text:list-item>
        <text:list-item>
          <text:p text:style-name="P23"><text:span text:style-name="Strong_20_Emphasis">¿Cuáles son los 4 contenidos?</text:span> Historia, Enseñanzas, Profecía y Cumplimiento. (Los más importantes son Profecía y Cumplimiento, porque prueban que Dios es real). </text:p>
        </text:list-item>
        <text:list-item>
          <text:p text:style-name="P23"><text:span text:style-name="Strong_20_Emphasis">¿Qué significa que Dios es el Alfa y la Omega?</text:span> Que Él promete y Él cumple. </text:p>
        </text:list-item>
        <text:list-item>
          <text:p text:style-name="P23"><text:span text:style-name="Strong_20_Emphasis">Las 7 Eras:</text:span> Creación ➡️ Éxodo/Ley ➡️ Jueces ➡️ Reyes ➡️ Profetas ➡️ Evangelio ➡️ Recreación (Hoy). </text:p>
        </text:list-item>
        <text:list-item>
          <text:p text:style-name="P22"><text:span text:style-name="Strong_20_Emphasis">El Proceso de Cumplimiento:</text:span> Traición ➡️ Destrucción ➡️ Salvación. </text:p>
        </text:list-item>
      </text:list>
      <text:p text:style-name="Text_20_body"><text:span text:style-name="Strong_20_Emphasis">Anuncio para la Próxima Lección:</text:span> ¡Prepárense! La próxima lección entraremos en el tema de <text:span text:style-name="Strong_20_Emphasis">Las Parábolas y los Misterios del Reino de los Cielos</text:span>. Dios les revelará cosas porque los considera Su pueblo y quiere que entiendan Su pacto.</text:p>
      <text:p text:style-name="Text_20_body"><text:span text:style-name="Strong_20_Emphasis">Oración de Cierre (El Padre Nuestro):</text:span></text:p>
      <text:p text:style-name="Quotations"><text:span text:style-name="Emphasis">"Padre nuestro que estás en los cielos, santificado sea tu nombre. Venga tu reino, hágase tu voluntad en la tierra como en el cielo. Danos hoy nuestro pan de cada día. Perdona nuestras deudas, como también nosotros perdonamos a nuestros deudores. No nos dejes caer en la tentación, mas líbranos del mal. Porque tuyo es el reino, el poder y la gloria por los siglos de los siglos. Amén."</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1T14:35:36.095905911</meta:creation-date>
    <dc:date>2026-06-11T14:41:26.311461359</dc:date>
    <meta:editing-duration>PT5M50S</meta:editing-duration>
    <meta:editing-cycles>1</meta:editing-cycles>
    <meta:document-statistic meta:table-count="0" meta:image-count="0" meta:object-count="0" meta:page-count="5" meta:paragraph-count="93" meta:word-count="1932" meta:character-count="11053" meta:non-whitespace-character-count="9215"/>
    <meta:generator>LibreOffice/24.2.7.2$Linux_X86_64 LibreOffice_project/420$Build-2</meta:generator>
  </office:meta>
</office:document-meta>
</file>