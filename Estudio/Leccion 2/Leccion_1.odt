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style:list-style-name="L11"/>
    <style:style style:name="P2" style:family="paragraph" style:parent-style-name="Quotations" style:list-style-name="L13"/>
    <style:style style:name="P3" style:family="paragraph" style:parent-style-name="Quotations" style:list-style-name="L14"/>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5">
      <style:paragraph-properties fo:margin-top="0cm" fo:margin-bottom="0cm" style:contextual-spacing="false"/>
    </style:style>
    <style:style style:name="P32" style:family="paragraph" style:parent-style-name="Text_20_body" style:list-style-name="L16"/>
    <style:style style:name="P33" style:family="paragraph" style:parent-style-name="Text_20_body" style:list-style-name="L16">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2 (PARTE 1)</text:h>
      <text:h text:style-name="Heading_20_2" text:outline-level="2">El Entendimiento Básico de la Biblia</text:h>
      <text:p text:style-name="Horizontal_20_Line"/>
      <text:h text:style-name="Heading_20_2" text:outline-level="2">🔄 1. Repaso Inicial y Preguntas de Reflexión</text:h>
      <text:p text:style-name="Text_20_body"><text:span text:style-name="Emphasis">(A cargo del Evangelista Christian Howard)</text:span></text:p>
      <text:p text:style-name="Text_20_body">Antes de comenzar la nueva lección, repasamos los conceptos fundamentales de la Lección 1 sobre cómo discernir los espíritus y a los pastores:</text:p>
      <text:p text:style-name="Text_20_body"><text:span text:style-name="Strong_20_Emphasis">Preguntas de Reflexión y Respuestas:</text:span></text:p>
      <text:list text:style-name="L1">
        <text:list-item>
          <text:p text:style-name="P5"><text:span text:style-name="Strong_20_Emphasis">¿Qué debemos hacer según 1 Juan 4:1?</text:span></text:p>
          <text:list>
            <text:list-item>
              <text:p text:style-name="P5"><text:span text:style-name="Emphasis">Respuesta:</text:span> <text:span text:style-name="Strong_20_Emphasis">Probar los espíritus</text:span> si son de Dios. </text:p>
            </text:list-item>
          </text:list>
        </text:list-item>
        <text:list-item>
          <text:p text:style-name="P5"><text:span text:style-name="Strong_20_Emphasis">¿Cómo distinguimos entre un pastor verdadero y uno falso?</text:span></text:p>
          <text:list>
            <text:list-item>
              <text:p text:style-name="P5"><text:span text:style-name="Emphasis">Respuesta:</text:span> <text:span text:style-name="Strong_20_Emphasis">Por la palabra que enseñan</text:span> (no por su fama, tamaño de iglesia o riqueza). </text:p>
            </text:list-item>
          </text:list>
        </text:list-item>
        <text:list-item>
          <text:p text:style-name="P5"><text:span text:style-name="Strong_20_Emphasis">¿Qué significa discernir espíritus?</text:span></text:p>
          <text:list>
            <text:list-item>
              <text:p text:style-name="P5"><text:span text:style-name="Emphasis">Respuesta:</text:span> <text:span text:style-name="Strong_20_Emphasis">Discernir palabras y enseñanzas</text:span>. Entendemos el espíritu por las palabras que salen de la persona. </text:p>
            </text:list-item>
          </text:list>
        </text:list-item>
        <text:list-item>
          <text:p text:style-name="P5"><text:span text:style-name="Strong_20_Emphasis">¿De qué habla una persona enviada por Dios?</text:span></text:p>
          <text:list>
            <text:list-item>
              <text:p text:style-name="P5"><text:span text:style-name="Emphasis">Respuesta:</text:span> Habla las <text:span text:style-name="Strong_20_Emphasis">palabras de Dios</text:span>, no las del hombre. </text:p>
            </text:list-item>
          </text:list>
        </text:list-item>
        <text:list-item>
          <text:p text:style-name="P5"><text:span text:style-name="Strong_20_Emphasis">¿De qué habla Satanás a través de los falsos pastores?</text:span></text:p>
          <text:list>
            <text:list-item>
              <text:p text:style-name="P5"><text:span text:style-name="Emphasis">Respuesta:</text:span> Habla <text:span text:style-name="Strong_20_Emphasis">mentiras, falsedades y engaños</text:span>. </text:p>
            </text:list-item>
          </text:list>
        </text:list-item>
        <text:list-item>
          <text:p text:style-name="P5"><text:span text:style-name="Strong_20_Emphasis">Reflexión:</text:span> <text:span text:style-name="Emphasis">¿Cómo aplicar esto al escuchar enseñanzas en Internet o en la iglesia?</text:span></text:p>
          <text:list>
            <text:list-item>
              <text:p text:style-name="P4"><text:span text:style-name="Emphasis">Conclusión:</text:span> Siempre debemos referirnos a la <text:span text:style-name="Strong_20_Emphasis">Biblia</text:span>, ya que es la fuente de la verdad. </text:p>
            </text:list-item>
          </text:list>
        </text:list-item>
      </text:list>
      <text:p text:style-name="Text_20_body"><text:span text:style-name="Strong_20_Emphasis">Oración de apertura:</text:span></text:p>
      <text:p text:style-name="Quotations"><text:span text:style-name="Emphasis">"Santísimo Padre Dios, gracias por guiarnos. Gracias por darnos estas palabras que tú nos has enseñado y revelado estos días. Nunca entendíamos con mucha certeza qué significaba entender los espíritus, cómo es que los espíritus trabajan. Estamos viendo en estas lecciones que los espíritus trabajan con los hombres, Dios. No es que ellos están poseídos, pero es que el espíritu habla por ellos. Y esto es de lo que tenemos que darnos cuenta. Tenemos que probar las palabras de los pastores, no solo aceptarlas sin entendimiento, o solo porque conozco a ese pastor, pero tenemos que aceptarla, porque la palabra está basada en tu palabra, Dios, en la Biblia, y te agradecemos por saber esto ya. Dios, oramos por los estudiantes que no pudieron venir por circunstancias, pero sabemos que tú estás mandando tus espíritus santos a ellos y ayudándolos y arreglándoles sus circunstancias para que puedan venir a escuchar tu palabra y ser liberados por tu palabra. Dios, gracias por esta oportunidad y oramos todo esto ante tu hijo Jesucristo. Amén."</text:span></text:p>
      <text:p text:style-name="Horizontal_20_Line"/>
      <text:h text:style-name="Heading_20_2" text:outline-level="2"><text:soft-page-break/>🏠 2. Introducción: Los Cimientos de la Fe</text:h>
      <text:p text:style-name="Text_20_body"><text:span text:style-name="Emphasis">(A cargo del Instructor Sibiani)</text:span></text:p>
      <text:h text:style-name="Heading_20_3" text:outline-level="3">📌 Recordatorios de Etiqueta</text:h>
      <text:list text:style-name="L2">
        <text:list-item>
          <text:p text:style-name="P7"><text:span text:style-name="Strong_20_Emphasis">Actitud:</text:span> Estamos delante de la Palabra de Dios, por lo que debemos mostrar respeto (cámara encendida si es posible, Biblia y cuaderno a la mano). </text:p>
        </text:list-item>
        <text:list-item>
          <text:p text:style-name="P6"><text:span text:style-name="Strong_20_Emphasis">Los Apuntes:</text:span> Hacer apuntes organizados es vital. No podemos memorizar todo; los apuntes nos permiten repasar, responder las preguntas de reflexión y entender mejor la lección. </text:p>
        </text:list-item>
      </text:list>
      <text:h text:style-name="Heading_20_3" text:outline-level="3">🧱 La Analogía de la Casa</text:h>
      <text:p text:style-name="Text_20_body">El título de la lección es <text:span text:style-name="Strong_20_Emphasis">"El entendimiento básico de la Biblia"</text:span>. Aunque suene "básico", es como los <text:span text:style-name="Strong_20_Emphasis">cimientos de una casa</text:span>. </text:p>
      <text:list text:style-name="L3">
        <text:list-item>
          <text:p text:style-name="P9">Si construimos sobre arena o una base inestable, la casa colapsará ante cualquier terremoto o inundación. </text:p>
        </text:list-item>
        <text:list-item>
          <text:p text:style-name="P8">Nuestro corazón y cuerpo son como un templo. Necesitamos crear buenas bases en nosotros para que nuestra fe no caiga, sino que se mantenga firme e inamovible. </text:p>
        </text:list-item>
      </text:list>
      <text:p text:style-name="Horizontal_20_Line"/>
      <text:h text:style-name="Heading_20_2" text:outline-level="2">🎯 3. El Propósito de Dios y el Conocimiento</text:h>
      <text:p text:style-name="Text_20_body"><text:span text:style-name="Strong_20_Emphasis">1 Timoteo 2:4</text:span></text:p>
      <text:p text:style-name="Quotations"><text:span text:style-name="Emphasis">"El cual quiere que todos los hombres sean salvos y vengan al conocimiento de la verdad".</text:span></text:p>
      <text:list text:style-name="L4">
        <text:list-item>
          <text:p text:style-name="P11"><text:span text:style-name="Strong_20_Emphasis">La Voluntad de Dios:</text:span> Dios quiere que todos seamos salvos. No es su voluntad que suframos o muramos. </text:p>
        </text:list-item>
        <text:list-item>
          <text:p text:style-name="P11"><text:span text:style-name="Strong_20_Emphasis">El Medio para la Salvación:</text:span> No basta con simplemente "llegar" ante Dios. La salvación se alcanza a través del <text:span text:style-name="Strong_20_Emphasis">conocimiento de la verdad</text:span>. </text:p>
        </text:list-item>
        <text:list-item>
          <text:p text:style-name="P11"><text:span text:style-name="Strong_20_Emphasis">La Semilla de Dios:</text:span> Así como tenemos la semilla física de nuestros padres terrenales, necesitamos la "semilla" de nuestro Padre espiritual (Su Palabra) en nuestro corazón para poder llamarlo "Padre". </text:p>
        </text:list-item>
        <text:list-item>
          <text:p text:style-name="P10"><text:span text:style-name="Strong_20_Emphasis">La Verdad:</text:span> Esta verdad proviene del cielo (de Dios), no de los pensamientos del hombre. </text:p>
        </text:list-item>
      </text:list>
      <text:p text:style-name="Horizontal_20_Line"/>
      <text:h text:style-name="Heading_20_2" text:outline-level="2">📜 4. La Biblia: Un Libro de Pactos</text:h>
      <text:p text:style-name="Text_20_body"><text:span text:style-name="Strong_20_Emphasis">Salmos 89:3</text:span></text:p>
      <text:p text:style-name="Quotations"><text:span text:style-name="Emphasis">"Hice pacto con mi escogido. Juré a David mi siervo, diciendo: Para siempre confirmaré tu descendencia, y edificaré tu trono por todas las generaciones".</text:span></text:p>
      <text:list text:style-name="L5">
        <text:list-item>
          <text:p text:style-name="P13"><text:span text:style-name="Strong_20_Emphasis">Definición:</text:span> La Biblia es un libro de pactos (promesas) entre Dios y su <text:span text:style-name="Strong_20_Emphasis">pueblo elegido</text:span>. </text:p>
        </text:list-item>
        <text:list-item>
          <text:p text:style-name="P13"><text:span text:style-name="Strong_20_Emphasis">El Pueblo Escogido:</text:span> Dios creó a toda la humanidad, pero elige a un grupo específico para hacer un pacto con ellos. A esto le llamamos el pueblo escogido. </text:p>
        </text:list-item>
        <text:list-item>
          <text:p text:style-name="P12"><text:soft-page-break/><text:span text:style-name="Strong_20_Emphasis">La Condición:</text:span> Las promesas de Dios son condicionales. Él mantendrá Su parte, pero nosotros debemos mantener la nuestra. Es como un contrato sagrado. </text:p>
        </text:list-item>
      </text:list>
      <text:p text:style-name="Horizontal_20_Line"/>
      <text:h text:style-name="Heading_20_2" text:outline-level="2">📖 5. Clasificación: El Antiguo Testamento</text:h>
      <text:p text:style-name="Text_20_body">La Biblia se divide en dos grandes partes: <text:span text:style-name="Strong_20_Emphasis">Antiguo Testamento</text:span> (Antiguo Pacto) y <text:span text:style-name="Strong_20_Emphasis">Nuevo Testamento</text:span> (Nuevo Pacto).</text:p>
      <text:h text:style-name="Heading_20_3" text:outline-level="3">📊 Estadísticas del Antiguo Testamento</text:h>
      <text:list text:style-name="L6">
        <text:list-item>
          <text:p text:style-name="P15"><text:span text:style-name="Strong_20_Emphasis">Extensión:</text:span> Desde Génesis hasta Malaquías. </text:p>
        </text:list-item>
        <text:list-item>
          <text:p text:style-name="P15"><text:span text:style-name="Strong_20_Emphasis">Contenido:</text:span> 39 libros, 929 capítulos y 23,144 versículos. </text:p>
        </text:list-item>
        <text:list-item>
          <text:p text:style-name="P14"><text:span text:style-name="Strong_20_Emphasis">Partes del Pacto:</text:span> Dios y el <text:span text:style-name="Strong_20_Emphasis">pueblo físico de Israel</text:span> (los descendientes de Abraham, Isaac y Jacob por linaje de sangre). </text:p>
        </text:list-item>
      </text:list>
      <text:h text:style-name="Heading_20_3" text:outline-level="3">🤝 La Ceremonia del Antiguo Pacto</text:h>
      <text:p text:style-name="Text_20_body"><text:span text:style-name="Strong_20_Emphasis">Éxodo 19:5-6</text:span></text:p>
      <text:p text:style-name="Quotations"><text:span text:style-name="Emphasis">"Ahora, pues, si diereis oído a mi voz, y guardareis mi pacto, vosotros seréis mi especial tesoro sobre todos los pueblos... y me seréis un reino de sacerdotes, y gente santa".</text:span></text:p>
      <text:list text:style-name="L7">
        <text:list-item>
          <text:p text:style-name="P17"><text:span text:style-name="Strong_20_Emphasis">La Condición:</text:span> "Si guardareis mi pacto". Las bendiciones (ser un reino de sacerdotes y gente santa) dependían de la obediencia del pueblo. </text:p>
        </text:list-item>
        <text:list-item>
          <text:p text:style-name="P17"><text:span text:style-name="Strong_20_Emphasis">El Contenido del Pacto:</text:span> Recibir y mantener los 10 Mandamientos y la ley de Moisés. </text:p>
        </text:list-item>
        <text:list-item>
          <text:p text:style-name="P16"><text:span text:style-name="Strong_20_Emphasis">La Ceremonia de Sangre:</text:span> En <text:span text:style-name="Strong_20_Emphasis">Éxodo 24:6-8</text:span>, Moisés roció la sangre de animales sobre el pueblo para sellar formalmente el pacto. Todos sabían que tenían un acuerdo con Dios. </text:p>
        </text:list-item>
      </text:list>
      <text:h text:style-name="Heading_20_3" text:outline-level="3">❌ El Quebrantamiento del Pacto</text:h>
      <text:p text:style-name="Text_20_body"><text:span text:style-name="Strong_20_Emphasis">Oseas 6:7</text:span></text:p>
      <text:p text:style-name="Quotations"><text:span text:style-name="Emphasis">"Mas ellos, cual Adán, traspasaron el pacto; allí prevaricaron contra mí".</text:span></text:p>
      <text:list text:style-name="L8">
        <text:list-item>
          <text:p text:style-name="P19"><text:span text:style-name="Strong_20_Emphasis">Las Quejas:</text:span> A pesar de los milagros, el pueblo se quejaba constantemente en el desierto, queriendo volver a Egipto. </text:p>
        </text:list-item>
        <text:list-item>
          <text:p text:style-name="P19"><text:span text:style-name="Strong_20_Emphasis">La Idolatría:</text:span> El Rey Salomón, y posteriormente el pueblo, empezaron a adorar dioses gentiles, quebrantando el primer mandamiento. </text:p>
        </text:list-item>
        <text:list-item>
          <text:p text:style-name="P18"><text:span text:style-name="Strong_20_Emphasis">La Consecuencia:</text:span> Dios dividió el reino (Israel al norte y Judá al sur) y eventualmente permitió su destrucción (Asiria y Babilonia) por haber roto el pacto. </text:p>
        </text:list-item>
      </text:list>
      <text:h text:style-name="Heading_20_3" text:outline-level="3">🔮 La Promesa de un Nuevo Pacto</text:h>
      <text:p text:style-name="Text_20_body">Ante el fracaso de Israel física, Dios envió profetas (desde Isaías hasta Malaquías) para anunciar un nuevo pacto. <text:span text:style-name="Strong_20_Emphasis">Jeremías 31:31</text:span></text:p>
      <text:p text:style-name="Quotations"><text:span text:style-name="Emphasis">"He aquí que vienen días, dice Jehová, en los cuales haré nuevo pacto con la casa de Israel y con la casa de Judá... porque ellos invalidaron mi pacto, aunque fui yo un marido para ellos, dice Jehová".</text:span></text:p>
      <text:list text:style-name="L9">
        <text:list-item>
          <text:p text:style-name="P20"><text:soft-page-break/><text:span text:style-name="Strong_20_Emphasis">Nota importante:</text:span> Este "Israel" y "Judá" en las profecías ya no se refiere a la nación física (que fue juzgada), sino al <text:span text:style-name="Strong_20_Emphasis">pueblo espiritual de Dios</text:span>. </text:p>
        </text:list-item>
      </text:list>
      <text:p text:style-name="Horizontal_20_Line"/>
      <text:h text:style-name="Heading_20_2" text:outline-level="2">✝️ 6. El Nuevo Testamento: El Nuevo Pacto</text:h>
      <text:h text:style-name="Heading_20_3" text:outline-level="3">📊 Estadísticas del Nuevo Testamento</text:h>
      <text:list text:style-name="L10">
        <text:list-item>
          <text:p text:style-name="P22"><text:span text:style-name="Strong_20_Emphasis">Extensión:</text:span> Desde Mateo hasta Apocalipsis. </text:p>
        </text:list-item>
        <text:list-item>
          <text:p text:style-name="P22"><text:span text:style-name="Strong_20_Emphasis">Contenido:</text:span> 27 libros, 260 capítulos y 7,957 versos. </text:p>
        </text:list-item>
        <text:list-item>
          <text:p text:style-name="P21"><text:span text:style-name="Strong_20_Emphasis">Total de la Biblia:</text:span> 66 libros, 1,189 capítulos y 31,101 versículos aproximadamente. </text:p>
        </text:list-item>
      </text:list>
      <text:h text:style-name="Heading_20_3" text:outline-level="3">👥 Los Participantes: Israel Espiritual</text:h>
      <text:p text:style-name="Text_20_body"><text:span text:style-name="Strong_20_Emphasis">Romanos 2:28-29</text:span></text:p>
      <text:p text:style-name="Quotations"><text:span text:style-name="Emphasis">"Pues no es judío el que lo es exteriormente, ni es la circuncisión lo que se hace exteriormente en la carne; sino que es judío el que lo es en lo interior, y la circuncisión es del corazón, en espíritu, no en letra".</text:span></text:p>
      <text:list text:style-name="L11">
        <text:list-item>
          <text:p text:style-name="P24"><text:span text:style-name="Strong_20_Emphasis">El Nuevo Pueblo:</text:span> El Nuevo Pacto no es con Israel física (de sangre), sino con el <text:span text:style-name="Strong_20_Emphasis">Israel espiritual</text:span> (los cristianos). </text:p>
        </text:list-item>
        <text:list-item>
          <text:p text:style-name="P23"><text:span text:style-name="Strong_20_Emphasis">La Circuncisión del Corazón:</text:span> Ser "judío" ante los ojos de Dios significa tener el corazón abierto para recibir las palabras de Jesús. No se trata de un linaje físico, sino de recibir la semilla espiritual (la Palabra). <text:span text:style-name="Strong_20_Emphasis">Juan 1:11-13</text:span></text:p>
          <text:p text:style-name="P1"><text:span text:style-name="Emphasis">"A todos los que le recibieron, a los que creen en su nombre, les dio potestad de ser hechos hijos de Dios".</text:span></text:p>
        </text:list-item>
      </text:list>
      <text:h text:style-name="Heading_20_3" text:outline-level="3">🍷 El Contenido y la Ceremonia del Nuevo Pacto</text:h>
      <text:list text:style-name="L12">
        <text:list-item>
          <text:p text:style-name="P26"><text:span text:style-name="Strong_20_Emphasis">El Contenido:</text:span> La ley de la redención de los pecados (que va más allá de las acciones físicas, evaluando también la ideología y el corazón) y las profecías sobre la <text:span text:style-name="Strong_20_Emphasis">Segunda Venida</text:span>. </text:p>
        </text:list-item>
        <text:list-item>
          <text:p text:style-name="P25"><text:span text:style-name="Strong_20_Emphasis">La Ceremonia (La Última Cena):</text:span> <text:span text:style-name="Strong_20_Emphasis">Lucas 22:14-20</text:span> En la noche de la Pascua, Jesús establece el nuevo pacto. A diferencia del antiguo pacto sellado con sangre de animales, este se sella con <text:span text:style-name="Strong_20_Emphasis">la sangre del propio Jesucristo</text:span>. Es el pacto más importante que tenemos hoy. </text:p>
        </text:list-item>
      </text:list>
      <text:p text:style-name="Horizontal_20_Line"/>
      <text:h text:style-name="Heading_20_2" text:outline-level="2">⚖️ 7. Consecuencias: Guardar vs. Quebrantar el Pacto</text:h>
      <text:h text:style-name="Heading_20_3" text:outline-level="3">✅ Resultado de Guardar el Pacto</text:h>
      <text:list text:style-name="L13">
        <text:list-item>
          <text:p text:style-name="P27">Recibir el reino de los cielos, vida eterna, salvación y las bendiciones de Dios. <text:span text:style-name="Strong_20_Emphasis">Hebreos 8:10</text:span></text:p>
          <text:p text:style-name="P2"><text:span text:style-name="Emphasis">"Pondré mis leyes en la mente de ellos, y sobre su corazón las escribiré; y seré a ellos por Dios, y ellos me serán a mí por pueblo".</text:span></text:p>
        </text:list-item>
        <text:list-item>
          <text:p text:style-name="P27"><text:span text:style-name="Strong_20_Emphasis">Cómo guardarlo:</text:span> No basta con leerlo; hay que <text:span text:style-name="Strong_20_Emphasis">entenderlo</text:span> para que la ley de Dios se escriba literalmente en nuestra mente y corazón. </text:p>
        </text:list-item>
      </text:list>
      <text:h text:style-name="Heading_20_3" text:outline-level="3"><text:soft-page-break/>❌ Resultado de No Guardar el Pacto</text:h>
      <text:list text:style-name="L14">
        <text:list-item>
          <text:p text:style-name="P29">Condenación eterna, destrucción e infierno. </text:p>
        </text:list-item>
        <text:list-item>
          <text:p text:style-name="P28"><text:span text:style-name="Strong_20_Emphasis">Advertencia solemne en Apocalipsis:</text:span> <text:span text:style-name="Strong_20_Emphasis">Apocalipsis 1:3</text:span></text:p>
          <text:p text:style-name="P3"><text:span text:style-name="Emphasis">"Bienaventurado el que lee, y los que oyen las palabras de esta profecía, y guardan las cosas en ella escritas".</text:span> <text:span text:style-name="Strong_20_Emphasis">Apocalipsis 22:18-19</text:span> Advierte severamente contra <text:span text:style-name="Strong_20_Emphasis">añadir</text:span> (inventar interpretaciones propias) o <text:span text:style-name="Strong_20_Emphasis">quitar</text:span> (ignorar el libro) de las palabras de la profecía de Apocalipsis. Las consecuencias son las plagas escritas en el libro o perder la parte del árbol de la vida.</text:p>
        </text:list-item>
      </text:list>
      <text:p text:style-name="Horizontal_20_Line"/>
      <text:h text:style-name="Heading_20_2" text:outline-level="2">🔍 8. La Fe en la Segunda Venida</text:h>
      <text:p text:style-name="Text_20_body"><text:span text:style-name="Strong_20_Emphasis">Lucas 18:8</text:span></text:p>
      <text:p text:style-name="Quotations"><text:span text:style-name="Emphasis">"Os digo que pronto les hará justicia. Pero cuando venga el Hijo del Hombre, ¿hallará fe en la tierra?"</text:span></text:p>
      <text:list text:style-name="L15">
        <text:list-item>
          <text:p text:style-name="P31"><text:span text:style-name="Strong_20_Emphasis">La Pregunta de Jesús:</text:span> Cuando Jesús regrese en su Segunda Venida, ¿encontrará fe verdadera? </text:p>
        </text:list-item>
        <text:list-item>
          <text:p text:style-name="P31"><text:span text:style-name="Strong_20_Emphasis">¿Qué es la Fe Verdadera?</text:span> No es simplemente decir "Creo en Jesús" (un tercio del mundo dice esto). La fe verdadera ante los ojos de Dios es <text:span text:style-name="Strong_20_Emphasis">creer en Sus promesas, Sus profecías y en el cumplimiento de esas promesas</text:span> (la realidad). </text:p>
        </text:list-item>
        <text:list-item>
          <text:p text:style-name="P30"><text:span text:style-name="Strong_20_Emphasis">Nuestro deber:</text:span> Entender nuestro pacto (Apocalipsis) para poder guardarlo y creer en la realidad cuando esta aparezca. </text:p>
        </text:list-item>
      </text:list>
      <text:p text:style-name="Horizontal_20_Line"/>
      <text:h text:style-name="Heading_20_2" text:outline-level="2">🔄 9. Repaso Final y Oración de Cierre</text:h>
      <text:p text:style-name="Text_20_body"><text:span text:style-name="Emphasis">(A cargo del Evangelista Christian Howard)</text:span></text:p>
      <text:p text:style-name="Text_20_body"><text:span text:style-name="Strong_20_Emphasis">Resumen del Repaso Interactivo:</text:span></text:p>
      <text:list text:style-name="L16">
        <text:list-item>
          <text:p text:style-name="P33"><text:span text:style-name="Strong_20_Emphasis">¿De qué es libro la Biblia?</text:span> Es un libro de <text:span text:style-name="Strong_20_Emphasis">pactos</text:span> (Antiguo y Nuevo Testamento). </text:p>
        </text:list-item>
        <text:list-item>
          <text:p text:style-name="P33"><text:span text:style-name="Strong_20_Emphasis">El Antiguo Testamento:</text:span> Pacto entre Dios e <text:span text:style-name="Strong_20_Emphasis">Israel física</text:span> (gente de sangre). Contenido: Ley de Moisés. Método: Sangre de animales. </text:p>
        </text:list-item>
        <text:list-item>
          <text:p text:style-name="P32"><text:span text:style-name="Strong_20_Emphasis">El Nuevo Testamento:</text:span> Pacto entre Jesús e <text:span text:style-name="Strong_20_Emphasis">Israel espiritual</text:span> (cristianos). Contenido: Ley de redención y profecías. Método: Sangre de Cristo. </text:p>
        </text:list-item>
      </text:list>
      <text:p text:style-name="Text_20_body"><text:span text:style-name="Strong_20_Emphasis">📢 Anuncio para Pastores:</text:span> Se invita a todos los pastores que están tomando la clase a quedarse unos minutos después de la oración final para tener una breve reunión con el instructor Sibiani.</text:p>
      <text:p text:style-name="Text_20_body"><text:span text:style-name="Strong_20_Emphasis">Oración de Cierre (El Padre Nuestro):</text:span></text:p>
      <text:p text:style-name="Quotations"><text:span text:style-name="Emphasis">"Padre nuestro que estás en los cielos, santificado sea tu nombre. Venga tu reino, hágase tu voluntad como en el cielo, así también en la Tierra. El pan nuestro de cada día dánoslo hoy y perdona nuestras deudas como también nosotros perdonamos a nuestros deudores. Y no nos metas en tentación, mas líbranos del mal. Porque tuyo es el reino y el poder y la gloria por todos los siglos, amén."</text:span></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14:19:01.639898275</meta:creation-date>
    <dc:date>2026-06-11T14:23:34.406296670</dc:date>
    <meta:editing-duration>PT4M33S</meta:editing-duration>
    <meta:editing-cycles>1</meta:editing-cycles>
    <meta:document-statistic meta:table-count="0" meta:image-count="0" meta:object-count="0" meta:page-count="6" meta:paragraph-count="102" meta:word-count="1796" meta:character-count="10413" meta:non-whitespace-character-count="8730"/>
    <meta:generator>LibreOffice/24.2.7.2$Linux_X86_64 LibreOffice_project/420$Build-2</meta:generator>
  </office:meta>
</office:document-meta>
</file>