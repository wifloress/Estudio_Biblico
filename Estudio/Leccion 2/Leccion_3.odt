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Standard">
      <style:text-properties style:font-name="Padauk Book"/>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text-properties style:font-name="Padauk Book"/>
    </style:style>
    <style:style style:name="P32" style:family="paragraph" style:parent-style-name="Text_20_body" style:list-style-name="L2">
      <style:text-properties style:font-name="Padauk Book"/>
    </style:style>
    <style:style style:name="P33" style:family="paragraph" style:parent-style-name="Text_20_body" style:list-style-name="L4">
      <style:paragraph-properties fo:margin-top="0cm" fo:margin-bottom="0cm" style:contextual-spacing="false"/>
      <style:text-properties style:font-name="Padauk Book"/>
    </style:style>
    <style:style style:name="P34" style:family="paragraph" style:parent-style-name="Text_20_body" style:list-style-name="L6">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2 (PARTE 3)</text:h>
      <text:h text:style-name="P2" text:outline-level="2">El Entendimiento Básico de la Biblia: Profecía y su Realidad</text:h>
      <text:p text:style-name="P4"/>
      <text:h text:style-name="P2" text:outline-level="2">🔄 1. Repaso Inicial: Preguntas de Reflexión</text:h>
      <text:p text:style-name="Text_20_body"><text:span text:style-name="Emphasis"><text:span text:style-name="T1">(A cargo del Evangelista Christian Howard)</text:span></text:span></text:p>
      <text:p text:style-name="P31">Antes de entrar en la palabra, ponemos a prueba lo aprendido sobre las enseñanzas, las tradiciones y los contenidos de la Biblia:</text:p>
      <text:list text:style-name="L1">
        <text:list-item>
          <text:p text:style-name="P7"><text:span text:style-name="Strong_20_Emphasis"><text:span text:style-name="T1">Según Marcos 7:6-9, ¿qué criticó Jesús?</text:span></text:span></text:p>
          <text:list>
            <text:list-item>
              <text:p text:style-name="P7"><text:span text:style-name="Emphasis"><text:span text:style-name="T1">Respuesta:</text:span></text:span><text:span text:style-name="T1"> </text:span><text:span text:style-name="Strong_20_Emphasis"><text:span text:style-name="T1">C) Las tradiciones humanas que reemplazan la palabra de Dios.</text:span></text:span><text:span text:style-name="T1"> (La gente mezcló la verdad con sus propios pensamientos; debemos verificar todo solo con la palabra pura). </text:span></text:p>
            </text:list-item>
          </text:list>
        </text:list-item>
        <text:list-item>
          <text:p text:style-name="P7"><text:span text:style-name="Strong_20_Emphasis"><text:span text:style-name="T1">¿Qué significa que la Biblia está inspirada por Dios?</text:span></text:span></text:p>
          <text:list>
            <text:list-item>
              <text:p text:style-name="P7"><text:span text:style-name="Emphasis"><text:span text:style-name="T1">Respuesta:</text:span></text:span><text:span text:style-name="T1"> Que </text:span><text:span text:style-name="Strong_20_Emphasis"><text:span text:style-name="T1">Dios guió a los escritores con su Espíritu Santo</text:span></text:span><text:span text:style-name="T1">. No fue solo razonamiento humano. </text:span></text:p>
            </text:list-item>
          </text:list>
        </text:list-item>
        <text:list-item>
          <text:p text:style-name="P7"><text:span text:style-name="Strong_20_Emphasis"><text:span text:style-name="T1">¿Cuáles son las 4 clasificaciones del contenido bíblico?</text:span></text:span></text:p>
          <text:list>
            <text:list-item>
              <text:p text:style-name="P7"><text:span text:style-name="Emphasis"><text:span text:style-name="T1">Respuesta:</text:span></text:span><text:span text:style-name="T1"> </text:span><text:span text:style-name="Strong_20_Emphasis"><text:span text:style-name="T1">Historia, Enseñanzas morales, Profecía y Cumplimiento.</text:span></text:span><text:span text:style-name="T1"> (Las dos últimas son las más importantes porque nos permiten verificar la realidad y tener fe). </text:span></text:p>
            </text:list-item>
          </text:list>
        </text:list-item>
        <text:list-item>
          <text:p text:style-name="P7"><text:span text:style-name="Strong_20_Emphasis"><text:span text:style-name="T1">Reflexión: ¿Qué diferencia hay entre seguir una tradición y seguir la palabra de Dios?</text:span></text:span></text:p>
          <text:list>
            <text:list-item>
              <text:p text:style-name="P7"><text:span text:style-name="Emphasis"><text:span text:style-name="T1">Conclusión:</text:span></text:span><text:span text:style-name="T1"> La palabra de Dios es perfecta y no cambia. Las tradiciones humanas pueden tener errores y cambian con el tiempo. </text:span></text:p>
            </text:list-item>
          </text:list>
        </text:list-item>
        <text:list-item>
          <text:p text:style-name="P7"><text:span text:style-name="Strong_20_Emphasis"><text:span text:style-name="T1">¿Por qué Dios anuncia las cosas antes de que sucedan?</text:span></text:span></text:p>
          <text:list>
            <text:list-item>
              <text:p text:style-name="P6"><text:span text:style-name="Emphasis"><text:span text:style-name="T1">Respuesta:</text:span></text:span><text:span text:style-name="T1"> </text:span><text:span text:style-name="Strong_20_Emphasis"><text:span text:style-name="T1">Para que creamos cuando sucedan.</text:span></text:span><text:span text:style-name="T1"> (Esto está directamente ligado a la profecía y el cumplimiento). </text:span></text:p>
            </text:list-item>
          </text:list>
        </text:list-item>
      </text:list>
      <text:p text:style-name="Text_20_body"><text:span text:style-name="Strong_20_Emphasis"><text:span text:style-name="T1">Oración de apertura:</text:span></text:span></text:p>
      <text:p text:style-name="Quotations"><text:soft-page-break/><text:span text:style-name="Emphasis"><text:span text:style-name="T1">"Santísimo Padre, Dios creador de todos los ángeles, de nosotros y de los Espíritus Santos, gracias por traernos hoy y guiarnos a la clase. Estamos viendo la importancia de las cosas básicas de la Biblia. Tú nos has dicho que somos inmaduros en tu palabra y estamos descubriendo que es verdad. Gracias por abrir nuestros ojos espirituales. Oramos por los estudiantes que no han podido venir; eres tú quien les abre el camino. Manda tus Espíritus Santos para que nos hagan más humildes para aceptar tu palabra, porque no importa cuántos años éramos cristianos, lo que depende es cuánta de tu verdad entendemos. En el nombre de Jesucristo. Amén."</text:span></text:span></text:p>
      <text:p text:style-name="P4"/>
      <text:h text:style-name="P2" text:outline-level="2">🏫 2. La Metodología de Dios: Profecía y Realidad</text:h>
      <text:p text:style-name="Text_20_body"><text:span text:style-name="Emphasis"><text:span text:style-name="T1">(A cargo del Instructor Sibiani)</text:span></text:span></text:p>
      <text:h text:style-name="P3" text:outline-level="3">📌 La Actitud ante la Palabra</text:h>
      <text:p text:style-name="Text_20_body"><text:span text:style-name="T1">Estamos delante de la Palabra de Dios, por lo que nuestra actitud debe ser de reverencia. No estamos en un estudio cualquiera; Dios quiere revelarnos misterios y cosas profundas. No digamos </text:span><text:span text:style-name="Emphasis"><text:span text:style-name="T1">"lo veo después"</text:span></text:span><text:span text:style-name="T1"> o </text:span><text:span text:style-name="Emphasis"><text:span text:style-name="T1">"estoy ocupado"</text:span></text:span><text:span text:style-name="T1">, porque sería como decirle a Dios que no tenemos tiempo para Él.</text:span></text:p>
      <text:h text:style-name="P3" text:outline-level="3">🎯 El Tema Central: La Profecía y su Realidad</text:h>
      <text:p text:style-name="Text_20_body"><text:span text:style-name="T1">La metodología que utiliza Dios para darse a conocer y demostrarnos que está vivo y obrando (no es un espectador pasivo) es la </text:span><text:span text:style-name="Strong_20_Emphasis"><text:span text:style-name="T1">Profecía y su Cumplimiento (Realidad)</text:span></text:span><text:span text:style-name="T1">.</text:span></text:p>
      <text:list text:style-name="L2">
        <text:list-item>
          <text:p text:style-name="P8"><text:span text:style-name="Strong_20_Emphasis"><text:span text:style-name="T1">La Ecuación Divina:</text:span></text:span><text:span text:style-name="T1"> Profecía (Promesa) + Cumplimiento = </text:span><text:span text:style-name="Strong_20_Emphasis"><text:span text:style-name="T1">Realidad</text:span></text:span><text:span text:style-name="T1">. </text:span></text:p>
        </text:list-item>
        <text:list-item>
          <text:p text:style-name="P32">No podemos tener una realidad sin profecía, ni una profecía sin realidad. Ambas actúan juntas para que Dios se haga conocer. </text:p>
        </text:list-item>
      </text:list>
      <text:h text:style-name="P3" text:outline-level="3">🔤 Dios es el Alfa y la Omega</text:h>
      <text:p text:style-name="P31">Decimos que Dios es el principio y el fin. ¿Qué significa esto en la práctica?</text:p>
      <text:list text:style-name="L3">
        <text:list-item>
          <text:p text:style-name="P10"><text:span text:style-name="Strong_20_Emphasis"><text:span text:style-name="T1">Alfa (El Principio):</text:span></text:span><text:span text:style-name="T1"> Dios promete, profetiza y establece su plan desde el inicio. </text:span></text:p>
        </text:list-item>
        <text:list-item>
          <text:p text:style-name="P10"><text:span text:style-name="Strong_20_Emphasis"><text:span text:style-name="T1">Omega (El Fin):</text:span></text:span><text:span text:style-name="T1"> Dios termina cumpliendo </text:span><text:span text:style-name="Emphasis"><text:span text:style-name="T1">exactamente</text:span></text:span><text:span text:style-name="T1"> como lo predijo. </text:span></text:p>
        </text:list-item>
        <text:list-item>
          <text:p text:style-name="P9"><text:span text:style-name="Strong_20_Emphasis"><text:span text:style-name="T1">Advertencia Solemne (Apocalipsis 22:18-19):</text:span></text:span><text:span text:style-name="T1"> No debemos </text:span><text:span text:style-name="Strong_20_Emphasis"><text:span text:style-name="T1">añadir</text:span></text:span><text:span text:style-name="T1"> (agregar nuestros pensamientos) ni </text:span><text:span text:style-name="Strong_20_Emphasis"><text:span text:style-name="T1">quitar</text:span></text:span><text:span text:style-name="T1"> (ignorar el libro) de la profecía. ¿Por qué? Porque cuando Dios cumpla su promesa, lo hará exactamente como está escrito. Si alteramos la profecía, no podremos reconocer la realidad cuando aparezca. </text:span></text:p>
        </text:list-item>
      </text:list>
      <text:p text:style-name="P4"><text:soft-page-break/></text:p>
      <text:h text:style-name="P2" text:outline-level="2">📜 3. El Cumplimiento Específico: De Abraham a Moisés</text:h>
      <text:p text:style-name="P31">Dios no da promesas vagas; Sus promesas son sumamente específicas. Veamos el primer gran ejemplo de profecía y cumplimiento en el Antiguo Testamento.</text:p>
      <text:h text:style-name="P3" text:outline-level="3">🤝 La Promesa a Abraham (Génesis 15:13-14)</text:h>
      <text:p text:style-name="P31">Dios le da a Abraham una promesa con detalles exactos, no una "oración genérica":</text:p>
      <text:list text:style-name="L4">
        <text:list-item>
          <text:p text:style-name="P33">Su descendencia sería numerosa (como las estrellas). </text:p>
        </text:list-item>
        <text:list-item>
          <text:p text:style-name="P12"><text:span text:style-name="T1">Morarían en </text:span><text:span text:style-name="Strong_20_Emphasis"><text:span text:style-name="T1">tierra ajena</text:span></text:span><text:span text:style-name="T1"> (gentil). </text:span></text:p>
        </text:list-item>
        <text:list-item>
          <text:p text:style-name="P12"><text:span text:style-name="T1">Serían </text:span><text:span text:style-name="Strong_20_Emphasis"><text:span text:style-name="T1">esclavos y oprimidos</text:span></text:span><text:span text:style-name="T1">. </text:span></text:p>
        </text:list-item>
        <text:list-item>
          <text:p text:style-name="P12"><text:span text:style-name="T1">El tiempo específico sería </text:span><text:span text:style-name="Strong_20_Emphasis"><text:span text:style-name="T1">400 años</text:span></text:span><text:span text:style-name="T1">. </text:span></text:p>
        </text:list-item>
        <text:list-item>
          <text:p text:style-name="P12"><text:span text:style-name="T1">Dios </text:span><text:span text:style-name="Strong_20_Emphasis"><text:span text:style-name="T1">juzgaría</text:span></text:span><text:span text:style-name="T1"> a la nación que los esclavizaría. </text:span></text:p>
        </text:list-item>
        <text:list-item>
          <text:p text:style-name="P11"><text:span text:style-name="T1">Después de esto, </text:span><text:span text:style-name="Strong_20_Emphasis"><text:span text:style-name="T1">saldrían con gran riqueza</text:span></text:span><text:span text:style-name="T1">. </text:span></text:p>
        </text:list-item>
      </text:list>
      <text:h text:style-name="P3" text:outline-level="3">✨ El Cumplimiento en el Éxodo (Éxodo 12:29, 36-37, 40-41)</text:h>
      <text:p text:style-name="Text_20_body"><text:span text:style-name="Strong_20_Emphasis"><text:span text:style-name="T1">Seis generaciones después</text:span></text:span><text:span text:style-name="T1">, Dios cumple cada detalle:</text:span></text:p>
      <text:list text:style-name="L5">
        <text:list-item>
          <text:p text:style-name="P14"><text:span text:style-name="Strong_20_Emphasis"><text:span text:style-name="T1">El Juicio:</text:span></text:span><text:span text:style-name="T1"> Dios hiere a todo primogénito en Egipto. </text:span></text:p>
        </text:list-item>
        <text:list-item>
          <text:p text:style-name="P14"><text:span text:style-name="Strong_20_Emphasis"><text:span text:style-name="T1">La Riqueza:</text:span></text:span><text:span text:style-name="T1"> Los egipcios, desesperados por las plagas, les dieron cuanto pidieron. </text:span><text:span text:style-name="Emphasis"><text:span text:style-name="T1">"Despojaron a los egipcios"</text:span></text:span><text:span text:style-name="T1">. </text:span></text:p>
        </text:list-item>
        <text:list-item>
          <text:p text:style-name="P14"><text:span text:style-name="Strong_20_Emphasis"><text:span text:style-name="T1">El Tiempo:</text:span></text:span><text:span text:style-name="T1"> Habitaron en Egipto 430 años. </text:span><text:span text:style-name="Emphasis"><text:span text:style-name="T1">"En el mismo día, todas las huestes de Jehová salieron"</text:span></text:span><text:span text:style-name="T1">. </text:span></text:p>
        </text:list-item>
        <text:list-item>
          <text:p text:style-name="P13"><text:span text:style-name="Emphasis"><text:span text:style-name="T1">Reflexión:</text:span></text:span><text:span text:style-name="T1"> Si Faraón los hubiera dejado ir a la primera, no les habrían dado riquezas. Dios endureció el corazón de Faraón y envió las plagas con un propósito mayor: </text:span><text:span text:style-name="Strong_20_Emphasis"><text:span text:style-name="T1">cumplir Su profecía al pie de la letra</text:span></text:span><text:span text:style-name="T1">. </text:span></text:p>
        </text:list-item>
      </text:list>
      <text:p text:style-name="P4"/>
      <text:h text:style-name="P2" text:outline-level="2">✝️ 4. Las Profecías del Antiguo Testamento y la Primera Venida</text:h>
      <text:p text:style-name="Text_20_body"><text:span text:style-name="T1">Toda la ley de Moisés, los profetas y los salmos testificaban sobre Jesús (Lucas 24:25-27, 44). Sin embargo, los judíos no lo reconocieron porque no entendieron que la ley era solo una </text:span><text:span text:style-name="Strong_20_Emphasis"><text:span text:style-name="T1">"sombra de los bienes venideros"</text:span></text:span><text:span text:style-name="T1"> (Hebreos 10:1).</text:span></text:p>
      <text:p text:style-name="P31"><text:soft-page-break/>A continuación, vemos cómo Jesús cumplió profecías específicas para validar que Él era la "Realidad":</text:p>
      <text:h text:style-name="P3" text:outline-level="3">🗣️ 1. La Certeza de la Palabra de Dios</text:h>
      <text:p text:style-name="Quotations"><text:span text:style-name="Emphasis"><text:span text:style-name="T1">"Ciertamente se hará de la manera que lo he pensado, y será confirmado como lo he determinado... Anunció lo por venir desde el principio... Mi consejo permanecerá, y haré todo lo que quiero."</text:span></text:span><text:span text:style-name="T1"> — </text:span><text:span text:style-name="Strong_20_Emphasis"><text:span text:style-name="T1">Isaías 14:24 / 46:10</text:span></text:span></text:p>
      <text:list text:style-name="L6">
        <text:list-item>
          <text:p text:style-name="P34">Dios no es como el hombre que cambia de opinión o no cumple sus "resoluciones de año nuevo". Si Dios lo determina, se cumple sí o sí. </text:p>
        </text:list-item>
      </text:list>
      <text:h text:style-name="P3" text:outline-level="3">🍷 2. El Vinagre en la Cruz</text:h>
      <text:list text:style-name="L7">
        <text:list-item>
          <text:p text:style-name="P16"><text:span text:style-name="Strong_20_Emphasis"><text:span text:style-name="T1">Profecía (Salmos 69:21):</text:span></text:span><text:span text:style-name="T1"> </text:span><text:span text:style-name="Emphasis"><text:span text:style-name="T1">"En mi sed me dieron a beber vinagre"</text:span></text:span><text:span text:style-name="T1">. </text:span></text:p>
        </text:list-item>
        <text:list-item>
          <text:p text:style-name="P15"><text:span text:style-name="Strong_20_Emphasis"><text:span text:style-name="T1">Cumplimiento (Juan 19:28-30):</text:span></text:span><text:span text:style-name="T1"> Jesús, sabiendo que todo estaba consumado, dijo </text:span><text:span text:style-name="Emphasis"><text:span text:style-name="T1">"Tengo sed"</text:span></text:span><text:span text:style-name="T1"> para que la Escritura se cumpliese. Tomó el vinagre y declaró: </text:span><text:span text:style-name="Strong_20_Emphasis"><text:span text:style-name="T1">"Consumado es"</text:span></text:span><text:span text:style-name="T1"> (Hecho está). No fue por casualidad ni solo por sed física; fue para sellar el cumplimiento. </text:span></text:p>
        </text:list-item>
      </text:list>
      <text:h text:style-name="P3" text:outline-level="3">👶 3. Nacimiento de una Virgen</text:h>
      <text:list text:style-name="L8">
        <text:list-item>
          <text:p text:style-name="P18"><text:span text:style-name="Strong_20_Emphasis"><text:span text:style-name="T1">Profecía (Isaías 7:14):</text:span></text:span><text:span text:style-name="T1"> </text:span><text:span text:style-name="Emphasis"><text:span text:style-name="T1">"He aquí que la virgen concebirá... y llamará su nombre Emanuel"</text:span></text:span><text:span text:style-name="T1">. (700 años antes). </text:span></text:p>
        </text:list-item>
        <text:list-item>
          <text:p text:style-name="P17"><text:span text:style-name="Strong_20_Emphasis"><text:span text:style-name="T1">Cumplimiento (Mateo 1:21-23):</text:span></text:span><text:span text:style-name="T1"> El ángel anuncia a María que tendrá un hijo llamado </text:span><text:span text:style-name="Strong_20_Emphasis"><text:span text:style-name="T1">Jesús</text:span></text:span><text:span text:style-name="T1"> (Salvador). Aunque la profecía decía "Emanuel" (Dios con nosotros), la realidad se llamó Jesús, cumpliendo que Dios estaba literalmente con su pueblo a través de Él. </text:span></text:p>
        </text:list-item>
      </text:list>
      <text:h text:style-name="P3" text:outline-level="3">📍 4. Nacimiento en Belén</text:h>
      <text:list text:style-name="L9">
        <text:list-item>
          <text:p text:style-name="P20"><text:span text:style-name="Strong_20_Emphasis"><text:span text:style-name="T1">Profecía (Miqueas 5:2 / Mateo 2:5-6):</text:span></text:span><text:span text:style-name="T1"> </text:span><text:span text:style-name="Emphasis"><text:span text:style-name="T1">"Tú, Belén Efrata... de ti me saldrá el que será Señor en Israel"</text:span></text:span><text:span text:style-name="T1">. </text:span></text:p>
        </text:list-item>
        <text:list-item>
          <text:p text:style-name="P19"><text:span text:style-name="Strong_20_Emphasis"><text:span text:style-name="T1">Cumplimiento (Lucas 2):</text:span></text:span><text:span text:style-name="T1"> Debido al censo del César, José y María viajan a su ciudad natal, Belén. Jesús no nació en Jerusalén (la ciudad digna) ni en Galilea, sino en un pueblo pequeño, </text:span><text:span text:style-name="Strong_20_Emphasis"><text:span text:style-name="T1">porque estaba profetizado</text:span></text:span><text:span text:style-name="T1">. </text:span></text:p>
        </text:list-item>
      </text:list>
      <text:h text:style-name="P3" text:outline-level="3">🌅 5. Ministerio en Galilea de los Gentiles</text:h>
      <text:list text:style-name="L10">
        <text:list-item>
          <text:p text:style-name="P22"><text:span text:style-name="Strong_20_Emphasis"><text:span text:style-name="T1">Profecía (Isaías 9:1-2):</text:span></text:span><text:span text:style-name="T1"> </text:span><text:span text:style-name="Emphasis"><text:span text:style-name="T1">"El pueblo que andaba en tinieblas vio gran luz... en Galilea de los gentiles"</text:span></text:span><text:span text:style-name="T1">. </text:span></text:p>
        </text:list-item>
        <text:list-item>
          <text:p text:style-name="P21"><text:soft-page-break/><text:span text:style-name="Strong_20_Emphasis"><text:span text:style-name="T1">Cumplimiento (Mateo 4:12-16):</text:span></text:span><text:span text:style-name="T1"> Jesús deja Nazaret y se habita en Capernaum (zona de Zabulón y Neftalí, considerada "gentil" y oscura por los judíos). </text:span><text:span text:style-name="Strong_20_Emphasis"><text:span text:style-name="T1">La Realidad de esa "gran luz" fue Jesús y Sus palabras</text:span></text:span><text:span text:style-name="T1">, trayendo vida a los que estaban en tinieblas espirituales. </text:span></text:p>
        </text:list-item>
      </text:list>
      <text:h text:style-name="P3" text:outline-level="3">📢 6. Predicación de las Buenas Nuevas</text:h>
      <text:list text:style-name="L11">
        <text:list-item>
          <text:p text:style-name="P24"><text:span text:style-name="Strong_20_Emphasis"><text:span text:style-name="T1">Profecía (Isaías 61:1-2):</text:span></text:span><text:span text:style-name="T1"> </text:span><text:span text:style-name="Emphasis"><text:span text:style-name="T1">"El espíritu de Jehová... me ha enviado a predicar buenas nuevas a los abatidos... a pregonar libertad a los cautivos"</text:span></text:span><text:span text:style-name="T1">. </text:span></text:p>
        </text:list-item>
        <text:list-item>
          <text:p text:style-name="P23"><text:span text:style-name="Strong_20_Emphasis"><text:span text:style-name="T1">Cumplimiento (Lucas 4:17-21):</text:span></text:span><text:span text:style-name="T1"> En la sinagoga, Jesús lee este rollo de Isaías y dice: </text:span><text:span text:style-name="Strong_20_Emphasis"><text:span text:style-name="T1">"Hoy se ha cumplido esta escritura delante de vosotros"</text:span></text:span><text:span text:style-name="T1">. Él era la persona ungida para dar libertad a través de Sus palabras. </text:span></text:p>
        </text:list-item>
      </text:list>
      <text:h text:style-name="P3" text:outline-level="3">✝️ 7. El Sacrificio Perfecto (La Cruz)</text:h>
      <text:list text:style-name="L12">
        <text:list-item>
          <text:p text:style-name="P26"><text:span text:style-name="Strong_20_Emphasis"><text:span text:style-name="T1">Profecía (Salmos 40:6-8 / 22:18):</text:span></text:span><text:span text:style-name="T1"> </text:span><text:span text:style-name="Emphasis"><text:span text:style-name="T1">"Sacrificio y ofrenda no te agrada... He aquí vengo... para hacer tu voluntad"</text:span></text:span><text:span text:style-name="T1">. Y </text:span><text:span text:style-name="Emphasis"><text:span text:style-name="T1">"Partieron entre sí mis vestidos"</text:span></text:span><text:span text:style-name="T1">. </text:span></text:p>
        </text:list-item>
        <text:list-item>
          <text:p text:style-name="P25"><text:span text:style-name="Strong_20_Emphasis"><text:span text:style-name="T1">Cumplimiento (Hebreos 10:1-10):</text:span></text:span><text:span text:style-name="T1"> La sangre de toros no podía quitar pecados. Dios preparó un </text:span><text:span text:style-name="Strong_20_Emphasis"><text:span text:style-name="T1">cuerpo</text:span></text:span><text:span text:style-name="T1"> (Jesús) para hacer Su voluntad. La ofrenda del cuerpo de Jesucristo fue hecha </text:span><text:span text:style-name="Strong_20_Emphasis"><text:span text:style-name="T1">una vez para siempre</text:span></text:span><text:span text:style-name="T1">, santificándonos. </text:span></text:p>
        </text:list-item>
      </text:list>
      <text:p text:style-name="P4"/>
      <text:h text:style-name="P2" text:outline-level="2">🛡️ 5. La Actitud del Creyente ante la Revelación</text:h>
      <text:h text:style-name="P3" text:outline-level="3">⚠️ El Peligro de no Entender el Cumplimiento</text:h>
      <text:p text:style-name="P31">Los judíos memorizaban las Escrituras, pero cuando la "Realidad" (Jesús) apareció frente a sus ojos, no lo reconocieron porque estaban cegados por sus tradiciones y no entendían que la ley era una sombra que apuntaba a Cristo.</text:p>
      <text:list text:style-name="L13">
        <text:list-item>
          <text:p text:style-name="P28"><text:span text:style-name="Strong_20_Emphasis"><text:span text:style-name="T1">La Lección para nosotros:</text:span></text:span><text:span text:style-name="T1"> Nosotros tenemos las profecías del Nuevo Testamento (Apocalipsis). Si las leemos pero no abrimos el corazón para entenderlas, cuando aparezca la Realidad en la Segunda Venida, cometeremos el mismo error que los fariseos. </text:span></text:p>
        </text:list-item>
        <text:list-item>
          <text:p text:style-name="P27"><text:span text:style-name="Strong_20_Emphasis"><text:span text:style-name="T1">El Llamado:</text:span></text:span><text:span text:style-name="T1"> No multitarea durante la clase. No le digas a Dios </text:span><text:span text:style-name="Emphasis"><text:span text:style-name="T1">"estoy ocupado, después te hago caso"</text:span></text:span><text:span text:style-name="T1">. Dios quiere revelarte los misterios del reino para que puedas guardar tu pacto. </text:span></text:p>
        </text:list-item>
      </text:list>
      <text:p text:style-name="P4"/>
      <text:h text:style-name="P2" text:outline-level="2"><text:soft-page-break/>🔄 6.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de las 5 Profecías Clave de Jesús vistas hoy:</text:span></text:span></text:p>
      <text:list text:style-name="L14">
        <text:list-item>
          <text:p text:style-name="P30"><text:span text:style-name="Strong_20_Emphasis"><text:span text:style-name="T1">Nacería de una virgen</text:span></text:span><text:span text:style-name="T1"> (Isaías 7:14 ➡️ Mateo 1). </text:span></text:p>
        </text:list-item>
        <text:list-item>
          <text:p text:style-name="P30"><text:span text:style-name="Strong_20_Emphasis"><text:span text:style-name="T1">Nacería en Belén</text:span></text:span><text:span text:style-name="T1"> (Miqueas/Mateo 2). </text:span></text:p>
        </text:list-item>
        <text:list-item>
          <text:p text:style-name="P30"><text:span text:style-name="Strong_20_Emphasis"><text:span text:style-name="T1">Predicaría en Galilea</text:span></text:span><text:span text:style-name="T1"> (Isaías 9 ➡️ Mateo 4). </text:span></text:p>
        </text:list-item>
        <text:list-item>
          <text:p text:style-name="P30"><text:span text:style-name="Strong_20_Emphasis"><text:span text:style-name="T1">Anunciaría las buenas nuevas / libertad</text:span></text:span><text:span text:style-name="T1"> (Isaías 61 ➡️ Lucas 4). </text:span></text:p>
        </text:list-item>
        <text:list-item>
          <text:p text:style-name="P29"><text:span text:style-name="Strong_20_Emphasis"><text:span text:style-name="T1">Moriría en la cruz / Sufriría</text:span></text:span><text:span text:style-name="T1"> (Salmos 22, 40 ➡️ Juan 19, Hebreos 10). </text:span></text:p>
        </text:list-item>
      </text:list>
      <text:p text:style-name="Text_20_body"><text:span text:style-name="Strong_20_Emphasis"><text:span text:style-name="T1">Conclusión del Evangelista:</text:span></text:span><text:span text:style-name="T1"> El cumplimiento de la profecía no es solo para saber historia; nos enseña que </text:span><text:span text:style-name="Strong_20_Emphasis"><text:span text:style-name="T1">Dios está vivo, está trabajando y va a cumplir todo lo del futuro</text:span></text:span><text:span text:style-name="T1">. Esto fortalece nuestra fe para creer en Sus promesas futuras.</text:span></text:p>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nuestros ofensores. No nos dejes caer en la tentación, mas líbranos del mal. Porque tuyo es el reino, el poder y la gloria por los siglos de los siglos. Amén."</text:span></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30:57.779605864</meta:creation-date>
    <dc:date>2026-07-02T08:58:31.722814636</dc:date>
    <meta:editing-duration>PT4M41S</meta:editing-duration>
    <meta:editing-cycles>2</meta:editing-cycles>
    <meta:generator>LibreOffice/24.2.7.2$Linux_X86_64 LibreOffice_project/420$Build-2</meta:generator>
    <meta:document-statistic meta:table-count="0" meta:image-count="0" meta:object-count="0" meta:page-count="6" meta:paragraph-count="86" meta:word-count="1600" meta:character-count="9384" meta:non-whitespace-character-count="7874"/>
  </office:meta>
</office:document-meta>
</file>