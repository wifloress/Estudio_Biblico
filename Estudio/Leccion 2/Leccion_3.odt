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9"/>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10"/>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1"/>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2"/>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3"/>
    <style:style style:name="P25" style:family="paragraph" style:parent-style-name="Text_20_body" style:list-style-name="L13">
      <style:paragraph-properties fo:margin-top="0cm" fo:margin-bottom="0cm" style:contextual-spacing="false"/>
    </style:style>
    <style:style style:name="P26" style:family="paragraph" style:parent-style-name="Text_20_body" style:list-style-name="L14"/>
    <style:style style:name="P27" style:family="paragraph" style:parent-style-name="Text_20_body" style:list-style-name="L14">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CUADERNO DE ESTUDIO: LECCIÓN 2 (PARTE 3)</text:h>
      <text:h text:style-name="Heading_20_2" text:outline-level="2">El Entendimiento Básico de la Biblia: Profecía y su Realidad</text:h>
      <text:p text:style-name="Horizontal_20_Line"/>
      <text:h text:style-name="Heading_20_2" text:outline-level="2">🔄 1. Repaso Inicial: Preguntas de Reflexión</text:h>
      <text:p text:style-name="Text_20_body"><text:span text:style-name="Emphasis">(A cargo del Evangelista Christian Howard)</text:span></text:p>
      <text:p text:style-name="Text_20_body">Antes de entrar en la palabra, ponemos a prueba lo aprendido sobre las enseñanzas, las tradiciones y los contenidos de la Biblia:</text:p>
      <text:list text:style-name="L1">
        <text:list-item>
          <text:p text:style-name="P2"><text:span text:style-name="Strong_20_Emphasis">Según Marcos 7:6-9, ¿qué criticó Jesús?</text:span></text:p>
          <text:list>
            <text:list-item>
              <text:p text:style-name="P2"><text:span text:style-name="Emphasis">Respuesta:</text:span> <text:span text:style-name="Strong_20_Emphasis">C) Las tradiciones humanas que reemplazan la palabra de Dios.</text:span> (La gente mezcló la verdad con sus propios pensamientos; debemos verificar todo solo con la palabra pura). </text:p>
            </text:list-item>
          </text:list>
        </text:list-item>
        <text:list-item>
          <text:p text:style-name="P2"><text:span text:style-name="Strong_20_Emphasis">¿Qué significa que la Biblia está inspirada por Dios?</text:span></text:p>
          <text:list>
            <text:list-item>
              <text:p text:style-name="P2"><text:span text:style-name="Emphasis">Respuesta:</text:span> Que <text:span text:style-name="Strong_20_Emphasis">Dios guió a los escritores con su Espíritu Santo</text:span>. No fue solo razonamiento humano. </text:p>
            </text:list-item>
          </text:list>
        </text:list-item>
        <text:list-item>
          <text:p text:style-name="P2"><text:span text:style-name="Strong_20_Emphasis">¿Cuáles son las 4 clasificaciones del contenido bíblico?</text:span></text:p>
          <text:list>
            <text:list-item>
              <text:p text:style-name="P2"><text:span text:style-name="Emphasis">Respuesta:</text:span> <text:span text:style-name="Strong_20_Emphasis">Historia, Enseñanzas morales, Profecía y Cumplimiento.</text:span> (Las dos últimas son las más importantes porque nos permiten verificar la realidad y tener fe). </text:p>
            </text:list-item>
          </text:list>
        </text:list-item>
        <text:list-item>
          <text:p text:style-name="P2"><text:span text:style-name="Strong_20_Emphasis">Reflexión: ¿Qué diferencia hay entre seguir una tradición y seguir la palabra de Dios?</text:span></text:p>
          <text:list>
            <text:list-item>
              <text:p text:style-name="P2"><text:span text:style-name="Emphasis">Conclusión:</text:span> La palabra de Dios es perfecta y no cambia. Las tradiciones humanas pueden tener errores y cambian con el tiempo. </text:p>
            </text:list-item>
          </text:list>
        </text:list-item>
        <text:list-item>
          <text:p text:style-name="P2"><text:span text:style-name="Strong_20_Emphasis">¿Por qué Dios anuncia las cosas antes de que sucedan?</text:span></text:p>
          <text:list>
            <text:list-item>
              <text:p text:style-name="P1"><text:span text:style-name="Emphasis">Respuesta:</text:span> <text:span text:style-name="Strong_20_Emphasis">Para que creamos cuando sucedan.</text:span> (Esto está directamente ligado a la profecía y el cumplimiento). </text:p>
            </text:list-item>
          </text:list>
        </text:list-item>
      </text:list>
      <text:p text:style-name="Text_20_body"><text:span text:style-name="Strong_20_Emphasis">Oración de apertura:</text:span></text:p>
      <text:p text:style-name="Quotations"><text:span text:style-name="Emphasis">"Santísimo Padre, Dios creador de todos los ángeles, de nosotros y de los Espíritus Santos, gracias por traernos hoy y guiarnos a la clase. Estamos viendo la importancia de las cosas básicas de la Biblia. Tú nos has dicho que somos inmaduros en tu palabra y estamos descubriendo que es verdad. Gracias por abrir nuestros ojos espirituales. Oramos por los estudiantes que no han podido venir; eres tú quien les abre el camino. Manda tus Espíritus Santos para que nos hagan más humildes para aceptar tu palabra, porque no importa cuántos años éramos cristianos, lo que depende es cuánta de tu verdad entendemos. En el nombre de Jesucristo. Amén."</text:span></text:p>
      <text:p text:style-name="Horizontal_20_Line"/>
      <text:h text:style-name="Heading_20_2" text:outline-level="2">🏫 2. La Metodología de Dios: Profecía y Realidad</text:h>
      <text:p text:style-name="Text_20_body"><text:span text:style-name="Emphasis">(A cargo del Instructor Sibiani)</text:span></text:p>
      <text:h text:style-name="Heading_20_3" text:outline-level="3"><text:soft-page-break/>📌 La Actitud ante la Palabra</text:h>
      <text:p text:style-name="Text_20_body">Estamos delante de la Palabra de Dios, por lo que nuestra actitud debe ser de reverencia. No estamos en un estudio cualquiera; Dios quiere revelarnos misterios y cosas profundas. No digamos <text:span text:style-name="Emphasis">"lo veo después"</text:span> o <text:span text:style-name="Emphasis">"estoy ocupado"</text:span>, porque sería como decirle a Dios que no tenemos tiempo para Él.</text:p>
      <text:h text:style-name="Heading_20_3" text:outline-level="3">🎯 El Tema Central: La Profecía y su Realidad</text:h>
      <text:p text:style-name="Text_20_body">La metodología que utiliza Dios para darse a conocer y demostrarnos que está vivo y obrando (no es un espectador pasivo) es la <text:span text:style-name="Strong_20_Emphasis">Profecía y su Cumplimiento (Realidad)</text:span>.</text:p>
      <text:list text:style-name="L2">
        <text:list-item>
          <text:p text:style-name="P4"><text:span text:style-name="Strong_20_Emphasis">La Ecuación Divina:</text:span> Profecía (Promesa) + Cumplimiento = <text:span text:style-name="Strong_20_Emphasis">Realidad</text:span>. </text:p>
        </text:list-item>
        <text:list-item>
          <text:p text:style-name="P3">No podemos tener una realidad sin profecía, ni una profecía sin realidad. Ambas actúan juntas para que Dios se haga conocer. </text:p>
        </text:list-item>
      </text:list>
      <text:h text:style-name="Heading_20_3" text:outline-level="3">🔤 Dios es el Alfa y la Omega</text:h>
      <text:p text:style-name="Text_20_body">Decimos que Dios es el principio y el fin. ¿Qué significa esto en la práctica?</text:p>
      <text:list text:style-name="L3">
        <text:list-item>
          <text:p text:style-name="P6"><text:span text:style-name="Strong_20_Emphasis">Alfa (El Principio):</text:span> Dios promete, profetiza y establece su plan desde el inicio. </text:p>
        </text:list-item>
        <text:list-item>
          <text:p text:style-name="P6"><text:span text:style-name="Strong_20_Emphasis">Omega (El Fin):</text:span> Dios termina cumpliendo <text:span text:style-name="Emphasis">exactamente</text:span> como lo predijo. </text:p>
        </text:list-item>
        <text:list-item>
          <text:p text:style-name="P5"><text:span text:style-name="Strong_20_Emphasis">Advertencia Solemne (Apocalipsis 22:18-19):</text:span> No debemos <text:span text:style-name="Strong_20_Emphasis">añadir</text:span> (agregar nuestros pensamientos) ni <text:span text:style-name="Strong_20_Emphasis">quitar</text:span> (ignorar el libro) de la profecía. ¿Por qué? Porque cuando Dios cumpla su promesa, lo hará exactamente como está escrito. Si alteramos la profecía, no podremos reconocer la realidad cuando aparezca. </text:p>
        </text:list-item>
      </text:list>
      <text:p text:style-name="Horizontal_20_Line"/>
      <text:h text:style-name="Heading_20_2" text:outline-level="2">📜 3. El Cumplimiento Específico: De Abraham a Moisés</text:h>
      <text:p text:style-name="Text_20_body">Dios no da promesas vagas; Sus promesas son sumamente específicas. Veamos el primer gran ejemplo de profecía y cumplimiento en el Antiguo Testamento.</text:p>
      <text:h text:style-name="Heading_20_3" text:outline-level="3">🤝 La Promesa a Abraham (Génesis 15:13-14)</text:h>
      <text:p text:style-name="Text_20_body">Dios le da a Abraham una promesa con detalles exactos, no una "oración genérica":</text:p>
      <text:list text:style-name="L4">
        <text:list-item>
          <text:p text:style-name="P8">Su descendencia sería numerosa (como las estrellas). </text:p>
        </text:list-item>
        <text:list-item>
          <text:p text:style-name="P8">Morarían en <text:span text:style-name="Strong_20_Emphasis">tierra ajena</text:span> (gentil). </text:p>
        </text:list-item>
        <text:list-item>
          <text:p text:style-name="P8">Serían <text:span text:style-name="Strong_20_Emphasis">esclavos y oprimidos</text:span>. </text:p>
        </text:list-item>
        <text:list-item>
          <text:p text:style-name="P8">El tiempo específico sería <text:span text:style-name="Strong_20_Emphasis">400 años</text:span>. </text:p>
        </text:list-item>
        <text:list-item>
          <text:p text:style-name="P8">Dios <text:span text:style-name="Strong_20_Emphasis">juzgaría</text:span> a la nación que los esclavizaría. </text:p>
        </text:list-item>
        <text:list-item>
          <text:p text:style-name="P7">Después de esto, <text:span text:style-name="Strong_20_Emphasis">saldrían con gran riqueza</text:span>. </text:p>
        </text:list-item>
      </text:list>
      <text:h text:style-name="Heading_20_3" text:outline-level="3">✨ El Cumplimiento en el Éxodo (Éxodo 12:29, 36-37, 40-41)</text:h>
      <text:p text:style-name="Text_20_body"><text:span text:style-name="Strong_20_Emphasis">Seis generaciones después</text:span>, Dios cumple cada detalle:</text:p>
      <text:list text:style-name="L5">
        <text:list-item>
          <text:p text:style-name="P10"><text:span text:style-name="Strong_20_Emphasis">El Juicio:</text:span> Dios hiere a todo primogénito en Egipto. </text:p>
        </text:list-item>
        <text:list-item>
          <text:p text:style-name="P10"><text:span text:style-name="Strong_20_Emphasis">La Riqueza:</text:span> Los egipcios, desesperados por las plagas, les dieron cuanto pidieron. <text:span text:style-name="Emphasis">"Despojaron a los egipcios"</text:span>. </text:p>
        </text:list-item>
        <text:list-item>
          <text:p text:style-name="P10"><text:soft-page-break/><text:span text:style-name="Strong_20_Emphasis">El Tiempo:</text:span> Habitaron en Egipto 430 años. <text:span text:style-name="Emphasis">"En el mismo día, todas las huestes de Jehová salieron"</text:span>. </text:p>
        </text:list-item>
        <text:list-item>
          <text:p text:style-name="P9"><text:span text:style-name="Emphasis">Reflexión:</text:span> Si Faraón los hubiera dejado ir a la primera, no les habrían dado riquezas. Dios endureció el corazón de Faraón y envió las plagas con un propósito mayor: <text:span text:style-name="Strong_20_Emphasis">cumplir Su profecía al pie de la letra</text:span>. </text:p>
        </text:list-item>
      </text:list>
      <text:p text:style-name="Horizontal_20_Line"/>
      <text:h text:style-name="Heading_20_2" text:outline-level="2">✝️ 4. Las Profecías del Antiguo Testamento y la Primera Venida</text:h>
      <text:p text:style-name="Text_20_body">Toda la ley de Moisés, los profetas y los salmos testificaban sobre Jesús (Lucas 24:25-27, 44). Sin embargo, los judíos no lo reconocieron porque no entendieron que la ley era solo una <text:span text:style-name="Strong_20_Emphasis">"sombra de los bienes venideros"</text:span> (Hebreos 10:1).</text:p>
      <text:p text:style-name="Text_20_body">A continuación, vemos cómo Jesús cumplió profecías específicas para validar que Él era la "Realidad":</text:p>
      <text:h text:style-name="Heading_20_3" text:outline-level="3">🗣️ 1. La Certeza de la Palabra de Dios</text:h>
      <text:p text:style-name="Quotations"><text:span text:style-name="Emphasis">"Ciertamente se hará de la manera que lo he pensado, y será confirmado como lo he determinado... Anunció lo por venir desde el principio... Mi consejo permanecerá, y haré todo lo que quiero."</text:span> — <text:span text:style-name="Strong_20_Emphasis">Isaías 14:24 / 46:10</text:span></text:p>
      <text:list text:style-name="L6">
        <text:list-item>
          <text:p text:style-name="P11">Dios no es como el hombre que cambia de opinión o no cumple sus "resoluciones de año nuevo". Si Dios lo determina, se cumple sí o sí. </text:p>
        </text:list-item>
      </text:list>
      <text:h text:style-name="Heading_20_3" text:outline-level="3">🍷 2. El Vinagre en la Cruz</text:h>
      <text:list text:style-name="L7">
        <text:list-item>
          <text:p text:style-name="P13"><text:span text:style-name="Strong_20_Emphasis">Profecía (Salmos 69:21):</text:span> <text:span text:style-name="Emphasis">"En mi sed me dieron a beber vinagre"</text:span>. </text:p>
        </text:list-item>
        <text:list-item>
          <text:p text:style-name="P12"><text:span text:style-name="Strong_20_Emphasis">Cumplimiento (Juan 19:28-30):</text:span> Jesús, sabiendo que todo estaba consumado, dijo <text:span text:style-name="Emphasis">"Tengo sed"</text:span> para que la Escritura se cumpliese. Tomó el vinagre y declaró: <text:span text:style-name="Strong_20_Emphasis">"Consumado es"</text:span> (Hecho está). No fue por casualidad ni solo por sed física; fue para sellar el cumplimiento. </text:p>
        </text:list-item>
      </text:list>
      <text:h text:style-name="Heading_20_3" text:outline-level="3">👶 3. Nacimiento de una Virgen</text:h>
      <text:list text:style-name="L8">
        <text:list-item>
          <text:p text:style-name="P15"><text:span text:style-name="Strong_20_Emphasis">Profecía (Isaías 7:14):</text:span> <text:span text:style-name="Emphasis">"He aquí que la virgen concebirá... y llamará su nombre Emanuel"</text:span>. (700 años antes). </text:p>
        </text:list-item>
        <text:list-item>
          <text:p text:style-name="P14"><text:span text:style-name="Strong_20_Emphasis">Cumplimiento (Mateo 1:21-23):</text:span> El ángel anuncia a María que tendrá un hijo llamado <text:span text:style-name="Strong_20_Emphasis">Jesús</text:span> (Salvador). Aunque la profecía decía "Emanuel" (Dios con nosotros), la realidad se llamó Jesús, cumpliendo que Dios estaba literalmente con su pueblo a través de Él. </text:p>
        </text:list-item>
      </text:list>
      <text:h text:style-name="Heading_20_3" text:outline-level="3">📍 4. Nacimiento en Belén</text:h>
      <text:list text:style-name="L9">
        <text:list-item>
          <text:p text:style-name="P17"><text:span text:style-name="Strong_20_Emphasis">Profecía (Miqueas 5:2 / Mateo 2:5-6):</text:span> <text:span text:style-name="Emphasis">"Tú, Belén Efrata... de ti me saldrá el que será Señor en Israel"</text:span>. </text:p>
        </text:list-item>
        <text:list-item>
          <text:p text:style-name="P16"><text:span text:style-name="Strong_20_Emphasis">Cumplimiento (Lucas 2):</text:span> Debido al censo del César, José y María viajan a su ciudad natal, Belén. Jesús no nació en Jerusalén (la ciudad digna) ni en Galilea, sino en un pueblo pequeño, <text:span text:style-name="Strong_20_Emphasis">porque estaba profetizado</text:span>. </text:p>
        </text:list-item>
      </text:list>
      <text:h text:style-name="Heading_20_3" text:outline-level="3"><text:soft-page-break/>🌅 5. Ministerio en Galilea de los Gentiles</text:h>
      <text:list text:style-name="L10">
        <text:list-item>
          <text:p text:style-name="P19"><text:span text:style-name="Strong_20_Emphasis">Profecía (Isaías 9:1-2):</text:span> <text:span text:style-name="Emphasis">"El pueblo que andaba en tinieblas vio gran luz... en Galilea de los gentiles"</text:span>. </text:p>
        </text:list-item>
        <text:list-item>
          <text:p text:style-name="P18"><text:span text:style-name="Strong_20_Emphasis">Cumplimiento (Mateo 4:12-16):</text:span> Jesús deja Nazaret y se habita en Capernaum (zona de Zabulón y Neftalí, considerada "gentil" y oscura por los judíos). <text:span text:style-name="Strong_20_Emphasis">La Realidad de esa "gran luz" fue Jesús y Sus palabras</text:span>, trayendo vida a los que estaban en tinieblas espirituales. </text:p>
        </text:list-item>
      </text:list>
      <text:h text:style-name="Heading_20_3" text:outline-level="3">📢 6. Predicación de las Buenas Nuevas</text:h>
      <text:list text:style-name="L11">
        <text:list-item>
          <text:p text:style-name="P21"><text:span text:style-name="Strong_20_Emphasis">Profecía (Isaías 61:1-2):</text:span> <text:span text:style-name="Emphasis">"El espíritu de Jehová... me ha enviado a predicar buenas nuevas a los abatidos... a pregonar libertad a los cautivos"</text:span>. </text:p>
        </text:list-item>
        <text:list-item>
          <text:p text:style-name="P20"><text:span text:style-name="Strong_20_Emphasis">Cumplimiento (Lucas 4:17-21):</text:span> En la sinagoga, Jesús lee este rollo de Isaías y dice: <text:span text:style-name="Strong_20_Emphasis">"Hoy se ha cumplido esta escritura delante de vosotros"</text:span>. Él era la persona ungida para dar libertad a través de Sus palabras. </text:p>
        </text:list-item>
      </text:list>
      <text:h text:style-name="Heading_20_3" text:outline-level="3">✝️ 7. El Sacrificio Perfecto (La Cruz)</text:h>
      <text:list text:style-name="L12">
        <text:list-item>
          <text:p text:style-name="P23"><text:span text:style-name="Strong_20_Emphasis">Profecía (Salmos 40:6-8 / 22:18):</text:span> <text:span text:style-name="Emphasis">"Sacrificio y ofrenda no te agrada... He aquí vengo... para hacer tu voluntad"</text:span>. Y <text:span text:style-name="Emphasis">"Partieron entre sí mis vestidos"</text:span>. </text:p>
        </text:list-item>
        <text:list-item>
          <text:p text:style-name="P22"><text:span text:style-name="Strong_20_Emphasis">Cumplimiento (Hebreos 10:1-10):</text:span> La sangre de toros no podía quitar pecados. Dios preparó un <text:span text:style-name="Strong_20_Emphasis">cuerpo</text:span> (Jesús) para hacer Su voluntad. La ofrenda del cuerpo de Jesucristo fue hecha <text:span text:style-name="Strong_20_Emphasis">una vez para siempre</text:span>, santificándonos. </text:p>
        </text:list-item>
      </text:list>
      <text:p text:style-name="Horizontal_20_Line"/>
      <text:h text:style-name="Heading_20_2" text:outline-level="2">🛡️ 5. La Actitud del Creyente ante la Revelación</text:h>
      <text:h text:style-name="Heading_20_3" text:outline-level="3">⚠️ El Peligro de no Entender el Cumplimiento</text:h>
      <text:p text:style-name="Text_20_body">Los judíos memorizaban las Escrituras, pero cuando la "Realidad" (Jesús) apareció frente a sus ojos, no lo reconocieron porque estaban cegados por sus tradiciones y no entendían que la ley era una sombra que apuntaba a Cristo.</text:p>
      <text:list text:style-name="L13">
        <text:list-item>
          <text:p text:style-name="P25"><text:span text:style-name="Strong_20_Emphasis">La Lección para nosotros:</text:span> Nosotros tenemos las profecías del Nuevo Testamento (Apocalipsis). Si las leemos pero no abrimos el corazón para entenderlas, cuando aparezca la Realidad en la Segunda Venida, cometeremos el mismo error que los fariseos. </text:p>
        </text:list-item>
        <text:list-item>
          <text:p text:style-name="P24"><text:span text:style-name="Strong_20_Emphasis">El Llamado:</text:span> No multitarea durante la clase. No le digas a Dios <text:span text:style-name="Emphasis">"estoy ocupado, después te hago caso"</text:span>. Dios quiere revelarte los misterios del reino para que puedas guardar tu pacto. </text:p>
        </text:list-item>
      </text:list>
      <text:p text:style-name="Horizontal_20_Line"/>
      <text:h text:style-name="Heading_20_2" text:outline-level="2">🔄 6. Repaso Final y Oración de Cierre</text:h>
      <text:p text:style-name="Text_20_body"><text:span text:style-name="Emphasis">(A cargo del Evangelista Christian Howard)</text:span></text:p>
      <text:p text:style-name="Text_20_body"><text:span text:style-name="Strong_20_Emphasis">Resumen de las 5 Profecías Clave de Jesús vistas hoy:</text:span></text:p>
      <text:list text:style-name="L14">
        <text:list-item>
          <text:p text:style-name="P27"><text:span text:style-name="Strong_20_Emphasis">Nacería de una virgen</text:span> (Isaías 7:14 ➡️ Mateo 1). </text:p>
        </text:list-item>
        <text:list-item>
          <text:p text:style-name="P27"><text:span text:style-name="Strong_20_Emphasis">Nacería en Belén</text:span> (Miqueas/Mateo 2). </text:p>
        </text:list-item>
        <text:list-item>
          <text:p text:style-name="P27"><text:span text:style-name="Strong_20_Emphasis">Predicaría en Galilea</text:span> (Isaías 9 ➡️ Mateo 4). </text:p>
        </text:list-item>
        <text:list-item>
          <text:p text:style-name="P27"><text:soft-page-break/><text:span text:style-name="Strong_20_Emphasis">Anunciaría las buenas nuevas / libertad</text:span> (Isaías 61 ➡️ Lucas 4). </text:p>
        </text:list-item>
        <text:list-item>
          <text:p text:style-name="P26"><text:span text:style-name="Strong_20_Emphasis">Moriría en la cruz / Sufriría</text:span> (Salmos 22, 40 ➡️ Juan 19, Hebreos 10). </text:p>
        </text:list-item>
      </text:list>
      <text:p text:style-name="Text_20_body"><text:span text:style-name="Strong_20_Emphasis">Conclusión del Evangelista:</text:span> El cumplimiento de la profecía no es solo para saber historia; nos enseña que <text:span text:style-name="Strong_20_Emphasis">Dios está vivo, está trabajando y va a cumplir todo lo del futuro</text:span>. Esto fortalece nuestra fe para creer en Sus promesas futuras.</text:p>
      <text:p text:style-name="Text_20_body"><text:span text:style-name="Strong_20_Emphasis">Oración de Cierre (El Padre Nuestro):</text:span></text:p>
      <text:p text:style-name="Quotations"><text:span text:style-name="Emphasis">"Padre nuestro que estás en los cielos, santificado sea tu nombre. Venga a nosotros tu reino, hágase tu voluntad en la tierra como en el cielo. Danos hoy nuestro pan de cada día. Perdona nuestras ofensas, como también nosotros perdonamos a nuestros ofensores. No nos dejes caer en la tentación, mas líbranos del mal. Porque tuyo es el reino, el poder y la gloria por los siglos de los siglos. Amén."</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1T14:30:57.779605864</meta:creation-date>
    <dc:date>2026-06-11T14:35:31.643153585</dc:date>
    <meta:editing-duration>PT4M34S</meta:editing-duration>
    <meta:editing-cycles>1</meta:editing-cycles>
    <meta:document-statistic meta:table-count="0" meta:image-count="0" meta:object-count="0" meta:page-count="5" meta:paragraph-count="86" meta:word-count="1600" meta:character-count="9384" meta:non-whitespace-character-count="7874"/>
    <meta:generator>LibreOffice/24.2.7.2$Linux_X86_64 LibreOffice_project/420$Build-2</meta:generator>
  </office:meta>
</office:document-meta>
</file>