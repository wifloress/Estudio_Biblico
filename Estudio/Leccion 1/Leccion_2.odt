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dauk Book" svg:font-family="'Padauk Book'" style:font-pitch="variable"/>
  </office:font-face-decls>
  <office:automatic-styles>
    <style:style style:name="P1" style:family="paragraph" style:parent-style-name="Heading_20_1">
      <style:text-properties style:font-name="Padauk Book"/>
    </style:style>
    <style:style style:name="P2" style:family="paragraph" style:parent-style-name="Heading_20_2">
      <style:text-properties style:font-name="Padauk Book"/>
    </style:style>
    <style:style style:name="P3" style:family="paragraph" style:parent-style-name="Heading_20_3">
      <style:text-properties style:font-name="Padauk Book"/>
    </style:style>
    <style:style style:name="P4" style:family="paragraph" style:parent-style-name="Horizontal_20_Line">
      <style:text-properties style:font-name="Padauk Book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>
      <style:text-properties style:font-name="Padauk Book"/>
    </style:style>
    <style:style style:name="P29" style:family="paragraph" style:parent-style-name="Text_20_body" style:list-style-name="L4">
      <style:paragraph-properties fo:margin-top="0cm" fo:margin-bottom="0cm" style:contextual-spacing="false"/>
      <style:text-properties style:font-name="Padauk Book"/>
    </style:style>
    <style:style style:name="P30" style:family="paragraph" style:parent-style-name="Text_20_body" style:list-style-name="L4">
      <style:text-properties style:font-name="Padauk Book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style:font-name="Padauk Book"/>
    </style:style>
    <style:style style:name="P32" style:family="paragraph" style:parent-style-name="Text_20_body" style:list-style-name="L6">
      <style:text-properties style:font-name="Padauk Book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style:font-name="Padauk Book"/>
    </style:style>
    <style:style style:name="P34" style:family="paragraph" style:parent-style-name="Text_20_body" style:list-style-name="L8">
      <style:text-properties style:font-name="Padauk Book"/>
    </style:style>
    <style:style style:name="P35" style:family="paragraph" style:parent-style-name="Text_20_body" style:list-style-name="L15">
      <style:text-properties style:font-name="Padauk Book"/>
    </style:style>
    <style:style style:name="T1" style:family="text">
      <style:text-properties style:font-name="Padauk Book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📖 CUADERNO DE ESTUDIO: LECCIÓN 1 (PARTE 2)</text:h>
      <text:h text:style-name="P2" text:outline-level="2">Los Dos Dioses: La Obra en el Mundo Físico y el Discernimiento</text:h>
      <text:p text:style-name="P4"/>
      <text:h text:style-name="P2" text:outline-level="2">🔄 1. Repaso Interactivo y Oración de Apertura</text:h>
      <text:p text:style-name="Text_20_body"><text:span text:style-name="Emphasis"><text:span text:style-name="T1">(A cargo del Evangelista Christian Howard)</text:span></text:span></text:p>
      <text:p text:style-name="P28">Antes de iniciar la segunda parte de la lección, realizamos un repaso interactivo para asegurar que los conceptos de la Parte 1 fueron comprendidos:</text:p>
      <text:p text:style-name="Text_20_body"><text:span text:style-name="Strong_20_Emphasis"><text:span text:style-name="T1">Preguntas de Reflexión y Respuestas:</text:span></text:span></text:p>
      <text:list text:style-name="L1">
        <text:list-item>
          <text:p text:style-name="P6"><text:span text:style-name="Strong_20_Emphasis"><text:span text:style-name="T1">¿Qué opción NO se refiere a Dios?</text:span></text:span></text:p>
          <text:list>
            <text:list-item>
              <text:p text:style-name="P6"><text:span text:style-name="Emphasis"><text:span text:style-name="T1">Respuesta:</text:span></text:span><text:span text:style-name="T1"> </text:span><text:span text:style-name="Strong_20_Emphasis"><text:span text:style-name="T1">C) La creación</text:span></text:span><text:span text:style-name="T1">. (Dios es el Creador, no una creación). </text:span></text:p>
            </text:list-item>
          </text:list>
        </text:list-item>
        <text:list-item>
          <text:p text:style-name="P6"><text:span text:style-name="Strong_20_Emphasis"><text:span text:style-name="T1">¿Qué opción NO se refiere a Satanás?</text:span></text:span></text:p>
          <text:list>
            <text:list-item>
              <text:p text:style-name="P6"><text:span text:style-name="Emphasis"><text:span text:style-name="T1">Respuesta:</text:span></text:span><text:span text:style-name="T1"> </text:span><text:span text:style-name="Strong_20_Emphasis"><text:span text:style-name="T1">A) Dios hizo a Satanás malo desde el principio</text:span></text:span><text:span text:style-name="T1">. (Dios lo creó perfecto, pero su orgullo lo corrompió). </text:span></text:p>
            </text:list-item>
          </text:list>
        </text:list-item>
        <text:list-item>
          <text:p text:style-name="P6"><text:span text:style-name="Strong_20_Emphasis"><text:span text:style-name="T1">¿Qué significa "Yo soy" en Éxodo 3:14?</text:span></text:span></text:p>
          <text:list>
            <text:list-item>
              <text:p text:style-name="P6"><text:span text:style-name="Emphasis"><text:span text:style-name="T1">Respuesta:</text:span></text:span><text:span text:style-name="T1"> </text:span><text:span text:style-name="Strong_20_Emphasis"><text:span text:style-name="T1">B) Dios existe por sí mismo</text:span></text:span><text:span text:style-name="T1">. (Es autoexistente, nadie lo creó). </text:span></text:p>
            </text:list-item>
          </text:list>
        </text:list-item>
        <text:list-item>
          <text:p text:style-name="P6"><text:span text:style-name="Strong_20_Emphasis"><text:span text:style-name="T1">¿Cuál fue la causa de la caída de Satanás?</text:span></text:span></text:p>
          <text:list>
            <text:list-item>
              <text:p text:style-name="P6"><text:span text:style-name="Emphasis"><text:span text:style-name="T1">Respuesta:</text:span></text:span><text:span text:style-name="T1"> </text:span><text:span text:style-name="Strong_20_Emphasis"><text:span text:style-name="T1">C) El orgullo</text:span></text:span><text:span text:style-name="T1">. (Debemos tener cuidado de no caer en este mismo pecado). </text:span></text:p>
            </text:list-item>
          </text:list>
        </text:list-item>
        <text:list-item>
          <text:p text:style-name="P6"><text:span text:style-name="Strong_20_Emphasis"><text:span text:style-name="T1">¿Por qué es importante crecer espiritualmente según Hebreos 5:12-14?</text:span></text:span></text:p>
          <text:list>
            <text:list-item>
              <text:p text:style-name="P5"><text:span text:style-name="Emphasis"><text:span text:style-name="T1">Respuesta:</text:span></text:span><text:span text:style-name="T1"> Para alcanzar la madurez y tener los sentidos ejercitados en el </text:span><text:span text:style-name="Strong_20_Emphasis"><text:span text:style-name="T1">discernimiento entre el bien y el mal</text:span></text:span><text:span text:style-name="T1">. </text:span></text:p>
            </text:list-item>
          </text:list>
        </text:list-item>
      </text:list>
      <text:p text:style-name="Text_20_body"><text:span text:style-name="Strong_20_Emphasis"><text:span text:style-name="T1">Oración de apertura:</text:span></text:span></text:p>
      <text:p text:style-name="Quotations"><text:span text:style-name="Emphasis"><text:span text:style-name="T1">"Santísimo Padre Dios, gracias por esta oportunidad. Específicamente, estas lecciones tratan del bien y del mal en tu estándar. Tú eres el que dice qué es bueno y qué es malo. Ábreles los corazones y mentes a los estudiantes, manda tu Espíritu Santo para que entiendan tus palabras. Oramos por los que no han </text:span></text:span><text:soft-page-break/><text:span text:style-name="Emphasis"><text:span text:style-name="T1">podido venir por la electricidad o situaciones personales, ábreles el camino para que escuchen tu palabra. En el nombre de tu hijo precioso, Jesucristo. Amén."</text:span></text:span></text:p>
      <text:p text:style-name="P4"/>
      <text:h text:style-name="P2" text:outline-level="2">🏫 2. Bienvenida y la Naturaleza del Engaño</text:h>
      <text:p text:style-name="Text_20_body"><text:span text:style-name="Emphasis"><text:span text:style-name="T1">(A cargo del Instructor Sibiani)</text:span></text:span></text:p>
      <text:h text:style-name="P3" text:outline-level="3">📌 Recordatorios de Etiqueta y Estudio</text:h>
      <text:list text:style-name="L2">
        <text:list-item>
          <text:p text:style-name="P8"><text:span text:style-name="Strong_20_Emphasis"><text:span text:style-name="T1">Actitud de Respeto:</text:span></text:span><text:span text:style-name="T1"> Estamos delante de la Palabra de Dios, no de la palabra del hombre. Mantengan la cámara encendida (si las circunstancias lo permiten) y la Biblia abierta. </text:span></text:p>
        </text:list-item>
        <text:list-item>
          <text:p text:style-name="P7"><text:span text:style-name="Strong_20_Emphasis"><text:span text:style-name="T1">El Método de las 3 Veces:</text:span></text:span><text:span text:style-name="T1"> Se recomienda ver los videos de la lección al menos tres veces ("la tercera es la vencida") y repasar los apuntes para responder las preguntas de reflexión. </text:span></text:p>
        </text:list-item>
      </text:list>
      <text:h text:style-name="P3" text:outline-level="3">🎭 Aclaración del Título: "Los dos dioses"</text:h>
      <text:p text:style-name="Text_20_body"><text:span text:style-name="T1">El título no significa que existan dos Dioses verdaderos, ni que Satanás sea igual a Dios. El punto clave es que </text:span><text:span text:style-name="Strong_20_Emphasis"><text:span text:style-name="T1">Satanás actúa como un dios (con "d" minúscula)</text:span></text:span><text:span text:style-name="T1">. </text:span></text:p>
      <text:list text:style-name="L3">
        <text:list-item>
          <text:p text:style-name="P10"><text:span text:style-name="Strong_20_Emphasis"><text:span text:style-name="T1">El Gran Engaño:</text:span></text:span><text:span text:style-name="T1"> Satanás engaña a las personas para que crean que él es Dios, poniéndose en el lugar de Dios. </text:span></text:p>
        </text:list-item>
        <text:list-item>
          <text:p text:style-name="P9"><text:span text:style-name="Strong_20_Emphasis"><text:span text:style-name="T1">El Ejemplo de la Primera Venida:</text:span></text:span><text:span text:style-name="T1"> En Jerusalén, todos los creyentes (fariseos, escribas) estudiaban a Dios y creían que le adoraban. Sin embargo, Jesús les dijo: </text:span><text:span text:style-name="Emphasis"><text:span text:style-name="T1">"Vosotros sois de vuestro padre, el diablo"</text:span></text:span><text:span text:style-name="T1"> (Juan 8:44). Al no conocer la Palabra de Dios ni entender cómo obraba, terminaron adorando a Satanás sin darse cuenta. </text:span></text:p>
        </text:list-item>
      </text:list>
      <text:p text:style-name="Text_20_body"><text:span text:style-name="Strong_20_Emphasis"><text:span text:style-name="T1">¿Cómo conocemos realmente a alguien?</text:span></text:span><text:span text:style-name="T1"> No podemos conocer a una persona (o a Dios) por su apariencia física o haciendo suposiciones ("a Dios le debe gustar esto"). La única forma de conocer a alguien es </text:span><text:span text:style-name="Strong_20_Emphasis"><text:span text:style-name="T1">escuchando lo que dice</text:span></text:span><text:span text:style-name="T1">. Para conocer a Dios, debemos escuchar y guardar Sus palabras.</text:span></text:p>
      <text:p text:style-name="P4"/>
      <text:h text:style-name="P2" text:outline-level="2"><text:soft-page-break/>⛪ 3. El Territorio de Operación de Satanás</text:h>
      <text:h text:style-name="P3" text:outline-level="3">¿Dónde trabaja Satanás en el mundo físico?</text:h>
      <text:p text:style-name="Text_20_body"><text:span text:style-name="T1">Satanás no trabaja solo en "iglesias satánicas" o en religiones lejanas. Su obra más eficiente es </text:span><text:span text:style-name="Strong_20_Emphasis"><text:span text:style-name="T1">dentro del templo de Dios</text:span></text:span><text:span text:style-name="T1">.</text:span></text:p>
      <text:list text:style-name="L4">
        <text:list-item>
          <text:p text:style-name="P11"><text:span text:style-name="Strong_20_Emphasis"><text:span text:style-name="T1">2 Tesalonicenses 2:4:</text:span></text:span><text:span text:style-name="T1"> </text:span><text:span text:style-name="Emphasis"><text:span text:style-name="T1">"El cual se opone y se levanta contra todo lo que se llama Dios... tanto que se sienta en el templo de Dios como Dios, haciéndose pasar por Dios"</text:span></text:span><text:span text:style-name="T1">.</text:span></text:p>
          <text:list>
            <text:list-item>
              <text:p text:style-name="P29">Satanás actúa como un espía dentro de la iglesia. No se presenta con tridente y cachos, sino disfrazado de creyente. </text:p>
            </text:list-item>
          </text:list>
        </text:list-item>
        <text:list-item>
          <text:p text:style-name="P11"><text:span text:style-name="Strong_20_Emphasis"><text:span text:style-name="T1">Mateo 23:2:</text:span></text:span><text:span text:style-name="T1"> </text:span><text:span text:style-name="Emphasis"><text:span text:style-name="T1">"En la cátedra de Moisés se sientan los escribas y los fariseos"</text:span></text:span><text:span text:style-name="T1">.</text:span></text:p>
          <text:list>
            <text:list-item>
              <text:p text:style-name="P30">La cátedra de Moisés era la posición de autoridad para guiar al pueblo con la Palabra de Dios. Sin embargo, los que estaban sentados allí (los fariseos) no tenían la verdad; estaban operados por el espíritu de Satanás. </text:p>
            </text:list-item>
          </text:list>
        </text:list-item>
      </text:list>
      <text:p text:style-name="Text_20_body"><text:span text:style-name="Strong_20_Emphasis"><text:span text:style-name="T1">Pregunta para reflexionar:</text:span></text:span><text:span text:style-name="T1"> ¿Dónde está trabajando Satanás hoy en 2026?</text:span></text:p>
      <text:list text:style-name="L5">
        <text:list-item>
          <text:p text:style-name="P31">Obviamente trabaja fuera de la iglesia (en el mundo, en otras religiones, en el ateísmo). </text:p>
        </text:list-item>
        <text:list-item>
          <text:p text:style-name="P12"><text:span text:style-name="T1">Pero </text:span><text:span text:style-name="Strong_20_Emphasis"><text:span text:style-name="T1">también trabaja DENTRO de la Iglesia</text:span></text:span><text:span text:style-name="T1">, entre los creyentes que dicen creer en Dios. Por eso es vital distinguir entre el bien y el mal. </text:span></text:p>
        </text:list-item>
      </text:list>
      <text:p text:style-name="P4"/>
      <text:h text:style-name="P2" text:outline-level="2">🔍 4. Cómo Probar los Espíritus</text:h>
      <text:p text:style-name="P28">El apóstol Juan nos da una advertencia clara:</text:p>
      <text:p text:style-name="Quotations"><text:span text:style-name="Emphasis"><text:span text:style-name="T1">"Amados, no creáis a todo espíritu, sino probad los espíritus si son de Dios, porque muchos falsos profetas han salido por el mundo".</text:span></text:span><text:span text:style-name="T1"> — </text:span><text:span text:style-name="Strong_20_Emphasis"><text:span text:style-name="T1">1 Juan 4:1</text:span></text:span></text:p>
      <text:h text:style-name="P3" text:outline-level="3">¿Cómo probamos un espíritu si no podemos verlo?</text:h>
      <text:p text:style-name="Text_20_body"><text:span text:style-name="T1">No podemos ver aureolas ni cachos, ni usar una máquina para detectar espíritus. La respuesta está en </text:span><text:span text:style-name="Strong_20_Emphasis"><text:span text:style-name="T1">Juan 6:63</text:span></text:span><text:span text:style-name="T1">:</text:span></text:p>
      <text:p text:style-name="Quotations"><text:span text:style-name="Emphasis"><text:span text:style-name="T1">"El espíritu es el que da vida; la carne para nada aprovecha; </text:span></text:span><text:span text:style-name="Emphasis"><text:span text:style-name="Strong_20_Emphasis"><text:span text:style-name="T1">las palabras que yo os he hablado son espíritu y son vida</text:span></text:span></text:span><text:span text:style-name="Emphasis"><text:span text:style-name="T1">."</text:span></text:span></text:p>
      <text:list text:style-name="L6">
        <text:list-item>
          <text:p text:style-name="P13"><text:span text:style-name="Strong_20_Emphasis"><text:span text:style-name="T1">La Ecuación Divina:</text:span></text:span><text:span text:style-name="T1"> Palabras = Espíritu. </text:span></text:p>
        </text:list-item>
        <text:list-item>
          <text:p text:style-name="P13"><text:soft-page-break/><text:span text:style-name="Strong_20_Emphasis"><text:span text:style-name="T1">El Método de Discernimiento:</text:span></text:span><text:span text:style-name="T1"> Para probar qué espíritu opera en una persona, debemos </text:span><text:span text:style-name="Strong_20_Emphasis"><text:span text:style-name="T1">escuchar las palabras que salen de su boca</text:span></text:span><text:span text:style-name="T1">. </text:span></text:p>
        </text:list-item>
        <text:list-item>
          <text:p text:style-name="P32">Si las palabras son del cielo (profecía, misterios del reino, cumplimiento), es el Espíritu de Dios. Si las palabras son terrenales o deseos humanos, es un espíritu de engaño. </text:p>
        </text:list-item>
      </text:list>
      <text:p text:style-name="P4"/>
      <text:h text:style-name="P2" text:outline-level="2">⚖️ 5. Los Dos Estándares: Verdad vs. Mentira</text:h>
      <text:p text:style-name="P28">En el mundo físico, los espíritus descienden sobre personas (pastores). Esto crea dos lados:</text:p>
      <text:list text:style-name="L7">
        <text:list-item>
          <text:p text:style-name="P15"><text:span text:style-name="Strong_20_Emphasis"><text:span text:style-name="T1">Lado de Dios:</text:span></text:span><text:span text:style-name="T1"> Espíritu de Verdad ➡️ Pastor Verdadero ➡️ Vida. </text:span></text:p>
        </text:list-item>
        <text:list-item>
          <text:p text:style-name="P14"><text:span text:style-name="Strong_20_Emphasis"><text:span text:style-name="T1">Lado de Satanás:</text:span></text:span><text:span text:style-name="T1"> Espíritu de Engaño ➡️ Pastor Falso ➡️ Muerte. </text:span></text:p>
        </text:list-item>
      </text:list>
      <text:p text:style-name="P28">Nosotros estamos en el medio, escuchando a ambos. ¿Cuál es el estándar para distinguirlos?</text:p>
      <text:h text:style-name="P3" text:outline-level="3">❌ Estándares Humanos (No sirven)</text:h>
      <text:list text:style-name="L8">
        <text:list-item>
          <text:p text:style-name="P33">El tamaño o la belleza del edificio de la iglesia. </text:p>
        </text:list-item>
        <text:list-item>
          <text:p text:style-name="P33">La fama mundial o el respeto (ej. iglesias famosas como Hillsong). </text:p>
        </text:list-item>
        <text:list-item>
          <text:p text:style-name="P34">Títulos académicos o grados de seminarios teológicos. </text:p>
        </text:list-item>
      </text:list>
      <text:h text:style-name="P3" text:outline-level="3">✅ El Único Estándar de Dios</text:h>
      <text:p text:style-name="Quotations"><text:span text:style-name="Emphasis"><text:span text:style-name="T1">"Los que son de Dios, nos oyen... En esto conocemos el espíritu de verdad y el espíritu de error".</text:span></text:span><text:span text:style-name="T1"> — </text:span><text:span text:style-name="Strong_20_Emphasis"><text:span text:style-name="T1">1 Juan 4:6</text:span></text:span></text:p>
      <text:p text:style-name="Text_20_body"><text:span text:style-name="T1">El estándar es </text:span><text:span text:style-name="Strong_20_Emphasis"><text:span text:style-name="T1">la Palabra de Dios</text:span></text:span><text:span text:style-name="T1">. No importa si la iglesia es grande o pequeña; lo que importa es si lo que se predica está acorde a la verdad bíblica.</text:span></text:p>
      <text:p text:style-name="P4"/>
      <text:h text:style-name="P2" text:outline-level="2">⚙️ 6. Metodología de Dios vs. Metodología de Satanás</text:h>
      <text:h text:style-name="P3" text:outline-level="3">✅ La Obra de Dios en el Mundo Físico</text:h>
      <text:list text:style-name="L9">
        <text:list-item>
          <text:p text:style-name="P17"><text:span text:style-name="Strong_20_Emphasis"><text:span text:style-name="T1">Transmite su Palabra a través de la carne (su pastor verdadero).</text:span></text:span><text:span text:style-name="T1"> Dios no suele hablar desde el cielo directamente a las multitudes; elige a un mensajero (como hizo con Moisés, Jesús y los 12 discípulos). </text:span></text:p>
        </text:list-item>
        <text:list-item>
          <text:p text:style-name="P17"><text:span text:style-name="Strong_20_Emphasis"><text:span text:style-name="T1">Profetiza y Cumple.</text:span></text:span><text:span text:style-name="T1"> Dios nunca miente. Si Él promete algo, lo cumple exactamente en el debido tiempo.</text:span></text:p>
          <text:list>
            <text:list-item>
              <text:p text:style-name="P17"><text:soft-page-break/><text:span text:style-name="Emphasis"><text:span text:style-name="T1">Juan 17:3:</text:span></text:span><text:span text:style-name="T1"> La vida eterna es conocer al único Dios verdadero y a Jesucristo (el enviado). </text:span></text:p>
            </text:list-item>
            <text:list-item>
              <text:p text:style-name="P16"><text:span text:style-name="Emphasis"><text:span text:style-name="T1">Juan 3:32-34:</text:span></text:span><text:span text:style-name="T1"> El que Dios envió, habla las palabras de Dios. Y la Palabra de Dios es Verdad (Juan 17:17). </text:span></text:p>
            </text:list-item>
          </text:list>
        </text:list-item>
      </text:list>
      <text:h text:style-name="P3" text:outline-level="3">❌ La Obra de Satanás en el Mundo Físico</text:h>
      <text:list text:style-name="L10">
        <text:list-item>
          <text:p text:style-name="P19"><text:span text:style-name="Strong_20_Emphasis"><text:span text:style-name="T1">Su espíritu se une al pastor falso para hablar mentiras.</text:span></text:span><text:span text:style-name="T1"> Satanás tergiversa la Palabra de Dios. </text:span></text:p>
        </text:list-item>
        <text:list-item>
          <text:p text:style-name="P19"><text:span text:style-name="Strong_20_Emphasis"><text:span text:style-name="T1">Los falsos pastores se unen para perseguir al pastor enviado por Dios.</text:span></text:span></text:p>
          <text:list>
            <text:list-item>
              <text:p text:style-name="P19"><text:span text:style-name="Emphasis"><text:span text:style-name="T1">2 Corintios 11:13-15:</text:span></text:span><text:span text:style-name="T1"> Los falsos apóstoles se disfrazan como apóstoles de Cristo. Satanás se disfraza como </text:span><text:span text:style-name="Strong_20_Emphasis"><text:span text:style-name="T1">ángel de luz</text:span></text:span><text:span text:style-name="T1">. </text:span></text:p>
            </text:list-item>
            <text:list-item>
              <text:p text:style-name="P18"><text:span text:style-name="Emphasis"><text:span text:style-name="T1">Juan 8:44:</text:span></text:span><text:span text:style-name="T1"> Satanás es homicida, mentiroso y padre de mentira. Los fariseos no tenían la verdad en ellos, por eso hablaban mentiras sobre Jesús. </text:span></text:p>
            </text:list-item>
          </text:list>
        </text:list-item>
      </text:list>
      <text:p text:style-name="P4"/>
      <text:h text:style-name="P2" text:outline-level="2">📜 7. ¿Qué es la Verdad? Profecía y Cumplimiento</text:h>
      <text:p text:style-name="P28">La Biblia se divide en cuatro contenidos principales:</text:p>
      <text:list text:style-name="L11">
        <text:list-item>
          <text:p text:style-name="P21"><text:span text:style-name="Strong_20_Emphasis"><text:span text:style-name="T1">Historia</text:span></text:span><text:span text:style-name="T1"> (Fácil de entender, ya pasó). </text:span></text:p>
        </text:list-item>
        <text:list-item>
          <text:p text:style-name="P21"><text:span text:style-name="Strong_20_Emphasis"><text:span text:style-name="T1">Enseñanzas morales</text:span></text:span><text:span text:style-name="T1"> (Fáciles de entender, aunque difíciles de practicar). </text:span></text:p>
        </text:list-item>
        <text:list-item>
          <text:p text:style-name="P21"><text:span text:style-name="Strong_20_Emphasis"><text:span text:style-name="T1">Profecía</text:span></text:span><text:span text:style-name="T1"> (Difícil de entender, pero crucial). </text:span></text:p>
        </text:list-item>
        <text:list-item>
          <text:p text:style-name="P20"><text:span text:style-name="Strong_20_Emphasis"><text:span text:style-name="T1">Cumplimiento</text:span></text:span><text:span text:style-name="T1"> (La revelación de cómo Dios obra hoy). </text:span></text:p>
        </text:list-item>
      </text:list>
      <text:p text:style-name="Text_20_body"><text:span text:style-name="Strong_20_Emphasis"><text:span text:style-name="T1">¿Dónde está la Verdad que nos muestra el cielo?</text:span></text:span><text:span text:style-name="T1"> En la </text:span><text:span text:style-name="Strong_20_Emphasis"><text:span text:style-name="T1">Profecía y su Cumplimiento</text:span></text:span><text:span text:style-name="T1">. Si no entendemos la profecía, no podremos entender el cumplimiento, y viceversa.</text:span></text:p>
      <text:h text:style-name="P3" text:outline-level="3">Ejemplos de Profecías que debemos entender:</text:h>
      <text:list text:style-name="L12">
        <text:list-item>
          <text:p text:style-name="P23"><text:span text:style-name="Strong_20_Emphasis"><text:span text:style-name="T1">Mateo 24:29-31:</text:span></text:span><text:span text:style-name="T1"> </text:span><text:span text:style-name="Emphasis"><text:span text:style-name="T1">"El sol, la luna y las estrellas se oscurecerán y caerán"</text:span></text:span><text:span text:style-name="T1">. </text:span></text:p>
          <text:list>
            <text:list-item>
              <text:p text:style-name="P23"><text:span text:style-name="Emphasis"><text:span text:style-name="T1">Reflexión:</text:span></text:span><text:span text:style-name="T1"> Si fuera un evento físico literal, el sol y las estrellas son más grandes que la Tierra. Si cayeran físicamente, nadie sobreviviría. Pero el verso 31 dice que después de esto, Dios reunirá a los escogidos. ¿Cómo los reunirá si todos murieron? Esto nos prueba que el lenguaje es figurativo/espiritual y debemos entender su cumplimiento real. </text:span></text:p>
            </text:list-item>
          </text:list>
        </text:list-item>
        <text:list-item>
          <text:p text:style-name="P23"><text:span text:style-name="Strong_20_Emphasis"><text:span text:style-name="T1">Génesis 3:</text:span></text:span><text:span text:style-name="T1"> El árbol del conocimiento del bien y del mal, y el árbol de la vida. </text:span></text:p>
          <text:list>
            <text:list-item>
              <text:p text:style-name="P22"><text:span text:style-name="Emphasis"><text:span text:style-name="T1">Reflexión:</text:span></text:span><text:span text:style-name="T1"> ¿Cómo podemos evitar comer del árbol prohibido o comer del árbol de la vida si no sabemos qué significan estas cosas en la actualidad? </text:span></text:p>
            </text:list-item>
          </text:list>
        </text:list-item>
      </text:list>
      <text:p text:style-name="P4"><text:soft-page-break/></text:p>
      <text:h text:style-name="P2" text:outline-level="2">🛡️ 8. El Estándar de la Fe y Conclusión</text:h>
      <text:h text:style-name="P3" text:outline-level="3">Escoge la Vida</text:h>
      <text:p text:style-name="Quotations"><text:span text:style-name="Emphasis"><text:span text:style-name="T1">"A la vida y a la muerte he puesto delante... escoge, pues, la vida, para que vivas tú y tu descendencia".</text:span></text:span><text:span text:style-name="T1"> — </text:span><text:span text:style-name="Strong_20_Emphasis"><text:span text:style-name="T1">Deuteronomio 30:19</text:span></text:span></text:p>
      <text:p text:style-name="Text_20_body"><text:span text:style-name="T1">Dios pone dos opciones frente a nosotros: la vida (Su Palabra) y la muerte (la falsedad). Como creyentes, debemos discernir los espíritus, discernir a los pastores y discernir las palabras. Todo empieza por </text:span><text:span text:style-name="Strong_20_Emphasis"><text:span text:style-name="T1">conocer la Palabra</text:span></text:span><text:span text:style-name="T1">.</text:span></text:p>
      <text:h text:style-name="P3" text:outline-level="3">📌 Las 3 Grandes Conclusiones de la Lección</text:h>
      <text:list text:style-name="L13">
        <text:list-item>
          <text:p text:style-name="P25"><text:span text:style-name="Strong_20_Emphasis"><text:span text:style-name="T1">División Espiritual:</text:span></text:span><text:span text:style-name="T1"> Con la aparición de Satanás en el mundo espiritual, los "dos dioses" se dividieron (el Dios verdadero y el que se hace pasar por Dios). </text:span></text:p>
        </text:list-item>
        <text:list-item>
          <text:p text:style-name="P25"><text:span text:style-name="Strong_20_Emphasis"><text:span text:style-name="T1">División Física:</text:span></text:span><text:span text:style-name="T1"> Estos dos dioses actúan en el mundo físico a través de dos tipos de pastores (el pastor verdadero y el pastor falso). </text:span></text:p>
        </text:list-item>
        <text:list-item>
          <text:p text:style-name="P24"><text:span text:style-name="Strong_20_Emphasis"><text:span text:style-name="T1">El Discernimiento:</text:span></text:span><text:span text:style-name="T1"> Podemos y debemos distinguir entre pastores verdaderos y falsos </text:span><text:span text:style-name="Strong_20_Emphasis"><text:span text:style-name="T1">únicamente a través de la palabra de verdad</text:span></text:span><text:span text:style-name="T1">. </text:span></text:p>
        </text:list-item>
      </text:list>
      <text:p text:style-name="P4"/>
      <text:h text:style-name="P2" text:outline-level="2">🔄 9. Repaso Final, Anuncios y Oración de Cierre</text:h>
      <text:p text:style-name="Text_20_body"><text:span text:style-name="Emphasis"><text:span text:style-name="T1">(A cargo del Evangelista Christian Howard)</text:span></text:span></text:p>
      <text:p text:style-name="Text_20_body"><text:span text:style-name="Strong_20_Emphasis"><text:span text:style-name="T1">Resumen del Repaso:</text:span></text:span></text:p>
      <text:list text:style-name="L14">
        <text:list-item>
          <text:p text:style-name="P27"><text:span text:style-name="Strong_20_Emphasis"><text:span text:style-name="T1">La División en la Tierra:</text:span></text:span><text:span text:style-name="T1"> Así como hay división en el cielo, la hay en la tierra. Los espíritus trabajan a través de la carne (personas/pastores). </text:span></text:p>
        </text:list-item>
        <text:list-item>
          <text:p text:style-name="P27"><text:span text:style-name="Strong_20_Emphasis"><text:span text:style-name="T1">Cómo probar los espíritus:</text:span></text:span><text:span text:style-name="T1"> A través de la Palabra. </text:span></text:p>
        </text:list-item>
        <text:list-item>
          <text:p text:style-name="P26"><text:span text:style-name="Strong_20_Emphasis"><text:span text:style-name="T1">El enfoque principal:</text:span></text:span><text:span text:style-name="T1"> Debemos enfocarnos en entender la </text:span><text:span text:style-name="Strong_20_Emphasis"><text:span text:style-name="T1">Profecía y el Cumplimiento</text:span></text:span><text:span text:style-name="T1">, ya que es la forma en que Dios nos muestra cómo está obrando hoy. </text:span></text:p>
        </text:list-item>
      </text:list>
      <text:p text:style-name="Text_20_body"><text:span text:style-name="Strong_20_Emphasis"><text:span text:style-name="T1">📢 Anuncios:</text:span></text:span></text:p>
      <text:list text:style-name="L15">
        <text:list-item>
          <text:p text:style-name="P35">Se invita a los pastores que están tomando la clase a una reunión especial el lunes en la noche (martes en Corea) para conversar más sobre las lecciones. </text:p>
        </text:list-item>
      </text:list>
      <text:p text:style-name="Text_20_body"><text:span text:style-name="Strong_20_Emphasis"><text:span text:style-name="T1">Oración de Cierre (El Padre Nuestro):</text:span></text:span></text:p>
      <text:p text:style-name="Quotations"><text:soft-page-break/><text:span text:style-name="Emphasis"><text:span text:style-name="T1">"Padre nuestro que estás en los cielos, santificado sea tu nombre. Venga a nosotros tu reino, hágase tu voluntad en la tierra como en el cielo. Danos hoy el pan de cada día. Perdona nuestras deudas, como también nosotros perdonamos a nuestros deudores. No nos dejes caer en la tentación, mas líbranos del mal. Porque tuyo es el reino, el poder y la gloria, por los siglos de los siglos. Amén."</text:span></text:span></text:p>
      <text:p text:style-name="P28">¡Gracias a todos! Cuídense, que Dios los bendiga y nos vemos la próxima semana con la lección sobre el entendimiento básico de la Biblia.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dauk Book" svg:font-family="'Padauk Book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13:00:58.275289454</meta:creation-date>
    <dc:date>2026-07-02T08:59:14.984484708</dc:date>
    <meta:editing-duration>PT1H7M1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7" meta:paragraph-count="101" meta:word-count="1774" meta:character-count="10044" meta:non-whitespace-character-count="8376"/>
  </office:meta>
</office:document-meta>
</file>