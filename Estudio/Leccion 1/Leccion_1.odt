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1">
      <style:text-properties style:font-name="Padauk Book"/>
    </style:style>
    <style:style style:name="P2" style:family="paragraph" style:parent-style-name="Heading_20_2">
      <style:text-properties style:font-name="Padauk Book"/>
    </style:style>
    <style:style style:name="P3" style:family="paragraph" style:parent-style-name="Heading_20_3">
      <style:text-properties style:font-name="Padauk Book"/>
    </style:style>
    <style:style style:name="P4" style:family="paragraph" style:parent-style-name="Horizontal_20_Line">
      <style:text-properties style:font-name="Padauk Book"/>
    </style:style>
    <style:style style:name="P5" style:family="paragraph" style:parent-style-name="Quotations" style:list-style-name="L6"/>
    <style:style style:name="P6" style:family="paragraph" style:parent-style-name="Standard">
      <style:text-properties style:font-name="Padauk Book"/>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4"/>
    <style:style style:name="P26" style:family="paragraph" style:parent-style-name="Text_20_body" style:list-style-name="L14">
      <style:paragraph-properties fo:margin-top="0cm" fo:margin-bottom="0cm" style:contextual-spacing="false"/>
    </style:style>
    <style:style style:name="P27" style:family="paragraph" style:parent-style-name="Text_20_body" style:list-style-name="L15"/>
    <style:style style:name="P28" style:family="paragraph" style:parent-style-name="Text_20_body" style:list-style-name="L15">
      <style:paragraph-properties fo:margin-top="0cm" fo:margin-bottom="0cm" style:contextual-spacing="false"/>
    </style:style>
    <style:style style:name="P29" style:family="paragraph" style:parent-style-name="Text_20_body">
      <style:text-properties style:font-name="Padauk Book"/>
    </style:style>
    <style:style style:name="P30" style:family="paragraph" style:parent-style-name="Text_20_body" style:list-style-name="L5">
      <style:paragraph-properties fo:margin-top="0cm" fo:margin-bottom="0cm" style:contextual-spacing="false"/>
      <style:text-properties style:font-name="Padauk Book"/>
    </style:style>
    <style:style style:name="P31" style:family="paragraph" style:parent-style-name="Text_20_body" style:list-style-name="L7">
      <style:paragraph-properties fo:margin-top="0cm" fo:margin-bottom="0cm" style:contextual-spacing="false"/>
      <style:text-properties style:font-name="Padauk Book"/>
    </style:style>
    <style:style style:name="P32" style:family="paragraph" style:parent-style-name="Text_20_body" style:list-style-name="L8">
      <style:paragraph-properties fo:margin-top="0cm" fo:margin-bottom="0cm" style:contextual-spacing="false"/>
      <style:text-properties style:font-name="Padauk Book"/>
    </style:style>
    <style:style style:name="P33" style:family="paragraph" style:parent-style-name="Text_20_body" style:list-style-name="L8">
      <style:text-properties style:font-name="Padauk Book"/>
    </style:style>
    <style:style style:name="P34" style:family="paragraph" style:parent-style-name="Text_20_body" style:list-style-name="L9">
      <style:paragraph-properties fo:margin-top="0cm" fo:margin-bottom="0cm" style:contextual-spacing="false"/>
      <style:text-properties style:font-name="Padauk Book"/>
    </style:style>
    <style:style style:name="P35" style:family="paragraph" style:parent-style-name="Text_20_body" style:list-style-name="L10">
      <style:paragraph-properties fo:margin-top="0cm" fo:margin-bottom="0cm" style:contextual-spacing="false"/>
      <style:text-properties style:font-name="Padauk Book"/>
    </style:style>
    <style:style style:name="P36" style:family="paragraph" style:parent-style-name="Text_20_body" style:list-style-name="L10">
      <style:text-properties style:font-name="Padauk Book"/>
    </style:style>
    <style:style style:name="P37" style:family="paragraph" style:parent-style-name="Text_20_body" style:list-style-name="L13">
      <style:paragraph-properties fo:margin-top="0cm" fo:margin-bottom="0cm" style:contextual-spacing="false"/>
      <style:text-properties style:font-name="Padauk Book"/>
    </style:style>
    <style:style style:name="P38" style:family="paragraph" style:parent-style-name="Text_20_body" style:list-style-name="L13">
      <style:text-properties style:font-name="Padauk Book"/>
    </style:style>
    <style:style style:name="P39" style:family="paragraph" style:parent-style-name="Text_20_body" style:list-style-name="L15">
      <style:paragraph-properties fo:margin-top="0cm" fo:margin-bottom="0cm" style:contextual-spacing="false"/>
      <style:text-properties style:font-name="Padauk Book"/>
    </style:style>
    <style:style style:name="T1" style:family="text">
      <style:text-properties style:font-name="Padauk Book"/>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CUADERNO DE ESTUDIO: LECCIÓN 1 (PARTE 1)</text:h>
      <text:h text:style-name="P2" text:outline-level="2">Los Dos Dioses: Dios y Satanás</text:h>
      <text:p text:style-name="P4"/>
      <text:h text:style-name="P2" text:outline-level="2">🙏 1. Repaso Inicial: El Significado de la Religión</text:h>
      <text:p text:style-name="Text_20_body"><text:span text:style-name="Emphasis"><text:span text:style-name="T1">(A cargo del Evangelista Christian Howard)</text:span></text:span></text:p>
      <text:p text:style-name="P29">Antes de comenzar la nueva lección, recordamos las definiciones de "religión" vistas en la clase anterior:</text:p>
      <text:list text:style-name="L1">
        <text:list-item>
          <text:p text:style-name="P8"><text:span text:style-name="Strong_20_Emphasis"><text:span text:style-name="T1">Significado en Oriente:</text:span></text:span><text:span text:style-name="T1"> Las enseñanzas más altas que vienen del cielo (de Dios). </text:span></text:p>
        </text:list-item>
        <text:list-item>
          <text:p text:style-name="P7"><text:span text:style-name="Strong_20_Emphasis"><text:span text:style-name="T1">Significado en Occidente:</text:span></text:span><text:span text:style-name="T1"> Reconexión (</text:span><text:span text:style-name="Emphasis"><text:span text:style-name="T1">religare</text:span></text:span><text:span text:style-name="T1"> en latín). Significa volver a conectarnos con nuestro Padre Dios tras una desconexión original. </text:span></text:p>
        </text:list-item>
      </text:list>
      <text:p text:style-name="Text_20_body"><text:span text:style-name="Strong_20_Emphasis"><text:span text:style-name="T1">Oración de apertura:</text:span></text:span></text:p>
      <text:p text:style-name="Quotations"><text:span text:style-name="Emphasis"><text:span text:style-name="T1">"Santísimo Padre Dios, gracias por guiarnos aquí a aprender más de ti. En la última clase vimos qué es el significado de religión. Muchas veces creíamos que solo era creer en ti, pero vimos que religión es creer en ti, pero en tus enseñanzas, no las enseñanzas de los hombres. Y también es una reconexión que tenemos que tener contigo, Dios. Y eso es lo que todos los estudiantes aquí quieren: una reconexión contigo de nuevo. Y Dios, yo oro para que mandes tu Espíritu Santo aquí, para que les dé las palabras al instructor, para que él hable solo de tus palabras y no de las palabras de él mismo. También oramos por los estudiantes que están aquí. Ábreles los corazones, ábreles las mentes y los ojos para que puedan entender tu palabra de tu forma, Dios. Y también oramos por los estudiantes que están en la clase, pero no pueden venir por situaciones como electricidad o cosas que están pasando. Por favor, consuélalos y estate con ellos para que tengan ese hambre, ese motivo de venir a escuchar tu palabra. Y oramos todo esto en el nombre de tu hijo Jesucristo. Amén."</text:span></text:span></text:p>
      <text:p text:style-name="P4"/>
      <text:h text:style-name="P2" text:outline-level="2">🏫 2. Bienvenida y Preparación para la Clase</text:h>
      <text:p text:style-name="Text_20_body"><text:span text:style-name="Emphasis"><text:span text:style-name="T1">(A cargo del Instructor Sibiani)</text:span></text:span></text:p>
      <text:h text:style-name="P3" text:outline-level="3"><text:soft-page-break/>📌 Recordatorios de Etiqueta</text:h>
      <text:list text:style-name="L2">
        <text:list-item>
          <text:p text:style-name="P10"><text:span text:style-name="Strong_20_Emphasis"><text:span text:style-name="T1">Actitud de Respeto:</text:span></text:span><text:span text:style-name="T1"> Estamos delante de la Palabra de Dios, por lo tanto, estamos delante de Dios mismo. Debemos mostrar respeto, prender la cámara (si las circunstancias eléctricas lo permiten) y tener la Biblia y el cuaderno listos. </text:span></text:p>
        </text:list-item>
        <text:list-item>
          <text:p text:style-name="P9"><text:span text:style-name="Strong_20_Emphasis"><text:span text:style-name="T1">Repaso:</text:span></text:span><text:span text:style-name="T1"> Se recomienda ver los videos al menos tres veces ("la tercera es la vencida") y repasar los apuntes para responder las preguntas de reflexión. </text:span></text:p>
        </text:list-item>
      </text:list>
      <text:h text:style-name="P3" text:outline-level="3">📖 El Título de la Lección: "Los dos dioses: Dios y Satanás"</text:h>
      <text:list text:style-name="L3">
        <text:list-item>
          <text:p text:style-name="P12"><text:span text:style-name="Strong_20_Emphasis"><text:span text:style-name="T1">Aclaración importante:</text:span></text:span><text:span text:style-name="T1"> El título no significa que Satanás sea Dios, ni que el Dios verdadero sea un dios con minúscula. </text:span></text:p>
        </text:list-item>
        <text:list-item>
          <text:p text:style-name="P12"><text:span text:style-name="Strong_20_Emphasis"><text:span text:style-name="T1">El punto clave:</text:span></text:span><text:span text:style-name="T1"> Satanás </text:span><text:span text:style-name="Emphasis"><text:span text:style-name="T1">actúa</text:span></text:span><text:span text:style-name="T1"> como un dios (con "d" minúscula). Él engaña a las personas para que crean que es Dios, poniéndose en el lugar de Dios. </text:span></text:p>
        </text:list-item>
        <text:list-item>
          <text:p text:style-name="P11"><text:span text:style-name="Strong_20_Emphasis"><text:span text:style-name="T1">Ejemplo de la Primera Venida:</text:span></text:span><text:span text:style-name="T1"> En Jerusalén, todos creían en Dios. Sin embargo, Jesús les dijo a los fariseos que ellos pertenecían a su padre, el diablo (Juan 8:44). Ellos </text:span><text:span text:style-name="Emphasis"><text:span text:style-name="T1">creían</text:span></text:span><text:span text:style-name="T1"> que adoraban a Dios, pero al no conocer Su palabra ni entender cómo obraba, terminaron adorando a Satanás sin darse cuenta. </text:span></text:p>
        </text:list-item>
      </text:list>
      <text:p text:style-name="Text_20_body"><text:span text:style-name="Strong_20_Emphasis"><text:span text:style-name="T1">Reflexión:</text:span></text:span><text:span text:style-name="T1"> Para conocer a una persona (o a Dios), no podemos hacer suposiciones basadas en lo que vemos físicamente o en lo que nosotros pensamos. La única forma de conocer a Dios es </text:span><text:span text:style-name="Strong_20_Emphasis"><text:span text:style-name="T1">escuchando Sus palabras</text:span></text:span><text:span text:style-name="T1">.</text:span></text:p>
      <text:p text:style-name="P4"/>
      <text:h text:style-name="P2" text:outline-level="2">⚖️ 3. El Estándar del Bien y el Mal: Leche vs. Alimento Sólido</text:h>
      <text:h text:style-name="P3" text:outline-level="3">🍼 El Problema de los "Niños" Espirituales</text:h>
      <text:p text:style-name="Text_20_body"><text:span text:style-name="Strong_20_Emphasis"><text:span text:style-name="T1">Hebreos 5:12-14</text:span></text:span></text:p>
      <text:p text:style-name="Quotations"><text:span text:style-name="Emphasis"><text:span text:style-name="T1">"Porque debiendo ser ya maestros, después de tanto tiempo, tenéis necesidad de que se os vuelva a enseñar cuáles son los primeros rudimentos de las palabras de Dios; y habéis llegado a ser tales que tenéis necesidad de leche y no de alimento sólido. Y todo aquel que participa de la leche es inexperto en la palabra de justicia, porque es niño. Pero el alimento sólido es para los que han alcanzado madurez, para los que por el uso tienen los sentidos ejercitados en el discernimiento del bien y del mal."</text:span></text:span></text:p>
      <text:list text:style-name="L4">
        <text:list-item>
          <text:p text:style-name="P14"><text:soft-page-break/><text:span text:style-name="Strong_20_Emphasis"><text:span text:style-name="T1">Los que toman leche (Niños/Carnales):</text:span></text:span><text:span text:style-name="T1"> Inexpertos en la palabra de justicia. A pesar de llevar mucho tiempo creyendo, no saben lo que es justo </text:span><text:span text:style-name="Emphasis"><text:span text:style-name="T1">ante los ojos de Dios</text:span></text:span><text:span text:style-name="T1">. Se guían por sus propios pensamientos o los del mundo. (Ver también 1 Corintios 3:1-5 sobre los carnales). </text:span></text:p>
        </text:list-item>
        <text:list-item>
          <text:p text:style-name="P13"><text:span text:style-name="Strong_20_Emphasis"><text:span text:style-name="T1">Los que comen alimento sólido (Maduros/Espirituales):</text:span></text:span><text:span text:style-name="T1"> Tienen los sentidos ejercitados por la palabra del cielo para discernir lo bueno y lo malo </text:span><text:span text:style-name="Strong_20_Emphasis"><text:span text:style-name="T1">ante los ojos de Dios</text:span></text:span><text:span text:style-name="T1">, no ante la cultura o la moralidad humana. </text:span></text:p>
        </text:list-item>
      </text:list>
      <text:h text:style-name="P3" text:outline-level="3">🌍 El Estándar del Mundo vs. El Estándar de Dios</text:h>
      <text:list text:style-name="L5">
        <text:list-item>
          <text:p text:style-name="P30">El mundo tiene estándares subjetivos de bien y mal (basados en la cultura, geografía, etc.). </text:p>
        </text:list-item>
        <text:list-item>
          <text:p text:style-name="P16"><text:span text:style-name="Strong_20_Emphasis"><text:span text:style-name="T1">Nuestro estándar:</text:span></text:span><text:span text:style-name="T1"> Dios y Su Palabra. </text:span></text:p>
        </text:list-item>
        <text:list-item>
          <text:p text:style-name="P15"><text:span text:style-name="Strong_20_Emphasis"><text:span text:style-name="T1">Marcos 10:18:</text:span></text:span><text:span text:style-name="T1"> </text:span><text:span text:style-name="Emphasis"><text:span text:style-name="T1">"¿Por qué me llamas bueno? Ninguno hay bueno, sino solo uno, Dios."</text:span></text:span><text:span text:style-name="T1"> Dios es la fuente del bien. Donde está Su Palabra, está Él. </text:span></text:p>
        </text:list-item>
      </text:list>
      <text:p text:style-name="P4"/>
      <text:h text:style-name="P2" text:outline-level="2">👑 4. ¿Quién es Dios? Características Fundamentales</text:h>
      <text:p text:style-name="P29">Basándonos en la Biblia, Dios tiene características específicas que debemos conocer:</text:p>
      <text:list text:style-name="L6">
        <text:list-item>
          <text:p text:style-name="P17"><text:span text:style-name="Strong_20_Emphasis"><text:span text:style-name="T1">Es Único:</text:span></text:span><text:span text:style-name="T1"> </text:span></text:p>
          <text:p text:style-name="P5"><text:span text:style-name="Emphasis"><text:span text:style-name="T1">"Jehová de los ejércitos, Dios de Israel... solo tú eres Dios de todos los reinos de la tierra. Tú hiciste los cielos y la tierra"</text:span></text:span><text:span text:style-name="T1"> — </text:span><text:span text:style-name="Strong_20_Emphasis"><text:span text:style-name="T1">Isaías 37:16</text:span></text:span><text:span text:style-name="T1">. No hay dos dioses verdaderos; solo hay uno.</text:span></text:p>
        </text:list-item>
        <text:list-item>
          <text:p text:style-name="P17"><text:span text:style-name="Strong_20_Emphasis"><text:span text:style-name="T1">Es Espíritu:</text:span></text:span><text:span text:style-name="T1"> </text:span></text:p>
          <text:p text:style-name="P5"><text:span text:style-name="Emphasis"><text:span text:style-name="T1">"Dios es espíritu, y los que le adoran, en espíritu y en verdad es necesario que adoren"</text:span></text:span><text:span text:style-name="T1"> — </text:span><text:span text:style-name="Strong_20_Emphasis"><text:span text:style-name="T1">Juan 4:24</text:span></text:span><text:span text:style-name="T1">. No es carne ni hueso; no podemos verlo físicamente.</text:span></text:p>
        </text:list-item>
        <text:list-item>
          <text:p text:style-name="P17"><text:span text:style-name="Strong_20_Emphasis"><text:span text:style-name="T1">Es Autoexistente ("Yo Soy"):</text:span></text:span><text:span text:style-name="T1"> </text:span></text:p>
          <text:p text:style-name="P5"><text:span text:style-name="T1">En </text:span><text:span text:style-name="Strong_20_Emphasis"><text:span text:style-name="T1">Éxodo 3:14</text:span></text:span><text:span text:style-name="T1">, Dios se presenta a Moisés como </text:span><text:span text:style-name="Emphasis"><text:span text:style-name="T1">"Yo soy el que soy"</text:span></text:span><text:span text:style-name="T1">. Significa que siempre ha existido, nadie lo creó. Es el origen sin origen.</text:span></text:p>
        </text:list-item>
        <text:list-item>
          <text:p text:style-name="P17"><text:span text:style-name="Strong_20_Emphasis"><text:span text:style-name="T1">Es Creador por medio de la Palabra (El Verbo):</text:span></text:span><text:span text:style-name="T1"> </text:span></text:p>
          <text:p text:style-name="P5"><text:soft-page-break/><text:span text:style-name="Emphasis"><text:span text:style-name="T1">"En el principio era el Verbo, y el Verbo era con Dios, y el Verbo era Dios... Todas las cosas por él fueron hechas... En él estaba la vida y la vida era la luz de los hombres"</text:span></text:span><text:span text:style-name="T1"> — </text:span><text:span text:style-name="Strong_20_Emphasis"><text:span text:style-name="T1">Juan 1:1-4</text:span></text:span><text:span text:style-name="T1">. </text:span></text:p>
          <text:list>
            <text:list-item>
              <text:p text:style-name="P17"><text:span text:style-name="Emphasis"><text:span text:style-name="T1">Conclusión:</text:span></text:span><text:span text:style-name="T1"> Donde está la Palabra, está Dios. En Su Palabra hay vida y luz. No podemos decir que "Dios está con nosotros" si ignoramos Su Palabra. </text:span></text:p>
            </text:list-item>
          </text:list>
        </text:list-item>
      </text:list>
      <text:p text:style-name="P4"/>
      <text:h text:style-name="P2" text:outline-level="2">👼 5. Los Ángeles y la Creación del Hombre</text:h>
      <text:h text:style-name="P3" text:outline-level="3">Los Ángeles (Salmos 103:20-22)</text:h>
      <text:p text:style-name="P29">Son espíritus poderosos creados por Dios. Sus características y misiones son:</text:p>
      <text:list text:style-name="L7">
        <text:list-item>
          <text:p text:style-name="P31">Ejecutan y obedecen la Palabra de Dios. </text:p>
        </text:list-item>
        <text:list-item>
          <text:p text:style-name="P31">Son ministros (ayudadores) que hacen Su voluntad. </text:p>
        </text:list-item>
        <text:list-item>
          <text:p text:style-name="P31">Son ejércitos que luchan para Dios. </text:p>
        </text:list-item>
        <text:list-item>
          <text:p text:style-name="P31">Sirven a los que serán herederos de la salvación. </text:p>
        </text:list-item>
        <text:list-item>
          <text:p text:style-name="P18"><text:span text:style-name="Emphasis"><text:span text:style-name="T1">Cantidad:</text:span></text:span><text:span text:style-name="T1"> Son muchísimos, millones de millones (</text:span><text:span text:style-name="Strong_20_Emphasis"><text:span text:style-name="T1">Apocalipsis 5:11</text:span></text:span><text:span text:style-name="T1">). </text:span></text:p>
        </text:list-item>
      </text:list>
      <text:h text:style-name="P3" text:outline-level="3">El Hombre (Génesis 1:26-28)</text:h>
      <text:list text:style-name="L8">
        <text:list-item>
          <text:p text:style-name="P32">Fue creado a la imagen y semejanza de Dios. </text:p>
        </text:list-item>
        <text:list-item>
          <text:p text:style-name="P19"><text:span text:style-name="T1">Al principio, todo lo que Dios creó fue </text:span><text:span text:style-name="Strong_20_Emphasis"><text:span text:style-name="T1">bueno</text:span></text:span><text:span text:style-name="T1"> ante Sus ojos. </text:span></text:p>
        </text:list-item>
        <text:list-item>
          <text:p text:style-name="P33">Dios se paseaba en el huerto del Edén con el hombre, deseando morar con su creación mientras esta fuera buena. </text:p>
        </text:list-item>
      </text:list>
      <text:p text:style-name="P4"/>
      <text:h text:style-name="P2" text:outline-level="2">🐍 6. El Origen y la Caída de Satanás</text:h>
      <text:p text:style-name="P29">¿Quién creó a Satanás? Dios, el creador de todo lo espiritual y físico. Pero, ¿lo creó malo? No. Fue creado perfecto, pero su corazón se corrompió.</text:p>
      <text:h text:style-name="P3" text:outline-level="3">📜 La Evidencia de su Caída</text:h>
      <text:p text:style-name="Text_20_body"><text:span text:style-name="Strong_20_Emphasis"><text:span text:style-name="T1">Isaías 14:12-15 (El Lucero)</text:span></text:span></text:p>
      <text:p text:style-name="Quotations"><text:span text:style-name="Emphasis"><text:span text:style-name="T1">"¡Cómo caíste del cielo, oh lucero, hijo de la mañana!... Tú que decías en tu corazón: Subiré al cielo; en lo alto, junto a las estrellas de Dios, levantaré mi trono... Sobre las alturas de las nubes subiré, y seré semejante al Altísimo."</text:span></text:span></text:p>
      <text:list text:style-name="L9">
        <text:list-item>
          <text:p text:style-name="P34"><text:soft-page-break/>Era una entidad brillante ("lucero", "hijo de la mañana" - como hijo de Dios). </text:p>
        </text:list-item>
        <text:list-item>
          <text:p text:style-name="P20"><text:span text:style-name="Strong_20_Emphasis"><text:span text:style-name="T1">La causa de su caída:</text:span></text:span><text:span text:style-name="T1"> El orgullo y la codicia. Pensó que podía hacer las cosas mejor que Dios y quiso levantar su propio trono. </text:span></text:p>
        </text:list-item>
      </text:list>
      <text:p text:style-name="Text_20_body"><text:span text:style-name="Strong_20_Emphasis"><text:span text:style-name="T1">Ezequiel 28:11-17 (El Querubín Protector)</text:span></text:span></text:p>
      <text:p text:style-name="Quotations"><text:span text:style-name="Emphasis"><text:span text:style-name="T1">"Tú, querubín grande, protector... Perfecto eras en todos tus caminos desde el día que fuiste creado, hasta que se halló en ti maldad... Se enalteció tu corazón a causa de tu hermosura, corrompiste tu sabiduría... por lo que yo te eché del monte de Dios."</text:span></text:span></text:p>
      <text:list text:style-name="L10">
        <text:list-item>
          <text:p text:style-name="P35">Este pasaje menciona al "rey de Tiro", pero describe características que solo aplican a una entidad espiritual en el Edén (el querubín protector). </text:p>
        </text:list-item>
        <text:list-item>
          <text:p text:style-name="P36">Era el sello de la perfección hasta que se halló maldad en él. </text:p>
        </text:list-item>
      </text:list>
      <text:h text:style-name="P3" text:outline-level="3">👥 Los Ángeles Caídos</text:h>
      <text:p text:style-name="P29">Satanás no cayó solo. Otros ángeles lo siguieron:</text:p>
      <text:list text:style-name="L11">
        <text:list-item>
          <text:p text:style-name="P22"><text:span text:style-name="Strong_20_Emphasis"><text:span text:style-name="T1">2 Pedro 2:4 y Judas 1:6:</text:span></text:span><text:span text:style-name="T1"> Ángeles que pecaron y abandonaron su propia morada, siendo reservados bajo oscuridad para el juicio. </text:span></text:p>
        </text:list-item>
        <text:list-item>
          <text:p text:style-name="P21"><text:span text:style-name="Strong_20_Emphasis"><text:span text:style-name="T1">Apocalipsis 9:16:</text:span></text:span><text:span text:style-name="T1"> Menciona un ejército de </text:span><text:span text:style-name="Strong_20_Emphasis"><text:span text:style-name="T1">200 millones</text:span></text:span><text:span text:style-name="T1"> de ángeles caídos (espíritus malignos). </text:span></text:p>
        </text:list-item>
      </text:list>
      <text:p text:style-name="P4"/>
      <text:h text:style-name="P2" text:outline-level="2">⚔️ 7. La División en los Mundos Espiritual y Físico</text:h>
      <text:p text:style-name="P29">La aparición del pecado en Satanás introdujo una división que se refleja en ambos mundos:</text:p>
      <text:h text:style-name="P3" text:outline-level="3">🌌 En el Mundo Espiritual</text:h>
      <text:list text:style-name="L12">
        <text:list-item>
          <text:p text:style-name="P24"><text:span text:style-name="Strong_20_Emphasis"><text:span text:style-name="T1">Lado de Dios:</text:span></text:span><text:span text:style-name="T1"> Espíritus santos (hacen y obedecen la voluntad de Dios). </text:span></text:p>
        </text:list-item>
        <text:list-item>
          <text:p text:style-name="P23"><text:span text:style-name="Strong_20_Emphasis"><text:span text:style-name="T1">Lado de Satanás:</text:span></text:span><text:span text:style-name="T1"> Espíritus malignos (hacen la voluntad de Satanás). </text:span></text:p>
        </text:list-item>
      </text:list>
      <text:h text:style-name="P3" text:outline-level="3">🌍 En el Mundo Físico</text:h>
      <text:p text:style-name="P29">Los espíritus no se quedan solo en el cielo; descienden y obran a través de la carne (personas).</text:p>
      <text:list text:style-name="L13">
        <text:list-item>
          <text:p text:style-name="P37">Si un espíritu de Dios desciende sobre una persona, esta hace las obras de Dios. </text:p>
        </text:list-item>
        <text:list-item>
          <text:p text:style-name="P38">Si un espíritu maligno desciende, la persona hace las obras de Satanás. </text:p>
        </text:list-item>
      </text:list>
      <text:p text:style-name="Text_20_body"><text:soft-page-break/><text:span text:style-name="Strong_20_Emphasis"><text:span text:style-name="T1">El Ejemplo de la Primera Venida:</text:span></text:span><text:span text:style-name="T1"> La batalla no fue contra ateos o vikingos. Fue </text:span><text:span text:style-name="Emphasis"><text:span text:style-name="T1">dentro</text:span></text:span><text:span text:style-name="T1"> del pueblo de Dios. </text:span></text:p>
      <text:list text:style-name="L14">
        <text:list-item>
          <text:p text:style-name="P26"><text:span text:style-name="T1">El Espíritu de Dios estaba sobre </text:span><text:span text:style-name="Strong_20_Emphasis"><text:span text:style-name="T1">Jesús</text:span></text:span><text:span text:style-name="T1">. </text:span></text:p>
        </text:list-item>
        <text:list-item>
          <text:p text:style-name="P25"><text:span text:style-name="T1">Espíritus malignos obraban a través de los </text:span><text:span text:style-name="Strong_20_Emphasis"><text:span text:style-name="T1">fariseos y maestros de la ley</text:span></text:span><text:span text:style-name="T1">, quienes creían que adoraban a Dios, pero en realidad estaban haciendo la obra de Satanás por falta de la Palabra. </text:span></text:p>
        </text:list-item>
      </text:list>
      <text:p text:style-name="Text_20_body"><text:span text:style-name="Emphasis"><text:span text:style-name="T1">Advertencia:</text:span></text:span><text:span text:style-name="T1"> No debemos pensar que Satanás solo obra en otras religiones o en el ateísmo. Su obra más eficiente es engañar desde </text:span><text:span text:style-name="Emphasis"><text:span text:style-name="T1">dentro</text:span></text:span><text:span text:style-name="T1"> del cristianismo, haciéndose pasar por un creyente.</text:span></text:p>
      <text:p text:style-name="P4"/>
      <text:h text:style-name="P2" text:outline-level="2">🔄 8. Repaso Interactivo y Oración de Cierre</text:h>
      <text:p text:style-name="Text_20_body"><text:span text:style-name="Emphasis"><text:span text:style-name="T1">(A cargo del Evangelista Christian Howard)</text:span></text:span></text:p>
      <text:p text:style-name="Text_20_body"><text:span text:style-name="Strong_20_Emphasis"><text:span text:style-name="T1">Preguntas de reflexión y respuestas:</text:span></text:span></text:p>
      <text:list text:style-name="L15">
        <text:list-item>
          <text:p text:style-name="P28"><text:span text:style-name="Strong_20_Emphasis"><text:span text:style-name="T1">¿Cuáles son las 4 características de Dios que vimos?</text:span></text:span></text:p>
          <text:list>
            <text:list-item>
              <text:p text:style-name="P39">Creador, Espíritu, Autoexistente ("Yo soy"), Único. </text:p>
            </text:list-item>
          </text:list>
        </text:list-item>
        <text:list-item>
          <text:p text:style-name="P28"><text:span text:style-name="Strong_20_Emphasis"><text:span text:style-name="T1">¿Cómo describimos a Satanás?</text:span></text:span></text:p>
          <text:list>
            <text:list-item>
              <text:p text:style-name="P28"><text:span text:style-name="T1">Es un ángel caído, es espíritu, es una </text:span><text:span text:style-name="Emphasis"><text:span text:style-name="T1">creación</text:span></text:span><text:span text:style-name="T1"> (no el creador). </text:span></text:p>
            </text:list-item>
          </text:list>
        </text:list-item>
        <text:list-item>
          <text:p text:style-name="P28"><text:span text:style-name="Strong_20_Emphasis"><text:span text:style-name="T1">¿Qué introduce la aparición de Satanás?</text:span></text:span></text:p>
          <text:list>
            <text:list-item>
              <text:p text:style-name="P27"><text:span text:style-name="T1">Una </text:span><text:span text:style-name="Strong_20_Emphasis"><text:span text:style-name="T1">división</text:span></text:span><text:span text:style-name="T1"> entre el bien (Dios) y el mal (lo opuesto a Dios). </text:span></text:p>
            </text:list-item>
          </text:list>
        </text:list-item>
      </text:list>
      <text:p text:style-name="Text_20_body"><text:span text:style-name="Strong_20_Emphasis"><text:span text:style-name="T1">Oración de Cierre (Inicio del Padre Nuestro):</text:span></text:span></text:p>
      <text:p text:style-name="Quotations"><text:span text:style-name="Emphasis"><text:span text:style-name="T1">"Padre nuestro que estás en los cielos, santificado sea tu nombre. Venga tu reino, hágase tu voluntad en la Tierra como en el cielo. El pan nuestro de cada día, dánoslo hoy..."</text:span></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1T14:08:20.817394848</meta:creation-date>
    <dc:date>2026-07-02T08:59:27.893185648</dc:date>
    <meta:editing-duration>PT29S</meta:editing-duration>
    <meta:editing-cycles>2</meta:editing-cycles>
    <meta:generator>LibreOffice/24.2.7.2$Linux_X86_64 LibreOffice_project/420$Build-2</meta:generator>
    <meta:document-statistic meta:table-count="0" meta:image-count="0" meta:object-count="0" meta:page-count="6" meta:paragraph-count="91" meta:word-count="1653" meta:character-count="9287" meta:non-whitespace-character-count="7723"/>
  </office:meta>
</office:document-meta>
</file>