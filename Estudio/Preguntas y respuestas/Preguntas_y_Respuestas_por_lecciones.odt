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dauk Book" svg:font-family="'Padauk Book'" style:font-pitch="variable"/>
  </office:font-face-decls>
  <office:automatic-styles>
    <style:style style:name="P1" style:family="paragraph" style:parent-style-name="Heading_20_1">
      <style:text-properties style:font-name="Padauk Book"/>
    </style:style>
    <style:style style:name="P2" style:family="paragraph" style:parent-style-name="Heading_20_2">
      <style:text-properties style:font-name="Padauk Book"/>
    </style:style>
    <style:style style:name="P3" style:family="paragraph" style:parent-style-name="Heading_20_3">
      <style:text-properties style:font-name="Padauk Book"/>
    </style:style>
    <style:style style:name="P4" style:family="paragraph" style:parent-style-name="Heading_20_3" style:list-style-name="L60">
      <style:text-properties style:font-name="Padauk Book" officeooo:paragraph-rsid="001e14ef"/>
    </style:style>
    <style:style style:name="P5" style:family="paragraph" style:parent-style-name="Heading_20_3">
      <style:text-properties officeooo:paragraph-rsid="001fe24b"/>
    </style:style>
    <style:style style:name="P6" style:family="paragraph" style:parent-style-name="Horizontal_20_Line">
      <style:text-properties style:font-name="Padauk Book"/>
    </style:style>
    <style:style style:name="P7" style:family="paragraph" style:parent-style-name="Horizontal_20_Line" style:list-style-name="L60">
      <style:text-properties style:font-name="Padauk Book" officeooo:paragraph-rsid="001e14ef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3">
      <style:paragraph-properties fo:margin-top="0cm" fo:margin-bottom="0cm" style:contextual-spacing="false"/>
    </style:style>
    <style:style style:name="P35" style:family="paragraph" style:parent-style-name="Text_20_body" style:list-style-name="L24"/>
    <style:style style:name="P36" style:family="paragraph" style:parent-style-name="Text_20_body" style:list-style-name="L24">
      <style:paragraph-properties fo:margin-top="0cm" fo:margin-bottom="0cm" style:contextual-spacing="false"/>
    </style:style>
    <style:style style:name="P37" style:family="paragraph" style:parent-style-name="Text_20_body" style:list-style-name="L25"/>
    <style:style style:name="P38" style:family="paragraph" style:parent-style-name="Text_20_body" style:list-style-name="L25">
      <style:paragraph-properties fo:margin-top="0cm" fo:margin-bottom="0cm" style:contextual-spacing="false"/>
    </style:style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P41" style:family="paragraph" style:parent-style-name="Text_20_body" style:list-style-name="L28"/>
    <style:style style:name="P42" style:family="paragraph" style:parent-style-name="Text_20_body" style:list-style-name="L29"/>
    <style:style style:name="P43" style:family="paragraph" style:parent-style-name="Text_20_body" style:list-style-name="L30"/>
    <style:style style:name="P44" style:family="paragraph" style:parent-style-name="Text_20_body" style:list-style-name="L31"/>
    <style:style style:name="P45" style:family="paragraph" style:parent-style-name="Text_20_body" style:list-style-name="L31">
      <style:paragraph-properties fo:margin-top="0cm" fo:margin-bottom="0cm" style:contextual-spacing="false"/>
    </style:style>
    <style:style style:name="P46" style:family="paragraph" style:parent-style-name="Text_20_body" style:list-style-name="L32"/>
    <style:style style:name="P47" style:family="paragraph" style:parent-style-name="Text_20_body" style:list-style-name="L33"/>
    <style:style style:name="P48" style:family="paragraph" style:parent-style-name="Text_20_body" style:list-style-name="L34"/>
    <style:style style:name="P49" style:family="paragraph" style:parent-style-name="Text_20_body" style:list-style-name="L35"/>
    <style:style style:name="P50" style:family="paragraph" style:parent-style-name="Text_20_body" style:list-style-name="L35">
      <style:paragraph-properties fo:margin-top="0cm" fo:margin-bottom="0cm" style:contextual-spacing="false"/>
    </style:style>
    <style:style style:name="P51" style:family="paragraph" style:parent-style-name="Text_20_body" style:list-style-name="L36"/>
    <style:style style:name="P52" style:family="paragraph" style:parent-style-name="Text_20_body" style:list-style-name="L37"/>
    <style:style style:name="P53" style:family="paragraph" style:parent-style-name="Text_20_body" style:list-style-name="L38"/>
    <style:style style:name="P54" style:family="paragraph" style:parent-style-name="Text_20_body" style:list-style-name="L39"/>
    <style:style style:name="P55" style:family="paragraph" style:parent-style-name="Text_20_body" style:list-style-name="L40"/>
    <style:style style:name="P56" style:family="paragraph" style:parent-style-name="Text_20_body" style:list-style-name="L41"/>
    <style:style style:name="P57" style:family="paragraph" style:parent-style-name="Text_20_body" style:list-style-name="L42"/>
    <style:style style:name="P58" style:family="paragraph" style:parent-style-name="Text_20_body" style:list-style-name="L43"/>
    <style:style style:name="P59" style:family="paragraph" style:parent-style-name="Text_20_body" style:list-style-name="L44"/>
    <style:style style:name="P60" style:family="paragraph" style:parent-style-name="Text_20_body" style:list-style-name="L45"/>
    <style:style style:name="P61" style:family="paragraph" style:parent-style-name="Text_20_body" style:list-style-name="L46"/>
    <style:style style:name="P62" style:family="paragraph" style:parent-style-name="Text_20_body" style:list-style-name="L47"/>
    <style:style style:name="P63" style:family="paragraph" style:parent-style-name="Text_20_body" style:list-style-name="L47">
      <style:paragraph-properties fo:margin-top="0cm" fo:margin-bottom="0cm" style:contextual-spacing="false"/>
    </style:style>
    <style:style style:name="P64" style:family="paragraph" style:parent-style-name="Text_20_body" style:list-style-name="L48"/>
    <style:style style:name="P65" style:family="paragraph" style:parent-style-name="Text_20_body" style:list-style-name="L49"/>
    <style:style style:name="P66" style:family="paragraph" style:parent-style-name="Text_20_body" style:list-style-name="L49">
      <style:paragraph-properties fo:margin-top="0cm" fo:margin-bottom="0cm" style:contextual-spacing="false"/>
    </style:style>
    <style:style style:name="P67" style:family="paragraph" style:parent-style-name="Text_20_body" style:list-style-name="L50"/>
    <style:style style:name="P68" style:family="paragraph" style:parent-style-name="Text_20_body" style:list-style-name="L51"/>
    <style:style style:name="P69" style:family="paragraph" style:parent-style-name="Text_20_body" style:list-style-name="L52"/>
    <style:style style:name="P70" style:family="paragraph" style:parent-style-name="Text_20_body" style:list-style-name="L53"/>
    <style:style style:name="P71" style:family="paragraph" style:parent-style-name="Text_20_body" style:list-style-name="L54"/>
    <style:style style:name="P72" style:family="paragraph" style:parent-style-name="Text_20_body" style:list-style-name="L55"/>
    <style:style style:name="P73" style:family="paragraph" style:parent-style-name="Text_20_body" style:list-style-name="L55">
      <style:paragraph-properties fo:margin-top="0cm" fo:margin-bottom="0cm" style:contextual-spacing="false"/>
    </style:style>
    <style:style style:name="P74" style:family="paragraph" style:parent-style-name="Text_20_body" style:list-style-name="L56"/>
    <style:style style:name="P75" style:family="paragraph" style:parent-style-name="Text_20_body" style:list-style-name="L57"/>
    <style:style style:name="P76" style:family="paragraph" style:parent-style-name="Text_20_body" style:list-style-name="L58"/>
    <style:style style:name="P77" style:family="paragraph" style:parent-style-name="Text_20_body" style:list-style-name="L59"/>
    <style:style style:name="P78" style:family="paragraph" style:parent-style-name="Text_20_body" style:list-style-name="L60">
      <style:paragraph-properties fo:margin-top="0cm" fo:margin-bottom="0cm" style:contextual-spacing="false"/>
    </style:style>
    <style:style style:name="P79" style:family="paragraph" style:parent-style-name="Text_20_body" style:list-style-name="L60">
      <style:text-properties officeooo:paragraph-rsid="001e14ef"/>
    </style:style>
    <style:style style:name="P80" style:family="paragraph" style:parent-style-name="Text_20_body" style:list-style-name="L60">
      <style:paragraph-properties fo:margin-top="0cm" fo:margin-bottom="0cm" style:contextual-spacing="false"/>
      <style:text-properties officeooo:paragraph-rsid="001e14ef"/>
    </style:style>
    <style:style style:name="P81" style:family="paragraph" style:parent-style-name="Text_20_body" style:list-style-name="L61"/>
    <style:style style:name="P82" style:family="paragraph" style:parent-style-name="Text_20_body" style:list-style-name="L61">
      <style:paragraph-properties fo:margin-top="0cm" fo:margin-bottom="0cm" style:contextual-spacing="false"/>
    </style:style>
    <style:style style:name="P83" style:family="paragraph" style:parent-style-name="Text_20_body">
      <style:text-properties style:font-name="Padauk Book"/>
    </style:style>
    <style:style style:name="P84" style:family="paragraph" style:parent-style-name="Text_20_body" style:list-style-name="L62"/>
    <style:style style:name="P85" style:family="paragraph" style:parent-style-name="Text_20_body" style:list-style-name="L62">
      <style:paragraph-properties fo:margin-top="0cm" fo:margin-bottom="0cm" style:contextual-spacing="false"/>
    </style:style>
    <style:style style:name="P86" style:family="paragraph" style:parent-style-name="Text_20_body" style:list-style-name="L63"/>
    <style:style style:name="P87" style:family="paragraph" style:parent-style-name="Text_20_body" style:list-style-name="L63">
      <style:paragraph-properties fo:margin-top="0cm" fo:margin-bottom="0cm" style:contextual-spacing="false"/>
    </style:style>
    <style:style style:name="P88" style:family="paragraph" style:parent-style-name="Text_20_body" style:list-style-name="L64"/>
    <style:style style:name="P89" style:family="paragraph" style:parent-style-name="Text_20_body" style:list-style-name="L64">
      <style:paragraph-properties fo:margin-top="0cm" fo:margin-bottom="0cm" style:contextual-spacing="false"/>
    </style:style>
    <style:style style:name="P90" style:family="paragraph" style:parent-style-name="Text_20_body">
      <style:text-properties officeooo:paragraph-rsid="001e14ef"/>
    </style:style>
    <style:style style:name="P91" style:family="paragraph" style:parent-style-name="Text_20_body" style:list-style-name="L65"/>
    <style:style style:name="P92" style:family="paragraph" style:parent-style-name="Text_20_body" style:list-style-name="L65">
      <style:paragraph-properties fo:margin-top="0cm" fo:margin-bottom="0cm" style:contextual-spacing="false"/>
    </style:style>
    <style:style style:name="P93" style:family="paragraph" style:parent-style-name="Text_20_body" style:list-style-name="L66"/>
    <style:style style:name="P94" style:family="paragraph" style:parent-style-name="Text_20_body" style:list-style-name="L66">
      <style:paragraph-properties fo:margin-top="0cm" fo:margin-bottom="0cm" style:contextual-spacing="false"/>
    </style:style>
    <style:style style:name="P95" style:family="paragraph" style:parent-style-name="Text_20_body" style:list-style-name="L67"/>
    <style:style style:name="P96" style:family="paragraph" style:parent-style-name="Text_20_body" style:list-style-name="L68"/>
    <style:style style:name="P97" style:family="paragraph" style:parent-style-name="Text_20_body" style:list-style-name="L68">
      <style:paragraph-properties fo:margin-top="0cm" fo:margin-bottom="0cm" style:contextual-spacing="false"/>
    </style:style>
    <style:style style:name="P98" style:family="paragraph" style:parent-style-name="Text_20_body" style:list-style-name="L69"/>
    <style:style style:name="P99" style:family="paragraph" style:parent-style-name="Text_20_body" style:list-style-name="L70"/>
    <style:style style:name="P100" style:family="paragraph" style:parent-style-name="Text_20_body" style:list-style-name="L71"/>
    <style:style style:name="P101" style:family="paragraph" style:parent-style-name="Text_20_body" style:list-style-name="L72"/>
    <style:style style:name="P102" style:family="paragraph" style:parent-style-name="Text_20_body" style:list-style-name="L73"/>
    <style:style style:name="P103" style:family="paragraph" style:parent-style-name="Text_20_body" style:list-style-name="L74"/>
    <style:style style:name="P104" style:family="paragraph" style:parent-style-name="Text_20_body" style:list-style-name="L75"/>
    <style:style style:name="P105" style:family="paragraph" style:parent-style-name="Text_20_body" style:list-style-name="L76"/>
    <style:style style:name="P106" style:family="paragraph" style:parent-style-name="Text_20_body" style:list-style-name="L77"/>
    <style:style style:name="P107" style:family="paragraph" style:parent-style-name="Text_20_body" style:list-style-name="L78"/>
    <style:style style:name="P108" style:family="paragraph" style:parent-style-name="Text_20_body" style:list-style-name="L79"/>
    <style:style style:name="P109" style:family="paragraph" style:parent-style-name="Text_20_body" style:list-style-name="L80"/>
    <style:style style:name="P110" style:family="paragraph" style:parent-style-name="Text_20_body" style:list-style-name="L81"/>
    <style:style style:name="P111" style:family="paragraph" style:parent-style-name="Text_20_body" style:list-style-name="L82"/>
    <style:style style:name="P112" style:family="paragraph" style:parent-style-name="Text_20_body" style:list-style-name="L83"/>
    <style:style style:name="P113" style:family="paragraph" style:parent-style-name="Text_20_body" style:list-style-name="L84"/>
    <style:style style:name="P114" style:family="paragraph" style:parent-style-name="Text_20_body" style:list-style-name="L85"/>
    <style:style style:name="P115" style:family="paragraph" style:parent-style-name="Text_20_body" style:list-style-name="L86"/>
    <style:style style:name="P116" style:family="paragraph" style:parent-style-name="Text_20_body" style:list-style-name="L87"/>
    <style:style style:name="P117" style:family="paragraph" style:parent-style-name="Text_20_body" style:list-style-name="L87">
      <style:paragraph-properties fo:margin-top="0cm" fo:margin-bottom="0cm" style:contextual-spacing="false"/>
    </style:style>
    <style:style style:name="P118" style:family="paragraph" style:parent-style-name="Text_20_body" style:list-style-name="L88"/>
    <style:style style:name="P119" style:family="paragraph" style:parent-style-name="Text_20_body" style:list-style-name="L88">
      <style:paragraph-properties fo:margin-top="0cm" fo:margin-bottom="0cm" style:contextual-spacing="false"/>
    </style:style>
    <style:style style:name="P120" style:family="paragraph" style:parent-style-name="Text_20_body" style:list-style-name="L89"/>
    <style:style style:name="P121" style:family="paragraph" style:parent-style-name="Text_20_body" style:list-style-name="L89">
      <style:paragraph-properties fo:margin-top="0cm" fo:margin-bottom="0cm" style:contextual-spacing="false"/>
    </style:style>
    <style:style style:name="P122" style:family="paragraph" style:parent-style-name="Text_20_body" style:list-style-name="L90"/>
    <style:style style:name="P123" style:family="paragraph" style:parent-style-name="Text_20_body" style:list-style-name="L91"/>
    <style:style style:name="P124" style:family="paragraph" style:parent-style-name="Text_20_body" style:list-style-name="L92"/>
    <style:style style:name="P125" style:family="paragraph" style:parent-style-name="Text_20_body" style:list-style-name="L93"/>
    <style:style style:name="P126" style:family="paragraph" style:parent-style-name="Text_20_body" style:list-style-name="L94"/>
    <style:style style:name="P127" style:family="paragraph" style:parent-style-name="Text_20_body" style:list-style-name="L95"/>
    <style:style style:name="P128" style:family="paragraph" style:parent-style-name="Text_20_body" style:list-style-name="L95">
      <style:paragraph-properties fo:margin-top="0cm" fo:margin-bottom="0cm" style:contextual-spacing="false"/>
    </style:style>
    <style:style style:name="P129" style:family="paragraph" style:parent-style-name="Text_20_body" style:list-style-name="L96"/>
    <style:style style:name="P130" style:family="paragraph" style:parent-style-name="Text_20_body" style:list-style-name="L97"/>
    <style:style style:name="P131" style:family="paragraph" style:parent-style-name="Text_20_body" style:list-style-name="L98"/>
    <style:style style:name="P132" style:family="paragraph" style:parent-style-name="Text_20_body" style:list-style-name="L99"/>
    <style:style style:name="P133" style:family="paragraph" style:parent-style-name="Text_20_body" style:list-style-name="L99">
      <style:paragraph-properties fo:margin-top="0cm" fo:margin-bottom="0cm" style:contextual-spacing="false"/>
    </style:style>
    <style:style style:name="P134" style:family="paragraph" style:parent-style-name="Text_20_body" style:list-style-name="L100"/>
    <style:style style:name="P135" style:family="paragraph" style:parent-style-name="Text_20_body" style:list-style-name="L101"/>
    <style:style style:name="P136" style:family="paragraph" style:parent-style-name="Text_20_body" style:list-style-name="L102"/>
    <style:style style:name="P137" style:family="paragraph" style:parent-style-name="Text_20_body" style:list-style-name="L103"/>
    <style:style style:name="P138" style:family="paragraph" style:parent-style-name="Text_20_body" style:list-style-name="L104"/>
    <style:style style:name="P139" style:family="paragraph" style:parent-style-name="Text_20_body" style:list-style-name="L105"/>
    <style:style style:name="P140" style:family="paragraph" style:parent-style-name="Text_20_body" style:list-style-name="L106"/>
    <style:style style:name="P141" style:family="paragraph" style:parent-style-name="Text_20_body" style:list-style-name="L107"/>
    <style:style style:name="P142" style:family="paragraph" style:parent-style-name="Text_20_body" style:list-style-name="L108"/>
    <style:style style:name="P143" style:family="paragraph" style:parent-style-name="Text_20_body" style:list-style-name="L109"/>
    <style:style style:name="P144" style:family="paragraph" style:parent-style-name="Text_20_body" style:list-style-name="L110"/>
    <style:style style:name="P145" style:family="paragraph" style:parent-style-name="Text_20_body" style:list-style-name="L111"/>
    <style:style style:name="P146" style:family="paragraph" style:parent-style-name="Text_20_body" style:list-style-name="L111">
      <style:paragraph-properties fo:margin-top="0cm" fo:margin-bottom="0cm" style:contextual-spacing="false"/>
    </style:style>
    <style:style style:name="P147" style:family="paragraph" style:parent-style-name="Text_20_body" style:list-style-name="L112"/>
    <style:style style:name="P148" style:family="paragraph" style:parent-style-name="Text_20_body" style:list-style-name="L113"/>
    <style:style style:name="P149" style:family="paragraph" style:parent-style-name="Text_20_body" style:list-style-name="L113">
      <style:paragraph-properties fo:margin-top="0cm" fo:margin-bottom="0cm" style:contextual-spacing="false"/>
    </style:style>
    <style:style style:name="P150" style:family="paragraph" style:parent-style-name="Text_20_body" style:list-style-name="L114"/>
    <style:style style:name="P151" style:family="paragraph" style:parent-style-name="Text_20_body" style:list-style-name="L115"/>
    <style:style style:name="P152" style:family="paragraph" style:parent-style-name="Text_20_body" style:list-style-name="L116"/>
    <style:style style:name="P153" style:family="paragraph" style:parent-style-name="Text_20_body" style:list-style-name="L117"/>
    <style:style style:name="P154" style:family="paragraph" style:parent-style-name="Text_20_body" style:list-style-name="L118"/>
    <style:style style:name="P155" style:family="paragraph" style:parent-style-name="Text_20_body" style:list-style-name="L119"/>
    <style:style style:name="P156" style:family="paragraph" style:parent-style-name="Text_20_body" style:list-style-name="L119">
      <style:paragraph-properties fo:margin-top="0cm" fo:margin-bottom="0cm" style:contextual-spacing="false"/>
    </style:style>
    <style:style style:name="P157" style:family="paragraph" style:parent-style-name="Text_20_body" style:list-style-name="L120"/>
    <style:style style:name="P158" style:family="paragraph" style:parent-style-name="Text_20_body" style:list-style-name="L121"/>
    <style:style style:name="P159" style:family="paragraph" style:parent-style-name="Text_20_body" style:list-style-name="L122"/>
    <style:style style:name="P160" style:family="paragraph" style:parent-style-name="Text_20_body" style:list-style-name="L123"/>
    <style:style style:name="P161" style:family="paragraph" style:parent-style-name="Text_20_body" style:list-style-name="L124"/>
    <style:style style:name="P162" style:family="paragraph" style:parent-style-name="Text_20_body" style:list-style-name="L124">
      <style:paragraph-properties fo:margin-top="0cm" fo:margin-bottom="0cm" style:contextual-spacing="false"/>
    </style:style>
    <style:style style:name="P163" style:family="paragraph" style:parent-style-name="Text_20_body" style:list-style-name="L125"/>
    <style:style style:name="P164" style:family="paragraph" style:parent-style-name="Text_20_body" style:list-style-name="L126"/>
    <style:style style:name="P165" style:family="paragraph" style:parent-style-name="Text_20_body" style:list-style-name="L127"/>
    <style:style style:name="P166" style:family="paragraph" style:parent-style-name="Text_20_body" style:list-style-name="L128"/>
    <style:style style:name="P167" style:family="paragraph" style:parent-style-name="Text_20_body" style:list-style-name="L129"/>
    <style:style style:name="P168" style:family="paragraph" style:parent-style-name="Text_20_body" style:list-style-name="L130"/>
    <style:style style:name="P169" style:family="paragraph" style:parent-style-name="Text_20_body" style:list-style-name="L131"/>
    <style:style style:name="P170" style:family="paragraph" style:parent-style-name="Text_20_body" style:list-style-name="L132"/>
    <style:style style:name="P171" style:family="paragraph" style:parent-style-name="Text_20_body" style:list-style-name="L133"/>
    <style:style style:name="P172" style:family="paragraph" style:parent-style-name="Text_20_body" style:list-style-name="L134"/>
    <style:style style:name="P173" style:family="paragraph" style:parent-style-name="Text_20_body" style:list-style-name="L135"/>
    <style:style style:name="P174" style:family="paragraph" style:parent-style-name="Text_20_body" style:list-style-name="L136"/>
    <style:style style:name="P175" style:family="paragraph" style:parent-style-name="Text_20_body" style:list-style-name="L137"/>
    <style:style style:name="P176" style:family="paragraph" style:parent-style-name="Text_20_body" style:list-style-name="L137">
      <style:paragraph-properties fo:margin-top="0cm" fo:margin-bottom="0cm" style:contextual-spacing="false"/>
    </style:style>
    <style:style style:name="T1" style:family="text">
      <style:text-properties style:font-name="Padauk Book"/>
    </style:style>
    <style:style style:name="T2" style:family="text">
      <style:text-properties style:font-name="Padauk Book" officeooo:rsid="001e14ef"/>
    </style:style>
    <style:style style:name="T3" style:family="text">
      <style:text-properties style:font-name="Padauk Book" fo:font-size="18pt" style:font-size-asian="18pt" style:font-size-complex="18pt"/>
    </style:style>
    <style:style style:name="T4" style:family="text">
      <style:text-properties style:font-name="Padauk Book" fo:font-size="18pt" officeooo:rsid="001fe24b" style:font-size-asian="18pt" style:font-size-complex="18pt"/>
    </style:style>
    <style:style style:name="T5" style:family="text">
      <style:text-properties officeooo:rsid="001e14ef"/>
    </style:style>
    <style:style style:name="T6" style:family="text">
      <style:text-properties officeooo:rsid="001fe2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📝 COMPENDIO DE PREGUNTAS Y RESPUESTAS DE REFLEXIÓN</text:h>
      <text:h text:style-name="P2" text:outline-level="2">Curso de Discipulado Bíblico: Lecciones 0 a 8</text:h>
      <text:p text:style-name="P6"/>
      <text:h text:style-name="P2" text:outline-level="2">📖 LECCIÓN 0: Orientación e Introducción a la Religión</text:h>
      <text:h text:style-name="P3" text:outline-level="3">🔄 Preguntas de Repaso</text:h>
      <text:p text:style-name="Text_20_body"><text:span text:style-name="Strong_20_Emphasis"><text:span text:style-name="T1">1. ¿Cuáles son las dos definiciones de religión vistas en la lección?</text:span></text:span></text:p>
      <text:list text:style-name="L65">
        <text:list-item>
          <text:p text:style-name="P92"><text:span text:style-name="Strong_20_Emphasis"><text:span text:style-name="T1">Oriente (Jeongkyo):</text:span></text:span><text:span text:style-name="T1"> Las </text:span><text:span text:style-name="Strong_20_Emphasis"><text:span text:style-name="T1">mejores enseñanzas</text:span></text:span><text:span text:style-name="T1"> que vienen del cielo (de Dios). En caracteres chinos significa "cosas que se muestran del cielo". </text:span></text:p>
        </text:list-item>
        <text:list-item>
          <text:p text:style-name="P91"><text:span text:style-name="Strong_20_Emphasis"><text:span text:style-name="T1">Occidente (Religare):</text:span></text:span><text:span text:style-name="T1"> </text:span><text:span text:style-name="Strong_20_Emphasis"><text:span text:style-name="T1">Reconectar</text:span></text:span><text:span text:style-name="T1">. Implica que hubo una conexión original con Dios, luego una desconexión, y la religión es el proceso de volver a conectarse. </text:span></text:p>
        </text:list-item>
      </text:list>
      <text:p text:style-name="Text_20_body"><text:span text:style-name="Strong_20_Emphasis"><text:span text:style-name="T1">2. ¿Cómo podemos comprobar la existencia de Dios?</text:span></text:span></text:p>
      <text:list text:style-name="L66">
        <text:list-item>
          <text:p text:style-name="P94"><text:span text:style-name="Strong_20_Emphasis"><text:span text:style-name="T1">Respuesta:</text:span></text:span><text:span text:style-name="T1"> A través de la </text:span><text:span text:style-name="Strong_20_Emphasis"><text:span text:style-name="T1">Profecía y su Cumplimiento</text:span></text:span><text:span text:style-name="T1">. </text:span></text:p>
        </text:list-item>
        <text:list-item>
          <text:p text:style-name="P93"><text:span text:style-name="Emphasis"><text:span text:style-name="T1">Justificación:</text:span></text:span><text:span text:style-name="T1"> Así como al ver un desayuno listo con una nota sabemos que alguien existe y obró, al ver las profecías cumplidas sabemos que Dios existe y está activo. Ninguna otra religión tiene esta característica. </text:span></text:p>
        </text:list-item>
      </text:list>
      <text:p text:style-name="Text_20_body"><text:span text:style-name="Strong_20_Emphasis"><text:span text:style-name="T1">3. ¿Por qué necesitamos religión?</text:span></text:span></text:p>
      <text:list text:style-name="L67">
        <text:list-item>
          <text:p text:style-name="P95"><text:span text:style-name="Strong_20_Emphasis"><text:span text:style-name="T1">Respuesta:</text:span></text:span><text:span text:style-name="T1"> Porque </text:span><text:span text:style-name="Strong_20_Emphasis"><text:span text:style-name="T1">Dios es la fuente de vida</text:span></text:span><text:span text:style-name="T1">. Estar conectados con Él significa tener vida eterna; desconectarnos (como un teléfono sin corriente) lleva a la muerte espiritual. </text:span></text:p>
        </text:list-item>
      </text:list>
      <text:p text:style-name="P6"/>
      <text:h text:style-name="P2" text:outline-level="2">📖 LECCIÓN 1: Los Dos Dioses (Dios y Satanás)</text:h>
      <text:h text:style-name="P3" text:outline-level="3">🔄 Parte 1: Características de Dios y la Caída</text:h>
      <text:p text:style-name="Text_20_body"><text:span text:style-name="Strong_20_Emphasis"><text:span text:style-name="T1">1. ¿Qué opciones describen correctamente a Dios y a Satanás?</text:span></text:span></text:p>
      <text:list text:style-name="L68">
        <text:list-item>
          <text:p text:style-name="P97"><text:span text:style-name="Strong_20_Emphasis"><text:span text:style-name="T1">Dios:</text:span></text:span><text:span text:style-name="T1"> Es Creador, Espíritu, Autoexistente ("Yo soy") y Único. </text:span><text:span text:style-name="Strong_20_Emphasis"><text:span text:style-name="T1">No es una creación.</text:span></text:span><text:span text:style-name="T1"> </text:span></text:p>
        </text:list-item>
        <text:list-item>
          <text:p text:style-name="P96"><text:soft-page-break/><text:span text:style-name="Strong_20_Emphasis"><text:span text:style-name="T1">Satanás:</text:span></text:span><text:span text:style-name="T1"> Es un ángel caído, espíritu y </text:span><text:span text:style-name="Strong_20_Emphasis"><text:span text:style-name="T1">creación</text:span></text:span><text:span text:style-name="T1"> (no creador). </text:span><text:span text:style-name="Strong_20_Emphasis"><text:span text:style-name="T1">No fue creado malo desde el principio</text:span></text:span><text:span text:style-name="T1">; su orgullo lo corrompió. </text:span></text:p>
        </text:list-item>
      </text:list>
      <text:p text:style-name="Text_20_body"><text:span text:style-name="Strong_20_Emphasis"><text:span text:style-name="T1">2. ¿Qué significa "Yo soy" en Éxodo 3:14?</text:span></text:span></text:p>
      <text:list text:style-name="L69">
        <text:list-item>
          <text:p text:style-name="P98"><text:span text:style-name="Strong_20_Emphasis"><text:span text:style-name="T1">Respuesta:</text:span></text:span><text:span text:style-name="T1"> </text:span><text:span text:style-name="Strong_20_Emphasis"><text:span text:style-name="T1">Dios existe por sí mismo</text:span></text:span><text:span text:style-name="T1"> (autoexistente). Nadie lo creó; Él es el origen sin origen. </text:span></text:p>
        </text:list-item>
      </text:list>
      <text:p text:style-name="Text_20_body"><text:span text:style-name="Strong_20_Emphasis"><text:span text:style-name="T1">3. ¿Cuál fue la causa de la caída de Satanás?</text:span></text:span></text:p>
      <text:list text:style-name="L70">
        <text:list-item>
          <text:p text:style-name="P99"><text:span text:style-name="Strong_20_Emphasis"><text:span text:style-name="T1">Respuesta:</text:span></text:span><text:span text:style-name="T1"> </text:span><text:span text:style-name="Strong_20_Emphasis"><text:span text:style-name="T1">El orgullo</text:span></text:span><text:span text:style-name="T1">. Su corazón se enalteció y quiso ser semejante al Altísimo. </text:span></text:p>
        </text:list-item>
      </text:list>
      <text:p text:style-name="Text_20_body"><text:span text:style-name="Strong_20_Emphasis"><text:span text:style-name="T1">4. ¿Por qué es importante crecer espiritualmente según Hebreos 5:12-14?</text:span></text:span></text:p>
      <text:list text:style-name="L71">
        <text:list-item>
          <text:p text:style-name="P100"><text:span text:style-name="Strong_20_Emphasis"><text:span text:style-name="T1">Respuesta:</text:span></text:span><text:span text:style-name="T1"> Para alcanzar la madurez y tener los </text:span><text:span text:style-name="Strong_20_Emphasis"><text:span text:style-name="T1">sentidos ejercitados en el discernimiento entre el bien y el mal</text:span></text:span><text:span text:style-name="T1"> ante los ojos de Dios, no ante los del mundo. </text:span></text:p>
        </text:list-item>
      </text:list>
      <text:h text:style-name="P3" text:outline-level="3">🔄 Parte 2: La División en el Mundo Físico</text:h>
      <text:p text:style-name="Text_20_body"><text:span text:style-name="Strong_20_Emphasis"><text:span text:style-name="T1">5. ¿Cómo se prueba un espíritu si no podemos verlo?</text:span></text:span></text:p>
      <text:list text:style-name="L72">
        <text:list-item>
          <text:p text:style-name="P101"><text:span text:style-name="Strong_20_Emphasis"><text:span text:style-name="T1">Respuesta:</text:span></text:span><text:span text:style-name="T1"> A través de </text:span><text:span text:style-name="Strong_20_Emphasis"><text:span text:style-name="T1">las palabras que salen de la boca de la persona</text:span></text:span><text:span text:style-name="T1"> (Juan 6:63: "las palabras que yo os he hablado son espíritu y son vida"). </text:span></text:p>
        </text:list-item>
      </text:list>
      <text:p text:style-name="Text_20_body"><text:span text:style-name="Strong_20_Emphasis"><text:span text:style-name="T1">6. ¿Cómo distinguimos entre un pastor verdadero y uno falso?</text:span></text:span></text:p>
      <text:list text:style-name="L73">
        <text:list-item>
          <text:p text:style-name="P102"><text:span text:style-name="Strong_20_Emphasis"><text:span text:style-name="T1">Respuesta:</text:span></text:span><text:span text:style-name="T1"> </text:span><text:span text:style-name="Strong_20_Emphasis"><text:span text:style-name="T1">Por la palabra que enseñan</text:span></text:span><text:span text:style-name="T1">, no por su fama, tamaño de iglesia o riqueza. El estándar es la Biblia. </text:span></text:p>
        </text:list-item>
      </text:list>
      <text:p text:style-name="Text_20_body"><text:span text:style-name="Strong_20_Emphasis"><text:span text:style-name="T1">7. ¿De qué habla una persona enviada por Dios?</text:span></text:span></text:p>
      <text:list text:style-name="L74">
        <text:list-item>
          <text:p text:style-name="P103"><text:span text:style-name="Strong_20_Emphasis"><text:span text:style-name="T1">Respuesta:</text:span></text:span><text:span text:style-name="T1"> Habla las </text:span><text:span text:style-name="Strong_20_Emphasis"><text:span text:style-name="T1">palabras de Dios</text:span></text:span><text:span text:style-name="T1"> (la verdad, profecía y cumplimiento), no las palabras del hombre. </text:span></text:p>
        </text:list-item>
      </text:list>
      <text:p text:style-name="P6"/>
      <text:h text:style-name="P2" text:outline-level="2">📖 LECCIÓN 2: El Entendimiento Básico de la Biblia</text:h>
      <text:h text:style-name="P3" text:outline-level="3">🔄 Parte 1: Pactos y Discernimiento</text:h>
      <text:p text:style-name="Text_20_body"><text:span text:style-name="Strong_20_Emphasis"><text:span text:style-name="T1">1. ¿Qué debemos hacer según 1 Juan 4:1?</text:span></text:span></text:p>
      <text:list text:style-name="L75">
        <text:list-item>
          <text:p text:style-name="P104"><text:span text:style-name="Strong_20_Emphasis"><text:span text:style-name="T1">Respuesta:</text:span></text:span><text:span text:style-name="T1"> </text:span><text:span text:style-name="Strong_20_Emphasis"><text:span text:style-name="T1">Probar los espíritus</text:span></text:span><text:span text:style-name="T1"> si son de Dios, porque muchos falsos profetas han salido al mundo. </text:span></text:p>
        </text:list-item>
      </text:list>
      <text:p text:style-name="Text_20_body"><text:span text:style-name="Strong_20_Emphasis"><text:span text:style-name="T1">2. ¿Cuál es el propósito de Dios según 1 Timoteo 2:4?</text:span></text:span></text:p>
      <text:list text:style-name="L76">
        <text:list-item>
          <text:p text:style-name="P105"><text:soft-page-break/><text:span text:style-name="Strong_20_Emphasis"><text:span text:style-name="T1">Respuesta:</text:span></text:span><text:span text:style-name="T1"> </text:span><text:span text:style-name="Strong_20_Emphasis"><text:span text:style-name="T1">Que todos sean salvos y conozcan la verdad</text:span></text:span><text:span text:style-name="T1"> (la verdad de Dios, no la del hombre). </text:span></text:p>
        </text:list-item>
      </text:list>
      <text:p text:style-name="Text_20_body"><text:span text:style-name="Strong_20_Emphasis"><text:span text:style-name="T1">3. ¿Qué promesa hizo Dios a Israel en Éxodo 19:5-6?</text:span></text:span></text:p>
      <text:list text:style-name="L77">
        <text:list-item>
          <text:p text:style-name="P106"><text:span text:style-name="Strong_20_Emphasis"><text:span text:style-name="T1">Respuesta:</text:span></text:span><text:span text:style-name="T1"> Serían un </text:span><text:span text:style-name="Strong_20_Emphasis"><text:span text:style-name="T1">reino de sacerdotes y nación santa</text:span></text:span><text:span text:style-name="T1">, </text:span><text:span text:style-name="Emphasis"><text:span text:style-name="T1">siempre y cuando</text:span></text:span><text:span text:style-name="T1"> guardaran Su pacto al 100%. </text:span></text:p>
        </text:list-item>
      </text:list>
      <text:p text:style-name="Text_20_body"><text:span text:style-name="Strong_20_Emphasis"><text:span text:style-name="T1">4. ¿Quiénes forman el Israel espiritual según el Nuevo Testamento?</text:span></text:span></text:p>
      <text:list text:style-name="L78">
        <text:list-item>
          <text:p text:style-name="P107"><text:span text:style-name="Strong_20_Emphasis"><text:span text:style-name="T1">Respuesta:</text:span></text:span><text:span text:style-name="T1"> </text:span><text:span text:style-name="Strong_20_Emphasis"><text:span text:style-name="T1">Los creyentes (cristianos)</text:span></text:span><text:span text:style-name="T1"> que reciben y creen en Jesús, no por linaje de sangre, sino por recibir Su semilla (la Palabra). </text:span></text:p>
        </text:list-item>
      </text:list>
      <text:h text:style-name="P3" text:outline-level="3">🔄 Parte 2: Autoría y Contenidos</text:h>
      <text:p text:style-name="Text_20_body"><text:span text:style-name="Strong_20_Emphasis"><text:span text:style-name="T1">5. ¿Qué significa que la Biblia está inspirada por Dios?</text:span></text:span></text:p>
      <text:list text:style-name="L79">
        <text:list-item>
          <text:p text:style-name="P108"><text:span text:style-name="Strong_20_Emphasis"><text:span text:style-name="T1">Respuesta:</text:span></text:span><text:span text:style-name="T1"> Que </text:span><text:span text:style-name="Strong_20_Emphasis"><text:span text:style-name="T1">Dios guió a los escritores (35-40 personas) con su Espíritu Santo</text:span></text:span><text:span text:style-name="T1">. No fue solo razonamiento humano. </text:span></text:p>
        </text:list-item>
      </text:list>
      <text:p text:style-name="Text_20_body"><text:span text:style-name="Strong_20_Emphasis"><text:span text:style-name="T1">6. ¿Cuáles son las cuatro clasificaciones del contenido bíblico?</text:span></text:span></text:p>
      <text:list text:style-name="L80">
        <text:list-item>
          <text:p text:style-name="P109"><text:span text:style-name="Strong_20_Emphasis"><text:span text:style-name="T1">Respuesta:</text:span></text:span><text:span text:style-name="T1"> </text:span><text:span text:style-name="Strong_20_Emphasis"><text:span text:style-name="T1">Historia, Enseñanzas morales, Profecía y Cumplimiento.</text:span></text:span><text:span text:style-name="T1"> (Las dos últimas son las más importantes porque prueban que Dios es real y está vivo). </text:span></text:p>
        </text:list-item>
      </text:list>
      <text:p text:style-name="Text_20_body"><text:span text:style-name="Strong_20_Emphasis"><text:span text:style-name="T1">7. ¿Qué criticó Jesús según Marcos 7:6-9?</text:span></text:span></text:p>
      <text:list text:style-name="L81">
        <text:list-item>
          <text:p text:style-name="P110"><text:span text:style-name="Strong_20_Emphasis"><text:span text:style-name="T1">Respuesta:</text:span></text:span><text:span text:style-name="T1"> </text:span><text:span text:style-name="Strong_20_Emphasis"><text:span text:style-name="T1">Las tradiciones humanas que reemplazan la palabra de Dios</text:span></text:span><text:span text:style-name="T1">. </text:span></text:p>
        </text:list-item>
      </text:list>
      <text:h text:style-name="P3" text:outline-level="3">🔄 Parte 3 y 4: Profecía y Cumplimiento</text:h>
      <text:p text:style-name="Text_20_body"><text:span text:style-name="Strong_20_Emphasis"><text:span text:style-name="T1">8. ¿Por qué Dios anuncia las cosas antes de que sucedan?</text:span></text:span></text:p>
      <text:list text:style-name="L82">
        <text:list-item>
          <text:p text:style-name="P111"><text:span text:style-name="Strong_20_Emphasis"><text:span text:style-name="T1">Respuesta:</text:span></text:span><text:span text:style-name="T1"> </text:span><text:span text:style-name="Strong_20_Emphasis"><text:span text:style-name="T1">Para que creamos cuando sucedan</text:span></text:span><text:span text:style-name="T1"> (Juan 14:29). Esto está directamente ligado a la profecía y el cumplimiento. </text:span></text:p>
        </text:list-item>
      </text:list>
      <text:p text:style-name="Text_20_body"><text:span text:style-name="Strong_20_Emphasis"><text:span text:style-name="T1">9. ¿Qué demuestra el cumplimiento de las profecías?</text:span></text:span></text:p>
      <text:list text:style-name="L83">
        <text:list-item>
          <text:p text:style-name="P112"><text:span text:style-name="Strong_20_Emphasis"><text:span text:style-name="T1">Respuesta:</text:span></text:span><text:span text:style-name="T1"> Que </text:span><text:span text:style-name="Strong_20_Emphasis"><text:span text:style-name="T1">Dios es vivo y Su palabra es verdadera</text:span></text:span><text:span text:style-name="T1">. Si cumplió las del pasado, cumplirá las del futuro. </text:span></text:p>
        </text:list-item>
      </text:list>
      <text:p text:style-name="Text_20_body"><text:span text:style-name="Strong_20_Emphasis"><text:span text:style-name="T1">10. ¿Cuál es el orden correcto de las profecías según 2 Tesalonicenses 2:1-3?</text:span></text:span></text:p>
      <text:list text:style-name="L84">
        <text:list-item>
          <text:p text:style-name="P113"><text:span text:style-name="Strong_20_Emphasis"><text:span text:style-name="T1">Respuesta:</text:span></text:span><text:span text:style-name="T1"> </text:span><text:span text:style-name="Strong_20_Emphasis"><text:span text:style-name="T1">Traición, destrucción y salvación</text:span></text:span><text:span text:style-name="T1">. Este orden nos ayuda a no ser engañados. </text:span></text:p>
        </text:list-item>
      </text:list>
      <text:p text:style-name="Text_20_body"><text:span text:style-name="Strong_20_Emphasis"><text:span text:style-name="T1">11. ¿Qué significa tener una "fe completa"?</text:span></text:span></text:p>
      <text:list text:style-name="L85">
        <text:list-item>
          <text:p text:style-name="P114"><text:soft-page-break/><text:span text:style-name="Strong_20_Emphasis"><text:span text:style-name="T1">Respuesta:</text:span></text:span><text:span text:style-name="T1"> </text:span><text:span text:style-name="Strong_20_Emphasis"><text:span text:style-name="T1">Creer tanto en la profecía como en su cumplimiento (la realidad).</text:span></text:span><text:span text:style-name="T1"> Los judíos creyeron en la profecía, pero no en el cumplimiento (Jesús). </text:span></text:p>
        </text:list-item>
      </text:list>
      <text:p text:style-name="P6"/>
      <text:h text:style-name="P2" text:outline-level="2">📖 LECCIÓN 3: Las Parábolas de los Misterios del Reino</text:h>
      <text:h text:style-name="P3" text:outline-level="3">🔄 Preguntas de Repaso</text:h>
      <text:p text:style-name="Text_20_body"><text:span text:style-name="Strong_20_Emphasis"><text:span text:style-name="T1">1. ¿Qué es una parábola?</text:span></text:span></text:p>
      <text:list text:style-name="L86">
        <text:list-item>
          <text:p text:style-name="P115"><text:span text:style-name="Strong_20_Emphasis"><text:span text:style-name="T1">Respuesta:</text:span></text:span><text:span text:style-name="T1"> Es usar frases como </text:span><text:span text:style-name="Strong_20_Emphasis"><text:span text:style-name="T1">"es como..."</text:span></text:span><text:span text:style-name="T1"> para comparar algo físico con algo espiritual, describiendo características de uno para entender al otro. </text:span></text:p>
        </text:list-item>
      </text:list>
      <text:p text:style-name="Text_20_body"><text:span text:style-name="Strong_20_Emphasis"><text:span text:style-name="T1">2. ¿Cuál es el propósito de las parábolas en Historia/Moral vs. Profecía?</text:span></text:span></text:p>
      <text:list text:style-name="L87">
        <text:list-item>
          <text:p text:style-name="P117"><text:span text:style-name="Strong_20_Emphasis"><text:span text:style-name="T1">Enseñanzas e Historia:</text:span></text:span><text:span text:style-name="T1"> Son para </text:span><text:span text:style-name="Strong_20_Emphasis"><text:span text:style-name="T1">ayudar al entendimiento</text:span></text:span><text:span text:style-name="T1"> (reforzar la idea). </text:span></text:p>
        </text:list-item>
        <text:list-item>
          <text:p text:style-name="P116"><text:span text:style-name="Strong_20_Emphasis"><text:span text:style-name="T1">Profecía:</text:span></text:span><text:span text:style-name="T1"> Son para </text:span><text:span text:style-name="Strong_20_Emphasis"><text:span text:style-name="T1">ocultar los secretos del reino</text:span></text:span><text:span text:style-name="T1"> de Satanás y de aquellos con corazón cerrado. </text:span></text:p>
        </text:list-item>
      </text:list>
      <text:p text:style-name="Text_20_body"><text:span text:style-name="Strong_20_Emphasis"><text:span text:style-name="T1">3. ¿Por qué Jesús habló en parábolas? (Dos razones)</text:span></text:span></text:p>
      <text:list text:style-name="L88">
        <text:list-item>
          <text:p text:style-name="P119"><text:span text:style-name="Strong_20_Emphasis"><text:span text:style-name="T1">Razón 1:</text:span></text:span><text:span text:style-name="T1"> Para </text:span><text:span text:style-name="Strong_20_Emphasis"><text:span text:style-name="T1">esconder los secretos</text:span></text:span><text:span text:style-name="T1"> de los enemigos (como un código de guerra). </text:span></text:p>
        </text:list-item>
        <text:list-item>
          <text:p text:style-name="P118"><text:span text:style-name="Strong_20_Emphasis"><text:span text:style-name="T1">Razón 2:</text:span></text:span><text:span text:style-name="T1"> Porque estaba </text:span><text:span text:style-name="Strong_20_Emphasis"><text:span text:style-name="T1">profetizado</text:span></text:span><text:span text:style-name="T1"> (Salmos 78:2 ➡️ Mateo 13:34). </text:span></text:p>
        </text:list-item>
      </text:list>
      <text:p text:style-name="Text_20_body"><text:span text:style-name="Strong_20_Emphasis"><text:span text:style-name="T1">4. ¿Cuál es la diferencia entre los que saben las parábolas y los que no?</text:span></text:span></text:p>
      <text:list text:style-name="L89">
        <text:list-item>
          <text:p text:style-name="P121"><text:span text:style-name="Strong_20_Emphasis"><text:span text:style-name="T1">Los que saben:</text:span></text:span><text:span text:style-name="T1"> Conocen y hacen la voluntad de Dios ➡️ reciben perdón de pecados ➡️ tienen </text:span><text:span text:style-name="Strong_20_Emphasis"><text:span text:style-name="T1">salvación</text:span></text:span><text:span text:style-name="T1">. </text:span></text:p>
        </text:list-item>
        <text:list-item>
          <text:p text:style-name="P120"><text:span text:style-name="Strong_20_Emphasis"><text:span text:style-name="T1">Los que no saben:</text:span></text:span><text:span text:style-name="T1"> No conocen la voluntad ➡️ no la hacen ➡️ no reciben perdón ➡️ </text:span><text:span text:style-name="Strong_20_Emphasis"><text:span text:style-name="T1">no tienen salvación</text:span></text:span><text:span text:style-name="T1">. </text:span></text:p>
        </text:list-item>
      </text:list>
      <text:p text:style-name="Text_20_body"><text:span text:style-name="Strong_20_Emphasis"><text:span text:style-name="T1">5. ¿Cuándo se pueden entender las parábolas?</text:span></text:span></text:p>
      <text:list text:style-name="L90">
        <text:list-item>
          <text:p text:style-name="P122"><text:span text:style-name="Strong_20_Emphasis"><text:span text:style-name="T1">Respuesta:</text:span></text:span><text:span text:style-name="T1"> En el </text:span><text:span text:style-name="Strong_20_Emphasis"><text:span text:style-name="T1">último tiempo, cuando la profecía se cumple y aparece la realidad</text:span></text:span><text:span text:style-name="T1">. No en cualquier momento. </text:span></text:p>
        </text:list-item>
      </text:list>
      <text:p text:style-name="Text_20_body"><text:span text:style-name="Strong_20_Emphasis"><text:span text:style-name="T1">6. ¿Cuáles son los 5 tipos de parábolas?</text:span></text:span></text:p>
      <text:list text:style-name="L91">
        <text:list-item>
          <text:p text:style-name="P123"><text:span text:style-name="Strong_20_Emphasis"><text:span text:style-name="T1">Respuesta:</text:span></text:span><text:span text:style-name="T1"> 1) Objetos (naturaleza), 2) Profetas, 3) Animales/Bestias, 4) Acontecimientos Históricos, 5) Lugares/Países. </text:span></text:p>
        </text:list-item>
      </text:list>
      <text:p text:style-name="P6"/>
      <text:h text:style-name="P2" text:outline-level="2"><text:soft-page-break/>📖 LECCIÓN 4: Semilla, Campo, Árbol y Ave en Figurativo</text:h>
      <text:h text:style-name="P3" text:outline-level="3">🔄 Parte 1: Semilla y Campo</text:h>
      <text:p text:style-name="Text_20_body"><text:span text:style-name="Strong_20_Emphasis"><text:span text:style-name="T1">1. ¿Qué es la semilla espiritualmente?</text:span></text:span></text:p>
      <text:list text:style-name="L92">
        <text:list-item>
          <text:p text:style-name="P124"><text:span text:style-name="Strong_20_Emphasis"><text:span text:style-name="T1">Respuesta:</text:span></text:span><text:span text:style-name="T1"> </text:span><text:span text:style-name="Strong_20_Emphasis"><text:span text:style-name="T1">La Palabra de Dios</text:span></text:span><text:span text:style-name="T1"> (la verdad del cumplimiento). Lucas 8:11. </text:span></text:p>
        </text:list-item>
      </text:list>
      <text:p text:style-name="Text_20_body"><text:span text:style-name="Strong_20_Emphasis"><text:span text:style-name="T1">2. ¿Cuántas semillas hay?</text:span></text:span></text:p>
      <text:list text:style-name="L93">
        <text:list-item>
          <text:p text:style-name="P125"><text:span text:style-name="Strong_20_Emphasis"><text:span text:style-name="T1">Respuesta:</text:span></text:span><text:span text:style-name="T1"> </text:span><text:span text:style-name="Strong_20_Emphasis"><text:span text:style-name="T1">Dos.</text:span></text:span><text:span text:style-name="T1"> La semilla de Dios (Verdad) y la semilla de Satanás (Mentira/Tergiversación). </text:span></text:p>
        </text:list-item>
      </text:list>
      <text:p text:style-name="Text_20_body"><text:span text:style-name="Strong_20_Emphasis"><text:span text:style-name="T1">3. ¿Qué es el campo?</text:span></text:span></text:p>
      <text:list text:style-name="L94">
        <text:list-item>
          <text:p text:style-name="P126"><text:span text:style-name="Strong_20_Emphasis"><text:span text:style-name="T1">Respuesta:</text:span></text:span><text:span text:style-name="T1"> </text:span><text:span text:style-name="Strong_20_Emphasis"><text:span text:style-name="T1">Nuestro corazón</text:span></text:span><text:span text:style-name="T1"> (individuo) y también </text:span><text:span text:style-name="Strong_20_Emphasis"><text:span text:style-name="T1">el mundo</text:span></text:span><text:span text:style-name="T1"> (el cristianismo, donde conviven buena semilla y cizaña). </text:span></text:p>
        </text:list-item>
      </text:list>
      <text:p text:style-name="Text_20_body"><text:span text:style-name="Strong_20_Emphasis"><text:span text:style-name="T1">4. ¿Cuáles son los cuatro campos (corazones)?</text:span></text:span></text:p>
      <text:list text:style-name="L95">
        <text:list-item>
          <text:p text:style-name="P128"><text:span text:style-name="Strong_20_Emphasis"><text:span text:style-name="T1">Camino:</text:span></text:span><text:span text:style-name="T1"> No entienden, el diablo se la lleva. </text:span></text:p>
        </text:list-item>
        <text:list-item>
          <text:p text:style-name="P128"><text:span text:style-name="Strong_20_Emphasis"><text:span text:style-name="T1">Piedras:</text:span></text:span><text:span text:style-name="T1"> Persecución, se secan. </text:span></text:p>
        </text:list-item>
        <text:list-item>
          <text:p text:style-name="P128"><text:span text:style-name="Strong_20_Emphasis"><text:span text:style-name="T1">Espinos:</text:span></text:span><text:span text:style-name="T1"> Afanes y riquezas, se ahogan. </text:span></text:p>
        </text:list-item>
        <text:list-item>
          <text:p text:style-name="P127"><text:span text:style-name="Strong_20_Emphasis"><text:span text:style-name="T1">Buena Tierra:</text:span></text:span><text:span text:style-name="T1"> Retienen la palabra y dan fruto con perseverancia. </text:span></text:p>
        </text:list-item>
      </text:list>
      <text:h text:style-name="P3" text:outline-level="3">🔄 Parte 2: Árbol, Ramas, Hojas, Frutos y Aves</text:h>
      <text:p text:style-name="Text_20_body"><text:span text:style-name="Strong_20_Emphasis"><text:span text:style-name="T1">5. ¿Qué significa el árbol espiritual?</text:span></text:span></text:p>
      <text:list text:style-name="L96">
        <text:list-item>
          <text:p text:style-name="P129"><text:span text:style-name="Strong_20_Emphasis"><text:span text:style-name="T1">Respuesta:</text:span></text:span><text:span text:style-name="T1"> Una </text:span><text:span text:style-name="Strong_20_Emphasis"><text:span text:style-name="T1">persona interna renacida</text:span></text:span><text:span text:style-name="T1"> por la semilla espiritual, o también representa a un </text:span><text:span text:style-name="Strong_20_Emphasis"><text:span text:style-name="T1">pastor/organización</text:span></text:span><text:span text:style-name="T1">. </text:span></text:p>
        </text:list-item>
      </text:list>
      <text:p text:style-name="Text_20_body"><text:span text:style-name="Strong_20_Emphasis"><text:span text:style-name="T1">6. ¿Cuáles son los dos árboles?</text:span></text:span></text:p>
      <text:list text:style-name="L97">
        <text:list-item>
          <text:p text:style-name="P130"><text:span text:style-name="Strong_20_Emphasis"><text:span text:style-name="T1">Respuesta:</text:span></text:span><text:span text:style-name="T1"> El </text:span><text:span text:style-name="Strong_20_Emphasis"><text:span text:style-name="T1">Árbol de la Vida</text:span></text:span><text:span text:style-name="T1"> (Dios/Jesús/verdadero pastor) y el </text:span><text:span text:style-name="Strong_20_Emphasis"><text:span text:style-name="T1">Árbol de la Ciencia del Bien y del Mal</text:span></text:span><text:span text:style-name="T1"> (Satanás/falsos pastores). </text:span></text:p>
        </text:list-item>
      </text:list>
      <text:p text:style-name="Text_20_body"><text:span text:style-name="Strong_20_Emphasis"><text:span text:style-name="T1">7. ¿Qué son las aves?</text:span></text:span></text:p>
      <text:list text:style-name="L98">
        <text:list-item>
          <text:p text:style-name="P131"><text:span text:style-name="Strong_20_Emphasis"><text:span text:style-name="T1">Respuesta:</text:span></text:span><text:span text:style-name="T1"> </text:span><text:span text:style-name="Strong_20_Emphasis"><text:span text:style-name="T1">Los espíritus</text:span></text:span><text:span text:style-name="T1"> (buenos y malos). Los espíritus de Dios anidan en el árbol de vida; los espíritus malignos roban la semilla. </text:span></text:p>
        </text:list-item>
      </text:list>
      <text:p text:style-name="Text_20_body"><text:span text:style-name="Strong_20_Emphasis"><text:span text:style-name="T1">8. ¿Qué son las ramas, hojas y frutos?</text:span></text:span></text:p>
      <text:list text:style-name="L99">
        <text:list-item>
          <text:p text:style-name="P133"><text:span text:style-name="Strong_20_Emphasis"><text:span text:style-name="T1">Ramas:</text:span></text:span><text:span text:style-name="T1"> Los </text:span><text:span text:style-name="Strong_20_Emphasis"><text:span text:style-name="T1">discípulos/trabajadores</text:span></text:span><text:span text:style-name="T1">. </text:span></text:p>
        </text:list-item>
        <text:list-item>
          <text:p text:style-name="P133"><text:soft-page-break/><text:span text:style-name="Strong_20_Emphasis"><text:span text:style-name="T1">Hojas:</text:span></text:span><text:span text:style-name="T1"> Los </text:span><text:span text:style-name="Strong_20_Emphasis"><text:span text:style-name="T1">evangelistas</text:span></text:span><text:span text:style-name="T1"> (para la sanidad de las naciones). </text:span></text:p>
        </text:list-item>
        <text:list-item>
          <text:p text:style-name="P132"><text:span text:style-name="Strong_20_Emphasis"><text:span text:style-name="T1">Frutos:</text:span></text:span><text:span text:style-name="T1"> La </text:span><text:span text:style-name="Strong_20_Emphasis"><text:span text:style-name="T1">palabra</text:span></text:span><text:span text:style-name="T1"> y la </text:span><text:span text:style-name="Strong_20_Emphasis"><text:span text:style-name="T1">congregación</text:span></text:span><text:span text:style-name="T1"> que nace por ella. </text:span></text:p>
        </text:list-item>
      </text:list>
      <text:p text:style-name="P6"/>
      <text:h text:style-name="P2" text:outline-level="2">📖 LECCIÓN 5: Alimento y Levadura en Figurativo</text:h>
      <text:h text:style-name="P3" text:outline-level="3">🔄 Parte 1: Alimento Espiritual</text:h>
      <text:p text:style-name="Text_20_body"><text:span text:style-name="Strong_20_Emphasis"><text:span text:style-name="T1">1. ¿Cuáles son los dos alimentos espirituales?</text:span></text:span></text:p>
      <text:list text:style-name="L100">
        <text:list-item>
          <text:p text:style-name="P134"><text:span text:style-name="Strong_20_Emphasis"><text:span text:style-name="T1">Respuesta:</text:span></text:span><text:span text:style-name="T1"> El </text:span><text:span text:style-name="Strong_20_Emphasis"><text:span text:style-name="T1">alimento de Dios</text:span></text:span><text:span text:style-name="T1"> (Palabra de verdad, da vida) y el </text:span><text:span text:style-name="Strong_20_Emphasis"><text:span text:style-name="T1">alimento de Satanás</text:span></text:span><text:span text:style-name="T1"> (mentiras, causa muerte espiritual). </text:span></text:p>
        </text:list-item>
      </text:list>
      <text:p text:style-name="Text_20_body"><text:span text:style-name="Strong_20_Emphasis"><text:span text:style-name="T1">2. ¿Qué es el hambre espiritual?</text:span></text:span></text:p>
      <text:list text:style-name="L101">
        <text:list-item>
          <text:p text:style-name="P135"><text:span text:style-name="Strong_20_Emphasis"><text:span text:style-name="T1">Respuesta:</text:span></text:span><text:span text:style-name="T1"> </text:span><text:span text:style-name="Strong_20_Emphasis"><text:span text:style-name="T1">Hambre de oír la Palabra de Dios</text:span></text:span><text:span text:style-name="T1"> (Amós 8:11). No es falta de pan físico, sino de revelación. </text:span></text:p>
        </text:list-item>
      </text:list>
      <text:p text:style-name="Text_20_body"><text:span text:style-name="Strong_20_Emphasis"><text:span text:style-name="T1">3. ¿Cómo discernimos el alimento?</text:span></text:span></text:p>
      <text:list text:style-name="L102">
        <text:list-item>
          <text:p text:style-name="P136"><text:span text:style-name="Strong_20_Emphasis"><text:span text:style-name="T1">Respuesta:</text:span></text:span><text:span text:style-name="T1"> Usando nuestros </text:span><text:span text:style-name="Strong_20_Emphasis"><text:span text:style-name="T1">oídos</text:span></text:span><text:span text:style-name="T1"> y probando las palabras con la Biblia, como el paladar prueba la comida (Job 34:3). </text:span></text:p>
        </text:list-item>
      </text:list>
      <text:p text:style-name="Text_20_body"><text:span text:style-name="Strong_20_Emphasis"><text:span text:style-name="T1">4. ¿Cuál fue el alimento de la Primera Venida?</text:span></text:span></text:p>
      <text:list text:style-name="L103">
        <text:list-item>
          <text:p text:style-name="P137"><text:span text:style-name="Strong_20_Emphasis"><text:span text:style-name="T1">Respuesta:</text:span></text:span><text:span text:style-name="T1"> Las </text:span><text:span text:style-name="Strong_20_Emphasis"><text:span text:style-name="T1">profecías del Antiguo Testamento y su realidad/cumplimiento</text:span></text:span><text:span text:style-name="T1"> (Jesús). </text:span></text:p>
        </text:list-item>
      </text:list>
      <text:p text:style-name="Text_20_body"><text:span text:style-name="Strong_20_Emphasis"><text:span text:style-name="T1">5. ¿Cuál es el alimento de la Segunda Venida?</text:span></text:span></text:p>
      <text:list text:style-name="L104">
        <text:list-item>
          <text:p text:style-name="P138"><text:span text:style-name="Strong_20_Emphasis"><text:span text:style-name="T1">Respuesta:</text:span></text:span><text:span text:style-name="T1"> Las </text:span><text:span text:style-name="Strong_20_Emphasis"><text:span text:style-name="T1">profecías del Nuevo Testamento (Apocalipsis) y su realidad/cumplimiento</text:span></text:span><text:span text:style-name="T1">. </text:span></text:p>
        </text:list-item>
      </text:list>
      <text:p text:style-name="Text_20_body"><text:span text:style-name="Strong_20_Emphasis"><text:span text:style-name="T1">6. ¿Quién da este alimento a tiempo?</text:span></text:span></text:p>
      <text:list text:style-name="L105">
        <text:list-item>
          <text:p text:style-name="P139"><text:span text:style-name="Strong_20_Emphasis"><text:span text:style-name="T1">Respuesta:</text:span></text:span><text:span text:style-name="T1"> El </text:span><text:span text:style-name="Strong_20_Emphasis"><text:span text:style-name="T1">siervo fiel y prudente</text:span></text:span><text:span text:style-name="T1"> (el pastor verdadero enviado por Dios, Mateo 24:45). </text:span></text:p>
        </text:list-item>
      </text:list>
      <text:h text:style-name="P3" text:outline-level="3">🔄 Parte 2: Levadura Espiritual</text:h>
      <text:p text:style-name="Text_20_body"><text:span text:style-name="Strong_20_Emphasis"><text:span text:style-name="T1">7. ¿Qué representa la levadura espiritual?</text:span></text:span></text:p>
      <text:list text:style-name="L106">
        <text:list-item>
          <text:p text:style-name="P140"><text:span text:style-name="Strong_20_Emphasis"><text:span text:style-name="T1">Respuesta:</text:span></text:span><text:span text:style-name="T1"> </text:span><text:span text:style-name="Strong_20_Emphasis"><text:span text:style-name="T1">Enseñanzas morales que cambian el corazón</text:span></text:span><text:span text:style-name="T1">. Así como la levadura cambia la masa, estas enseñanzas nos transforman. </text:span></text:p>
        </text:list-item>
      </text:list>
      <text:p text:style-name="Text_20_body"><text:span text:style-name="Strong_20_Emphasis"><text:span text:style-name="T1">8. ¿Qué representa que "todo fue leudado"?</text:span></text:span></text:p>
      <text:list text:style-name="L107">
        <text:list-item>
          <text:p text:style-name="P141"><text:soft-page-break/><text:span text:style-name="Strong_20_Emphasis"><text:span text:style-name="T1">Respuesta:</text:span></text:span><text:span text:style-name="T1"> </text:span><text:span text:style-name="Strong_20_Emphasis"><text:span text:style-name="T1">La enseñanza influyó completamente</text:span></text:span><text:span text:style-name="T1"> en aquello donde fue puesta. Debe haber un cambio total, no parcial. </text:span></text:p>
        </text:list-item>
      </text:list>
      <text:p text:style-name="Text_20_body"><text:span text:style-name="Strong_20_Emphasis"><text:span text:style-name="T1">9. ¿Por qué es importante tener cuidado con lo que escuchamos?</text:span></text:span></text:p>
      <text:list text:style-name="L108">
        <text:list-item>
          <text:p text:style-name="P142"><text:span text:style-name="Strong_20_Emphasis"><text:span text:style-name="T1">Respuesta:</text:span></text:span><text:span text:style-name="T1"> Porque hay </text:span><text:span text:style-name="Strong_20_Emphasis"><text:span text:style-name="T1">dos tipos de levaduras</text:span></text:span><text:span text:style-name="T1">. Si aceptamos la de Dios, nos transformamos a Su imagen; si aceptamos la de Satanás, nos convertimos más en él. </text:span></text:p>
        </text:list-item>
      </text:list>
      <text:p text:style-name="Text_20_body"><text:span text:style-name="Strong_20_Emphasis"><text:span text:style-name="T1">10. ¿Qué evidencia muestra que una persona recibe la levadura de Dios?</text:span></text:span></text:p>
      <text:list text:style-name="L109">
        <text:list-item>
          <text:p text:style-name="P143"><text:span text:style-name="Strong_20_Emphasis"><text:span text:style-name="T1">Respuesta:</text:span></text:span><text:span text:style-name="T1"> </text:span><text:span text:style-name="Strong_20_Emphasis"><text:span text:style-name="T1">El cambio</text:span></text:span><text:span text:style-name="T1">. Abandonar el "viejo hombre" y renovarse en el espíritu de la mente (Efesios 4:21-24). </text:span></text:p>
        </text:list-item>
      </text:list>
      <text:p text:style-name="P6"/>
      <text:h text:style-name="P2" text:outline-level="2">📖 LECCIÓN 6: Copa, Balanza y Vara en Figurativo</text:h>
      <text:h text:style-name="P3" text:outline-level="3">🔄 Parte 1: Copa (Vasija)</text:h>
      <text:p text:style-name="Text_20_body"><text:span text:style-name="Strong_20_Emphasis"><text:span text:style-name="T1">1. ¿Qué representa la copa?</text:span></text:span></text:p>
      <text:list text:style-name="L110">
        <text:list-item>
          <text:p text:style-name="P144"><text:span text:style-name="Strong_20_Emphasis"><text:span text:style-name="T1">Respuesta:</text:span></text:span><text:span text:style-name="T1"> </text:span><text:span text:style-name="Strong_20_Emphasis"><text:span text:style-name="T1">El corazón de la persona</text:span></text:span><text:span text:style-name="T1"> (contenedor pequeño) y también </text:span><text:span text:style-name="Strong_20_Emphasis"><text:span text:style-name="T1">la Iglesia</text:span></text:span><text:span text:style-name="T1"> (contenedor grande que reúne muchas copas). </text:span></text:p>
        </text:list-item>
      </text:list>
      <text:p text:style-name="Text_20_body"><text:span text:style-name="Strong_20_Emphasis"><text:span text:style-name="T1">2. ¿Qué son los dos tipos de copas?</text:span></text:span></text:p>
      <text:list text:style-name="L111">
        <text:list-item>
          <text:p text:style-name="P146"><text:span text:style-name="Strong_20_Emphasis"><text:span text:style-name="T1">Copa de Dios:</text:span></text:span><text:span text:style-name="T1"> Contiene la </text:span><text:span text:style-name="Strong_20_Emphasis"><text:span text:style-name="T1">Verdad</text:span></text:span><text:span text:style-name="T1"> (profecía y cumplimiento). Resultado: Bendición, vida eterna. </text:span></text:p>
        </text:list-item>
        <text:list-item>
          <text:p text:style-name="P145"><text:span text:style-name="Strong_20_Emphasis"><text:span text:style-name="T1">Copa de Satanás:</text:span></text:span><text:span text:style-name="T1"> Contiene </text:span><text:span text:style-name="Strong_20_Emphasis"><text:span text:style-name="T1">Mentiras</text:span></text:span><text:span text:style-name="T1"> (palabra de Dios tergiversada con pensamientos humanos/sedimentos). Resultado: Maldición, juicio. </text:span></text:p>
        </text:list-item>
      </text:list>
      <text:p text:style-name="Text_20_body"><text:span text:style-name="Strong_20_Emphasis"><text:span text:style-name="T1">3. ¿Qué peligro espiritual muestra el ejemplo de Moab?</text:span></text:span></text:p>
      <text:list text:style-name="L112">
        <text:list-item>
          <text:p text:style-name="P147"><text:span text:style-name="Strong_20_Emphasis"><text:span text:style-name="T1">Respuesta:</text:span></text:span><text:span text:style-name="T1"> Pensar que estamos bien mientras conservamos </text:span><text:span text:style-name="Strong_20_Emphasis"><text:span text:style-name="T1">impurezas y pensamientos contrarios a la verdad</text:span></text:span><text:span text:style-name="T1"> (sedimentos) sin darnos cuenta. </text:span></text:p>
        </text:list-item>
      </text:list>
      <text:h text:style-name="P3" text:outline-level="3">🔄 Parte 2: Balanza y Vara</text:h>
      <text:p text:style-name="Text_20_body"><text:span text:style-name="Strong_20_Emphasis"><text:span text:style-name="T1">4. ¿Qué representa la balanza, la vara y la vara de hierro?</text:span></text:span></text:p>
      <text:list text:style-name="L113">
        <text:list-item>
          <text:p text:style-name="P149"><text:span text:style-name="Strong_20_Emphasis"><text:span text:style-name="T1">Balanza:</text:span></text:span><text:span text:style-name="T1"> La </text:span><text:span text:style-name="Strong_20_Emphasis"><text:span text:style-name="T1">Palabra de Dios</text:span></text:span><text:span text:style-name="T1"> (que nos pesa, mide y juzga). </text:span></text:p>
        </text:list-item>
        <text:list-item>
          <text:p text:style-name="P149"><text:span text:style-name="Strong_20_Emphasis"><text:span text:style-name="T1">Vara:</text:span></text:span><text:span text:style-name="T1"> La </text:span><text:span text:style-name="Strong_20_Emphasis"><text:span text:style-name="T1">Palabra de Dios y la persona (pastor) que la porta</text:span></text:span><text:span text:style-name="T1"> (nos guía y apoya). </text:span></text:p>
        </text:list-item>
        <text:list-item>
          <text:p text:style-name="P148"><text:span text:style-name="Strong_20_Emphasis"><text:span text:style-name="T1">Vara de Hierro:</text:span></text:span><text:span text:style-name="T1"> La </text:span><text:span text:style-name="Strong_20_Emphasis"><text:span text:style-name="T1">autoridad para reinar y juzgar</text:span></text:span><text:span text:style-name="T1"> (el cetro del rey). </text:span></text:p>
        </text:list-item>
      </text:list>
      <text:p text:style-name="Text_20_body"><text:span text:style-name="Strong_20_Emphasis"><text:span text:style-name="T1">5. ¿De dónde venía la autoridad que Jesús recibe en la primera venida?</text:span></text:span></text:p>
      <text:list text:style-name="L114">
        <text:list-item>
          <text:p text:style-name="P150"><text:soft-page-break/><text:span text:style-name="Strong_20_Emphasis"><text:span text:style-name="T1">Respuesta:</text:span></text:span><text:span text:style-name="T1"> De </text:span><text:span text:style-name="Strong_20_Emphasis"><text:span text:style-name="T1">las palabras de Dios</text:span></text:span><text:span text:style-name="T1">. El Padre le dio Su autoridad a través de las palabras reveladas (Juan 17:8). </text:span></text:p>
        </text:list-item>
      </text:list>
      <text:p text:style-name="Text_20_body"><text:span text:style-name="Strong_20_Emphasis"><text:span text:style-name="T1">6. ¿Quién recibe la vara de hierro en la primera venida?</text:span></text:span></text:p>
      <text:list text:style-name="L115">
        <text:list-item>
          <text:p text:style-name="P151"><text:span text:style-name="Strong_20_Emphasis"><text:span text:style-name="T1">Respuesta:</text:span></text:span><text:span text:style-name="T1"> </text:span><text:span text:style-name="Strong_20_Emphasis"><text:span text:style-name="T1">Jesucristo (Jesús)</text:span></text:span><text:span text:style-name="T1">. Dios el Padre le dio la autoridad. </text:span></text:p>
        </text:list-item>
      </text:list>
      <text:p text:style-name="Text_20_body"><text:span text:style-name="Strong_20_Emphasis"><text:span text:style-name="T1">7. ¿A quién promete Jesús darle la vara de hierro en la segunda venida?</text:span></text:span></text:p>
      <text:list text:style-name="L116">
        <text:list-item>
          <text:p text:style-name="P152"><text:span text:style-name="Strong_20_Emphasis"><text:span text:style-name="T1">Respuesta:</text:span></text:span><text:span text:style-name="T1"> </text:span><text:span text:style-name="Strong_20_Emphasis"><text:span text:style-name="T1">Al vencedor</text:span></text:span><text:span text:style-name="T1"> (el que venciere y guardare Sus obras hasta el final, Apocalipsis 2:26-27). </text:span></text:p>
        </text:list-item>
      </text:list>
      <text:p text:style-name="P6"/>
      <text:h text:style-name="P2" text:outline-level="2">📖 LECCIÓN 7: Fuego, Incensario y Olla en Figurativo</text:h>
      <text:h text:style-name="P3" text:outline-level="3">🔄 Parte 1: El Fuego</text:h>
      <text:p text:style-name="Text_20_body"><text:span text:style-name="Strong_20_Emphasis"><text:span text:style-name="T1">1. ¿Qué representa el fuego en figurativo?</text:span></text:span></text:p>
      <text:list text:style-name="L117">
        <text:list-item>
          <text:p text:style-name="P153"><text:span text:style-name="Strong_20_Emphasis"><text:span text:style-name="T1">Respuesta:</text:span></text:span><text:span text:style-name="T1"> </text:span><text:span text:style-name="Strong_20_Emphasis"><text:span text:style-name="T1">La Palabra.</text:span></text:span><text:span text:style-name="T1"> (Puede ser la Palabra de Dios o la palabra de Satanás). </text:span></text:p>
        </text:list-item>
      </text:list>
      <text:p text:style-name="Text_20_body"><text:span text:style-name="Strong_20_Emphasis"><text:span text:style-name="T1">2. ¿Qué significa ser bautizado en fuego?</text:span></text:span></text:p>
      <text:list text:style-name="L118">
        <text:list-item>
          <text:p text:style-name="P154"><text:span text:style-name="Strong_20_Emphasis"><text:span text:style-name="T1">Respuesta:</text:span></text:span><text:span text:style-name="T1"> </text:span><text:span text:style-name="Strong_20_Emphasis"><text:span text:style-name="T1">El bautismo de la Palabra de Dios.</text:span></text:span><text:span text:style-name="T1"> Es el proceso de darse cuenta de nuestras malas acciones e impurezas (sedimentos) y desecharlas a través de la Palabra de verdad. </text:span></text:p>
        </text:list-item>
      </text:list>
      <text:p text:style-name="Text_20_body"><text:span text:style-name="Strong_20_Emphasis"><text:span text:style-name="T1">3. ¿Cuáles son los dos tipos de fuego en figurativo y su resultado?</text:span></text:span></text:p>
      <text:list text:style-name="L119">
        <text:list-item>
          <text:p text:style-name="P156"><text:span text:style-name="Strong_20_Emphasis"><text:span text:style-name="T1">a) Fuego de Dios:</text:span></text:span></text:p>
          <text:list>
            <text:list-item>
              <text:p text:style-name="P156"><text:span text:style-name="Emphasis"><text:span text:style-name="T1">Representa:</text:span></text:span><text:span text:style-name="T1"> La Palabra de Dios (Verdad, profecía y cumplimiento). </text:span></text:p>
            </text:list-item>
            <text:list-item>
              <text:p text:style-name="P156"><text:span text:style-name="Emphasis"><text:span text:style-name="T1">Resultado:</text:span></text:span><text:span text:style-name="T1"> </text:span><text:span text:style-name="Strong_20_Emphasis"><text:span text:style-name="T1">Purifica y salva</text:span></text:span><text:span text:style-name="T1"> a los que la aceptan (limpia el pecado). También </text:span><text:span text:style-name="Strong_20_Emphasis"><text:span text:style-name="T1">juzga y destruye</text:span></text:span><text:span text:style-name="T1"> a los malvados que la rechazan. </text:span></text:p>
            </text:list-item>
          </text:list>
        </text:list-item>
        <text:list-item>
          <text:p text:style-name="P156"><text:span text:style-name="Strong_20_Emphasis"><text:span text:style-name="T1">b) Fuego de Satanás:</text:span></text:span></text:p>
          <text:list>
            <text:list-item>
              <text:p text:style-name="P156"><text:span text:style-name="Emphasis"><text:span text:style-name="T1">Representa:</text:span></text:span><text:span text:style-name="T1"> La palabra de Satanás (mentiras, falsedades, "fuego extraño"). </text:span></text:p>
            </text:list-item>
            <text:list-item>
              <text:p text:style-name="P155"><text:span text:style-name="Emphasis"><text:span text:style-name="T1">Resultado:</text:span></text:span><text:span text:style-name="T1"> </text:span><text:span text:style-name="Strong_20_Emphasis"><text:span text:style-name="T1">Mata el espíritu</text:span></text:span><text:span text:style-name="T1"> del creyente que lo recibe sin discernir (como le pasó a Adán y Eva). </text:span></text:p>
            </text:list-item>
          </text:list>
        </text:list-item>
      </text:list>
      <text:h text:style-name="P3" text:outline-level="3">🔄 Parte 2: Incensario y Olla</text:h>
      <text:p text:style-name="Text_20_body"><text:span text:style-name="Strong_20_Emphasis"><text:span text:style-name="T1">4. ¿Qué representa el incienso?</text:span></text:span></text:p>
      <text:list text:style-name="L120">
        <text:list-item>
          <text:p text:style-name="P157"><text:span text:style-name="Strong_20_Emphasis"><text:span text:style-name="T1">Respuesta:</text:span></text:span><text:span text:style-name="T1"> Las </text:span><text:span text:style-name="Strong_20_Emphasis"><text:span text:style-name="T1">oraciones de los santos</text:span></text:span><text:span text:style-name="T1"> (Apocalipsis 5:8). </text:span></text:p>
        </text:list-item>
      </text:list>
      <text:p text:style-name="Text_20_body"><text:soft-page-break/><text:span text:style-name="Strong_20_Emphasis"><text:span text:style-name="T1">5. ¿Qué representa el incensario?</text:span></text:span></text:p>
      <text:list text:style-name="L121">
        <text:list-item>
          <text:p text:style-name="P158"><text:span text:style-name="Strong_20_Emphasis"><text:span text:style-name="T1">Respuesta:</text:span></text:span><text:span text:style-name="T1"> </text:span><text:span text:style-name="Strong_20_Emphasis"><text:span text:style-name="T1">Una persona</text:span></text:span><text:span text:style-name="T1"> (específicamente, el corazón de la persona, que es el recipiente donde se pone el fuego). </text:span></text:p>
        </text:list-item>
      </text:list>
      <text:p text:style-name="Text_20_body"><text:span text:style-name="Strong_20_Emphasis"><text:span text:style-name="T1">6. ¿Qué representa el humo?</text:span></text:span></text:p>
      <text:list text:style-name="L122">
        <text:list-item>
          <text:p text:style-name="P159"><text:span text:style-name="Strong_20_Emphasis"><text:span text:style-name="T1">Respuesta:</text:span></text:span><text:span text:style-name="T1"> Las </text:span><text:span text:style-name="Strong_20_Emphasis"><text:span text:style-name="T1">oraciones que suben</text:span></text:span><text:span text:style-name="T1"> a la presencia de Dios (resultado de tener la palabra de Dios en el corazón). </text:span></text:p>
        </text:list-item>
      </text:list>
      <text:p text:style-name="Text_20_body"><text:span text:style-name="Strong_20_Emphasis"><text:span text:style-name="T1">7. ¿Qué representa la olla?</text:span></text:span></text:p>
      <text:list text:style-name="L123">
        <text:list-item>
          <text:p text:style-name="P160"><text:span text:style-name="Strong_20_Emphasis"><text:span text:style-name="T1">Respuesta:</text:span></text:span><text:span text:style-name="T1"> </text:span><text:span text:style-name="Strong_20_Emphasis"><text:span text:style-name="T1">La Iglesia.</text:span></text:span><text:span text:style-name="T1"> Un contenedor grande que reúne a muchas "carnes" (personas) para ser cocinadas/preparadas por el fuego de la palabra. </text:span></text:p>
        </text:list-item>
      </text:list>
      <text:p text:style-name="Text_20_body"><text:span text:style-name="Strong_20_Emphasis"><text:span text:style-name="T1">8. ¿Quiénes eran la olla de Dios y la olla de Satanás en la primera venida?</text:span></text:span></text:p>
      <text:list text:style-name="L124">
        <text:list-item>
          <text:p text:style-name="P162"><text:span text:style-name="Strong_20_Emphasis"><text:span text:style-name="T1">Olla de Dios:</text:span></text:span><text:span text:style-name="T1"> </text:span><text:span text:style-name="Strong_20_Emphasis"><text:span text:style-name="T1">Jesús y los 12 discípulos.</text:span></text:span><text:span text:style-name="T1"> De ahí salían las </text:span><text:span text:style-name="Strong_20_Emphasis"><text:span text:style-name="T1">palabras de verdad</text:span></text:span><text:span text:style-name="T1"> (profecía y cumplimiento) que daban vida. </text:span></text:p>
        </text:list-item>
        <text:list-item>
          <text:p text:style-name="P161"><text:span text:style-name="Strong_20_Emphasis"><text:span text:style-name="T1">Olla de Satanás:</text:span></text:span><text:span text:style-name="T1"> </text:span><text:span text:style-name="Strong_20_Emphasis"><text:span text:style-name="T1">Los escribas, fariseos y los miembros que se quedaron con ellos.</text:span></text:span><text:span text:style-name="T1"> De ahí salían </text:span><text:span text:style-name="Strong_20_Emphasis"><text:span text:style-name="T1">falsedades, mentiras y mandamientos de hombres</text:span></text:span><text:span text:style-name="T1"> que cocinaban al pueblo de Dios con palabras de muerte. </text:span></text:p>
        </text:list-item>
      </text:list>
      <text:p text:style-name="P6"/>
      <text:h text:style-name="P2" text:outline-level="2">📖 LECCIÓN 8: Luz, Candelero, Ciegos, Sordos y Vestido de Boda (Parte 1)</text:h>
      <text:h text:style-name="P3" text:outline-level="3">🔄 Mini-Quiz y Conceptos Previos</text:h>
      <text:p text:style-name="Text_20_body"><text:span text:style-name="Strong_20_Emphasis"><text:span text:style-name="T1">1. En la parábola de los cuatro campos, ¿pertenecemos a uno solo de ellos para siempre? (V/F)</text:span></text:span></text:p>
      <text:list text:style-name="L125">
        <text:list-item>
          <text:p text:style-name="P163"><text:span text:style-name="Strong_20_Emphasis"><text:span text:style-name="T1">Respuesta:</text:span></text:span><text:span text:style-name="T1"> </text:span><text:span text:style-name="Strong_20_Emphasis"><text:span text:style-name="T1">Falso.</text:span></text:span><text:span text:style-name="T1"> No estamos estancados; en un solo día podemos pasar por los cuatro campos dependiendo de nuestras decisiones, prioridades y de si dejamos que las preocupaciones del mundo nos dominen. </text:span></text:p>
        </text:list-item>
      </text:list>
      <text:p text:style-name="Text_20_body"><text:span text:style-name="Strong_20_Emphasis"><text:span text:style-name="T1">2. ¿El siervo fiel y prudente que da el alimento a su tiempo en Mateo 24 es Jesús? (V/F)</text:span></text:span></text:p>
      <text:list text:style-name="L126">
        <text:list-item>
          <text:p text:style-name="P164"><text:span text:style-name="Strong_20_Emphasis"><text:span text:style-name="T1">Respuesta:</text:span></text:span><text:span text:style-name="T1"> </text:span><text:span text:style-name="Strong_20_Emphasis"><text:span text:style-name="T1">Falso.</text:span></text:span><text:span text:style-name="T1"> Jesús fue el siervo fiel en la Primera Venida, pero en la Segunda Venida, Jesús pasa la antorcha a otra persona (el vencedor/pastor verdadero de estos tiempos). </text:span></text:p>
        </text:list-item>
      </text:list>
      <text:p text:style-name="Text_20_body"><text:soft-page-break/><text:span text:style-name="Strong_20_Emphasis"><text:span text:style-name="T1">3. La hambruna espiritual del Antiguo Testamento ya no se repite en la segunda venida. (V/F)</text:span></text:span></text:p>
      <text:list text:style-name="L127">
        <text:list-item>
          <text:p text:style-name="P165"><text:span text:style-name="Strong_20_Emphasis"><text:span text:style-name="T1">Respuesta:</text:span></text:span><text:span text:style-name="T1"> </text:span><text:span text:style-name="Strong_20_Emphasis"><text:span text:style-name="T1">Falso.</text:span></text:span><text:span text:style-name="T1"> Dios es consistente. Así como hubo hambruna espiritual en la Primera Venida, habrá una en la Segunda Venida (Mateo 24). </text:span></text:p>
        </text:list-item>
      </text:list>
      <text:p text:style-name="Text_20_body"><text:span text:style-name="Strong_20_Emphasis"><text:span text:style-name="T1">4. La parábola de la levadura (Mateo 13:33) enseña que las mujeres deben empoderarse. (V/F)</text:span></text:span></text:p>
      <text:list text:style-name="L128">
        <text:list-item>
          <text:p text:style-name="P166"><text:span text:style-name="Strong_20_Emphasis"><text:span text:style-name="T1">Respuesta:</text:span></text:span><text:span text:style-name="T1"> </text:span><text:span text:style-name="Strong_20_Emphasis"><text:span text:style-name="T1">Falso.</text:span></text:span><text:span text:style-name="T1"> La "mujer" en las parábolas representa a un </text:span><text:span text:style-name="Strong_20_Emphasis"><text:span text:style-name="T1">pastor</text:span></text:span><text:span text:style-name="T1"> (hombre o mujer) que crea hijos espirituales, no a una mujer física tomando iniciativa social. </text:span></text:p>
        </text:list-item>
      </text:list>
      <text:h text:style-name="P3" text:outline-level="3">🔄 Preguntas de Repaso de la Lección</text:h>
      <text:p text:style-name="Text_20_body"><text:span text:style-name="Strong_20_Emphasis"><text:span text:style-name="T1">5. ¿Qué es la luz en figurativo?</text:span></text:span></text:p>
      <text:list text:style-name="L129">
        <text:list-item>
          <text:p text:style-name="P167"><text:span text:style-name="Strong_20_Emphasis"><text:span text:style-name="T1">Respuesta:</text:span></text:span><text:span text:style-name="T1"> Es la </text:span><text:span text:style-name="Strong_20_Emphasis"><text:span text:style-name="T1">Palabra de vida</text:span></text:span><text:span text:style-name="T1">, pero también es la </text:span><text:span text:style-name="Strong_20_Emphasis"><text:span text:style-name="T1">persona que tiene la palabra</text:span></text:span><text:span text:style-name="T1"> (como Jesús y los 12 discípulos). </text:span></text:p>
        </text:list-item>
      </text:list>
      <text:p text:style-name="Text_20_body"><text:span text:style-name="Strong_20_Emphasis"><text:span text:style-name="T1">6. ¿Qué representan las tinieblas o la oscuridad?</text:span></text:span></text:p>
      <text:list text:style-name="L130">
        <text:list-item>
          <text:p text:style-name="P168"><text:span text:style-name="Strong_20_Emphasis"><text:span text:style-name="T1">Respuesta:</text:span></text:span><text:span text:style-name="T1"> La </text:span><text:span text:style-name="Strong_20_Emphasis"><text:span text:style-name="T1">ausencia de la palabra</text:span></text:span><text:span text:style-name="T1"> o la </text:span><text:span text:style-name="Strong_20_Emphasis"><text:span text:style-name="T1">ignorancia</text:span></text:span><text:span text:style-name="T1"> de la palabra revelada. </text:span></text:p>
        </text:list-item>
      </text:list>
      <text:p text:style-name="Text_20_body"><text:span text:style-name="Strong_20_Emphasis"><text:span text:style-name="T1">7. ¿Qué sucede cuando aparece la luz?</text:span></text:span></text:p>
      <text:list text:style-name="L131">
        <text:list-item>
          <text:p text:style-name="P169"><text:span text:style-name="Strong_20_Emphasis"><text:span text:style-name="T1">Respuesta:</text:span></text:span><text:span text:style-name="T1"> Ocurre una </text:span><text:span text:style-name="Strong_20_Emphasis"><text:span text:style-name="T1">separación</text:span></text:span><text:span text:style-name="T1">. La luz se convierte en el </text:span><text:span text:style-name="Strong_20_Emphasis"><text:span text:style-name="T1">estándar</text:span></text:span><text:span text:style-name="T1"> para distinguir la verdad de las suposiciones humanas. </text:span></text:p>
        </text:list-item>
      </text:list>
      <text:p text:style-name="Text_20_body"><text:span text:style-name="Strong_20_Emphasis"><text:span text:style-name="T1">8. ¿Qué significa la "exposición" de la palabra?</text:span></text:span></text:p>
      <text:list text:style-name="L132">
        <text:list-item>
          <text:p text:style-name="P170"><text:span text:style-name="Strong_20_Emphasis"><text:span text:style-name="T1">Respuesta:</text:span></text:span><text:span text:style-name="T1"> Significa que la palabra está </text:span><text:span text:style-name="Strong_20_Emphasis"><text:span text:style-name="T1">abierta y revelada</text:span></text:span><text:span text:style-name="T1"> (profecía y cumplimiento), haciéndose entendible para los simples. </text:span></text:p>
        </text:list-item>
      </text:list>
      <text:p text:style-name="Text_20_body"><text:span text:style-name="Strong_20_Emphasis"><text:span text:style-name="T1">9. ¿Qué separa a los hijos de luz de los hijos de oscuridad?</text:span></text:span></text:p>
      <text:list text:style-name="L133">
        <text:list-item>
          <text:p text:style-name="P171"><text:span text:style-name="Strong_20_Emphasis"><text:span text:style-name="T1">Respuesta:</text:span></text:span><text:span text:style-name="T1"> Tener o no la </text:span><text:span text:style-name="Strong_20_Emphasis"><text:span text:style-name="T1">palabra revelada</text:span></text:span><text:span text:style-name="T1"> (el entendimiento de la profecía y su cumplimiento). Ambos son creyentes, pero unos están en luz y otros en tinieblas. </text:span></text:p>
        </text:list-item>
      </text:list>
      <text:p text:style-name="Text_20_body"><text:span text:style-name="Strong_20_Emphasis"><text:span text:style-name="T1">10. ¿Qué es el candelero y el ojo en figurativo?</text:span></text:span></text:p>
      <text:list text:style-name="L134">
        <text:list-item>
          <text:p text:style-name="P172"><text:span text:style-name="Strong_20_Emphasis"><text:span text:style-name="T1">Respuesta:</text:span></text:span><text:span text:style-name="T1"> Representa al </text:span><text:span text:style-name="Strong_20_Emphasis"><text:span text:style-name="T1">espíritu y al trabajador</text:span></text:span><text:span text:style-name="T1"> (la persona de carne y hueso con quien el espíritu trabaja para dar la palabra). </text:span></text:p>
        </text:list-item>
      </text:list>
      <text:p text:style-name="Text_20_body"><text:span text:style-name="Strong_20_Emphasis"><text:span text:style-name="T1">11. ¿Dónde estaba el candelero en el tabernáculo y qué hacía?</text:span></text:span></text:p>
      <text:list text:style-name="L135">
        <text:list-item>
          <text:p text:style-name="P173"><text:span text:style-name="Strong_20_Emphasis"><text:span text:style-name="T1">Respuesta:</text:span></text:span><text:span text:style-name="T1"> Estaba en el </text:span><text:span text:style-name="Strong_20_Emphasis"><text:span text:style-name="T1">Lugar Santo</text:span></text:span><text:span text:style-name="T1">. Su propósito era alumbrar y </text:span><text:span text:style-name="Strong_20_Emphasis"><text:span text:style-name="T1">guiar el camino hacia el Lugar Santísimo</text:span></text:span><text:span text:style-name="T1"> (donde moraba Dios). </text:span></text:p>
        </text:list-item>
      </text:list>
      <text:p text:style-name="Text_20_body"><text:soft-page-break/><text:span text:style-name="Strong_20_Emphasis"><text:span text:style-name="T1">12. ¿Quién fue el candelero o antorcha en la primera venida?</text:span></text:span></text:p>
      <text:list text:style-name="L136">
        <text:list-item>
          <text:p text:style-name="P174"><text:span text:style-name="Strong_20_Emphasis"><text:span text:style-name="T1">Respuesta:</text:span></text:span><text:span text:style-name="T1"> </text:span><text:span text:style-name="Strong_20_Emphasis"><text:span text:style-name="T1">Juan el Bautista.</text:span></text:span><text:span text:style-name="T1"> Él no era la gran luz, sino la lámpara que guiaba el camino hacia la verdadera luz, que era Jesús. </text:span></text:p>
        </text:list-item>
      </text:list>
      <text:p text:style-name="P6"/>
      <text:h text:style-name="P2" text:outline-level="2">🎯 PREGUNTAS TRANSVERSALES DE REFLEXIÓN PERSONAL</text:h>
      <text:p text:style-name="P83">Estas preguntas aparecen a lo largo de todas las lecciones y son fundamentales para el autoexamen espiritual:</text:p>
      <text:list text:style-name="L137">
        <text:list-item>
          <text:p text:style-name="P176"><text:span text:style-name="Strong_20_Emphasis"><text:span text:style-name="T1">¿Qué estoy permitiendo que llene mi corazón?</text:span></text:span><text:span text:style-name="T1"> (¿Verdad de Dios o sedimentos de Moab/pensamientos humanos?) </text:span></text:p>
        </text:list-item>
        <text:list-item>
          <text:p text:style-name="P176"><text:span text:style-name="Strong_20_Emphasis"><text:span text:style-name="T1">¿De dónde estoy recibiendo mi alimento espiritual?</text:span></text:span><text:span text:style-name="T1"> (¿De Dios o de Satanás?) </text:span></text:p>
        </text:list-item>
        <text:list-item>
          <text:p text:style-name="P176"><text:span text:style-name="Strong_20_Emphasis"><text:span text:style-name="T1">¿Pertenezco yo a la iglesia que enseña la verdad pura?</text:span></text:span><text:span text:style-name="T1"> </text:span></text:p>
        </text:list-item>
        <text:list-item>
          <text:p text:style-name="P176"><text:span text:style-name="Strong_20_Emphasis"><text:span text:style-name="T1">¿Están mis oraciones basadas en la palabra de la verdad o en lo que yo quiero?</text:span></text:span><text:span text:style-name="T1"> </text:span></text:p>
        </text:list-item>
        <text:list-item>
          <text:p text:style-name="P176"><text:span text:style-name="Strong_20_Emphasis"><text:span text:style-name="T1">¿Qué clase de campo soy yo en este momento?</text:span></text:span><text:span text:style-name="T1"> (¿Camino, piedras, espinos o buena tierra?) </text:span></text:p>
        </text:list-item>
        <text:list-item>
          <text:p text:style-name="P176"><text:span text:style-name="Strong_20_Emphasis"><text:span text:style-name="T1">¿Hay algo que he permitido permanecer en mi corazón por mucho tiempo sin cambiarlo?</text:span></text:span><text:span text:style-name="T1"> </text:span></text:p>
        </text:list-item>
        <text:list-item>
          <text:p text:style-name="P175"><text:span text:style-name="Strong_20_Emphasis"><text:span text:style-name="T1">¿Estoy caminando en la luz (palabra revelada) o en tinieblas (ignorancia)?</text:span></text:span><text:span text:style-name="T1"> </text:span></text:p>
        </text:list-item>
      </text:list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dauk Book" svg:font-family="'Padauk Book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30T23:05:46.512284902</meta:creation-date>
    <dc:date>2026-07-02T09:49:57.923397912</dc:date>
    <meta:editing-duration>PT4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1" meta:paragraph-count="201" meta:word-count="2658" meta:character-count="15445" meta:non-whitespace-character-count="12990"/>
  </office:meta>
</office:document-meta>
</file>