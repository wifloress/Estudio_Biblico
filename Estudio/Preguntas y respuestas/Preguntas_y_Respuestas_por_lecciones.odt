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3">
      <style:paragraph-properties fo:margin-top="0cm" fo:margin-bottom="0cm" style:contextual-spacing="false"/>
    </style:style>
    <style:style style:name="P28" style:family="paragraph" style:parent-style-name="Text_20_body" style:list-style-name="L24"/>
    <style:style style:name="P29" style:family="paragraph" style:parent-style-name="Text_20_body" style:list-style-name="L24">
      <style:paragraph-properties fo:margin-top="0cm" fo:margin-bottom="0cm" style:contextual-spacing="false"/>
    </style:style>
    <style:style style:name="P30" style:family="paragraph" style:parent-style-name="Text_20_body" style:list-style-name="L25"/>
    <style:style style:name="P31" style:family="paragraph" style:parent-style-name="Text_20_body" style:list-style-name="L25">
      <style:paragraph-properties fo:margin-top="0cm" fo:margin-bottom="0cm" style:contextual-spacing="false"/>
    </style:style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/>
    <style:style style:name="P37" style:family="paragraph" style:parent-style-name="Text_20_body" style:list-style-name="L31"/>
    <style:style style:name="P38" style:family="paragraph" style:parent-style-name="Text_20_body" style:list-style-name="L31">
      <style:paragraph-properties fo:margin-top="0cm" fo:margin-bottom="0cm" style:contextual-spacing="false"/>
    </style:style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 style:list-style-name="L35">
      <style:paragraph-properties fo:margin-top="0cm" fo:margin-bottom="0cm" style:contextual-spacing="false"/>
    </style:style>
    <style:style style:name="P44" style:family="paragraph" style:parent-style-name="Text_20_body" style:list-style-name="L36"/>
    <style:style style:name="P45" style:family="paragraph" style:parent-style-name="Text_20_body" style:list-style-name="L37"/>
    <style:style style:name="P46" style:family="paragraph" style:parent-style-name="Text_20_body" style:list-style-name="L38"/>
    <style:style style:name="P47" style:family="paragraph" style:parent-style-name="Text_20_body" style:list-style-name="L39"/>
    <style:style style:name="P48" style:family="paragraph" style:parent-style-name="Text_20_body" style:list-style-name="L40"/>
    <style:style style:name="P49" style:family="paragraph" style:parent-style-name="Text_20_body" style:list-style-name="L41"/>
    <style:style style:name="P50" style:family="paragraph" style:parent-style-name="Text_20_body" style:list-style-name="L42"/>
    <style:style style:name="P51" style:family="paragraph" style:parent-style-name="Text_20_body" style:list-style-name="L43"/>
    <style:style style:name="P52" style:family="paragraph" style:parent-style-name="Text_20_body" style:list-style-name="L44"/>
    <style:style style:name="P53" style:family="paragraph" style:parent-style-name="Text_20_body" style:list-style-name="L45"/>
    <style:style style:name="P54" style:family="paragraph" style:parent-style-name="Text_20_body" style:list-style-name="L46"/>
    <style:style style:name="P55" style:family="paragraph" style:parent-style-name="Text_20_body" style:list-style-name="L47"/>
    <style:style style:name="P56" style:family="paragraph" style:parent-style-name="Text_20_body" style:list-style-name="L47">
      <style:paragraph-properties fo:margin-top="0cm" fo:margin-bottom="0cm" style:contextual-spacing="false"/>
    </style:style>
    <style:style style:name="P57" style:family="paragraph" style:parent-style-name="Text_20_body" style:list-style-name="L48"/>
    <style:style style:name="P58" style:family="paragraph" style:parent-style-name="Text_20_body" style:list-style-name="L49"/>
    <style:style style:name="P59" style:family="paragraph" style:parent-style-name="Text_20_body" style:list-style-name="L49">
      <style:paragraph-properties fo:margin-top="0cm" fo:margin-bottom="0cm" style:contextual-spacing="false"/>
    </style:style>
    <style:style style:name="P60" style:family="paragraph" style:parent-style-name="Text_20_body" style:list-style-name="L50"/>
    <style:style style:name="P61" style:family="paragraph" style:parent-style-name="Text_20_body" style:list-style-name="L51"/>
    <style:style style:name="P62" style:family="paragraph" style:parent-style-name="Text_20_body" style:list-style-name="L52"/>
    <style:style style:name="P63" style:family="paragraph" style:parent-style-name="Text_20_body" style:list-style-name="L53"/>
    <style:style style:name="P64" style:family="paragraph" style:parent-style-name="Text_20_body" style:list-style-name="L54"/>
    <style:style style:name="P65" style:family="paragraph" style:parent-style-name="Text_20_body" style:list-style-name="L55"/>
    <style:style style:name="P66" style:family="paragraph" style:parent-style-name="Text_20_body" style:list-style-name="L55">
      <style:paragraph-properties fo:margin-top="0cm" fo:margin-bottom="0cm" style:contextual-spacing="false"/>
    </style:style>
    <style:style style:name="P67" style:family="paragraph" style:parent-style-name="Text_20_body" style:list-style-name="L56"/>
    <style:style style:name="P68" style:family="paragraph" style:parent-style-name="Text_20_body" style:list-style-name="L57"/>
    <style:style style:name="P69" style:family="paragraph" style:parent-style-name="Text_20_body" style:list-style-name="L58"/>
    <style:style style:name="P70" style:family="paragraph" style:parent-style-name="Text_20_body" style:list-style-name="L59"/>
    <style:style style:name="P71" style:family="paragraph" style:parent-style-name="Text_20_body" style:list-style-name="L60"/>
    <style:style style:name="P72" style:family="paragraph" style:parent-style-name="Text_20_body" style:list-style-name="L60">
      <style:paragraph-properties fo:margin-top="0cm" fo:margin-bottom="0cm" style:contextual-spacing="false"/>
    </style:style>
    <style:style style:name="P73" style:family="paragraph" style:parent-style-name="Text_20_body" style:list-style-name="L61"/>
    <style:style style:name="P74" style:family="paragraph" style:parent-style-name="Text_20_body" style:list-style-name="L6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📝 COMPENDIO DE PREGUNTAS Y RESPUESTAS DE REFLEXIÓN</text:h>
      <text:h text:style-name="Heading_20_2" text:outline-level="2">Curso de Discipulado Bíblico: Lecciones 0 a 7</text:h>
      <text:p text:style-name="Horizontal_20_Line"/>
      <text:h text:style-name="Heading_20_2" text:outline-level="2">📖 LECCIÓN 0: Orientación e Introducción a la Religión</text:h>
      <text:h text:style-name="Heading_20_3" text:outline-level="3">🔄 Preguntas de Repaso</text:h>
      <text:p text:style-name="Text_20_body"><text:span text:style-name="Strong_20_Emphasis">1. ¿Cuáles son las dos definiciones de religión vistas en la lección?</text:span></text:p>
      <text:list text:style-name="L1">
        <text:list-item>
          <text:p text:style-name="P2"><text:span text:style-name="Strong_20_Emphasis">Oriente (Jeongkyo):</text:span> Las <text:span text:style-name="Strong_20_Emphasis">mejores enseñanzas</text:span> que vienen del cielo (de Dios). En caracteres chinos significa "cosas que se muestran del cielo". </text:p>
        </text:list-item>
        <text:list-item>
          <text:p text:style-name="P1"><text:span text:style-name="Strong_20_Emphasis">Occidente (Religare):</text:span> <text:span text:style-name="Strong_20_Emphasis">Reconectar</text:span>. Implica que hubo una conexión original con Dios, luego una desconexión, y la religión es el proceso de volver a conectarse. </text:p>
        </text:list-item>
      </text:list>
      <text:p text:style-name="Text_20_body"><text:span text:style-name="Strong_20_Emphasis">2. ¿Cómo podemos comprobar la existencia de Dios?</text:span></text:p>
      <text:list text:style-name="L2">
        <text:list-item>
          <text:p text:style-name="P4"><text:span text:style-name="Strong_20_Emphasis">Respuesta:</text:span> A través de la <text:span text:style-name="Strong_20_Emphasis">Profecía y su Cumplimiento</text:span>. </text:p>
        </text:list-item>
        <text:list-item>
          <text:p text:style-name="P3"><text:span text:style-name="Emphasis">Justificación:</text:span> Así como al ver un desayuno listo con una nota sabemos que alguien existe y obró, al ver las profecías cumplidas sabemos que Dios existe y está activo. Ninguna otra religión tiene esta característica. </text:p>
        </text:list-item>
      </text:list>
      <text:p text:style-name="Text_20_body"><text:span text:style-name="Strong_20_Emphasis">3. ¿Por qué necesitamos religión?</text:span></text:p>
      <text:list text:style-name="L3">
        <text:list-item>
          <text:p text:style-name="P5"><text:span text:style-name="Strong_20_Emphasis">Respuesta:</text:span> Porque <text:span text:style-name="Strong_20_Emphasis">Dios es la fuente de vida</text:span>. Estar conectados con Él significa tener vida eterna; desconectarnos (como un teléfono sin corriente) lleva a la muerte espiritual. </text:p>
        </text:list-item>
      </text:list>
      <text:p text:style-name="Horizontal_20_Line"/>
      <text:h text:style-name="Heading_20_2" text:outline-level="2">📖 LECCIÓN 1: Los Dos Dioses (Dios y Satanás)</text:h>
      <text:h text:style-name="Heading_20_3" text:outline-level="3">🔄 Parte 1: Características de Dios y la Caída</text:h>
      <text:p text:style-name="Text_20_body"><text:span text:style-name="Strong_20_Emphasis">1. ¿Qué opciones describen correctamente a Dios y a Satanás?</text:span></text:p>
      <text:list text:style-name="L4">
        <text:list-item>
          <text:p text:style-name="P7"><text:span text:style-name="Strong_20_Emphasis">Dios:</text:span> Es Creador, Espíritu, Autoexistente ("Yo soy") y Único. <text:span text:style-name="Strong_20_Emphasis">No es una creación.</text:span> </text:p>
        </text:list-item>
        <text:list-item>
          <text:p text:style-name="P6"><text:span text:style-name="Strong_20_Emphasis">Satanás:</text:span> Es un ángel caído, espíritu y <text:span text:style-name="Strong_20_Emphasis">creación</text:span> (no creador). <text:span text:style-name="Strong_20_Emphasis">No fue creado malo desde el principio</text:span>; su orgullo lo corrompió. </text:p>
        </text:list-item>
      </text:list>
      <text:p text:style-name="Text_20_body"><text:span text:style-name="Strong_20_Emphasis">2. ¿Qué significa "Yo soy" en Éxodo 3:14?</text:span></text:p>
      <text:list text:style-name="L5">
        <text:list-item>
          <text:p text:style-name="P8"><text:span text:style-name="Strong_20_Emphasis">Respuesta:</text:span> <text:span text:style-name="Strong_20_Emphasis">B) Dios existe por sí mismo</text:span> (autoexistente). Nadie lo creó; Él es el origen sin origen. </text:p>
        </text:list-item>
      </text:list>
      <text:p text:style-name="Text_20_body"><text:span text:style-name="Strong_20_Emphasis">3. ¿Cuál fue la causa de la caída de Satanás?</text:span></text:p>
      <text:list text:style-name="L6">
        <text:list-item>
          <text:p text:style-name="P9"><text:span text:style-name="Strong_20_Emphasis">Respuesta:</text:span> <text:span text:style-name="Strong_20_Emphasis">C) El orgullo</text:span>. Su corazón se enalteció y quiso ser semejante al Altísimo. </text:p>
        </text:list-item>
      </text:list>
      <text:p text:style-name="Text_20_body"><text:soft-page-break/><text:span text:style-name="Strong_20_Emphasis">4. ¿Por qué es importante crecer espiritualmente según Hebreos 5:12-14?</text:span></text:p>
      <text:list text:style-name="L7">
        <text:list-item>
          <text:p text:style-name="P10"><text:span text:style-name="Strong_20_Emphasis">Respuesta:</text:span> Para alcanzar la madurez y tener los <text:span text:style-name="Strong_20_Emphasis">sentidos ejercitados en el discernimiento entre el bien y el mal</text:span> ante los ojos de Dios, no ante los del mundo. </text:p>
        </text:list-item>
      </text:list>
      <text:h text:style-name="Heading_20_3" text:outline-level="3">🔄 Parte 2: La División en el Mundo Físico</text:h>
      <text:p text:style-name="Text_20_body"><text:span text:style-name="Strong_20_Emphasis">5. ¿Cómo se prueba un espíritu si no podemos verlo?</text:span></text:p>
      <text:list text:style-name="L8">
        <text:list-item>
          <text:p text:style-name="P11"><text:span text:style-name="Strong_20_Emphasis">Respuesta:</text:span> A través de <text:span text:style-name="Strong_20_Emphasis">las palabras que salen de la boca de la persona</text:span> (Juan 6:63: "las palabras que yo os he hablado son espíritu y son vida"). </text:p>
        </text:list-item>
      </text:list>
      <text:p text:style-name="Text_20_body"><text:span text:style-name="Strong_20_Emphasis">6. ¿Cómo distinguimos entre un pastor verdadero y uno falso?</text:span></text:p>
      <text:list text:style-name="L9">
        <text:list-item>
          <text:p text:style-name="P12"><text:span text:style-name="Strong_20_Emphasis">Respuesta:</text:span> <text:span text:style-name="Strong_20_Emphasis">Por la palabra que enseñan</text:span>, no por su fama, tamaño de iglesia o riqueza. El estándar es la Biblia. </text:p>
        </text:list-item>
      </text:list>
      <text:p text:style-name="Text_20_body"><text:span text:style-name="Strong_20_Emphasis">7. ¿De qué habla una persona enviada por Dios?</text:span></text:p>
      <text:list text:style-name="L10">
        <text:list-item>
          <text:p text:style-name="P13"><text:span text:style-name="Strong_20_Emphasis">Respuesta:</text:span> Habla las <text:span text:style-name="Strong_20_Emphasis">palabras de Dios</text:span> (la verdad, profecía y cumplimiento), no las palabras del hombre. </text:p>
        </text:list-item>
      </text:list>
      <text:p text:style-name="Horizontal_20_Line"/>
      <text:h text:style-name="Heading_20_2" text:outline-level="2">📖 LECCIÓN 2: El Entendimiento Básico de la Biblia</text:h>
      <text:h text:style-name="Heading_20_3" text:outline-level="3">🔄 Parte 1: Pactos y Discernimiento</text:h>
      <text:p text:style-name="Text_20_body"><text:span text:style-name="Strong_20_Emphasis">1. ¿Qué debemos hacer según 1 Juan 4:1?</text:span></text:p>
      <text:list text:style-name="L11">
        <text:list-item>
          <text:p text:style-name="P14"><text:span text:style-name="Strong_20_Emphasis">Respuesta:</text:span> <text:span text:style-name="Strong_20_Emphasis">D) Probar los espíritus</text:span> si son de Dios, porque muchos falsos profetas han salido al mundo. </text:p>
        </text:list-item>
      </text:list>
      <text:p text:style-name="Text_20_body"><text:span text:style-name="Strong_20_Emphasis">2. ¿Cuál es el propósito de Dios según 1 Timoteo 2:4?</text:span></text:p>
      <text:list text:style-name="L12">
        <text:list-item>
          <text:p text:style-name="P15"><text:span text:style-name="Strong_20_Emphasis">Respuesta:</text:span> <text:span text:style-name="Strong_20_Emphasis">C) Que todos sean salvos y conozcan la verdad</text:span> (la verdad de Dios, no la del hombre). </text:p>
        </text:list-item>
      </text:list>
      <text:p text:style-name="Text_20_body"><text:span text:style-name="Strong_20_Emphasis">3. ¿Qué promesa hizo Dios a Israel en Éxodo 19:5-6?</text:span></text:p>
      <text:list text:style-name="L13">
        <text:list-item>
          <text:p text:style-name="P16"><text:span text:style-name="Strong_20_Emphasis">Respuesta:</text:span> Serían un <text:span text:style-name="Strong_20_Emphasis">reino de sacerdotes y nación santa</text:span>, <text:span text:style-name="Emphasis">siempre y cuando</text:span> guardaran Su pacto al 100%. </text:p>
        </text:list-item>
      </text:list>
      <text:p text:style-name="Text_20_body"><text:span text:style-name="Strong_20_Emphasis">4. ¿Quiénes forman el Israel espiritual según el Nuevo Testamento?</text:span></text:p>
      <text:list text:style-name="L14">
        <text:list-item>
          <text:p text:style-name="P17"><text:span text:style-name="Strong_20_Emphasis">Respuesta:</text:span> <text:span text:style-name="Strong_20_Emphasis">Los creyentes (cristianos)</text:span> que reciben y creen en Jesús, no por linaje de sangre, sino por recibir Su semilla (la Palabra). </text:p>
        </text:list-item>
      </text:list>
      <text:h text:style-name="Heading_20_3" text:outline-level="3">🔄 Parte 2: Autoría y Contenidos</text:h>
      <text:p text:style-name="Text_20_body"><text:span text:style-name="Strong_20_Emphasis">5. ¿Qué significa que la Biblia está inspirada por Dios?</text:span></text:p>
      <text:list text:style-name="L15">
        <text:list-item>
          <text:p text:style-name="P18"><text:span text:style-name="Strong_20_Emphasis">Respuesta:</text:span> Que <text:span text:style-name="Strong_20_Emphasis">Dios guió a los escritores (35-40 personas) con su Espíritu Santo</text:span>. No fue solo razonamiento humano. </text:p>
        </text:list-item>
      </text:list>
      <text:p text:style-name="Text_20_body"><text:span text:style-name="Strong_20_Emphasis">6. ¿Cuáles son las cuatro clasificaciones del contenido bíblico?</text:span></text:p>
      <text:list text:style-name="L16">
        <text:list-item>
          <text:p text:style-name="P19"><text:soft-page-break/><text:span text:style-name="Strong_20_Emphasis">Respuesta:</text:span> <text:span text:style-name="Strong_20_Emphasis">Historia, Enseñanzas morales, Profecía y Cumplimiento.</text:span> (Las dos últimas son las más importantes porque prueban que Dios es real y está vivo). </text:p>
        </text:list-item>
      </text:list>
      <text:p text:style-name="Text_20_body"><text:span text:style-name="Strong_20_Emphasis">7. ¿Qué criticó Jesús según Marcos 7:6-9?</text:span></text:p>
      <text:list text:style-name="L17">
        <text:list-item>
          <text:p text:style-name="P20"><text:span text:style-name="Strong_20_Emphasis">Respuesta:</text:span> <text:span text:style-name="Strong_20_Emphasis">C) Las tradiciones humanas que reemplazan la palabra de Dios</text:span>. </text:p>
        </text:list-item>
      </text:list>
      <text:h text:style-name="Heading_20_3" text:outline-level="3">🔄 Parte 3 y 4: Profecía y Cumplimiento</text:h>
      <text:p text:style-name="Text_20_body"><text:span text:style-name="Strong_20_Emphasis">8. ¿Por qué Dios anuncia las cosas antes de que sucedan?</text:span></text:p>
      <text:list text:style-name="L18">
        <text:list-item>
          <text:p text:style-name="P21"><text:span text:style-name="Strong_20_Emphasis">Respuesta:</text:span> <text:span text:style-name="Strong_20_Emphasis">Para que creamos cuando sucedan</text:span> (Juan 14:29). Esto está directamente ligado a la profecía y el cumplimiento. </text:p>
        </text:list-item>
      </text:list>
      <text:p text:style-name="Text_20_body"><text:span text:style-name="Strong_20_Emphasis">9. ¿Qué demuestra el cumplimiento de las profecías?</text:span></text:p>
      <text:list text:style-name="L19">
        <text:list-item>
          <text:p text:style-name="P22"><text:span text:style-name="Strong_20_Emphasis">Respuesta:</text:span> Que <text:span text:style-name="Strong_20_Emphasis">Dios es vivo y Su palabra es verdadera</text:span>. Si cumplió las del pasado, cumplirá las del futuro. </text:p>
        </text:list-item>
      </text:list>
      <text:p text:style-name="Text_20_body"><text:span text:style-name="Strong_20_Emphasis">10. ¿Cuál es el orden correcto de las profecías según 2 Tesalonicenses 2:1-3?</text:span></text:p>
      <text:list text:style-name="L20">
        <text:list-item>
          <text:p text:style-name="P23"><text:span text:style-name="Strong_20_Emphasis">Respuesta:</text:span> <text:span text:style-name="Strong_20_Emphasis">C) Traición, destrucción y salvación</text:span>. Este orden nos ayuda a no ser engañados. </text:p>
        </text:list-item>
      </text:list>
      <text:p text:style-name="Text_20_body"><text:span text:style-name="Strong_20_Emphasis">11. ¿Qué significa tener una "fe completa"?</text:span></text:p>
      <text:list text:style-name="L21">
        <text:list-item>
          <text:p text:style-name="P24"><text:span text:style-name="Strong_20_Emphasis">Respuesta:</text:span> <text:span text:style-name="Strong_20_Emphasis">Creer tanto en la profecía como en su cumplimiento (la realidad).</text:span> Los judíos creyeron en la profecía, pero no en el cumplimiento (Jesús). </text:p>
        </text:list-item>
      </text:list>
      <text:p text:style-name="Horizontal_20_Line"/>
      <text:h text:style-name="Heading_20_2" text:outline-level="2">📖 LECCIÓN 3: Las Parábolas de los Misterios del Reino</text:h>
      <text:h text:style-name="Heading_20_3" text:outline-level="3">🔄 Preguntas de Repaso</text:h>
      <text:p text:style-name="Text_20_body"><text:span text:style-name="Strong_20_Emphasis">1. ¿Qué es una parábola?</text:span></text:p>
      <text:list text:style-name="L22">
        <text:list-item>
          <text:p text:style-name="P25"><text:span text:style-name="Strong_20_Emphasis">Respuesta:</text:span> Es usar frases como <text:span text:style-name="Strong_20_Emphasis">"es como..."</text:span> para comparar algo físico con algo espiritual, describiendo características de uno para entender al otro. </text:p>
        </text:list-item>
      </text:list>
      <text:p text:style-name="Text_20_body"><text:span text:style-name="Strong_20_Emphasis">2. ¿Cuál es el propósito de las parábolas en Historia/Moral vs. Profecía?</text:span></text:p>
      <text:list text:style-name="L23">
        <text:list-item>
          <text:p text:style-name="P27"><text:span text:style-name="Strong_20_Emphasis">Enseñanzas e Historia:</text:span> Son para <text:span text:style-name="Strong_20_Emphasis">ayudar al entendimiento</text:span> (reforzar la idea). </text:p>
        </text:list-item>
        <text:list-item>
          <text:p text:style-name="P26"><text:span text:style-name="Strong_20_Emphasis">Profecía:</text:span> Son para <text:span text:style-name="Strong_20_Emphasis">ocultar los secretos del reino</text:span> de Satanás y de aquellos con corazón cerrado. </text:p>
        </text:list-item>
      </text:list>
      <text:p text:style-name="Text_20_body"><text:span text:style-name="Strong_20_Emphasis">3. ¿Por qué Jesús habló en parábolas? (Dos razones)</text:span></text:p>
      <text:list text:style-name="L24">
        <text:list-item>
          <text:p text:style-name="P29"><text:span text:style-name="Strong_20_Emphasis">Razón 1:</text:span> Para <text:span text:style-name="Strong_20_Emphasis">esconder los secretos</text:span> de los enemigos (como un código de guerra). </text:p>
        </text:list-item>
        <text:list-item>
          <text:p text:style-name="P28"><text:span text:style-name="Strong_20_Emphasis">Razón 2:</text:span> Porque estaba <text:span text:style-name="Strong_20_Emphasis">profetizado</text:span> (Salmos 78:2 ➡️ Mateo 13:34). </text:p>
        </text:list-item>
      </text:list>
      <text:p text:style-name="Text_20_body"><text:span text:style-name="Strong_20_Emphasis">4. ¿Cuál es la diferencia entre los que saben las parábolas y los que no?</text:span></text:p>
      <text:list text:style-name="L25">
        <text:list-item>
          <text:p text:style-name="P31"><text:span text:style-name="Strong_20_Emphasis">Los que saben:</text:span> Conocen y hacen la voluntad de Dios ➡️ reciben perdón de pecados ➡️ tienen <text:span text:style-name="Strong_20_Emphasis">salvación</text:span>. </text:p>
        </text:list-item>
        <text:list-item>
          <text:p text:style-name="P30"><text:soft-page-break/><text:span text:style-name="Strong_20_Emphasis">Los que no saben:</text:span> No conocen la voluntad ➡️ no la hacen ➡️ no reciben perdón ➡️ <text:span text:style-name="Strong_20_Emphasis">no tienen salvación</text:span>. </text:p>
        </text:list-item>
      </text:list>
      <text:p text:style-name="Text_20_body"><text:span text:style-name="Strong_20_Emphasis">5. ¿Cuándo se pueden entender las parábolas?</text:span></text:p>
      <text:list text:style-name="L26">
        <text:list-item>
          <text:p text:style-name="P32"><text:span text:style-name="Strong_20_Emphasis">Respuesta:</text:span> En el <text:span text:style-name="Strong_20_Emphasis">último tiempo, cuando la profecía se cumple y aparece la realidad</text:span>. No en cualquier momento. </text:p>
        </text:list-item>
      </text:list>
      <text:p text:style-name="Text_20_body"><text:span text:style-name="Strong_20_Emphasis">6. ¿Cuáles son los 5 tipos de parábolas?</text:span></text:p>
      <text:list text:style-name="L27">
        <text:list-item>
          <text:p text:style-name="P33"><text:span text:style-name="Strong_20_Emphasis">Respuesta:</text:span> 1) Objetos (naturaleza), 2) Profetas, 3) Animales/Bestias, 4) Acontecimientos Históricos, 5) Lugares/Países. </text:p>
        </text:list-item>
      </text:list>
      <text:p text:style-name="Horizontal_20_Line"/>
      <text:h text:style-name="Heading_20_2" text:outline-level="2">📖 LECCIÓN 4: Semilla, Campo, Árbol y Ave en Figurativo</text:h>
      <text:h text:style-name="Heading_20_3" text:outline-level="3">🔄 Parte 1: Semilla y Campo</text:h>
      <text:p text:style-name="Text_20_body"><text:span text:style-name="Strong_20_Emphasis">1. ¿Qué es la semilla espiritualmente?</text:span></text:p>
      <text:list text:style-name="L28">
        <text:list-item>
          <text:p text:style-name="P34"><text:span text:style-name="Strong_20_Emphasis">Respuesta:</text:span> <text:span text:style-name="Strong_20_Emphasis">La Palabra de Dios</text:span> (la verdad del cumplimiento). Lucas 8:11. </text:p>
        </text:list-item>
      </text:list>
      <text:p text:style-name="Text_20_body"><text:span text:style-name="Strong_20_Emphasis">2. ¿Cuántas semillas hay?</text:span></text:p>
      <text:list text:style-name="L29">
        <text:list-item>
          <text:p text:style-name="P35"><text:span text:style-name="Strong_20_Emphasis">Respuesta:</text:span> <text:span text:style-name="Strong_20_Emphasis">Dos.</text:span> La semilla de Dios (Verdad) y la semilla de Satanás (Mentira/Tergiversación). </text:p>
        </text:list-item>
      </text:list>
      <text:p text:style-name="Text_20_body"><text:span text:style-name="Strong_20_Emphasis">3. ¿Qué es el campo?</text:span></text:p>
      <text:list text:style-name="L30">
        <text:list-item>
          <text:p text:style-name="P36"><text:span text:style-name="Strong_20_Emphasis">Respuesta:</text:span> <text:span text:style-name="Strong_20_Emphasis">Nuestro corazón</text:span> (individuo) y también <text:span text:style-name="Strong_20_Emphasis">el mundo</text:span> (el cristianismo, donde conviven buena semilla y cizaña). </text:p>
        </text:list-item>
      </text:list>
      <text:p text:style-name="Text_20_body"><text:span text:style-name="Strong_20_Emphasis">4. ¿Cuáles son los cuatro campos (corazones)?</text:span></text:p>
      <text:list text:style-name="L31">
        <text:list-item>
          <text:p text:style-name="P38"><text:span text:style-name="Strong_20_Emphasis">Camino:</text:span> No entienden, el diablo se la lleva. </text:p>
        </text:list-item>
        <text:list-item>
          <text:p text:style-name="P38"><text:span text:style-name="Strong_20_Emphasis">Piedras:</text:span> Persecución, se secan. </text:p>
        </text:list-item>
        <text:list-item>
          <text:p text:style-name="P38"><text:span text:style-name="Strong_20_Emphasis">Espinos:</text:span> Afanes y riquezas, se ahogan. </text:p>
        </text:list-item>
        <text:list-item>
          <text:p text:style-name="P37"><text:span text:style-name="Strong_20_Emphasis">Buena Tierra:</text:span> Retienen la palabra y dan fruto con perseverancia. </text:p>
        </text:list-item>
      </text:list>
      <text:h text:style-name="Heading_20_3" text:outline-level="3">🔄 Parte 2: Árbol, Ramas, Hojas, Frutos y Aves</text:h>
      <text:p text:style-name="Text_20_body"><text:span text:style-name="Strong_20_Emphasis">5. ¿Qué significa el árbol espiritual?</text:span></text:p>
      <text:list text:style-name="L32">
        <text:list-item>
          <text:p text:style-name="P39"><text:span text:style-name="Strong_20_Emphasis">Respuesta:</text:span> Una <text:span text:style-name="Strong_20_Emphasis">persona interna renacida</text:span> por la semilla espiritual, o también representa a un <text:span text:style-name="Strong_20_Emphasis">pastor/organización</text:span>. </text:p>
        </text:list-item>
      </text:list>
      <text:p text:style-name="Text_20_body"><text:span text:style-name="Strong_20_Emphasis">6. ¿Cuáles son los dos árboles?</text:span></text:p>
      <text:list text:style-name="L33">
        <text:list-item>
          <text:p text:style-name="P40"><text:span text:style-name="Strong_20_Emphasis">Respuesta:</text:span> El <text:span text:style-name="Strong_20_Emphasis">Árbol de la Vida</text:span> (Dios/Jesús/verdadero pastor) y el <text:span text:style-name="Strong_20_Emphasis">Árbol de la Ciencia del Bien y del Mal</text:span> (Satanás/falsos pastores). </text:p>
        </text:list-item>
      </text:list>
      <text:p text:style-name="Text_20_body"><text:span text:style-name="Strong_20_Emphasis">7. ¿Qué son las aves?</text:span></text:p>
      <text:list text:style-name="L34">
        <text:list-item>
          <text:p text:style-name="P41"><text:span text:style-name="Strong_20_Emphasis">Respuesta:</text:span> <text:span text:style-name="Strong_20_Emphasis">Los espíritus</text:span> (buenos y malos). Los espíritus de Dios anidan en el árbol de vida; los espíritus malignos roban la semilla. </text:p>
        </text:list-item>
      </text:list>
      <text:p text:style-name="Text_20_body"><text:soft-page-break/><text:span text:style-name="Strong_20_Emphasis">8. ¿Qué son las ramas, hojas y frutos?</text:span></text:p>
      <text:list text:style-name="L35">
        <text:list-item>
          <text:p text:style-name="P43"><text:span text:style-name="Strong_20_Emphasis">Ramas:</text:span> Los <text:span text:style-name="Strong_20_Emphasis">discípulos/trabajadores</text:span>. </text:p>
        </text:list-item>
        <text:list-item>
          <text:p text:style-name="P43"><text:span text:style-name="Strong_20_Emphasis">Hojas:</text:span> Los <text:span text:style-name="Strong_20_Emphasis">evangelistas</text:span> (para la sanidad de las naciones). </text:p>
        </text:list-item>
        <text:list-item>
          <text:p text:style-name="P42"><text:span text:style-name="Strong_20_Emphasis">Frutos:</text:span> La <text:span text:style-name="Strong_20_Emphasis">palabra</text:span> y la <text:span text:style-name="Strong_20_Emphasis">congregación</text:span> que nace por ella. </text:p>
        </text:list-item>
      </text:list>
      <text:p text:style-name="Horizontal_20_Line"/>
      <text:h text:style-name="Heading_20_2" text:outline-level="2">📖 LECCIÓN 5: Alimento y Levadura en Figurativo</text:h>
      <text:h text:style-name="Heading_20_3" text:outline-level="3">🔄 Parte 1: Alimento Espiritual</text:h>
      <text:p text:style-name="Text_20_body"><text:span text:style-name="Strong_20_Emphasis">1. ¿Cuáles son los dos alimentos espirituales?</text:span></text:p>
      <text:list text:style-name="L36">
        <text:list-item>
          <text:p text:style-name="P44"><text:span text:style-name="Strong_20_Emphasis">Respuesta:</text:span> El <text:span text:style-name="Strong_20_Emphasis">alimento de Dios</text:span> (Palabra de verdad, da vida) y el <text:span text:style-name="Strong_20_Emphasis">alimento de Satanás</text:span> (mentiras, causa muerte espiritual). </text:p>
        </text:list-item>
      </text:list>
      <text:p text:style-name="Text_20_body"><text:span text:style-name="Strong_20_Emphasis">2. ¿Qué es el hambre espiritual?</text:span></text:p>
      <text:list text:style-name="L37">
        <text:list-item>
          <text:p text:style-name="P45"><text:span text:style-name="Strong_20_Emphasis">Respuesta:</text:span> <text:span text:style-name="Strong_20_Emphasis">Hambre de oír la Palabra de Dios</text:span> (Amós 8:11). No es falta de pan físico, sino de revelación. </text:p>
        </text:list-item>
      </text:list>
      <text:p text:style-name="Text_20_body"><text:span text:style-name="Strong_20_Emphasis">3. ¿Cómo discernimos el alimento?</text:span></text:p>
      <text:list text:style-name="L38">
        <text:list-item>
          <text:p text:style-name="P46"><text:span text:style-name="Strong_20_Emphasis">Respuesta:</text:span> Usando nuestros <text:span text:style-name="Strong_20_Emphasis">oídos</text:span> y probando las palabras con la Biblia, como el paladar prueba la comida (Job 34:3). </text:p>
        </text:list-item>
      </text:list>
      <text:p text:style-name="Text_20_body"><text:span text:style-name="Strong_20_Emphasis">4. ¿Cuál fue el alimento de la Primera Venida?</text:span></text:p>
      <text:list text:style-name="L39">
        <text:list-item>
          <text:p text:style-name="P47"><text:span text:style-name="Strong_20_Emphasis">Respuesta:</text:span> Las <text:span text:style-name="Strong_20_Emphasis">profecías del Antiguo Testamento y su realidad/cumplimiento</text:span> (Jesús). </text:p>
        </text:list-item>
      </text:list>
      <text:p text:style-name="Text_20_body"><text:span text:style-name="Strong_20_Emphasis">5. ¿Cuál es el alimento de la Segunda Venida?</text:span></text:p>
      <text:list text:style-name="L40">
        <text:list-item>
          <text:p text:style-name="P48"><text:span text:style-name="Strong_20_Emphasis">Respuesta:</text:span> Las <text:span text:style-name="Strong_20_Emphasis">profecías del Nuevo Testamento (Apocalipsis) y su realidad/cumplimiento</text:span>. </text:p>
        </text:list-item>
      </text:list>
      <text:p text:style-name="Text_20_body"><text:span text:style-name="Strong_20_Emphasis">6. ¿Quién da este alimento a tiempo?</text:span></text:p>
      <text:list text:style-name="L41">
        <text:list-item>
          <text:p text:style-name="P49"><text:span text:style-name="Strong_20_Emphasis">Respuesta:</text:span> El <text:span text:style-name="Strong_20_Emphasis">siervo fiel y prudente</text:span> (el pastor verdadero enviado por Dios, Mateo 24:45). </text:p>
        </text:list-item>
      </text:list>
      <text:h text:style-name="Heading_20_3" text:outline-level="3">🔄 Parte 2: Levadura Espiritual</text:h>
      <text:p text:style-name="Text_20_body"><text:span text:style-name="Strong_20_Emphasis">7. ¿Qué representa la levadura espiritual?</text:span></text:p>
      <text:list text:style-name="L42">
        <text:list-item>
          <text:p text:style-name="P50"><text:span text:style-name="Strong_20_Emphasis">Respuesta:</text:span> <text:span text:style-name="Strong_20_Emphasis">B) Enseñanzas morales que cambian el corazón</text:span>. Así como la levadura cambia la masa, estas enseñanzas nos transforman. </text:p>
        </text:list-item>
      </text:list>
      <text:p text:style-name="Text_20_body"><text:span text:style-name="Strong_20_Emphasis">8. ¿Qué representa que "todo fue leudado"?</text:span></text:p>
      <text:list text:style-name="L43">
        <text:list-item>
          <text:p text:style-name="P51"><text:span text:style-name="Strong_20_Emphasis">Respuesta:</text:span> <text:span text:style-name="Strong_20_Emphasis">C) La enseñanza influyó completamente</text:span> en aquello donde fue puesta. Debe haber un cambio total, no parcial. </text:p>
        </text:list-item>
      </text:list>
      <text:p text:style-name="Text_20_body"><text:span text:style-name="Strong_20_Emphasis">9. ¿Por qué es importante tener cuidado con lo que escuchamos?</text:span></text:p>
      <text:list text:style-name="L44">
        <text:list-item>
          <text:p text:style-name="P52"><text:span text:style-name="Strong_20_Emphasis">Respuesta:</text:span> Porque hay <text:span text:style-name="Strong_20_Emphasis">dos tipos de levaduras</text:span>. Si aceptamos la de Dios, nos transformamos a Su imagen; si aceptamos la de Satanás, nos convertimos más en él. </text:p>
        </text:list-item>
      </text:list>
      <text:p text:style-name="Text_20_body"><text:soft-page-break/><text:span text:style-name="Strong_20_Emphasis">10. ¿Qué evidencia muestra que una persona recibe la levadura de Dios?</text:span></text:p>
      <text:list text:style-name="L45">
        <text:list-item>
          <text:p text:style-name="P53"><text:span text:style-name="Strong_20_Emphasis">Respuesta:</text:span> <text:span text:style-name="Strong_20_Emphasis">El cambio</text:span>. Abandonar el "viejo hombre" y renovarse en el espíritu de la mente (Efesios 4:21-24). </text:p>
        </text:list-item>
      </text:list>
      <text:p text:style-name="Horizontal_20_Line"/>
      <text:h text:style-name="Heading_20_2" text:outline-level="2">📖 LECCIÓN 6: Copa, Balanza y Vara en Figurativo</text:h>
      <text:h text:style-name="Heading_20_3" text:outline-level="3">🔄 Parte 1: Copa (Vasija)</text:h>
      <text:p text:style-name="Text_20_body"><text:span text:style-name="Strong_20_Emphasis">1. ¿Qué representa la copa?</text:span></text:p>
      <text:list text:style-name="L46">
        <text:list-item>
          <text:p text:style-name="P54"><text:span text:style-name="Strong_20_Emphasis">Respuesta:</text:span> <text:span text:style-name="Strong_20_Emphasis">El corazón de la persona</text:span> (contenedor pequeño) y también <text:span text:style-name="Strong_20_Emphasis">la Iglesia</text:span> (contenedor grande que reúne muchas copas). </text:p>
        </text:list-item>
      </text:list>
      <text:p text:style-name="Text_20_body"><text:span text:style-name="Strong_20_Emphasis">2. ¿Qué son los dos tipos de copas?</text:span></text:p>
      <text:list text:style-name="L47">
        <text:list-item>
          <text:p text:style-name="P56"><text:span text:style-name="Strong_20_Emphasis">Copa de Dios:</text:span> Contiene la <text:span text:style-name="Strong_20_Emphasis">Verdad</text:span> (profecía y cumplimiento). Resultado: Bendición, vida eterna. </text:p>
        </text:list-item>
        <text:list-item>
          <text:p text:style-name="P55"><text:span text:style-name="Strong_20_Emphasis">Copa de Satanás:</text:span> Contiene <text:span text:style-name="Strong_20_Emphasis">Mentiras</text:span> (palabra de Dios tergiversada con pensamientos humanos/sedimentos). Resultado: Maldición, juicio. </text:p>
        </text:list-item>
      </text:list>
      <text:p text:style-name="Text_20_body"><text:span text:style-name="Strong_20_Emphasis">3. ¿Qué peligro espiritual muestra el ejemplo de Moab?</text:span></text:p>
      <text:list text:style-name="L48">
        <text:list-item>
          <text:p text:style-name="P57"><text:span text:style-name="Strong_20_Emphasis">Respuesta:</text:span> Pensar que estamos bien mientras conservamos <text:span text:style-name="Strong_20_Emphasis">impurezas y pensamientos contrarios a la verdad</text:span> (sedimentos) sin darnos cuenta. </text:p>
        </text:list-item>
      </text:list>
      <text:h text:style-name="Heading_20_3" text:outline-level="3">🔄 Parte 2: Balanza y Vara</text:h>
      <text:p text:style-name="Text_20_body"><text:span text:style-name="Strong_20_Emphasis">4. ¿Qué representa la balanza, la vara y la vara de hierro?</text:span></text:p>
      <text:list text:style-name="L49">
        <text:list-item>
          <text:p text:style-name="P59"><text:span text:style-name="Strong_20_Emphasis">Balanza:</text:span> La <text:span text:style-name="Strong_20_Emphasis">Palabra de Dios</text:span> (que nos pesa, mide y juzga). </text:p>
        </text:list-item>
        <text:list-item>
          <text:p text:style-name="P59"><text:span text:style-name="Strong_20_Emphasis">Vara:</text:span> La <text:span text:style-name="Strong_20_Emphasis">Palabra de Dios y la persona (pastor) que la porta</text:span> (nos guía y apoya). </text:p>
        </text:list-item>
        <text:list-item>
          <text:p text:style-name="P58"><text:span text:style-name="Strong_20_Emphasis">Vara de Hierro:</text:span> La <text:span text:style-name="Strong_20_Emphasis">autoridad para reinar y juzgar</text:span> (el cetro del rey). </text:p>
        </text:list-item>
      </text:list>
      <text:p text:style-name="Text_20_body"><text:span text:style-name="Strong_20_Emphasis">5. ¿De dónde venía la autoridad que Jesús recibe en la primera venida?</text:span></text:p>
      <text:list text:style-name="L50">
        <text:list-item>
          <text:p text:style-name="P60"><text:span text:style-name="Strong_20_Emphasis">Respuesta:</text:span> De <text:span text:style-name="Strong_20_Emphasis">las palabras de Dios</text:span>. El Padre le dio Su autoridad a través de las palabras reveladas (Juan 17:8). </text:p>
        </text:list-item>
      </text:list>
      <text:p text:style-name="Text_20_body"><text:span text:style-name="Strong_20_Emphasis">6. ¿Quién recibe la vara de hierro en la primera venida?</text:span></text:p>
      <text:list text:style-name="L51">
        <text:list-item>
          <text:p text:style-name="P61"><text:span text:style-name="Strong_20_Emphasis">Respuesta:</text:span> <text:span text:style-name="Strong_20_Emphasis">Jesucristo (Jesús)</text:span>. Dios el Padre le dio la autoridad. </text:p>
        </text:list-item>
      </text:list>
      <text:p text:style-name="Text_20_body"><text:span text:style-name="Strong_20_Emphasis">7. ¿A quién promete Jesús darle la vara de hierro en la segunda venida?</text:span></text:p>
      <text:list text:style-name="L52">
        <text:list-item>
          <text:p text:style-name="P62"><text:span text:style-name="Strong_20_Emphasis">Respuesta:</text:span> <text:span text:style-name="Strong_20_Emphasis">Al vencedor</text:span> (el que venciere y guardare Sus obras hasta el final, Apocalipsis 2:26-27). </text:p>
        </text:list-item>
      </text:list>
      <text:p text:style-name="Horizontal_20_Line"/>
      <text:h text:style-name="Heading_20_2" text:outline-level="2"><text:soft-page-break/>📖 LECCIÓN 7: Fuego, Incensario y Olla en Figurativo</text:h>
      <text:h text:style-name="Heading_20_3" text:outline-level="3">🔄 Parte 1: El Fuego</text:h>
      <text:p text:style-name="Text_20_body"><text:span text:style-name="Strong_20_Emphasis">1. ¿Qué representa el fuego en figurativo?</text:span></text:p>
      <text:list text:style-name="L53">
        <text:list-item>
          <text:p text:style-name="P63"><text:span text:style-name="Strong_20_Emphasis">Respuesta:</text:span> <text:span text:style-name="Strong_20_Emphasis">La Palabra.</text:span> (Puede ser la Palabra de Dios o la palabra de Satanás). </text:p>
        </text:list-item>
      </text:list>
      <text:p text:style-name="Text_20_body"><text:span text:style-name="Strong_20_Emphasis">2. ¿Qué significa ser bautizado en fuego?</text:span></text:p>
      <text:list text:style-name="L54">
        <text:list-item>
          <text:p text:style-name="P64"><text:span text:style-name="Strong_20_Emphasis">Respuesta:</text:span> <text:span text:style-name="Strong_20_Emphasis">El bautismo de la Palabra de Dios.</text:span> Es el proceso de darse cuenta de nuestras malas acciones e impurezas (sedimentos) y desecharlas a través de la Palabra de verdad. </text:p>
        </text:list-item>
      </text:list>
      <text:p text:style-name="Text_20_body"><text:span text:style-name="Strong_20_Emphasis">3. ¿Cuáles son los dos tipos de fuego en figurativo y su resultado?</text:span></text:p>
      <text:list text:style-name="L55">
        <text:list-item>
          <text:p text:style-name="P66"><text:span text:style-name="Strong_20_Emphasis">a) Fuego de Dios:</text:span></text:p>
          <text:list>
            <text:list-item>
              <text:p text:style-name="P66"><text:span text:style-name="Emphasis">Representa:</text:span> La Palabra de Dios (Verdad, profecía y cumplimiento). </text:p>
            </text:list-item>
            <text:list-item>
              <text:p text:style-name="P66"><text:span text:style-name="Emphasis">Resultado:</text:span> <text:span text:style-name="Strong_20_Emphasis">Purifica y salva</text:span> a los que la aceptan (limpia el pecado). También <text:span text:style-name="Strong_20_Emphasis">juzga y destruye</text:span> a los malvados que la rechazan. </text:p>
            </text:list-item>
          </text:list>
        </text:list-item>
        <text:list-item>
          <text:p text:style-name="P66"><text:span text:style-name="Strong_20_Emphasis">b) Fuego de Satanás:</text:span></text:p>
          <text:list>
            <text:list-item>
              <text:p text:style-name="P66"><text:span text:style-name="Emphasis">Representa:</text:span> La palabra de Satanás (mentiras, falsedades, "fuego extraño"). </text:p>
            </text:list-item>
            <text:list-item>
              <text:p text:style-name="P65"><text:span text:style-name="Emphasis">Resultado:</text:span> <text:span text:style-name="Strong_20_Emphasis">Mata el espíritu</text:span> del creyente que lo recibe sin discernir (como le pasó a Adán y Eva). </text:p>
            </text:list-item>
          </text:list>
        </text:list-item>
      </text:list>
      <text:h text:style-name="Heading_20_3" text:outline-level="3">🔄 Parte 2: Incensario y Olla</text:h>
      <text:p text:style-name="Text_20_body"><text:span text:style-name="Strong_20_Emphasis">4. ¿Qué representa el incienso?</text:span></text:p>
      <text:list text:style-name="L56">
        <text:list-item>
          <text:p text:style-name="P67"><text:span text:style-name="Strong_20_Emphasis">Respuesta:</text:span> Las <text:span text:style-name="Strong_20_Emphasis">oraciones de los santos</text:span> (Apocalipsis 5:8). </text:p>
        </text:list-item>
      </text:list>
      <text:p text:style-name="Text_20_body"><text:span text:style-name="Strong_20_Emphasis">5. ¿Qué representa el incensario?</text:span></text:p>
      <text:list text:style-name="L57">
        <text:list-item>
          <text:p text:style-name="P68"><text:span text:style-name="Strong_20_Emphasis">Respuesta:</text:span> <text:span text:style-name="Strong_20_Emphasis">Una persona</text:span> (específicamente, el corazón de la persona, que es el recipiente donde se pone el fuego). </text:p>
        </text:list-item>
      </text:list>
      <text:p text:style-name="Text_20_body"><text:span text:style-name="Strong_20_Emphasis">6. ¿Qué representa el humo?</text:span></text:p>
      <text:list text:style-name="L58">
        <text:list-item>
          <text:p text:style-name="P69"><text:span text:style-name="Strong_20_Emphasis">Respuesta:</text:span> Las <text:span text:style-name="Strong_20_Emphasis">oraciones que suben</text:span> a la presencia de Dios (resultado de tener la palabra de Dios en el corazón). </text:p>
        </text:list-item>
      </text:list>
      <text:p text:style-name="Text_20_body"><text:span text:style-name="Strong_20_Emphasis">7. ¿Qué representa la olla?</text:span></text:p>
      <text:list text:style-name="L59">
        <text:list-item>
          <text:p text:style-name="P70"><text:span text:style-name="Strong_20_Emphasis">Respuesta:</text:span> <text:span text:style-name="Strong_20_Emphasis">La Iglesia.</text:span> Un contenedor grande que reúne a muchas "carnes" (personas) para ser cocinadas/preparadas por el fuego de la palabra. </text:p>
        </text:list-item>
      </text:list>
      <text:p text:style-name="Text_20_body"><text:span text:style-name="Strong_20_Emphasis">8. ¿Quiénes eran la olla de Dios y la olla de Satanás en la primera venida?</text:span></text:p>
      <text:list text:style-name="L60">
        <text:list-item>
          <text:p text:style-name="P72"><text:span text:style-name="Strong_20_Emphasis">Olla de Dios:</text:span> <text:span text:style-name="Strong_20_Emphasis">Jesús y los 12 discípulos.</text:span> De ahí salían las <text:span text:style-name="Strong_20_Emphasis">palabras de verdad</text:span> (profecía y cumplimiento) que daban vida. </text:p>
        </text:list-item>
        <text:list-item>
          <text:p text:style-name="P71"><text:span text:style-name="Strong_20_Emphasis">Olla de Satanás:</text:span> <text:span text:style-name="Strong_20_Emphasis">Los escribas, fariseos y los miembros que se quedaron con ellos.</text:span> De ahí salían <text:span text:style-name="Strong_20_Emphasis">falsedades, mentiras y mandamientos de hombres</text:span> que cocinaban al pueblo de Dios con palabras de muerte. </text:p>
        </text:list-item>
      </text:list>
      <text:p text:style-name="Horizontal_20_Line"/>
      <text:h text:style-name="Heading_20_2" text:outline-level="2"><text:soft-page-break/>🎯 PREGUNTAS TRANSVERSALES DE REFLEXIÓN PERSONAL</text:h>
      <text:p text:style-name="Text_20_body">Estas preguntas aparecen a lo largo de todas las lecciones y son fundamentales para el autoexamen espiritual:</text:p>
      <text:list text:style-name="L61">
        <text:list-item>
          <text:p text:style-name="P74"><text:span text:style-name="Strong_20_Emphasis">¿Qué estoy permitiendo que llene mi corazón?</text:span> (¿Verdad de Dios o sedimentos de Moab/pensamientos humanos?) </text:p>
        </text:list-item>
        <text:list-item>
          <text:p text:style-name="P74"><text:span text:style-name="Strong_20_Emphasis">¿De dónde estoy recibiendo mi alimento espiritual?</text:span> (¿De Dios o de Satanás?) </text:p>
        </text:list-item>
        <text:list-item>
          <text:p text:style-name="P74"><text:span text:style-name="Strong_20_Emphasis">¿Pertenezco yo a la iglesia que enseña la verdad pura?</text:span> </text:p>
        </text:list-item>
        <text:list-item>
          <text:p text:style-name="P74"><text:span text:style-name="Strong_20_Emphasis">¿Están mis oraciones basadas en la palabra de la verdad o en lo que yo quiero?</text:span> </text:p>
        </text:list-item>
        <text:list-item>
          <text:p text:style-name="P74"><text:span text:style-name="Strong_20_Emphasis">¿Qué clase de campo soy yo en este momento?</text:span> (¿Camino, piedras, espinos o buena tierra?) </text:p>
        </text:list-item>
        <text:list-item>
          <text:p text:style-name="P73"><text:span text:style-name="Strong_20_Emphasis">¿Hay algo que he permitido permanecer en mi corazón por mucho tiempo sin cambiarlo?</text:span>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30T23:05:46.512284902</meta:creation-date>
    <dc:date>2026-06-30T23:06:29.760149668</dc:date>
    <meta:editing-duration>PT48S</meta:editing-duration>
    <meta:editing-cycles>1</meta:editing-cycles>
    <meta:document-statistic meta:table-count="0" meta:image-count="0" meta:object-count="0" meta:page-count="8" meta:paragraph-count="173" meta:word-count="2203" meta:character-count="12810" meta:non-whitespace-character-count="10782"/>
    <meta:generator>LibreOffice/24.2.7.2$Linux_X86_64 LibreOffice_project/420$Build-2</meta:generator>
  </office:meta>
</office:document-meta>
</file>