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orizontal_20_Line">
      <style:text-properties style:font-name="Padauk Book"/>
    </style:style>
    <style:style style:name="P3" style:family="paragraph" style:parent-style-name="Heading_20_2">
      <style:text-properties style:font-name="Padauk Book"/>
    </style:style>
    <style:style style:name="P4" style:family="paragraph" style:parent-style-name="Heading_20_3">
      <style:text-properties style:font-name="Padauk Book"/>
    </style:style>
    <style:style style:name="P5" style:family="paragraph" style:parent-style-name="Text_20_body">
      <style:text-properties style:font-name="Padauk Book"/>
    </style:style>
    <style:style style:name="P6" style:family="paragraph" style:parent-style-name="Heading_20_3">
      <style:paragraph-properties fo:keep-with-next="always"/>
      <style:text-properties style:font-name="Padauk Book" fo:font-size="18pt" style:font-size-asian="18pt" style:font-size-complex="18pt"/>
    </style:style>
    <style:style style:name="P7" style:family="paragraph" style:parent-style-name="Text_20_body">
      <style:text-properties style:font-name="Padauk Book" fo:font-size="18pt" fo:font-weight="bold" officeooo:paragraph-rsid="002abd5b" style:font-size-asian="18pt" style:font-weight-asian="bold" style:font-size-complex="18pt" style:font-weight-complex="bold"/>
    </style:style>
    <style:style style:name="P8" style:family="paragraph" style:parent-style-name="Text_20_body">
      <style:text-properties style:font-name="Padauk Book" fo:font-size="18pt" fo:font-weight="bold" officeooo:paragraph-rsid="002f71b4" style:font-size-asian="18pt" style:font-weight-asian="bold" style:font-size-complex="18pt" style:font-weight-complex="bold"/>
    </style:style>
    <style:style style:name="P9" style:family="paragraph" style:parent-style-name="Text_20_body">
      <style:text-properties style:font-name="Padauk Book" fo:font-size="14pt" fo:font-weight="bold" officeooo:paragraph-rsid="0029881e" style:font-size-asian="14pt" style:font-weight-asian="bold" style:font-size-complex="14pt" style:font-weight-complex="bold"/>
    </style:style>
    <style:style style:name="P10" style:family="paragraph" style:parent-style-name="Text_20_body">
      <style:text-properties style:font-name="Padauk Book" fo:font-size="14pt" fo:font-weight="bold" officeooo:paragraph-rsid="002abd5b" style:font-size-asian="14pt" style:font-weight-asian="bold" style:font-size-complex="14pt" style:font-weight-complex="bold"/>
    </style:style>
    <style:style style:name="P11" style:family="paragraph" style:parent-style-name="Text_20_body">
      <style:text-properties style:font-name="Padauk Book" fo:font-size="14pt" fo:font-weight="bold" officeooo:paragraph-rsid="002f71b4" style:font-size-asian="14pt" style:font-weight-asian="bold" style:font-size-complex="14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officeooo:paragraph-rsid="00233e80"/>
    </style:style>
    <style:style style:name="P14" style:family="paragraph" style:parent-style-name="Text_20_body">
      <style:text-properties officeooo:paragraph-rsid="0029881e"/>
    </style:style>
    <style:style style:name="P15" style:family="paragraph" style:parent-style-name="Text_20_body">
      <style:text-properties officeooo:paragraph-rsid="002abd5b"/>
    </style:style>
    <style:style style:name="P16" style:family="paragraph" style:parent-style-name="Standard" style:list-style-name="L94">
      <style:text-properties fo:color="#000000" loext:opacity="100%" style:font-name="Padauk Book" fo:font-size="12pt" fo:font-weight="normal" officeooo:paragraph-rsid="003146c2" fo:background-color="#fffffe" style:font-size-asian="12pt" style:font-size-complex="12pt"/>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3">
      <style:paragraph-properties fo:margin-top="0cm" fo:margin-bottom="0cm" style:contextual-spacing="false"/>
    </style:style>
    <style:style style:name="P44" style:family="paragraph" style:parent-style-name="Text_20_body" style:list-style-name="L24"/>
    <style:style style:name="P45" style:family="paragraph" style:parent-style-name="Text_20_body" style:list-style-name="L24">
      <style:paragraph-properties fo:margin-top="0cm" fo:margin-bottom="0cm" style:contextual-spacing="false"/>
    </style:style>
    <style:style style:name="P46" style:family="paragraph" style:parent-style-name="Text_20_body" style:list-style-name="L25"/>
    <style:style style:name="P47" style:family="paragraph" style:parent-style-name="Text_20_body" style:list-style-name="L25">
      <style:paragraph-properties fo:margin-top="0cm" fo:margin-bottom="0cm" style:contextual-spacing="false"/>
    </style:style>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1">
      <style:paragraph-properties fo:margin-top="0cm" fo:margin-bottom="0cm" style:contextual-spacing="false"/>
    </style:style>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5">
      <style:paragraph-properties fo:margin-top="0cm" fo:margin-bottom="0cm" style:contextual-spacing="false"/>
    </style:style>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7">
      <style:paragraph-properties fo:margin-top="0cm" fo:margin-bottom="0cm" style:contextual-spacing="false"/>
    </style:style>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49">
      <style:paragraph-properties fo:margin-top="0cm" fo:margin-bottom="0cm" style:contextual-spacing="false"/>
    </style:style>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5">
      <style:paragraph-properties fo:margin-top="0cm" fo:margin-bottom="0cm" style:contextual-spacing="false"/>
    </style:style>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Text_20_body" style:list-style-name="L60">
      <style:paragraph-properties fo:margin-top="0cm" fo:margin-bottom="0cm" style:contextual-spacing="false"/>
    </style:style>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3"/>
    <style:style style:name="P92" style:family="paragraph" style:parent-style-name="Text_20_body" style:list-style-name="L64"/>
    <style:style style:name="P93" style:family="paragraph" style:parent-style-name="Text_20_body" style:list-style-name="L65"/>
    <style:style style:name="P94" style:family="paragraph" style:parent-style-name="Text_20_body" style:list-style-name="L66"/>
    <style:style style:name="P95" style:family="paragraph" style:parent-style-name="Text_20_body" style:list-style-name="L67"/>
    <style:style style:name="P96" style:family="paragraph" style:parent-style-name="Text_20_body" style:list-style-name="L68"/>
    <style:style style:name="P97" style:family="paragraph" style:parent-style-name="Text_20_body" style:list-style-name="L69"/>
    <style:style style:name="P98" style:family="paragraph" style:parent-style-name="Text_20_body" style:list-style-name="L70"/>
    <style:style style:name="P99" style:family="paragraph" style:parent-style-name="Text_20_body" style:list-style-name="L71"/>
    <style:style style:name="P100" style:family="paragraph" style:parent-style-name="Text_20_body" style:list-style-name="L72"/>
    <style:style style:name="P101" style:family="paragraph" style:parent-style-name="Text_20_body" style:list-style-name="L73"/>
    <style:style style:name="P102" style:family="paragraph" style:parent-style-name="Text_20_body" style:list-style-name="L74"/>
    <style:style style:name="P103" style:family="paragraph" style:parent-style-name="Text_20_body" style:list-style-name="L75"/>
    <style:style style:name="P104" style:family="paragraph" style:parent-style-name="Text_20_body" style:list-style-name="L76"/>
    <style:style style:name="P105" style:family="paragraph" style:parent-style-name="Text_20_body" style:list-style-name="L77"/>
    <style:style style:name="P106" style:family="paragraph" style:parent-style-name="Text_20_body" style:list-style-name="L77">
      <style:paragraph-properties fo:margin-top="0cm" fo:margin-bottom="0cm" style:contextual-spacing="false"/>
    </style:style>
    <style:style style:name="P107" style:family="paragraph" style:parent-style-name="Text_20_body" style:list-style-name="L78"/>
    <style:style style:name="P108" style:family="paragraph" style:parent-style-name="Text_20_body" style:list-style-name="L79"/>
    <style:style style:name="P109" style:family="paragraph" style:parent-style-name="Text_20_body" style:list-style-name="L79">
      <style:paragraph-properties fo:margin-top="0cm" fo:margin-bottom="0cm" style:contextual-spacing="false"/>
    </style:style>
    <style:style style:name="P110" style:family="paragraph" style:parent-style-name="Text_20_body" style:list-style-name="L80"/>
    <style:style style:name="P111" style:family="paragraph" style:parent-style-name="Text_20_body" style:list-style-name="L81">
      <style:text-properties officeooo:paragraph-rsid="00233e80"/>
    </style:style>
    <style:style style:name="P112" style:family="paragraph" style:parent-style-name="Text_20_body" style:list-style-name="L81">
      <style:text-properties style:font-name="Padauk Book" officeooo:paragraph-rsid="00233e80"/>
    </style:style>
    <style:style style:name="P113" style:family="paragraph" style:parent-style-name="Text_20_body" style:list-style-name="L83">
      <style:text-properties style:font-name="Padauk Book" fo:font-weight="bold" officeooo:paragraph-rsid="00284462" style:font-weight-asian="bold" style:font-weight-complex="bold"/>
    </style:style>
    <style:style style:name="P114" style:family="paragraph" style:parent-style-name="Text_20_body" style:list-style-name="L86">
      <style:text-properties style:font-name="Padauk Book" fo:font-weight="bold" officeooo:paragraph-rsid="00284462" style:font-weight-asian="bold" style:font-weight-complex="bold"/>
    </style:style>
    <style:style style:name="P115" style:family="paragraph" style:parent-style-name="Text_20_body" style:list-style-name="L83">
      <style:text-properties style:font-name="Padauk Book" officeooo:paragraph-rsid="00284462"/>
    </style:style>
    <style:style style:name="P116" style:family="paragraph" style:parent-style-name="Text_20_body" style:list-style-name="L85">
      <style:text-properties style:font-name="Padauk Book" officeooo:paragraph-rsid="00284462"/>
    </style:style>
    <style:style style:name="P117" style:family="paragraph" style:parent-style-name="Text_20_body" style:list-style-name="L87">
      <style:text-properties style:font-name="Padauk Book" officeooo:paragraph-rsid="00284462"/>
    </style:style>
    <style:style style:name="P118" style:family="paragraph" style:parent-style-name="Text_20_body">
      <style:text-properties style:font-name="Padauk Book" fo:font-size="18pt" fo:font-weight="bold" officeooo:paragraph-rsid="00329fe7" style:font-size-asian="18pt" style:font-weight-asian="bold" style:font-size-complex="18pt" style:font-weight-complex="bold"/>
    </style:style>
    <style:style style:name="P119" style:family="paragraph" style:parent-style-name="Text_20_body" style:list-style-name="L94">
      <style:text-properties style:font-name="Padauk Book" officeooo:paragraph-rsid="003146c2"/>
    </style:style>
    <style:style style:name="P120" style:family="paragraph" style:parent-style-name="Text_20_body">
      <style:text-properties style:font-name="Padauk Book" fo:font-size="14pt" fo:font-weight="bold" officeooo:paragraph-rsid="00329fe7" style:font-size-asian="14pt" style:font-weight-asian="bold" style:font-size-complex="14pt" style:font-weight-complex="bold"/>
    </style:style>
    <style:style style:name="P121" style:family="paragraph" style:parent-style-name="Text_20_body">
      <style:text-properties style:font-name="Padauk Book" fo:font-size="14pt" fo:font-weight="bold" officeooo:paragraph-rsid="0033d9e7" style:font-size-asian="14pt" style:font-weight-asian="bold" style:font-size-complex="14pt" style:font-weight-complex="bold"/>
    </style:style>
    <style:style style:name="P122" style:family="paragraph" style:parent-style-name="Text_20_body" style:list-style-name="L101">
      <style:text-properties style:font-name="Padauk Book" officeooo:paragraph-rsid="0033d9e7"/>
    </style:style>
    <style:style style:name="P123" style:family="paragraph" style:parent-style-name="Text_20_body" style:list-style-name="L82"/>
    <style:style style:name="P124" style:family="paragraph" style:parent-style-name="Text_20_body" style:list-style-name="L82">
      <style:text-properties officeooo:paragraph-rsid="00233e80"/>
    </style:style>
    <style:style style:name="P125" style:family="paragraph" style:parent-style-name="Text_20_body" style:list-style-name="L84">
      <style:text-properties officeooo:paragraph-rsid="00284462"/>
    </style:style>
    <style:style style:name="P126" style:family="paragraph" style:parent-style-name="Text_20_body" style:list-style-name="L86">
      <style:text-properties officeooo:paragraph-rsid="00284462"/>
    </style:style>
    <style:style style:name="P127" style:family="paragraph" style:parent-style-name="Text_20_body" style:list-style-name="L88">
      <style:text-properties officeooo:paragraph-rsid="00284462"/>
    </style:style>
    <style:style style:name="P128" style:family="paragraph" style:parent-style-name="Text_20_body" style:list-style-name="L89">
      <style:text-properties officeooo:paragraph-rsid="00284462"/>
    </style:style>
    <style:style style:name="P129" style:family="paragraph" style:parent-style-name="Text_20_body" style:list-style-name="L90">
      <style:text-properties officeooo:paragraph-rsid="002abd5b"/>
    </style:style>
    <style:style style:name="P130" style:family="paragraph" style:parent-style-name="Text_20_body" style:list-style-name="L91"/>
    <style:style style:name="P131" style:family="paragraph" style:parent-style-name="Text_20_body" style:list-style-name="L91">
      <style:text-properties officeooo:paragraph-rsid="002f71b4"/>
    </style:style>
    <style:style style:name="P132" style:family="paragraph" style:parent-style-name="Text_20_body" style:list-style-name="L92">
      <style:text-properties officeooo:paragraph-rsid="002f71b4"/>
    </style:style>
    <style:style style:name="P133" style:family="paragraph" style:parent-style-name="Text_20_body" style:list-style-name="L91">
      <style:text-properties fo:font-weight="normal" style:font-weight-asian="normal" style:font-weight-complex="normal"/>
    </style:style>
    <style:style style:name="P134" style:family="paragraph" style:parent-style-name="Text_20_body" style:list-style-name="L93"/>
    <style:style style:name="P135" style:family="paragraph" style:parent-style-name="Text_20_body" style:list-style-name="L93">
      <style:paragraph-properties fo:margin-top="0cm" fo:margin-bottom="0cm" style:contextual-spacing="false"/>
      <style:text-properties officeooo:paragraph-rsid="002da750"/>
    </style:style>
    <style:style style:name="P136" style:family="paragraph" style:parent-style-name="Text_20_body" style:list-style-name="L93">
      <style:paragraph-properties fo:margin-top="0cm" fo:margin-bottom="0cm" style:contextual-spacing="false"/>
    </style:style>
    <style:style style:name="P137" style:family="paragraph" style:parent-style-name="Text_20_body">
      <style:text-properties officeooo:paragraph-rsid="002f71b4"/>
    </style:style>
    <style:style style:name="P138" style:family="paragraph" style:parent-style-name="Text_20_body" style:list-style-name="L95">
      <style:text-properties officeooo:paragraph-rsid="003146c2"/>
    </style:style>
    <style:style style:name="P139" style:family="paragraph" style:parent-style-name="Text_20_body" style:list-style-name="L95">
      <style:text-properties officeooo:paragraph-rsid="00329fe7"/>
    </style:style>
    <style:style style:name="P140" style:family="paragraph" style:parent-style-name="Text_20_body" style:list-style-name="L95">
      <style:text-properties officeooo:paragraph-rsid="0033d9e7"/>
    </style:style>
    <style:style style:name="P141" style:family="paragraph" style:parent-style-name="Text_20_body" style:list-style-name="L96">
      <style:text-properties officeooo:paragraph-rsid="003146c2"/>
    </style:style>
    <style:style style:name="P142" style:family="paragraph" style:parent-style-name="Text_20_body" style:list-style-name="L97">
      <style:text-properties officeooo:paragraph-rsid="00329fe7"/>
    </style:style>
    <style:style style:name="P143" style:family="paragraph" style:parent-style-name="Text_20_body">
      <style:text-properties officeooo:paragraph-rsid="0033d9e7"/>
    </style:style>
    <style:style style:name="P144" style:family="paragraph" style:parent-style-name="Text_20_body" style:list-style-name="L102">
      <style:text-properties officeooo:paragraph-rsid="0033d9e7"/>
    </style:style>
    <style:style style:name="P145" style:family="paragraph" style:parent-style-name="Text_20_body" style:list-style-name="L102">
      <style:text-properties officeooo:paragraph-rsid="003533f3"/>
    </style:style>
    <style:style style:name="P146" style:family="paragraph" style:parent-style-name="Text_20_body" style:list-style-name="L102">
      <style:text-properties officeooo:rsid="0033d9e7" officeooo:paragraph-rsid="0033d9e7"/>
    </style:style>
    <style:style style:name="P147" style:family="paragraph" style:parent-style-name="Text_20_body" style:list-style-name="L109">
      <style:text-properties officeooo:paragraph-rsid="003533f3"/>
    </style:style>
    <style:style style:name="T1" style:family="text">
      <style:text-properties style:font-name="Padauk Book"/>
    </style:style>
    <style:style style:name="T2" style:family="text">
      <style:text-properties style:font-name="Padauk Book" officeooo:rsid="00233e80"/>
    </style:style>
    <style:style style:name="T3" style:family="text">
      <style:text-properties style:font-name="Padauk Book" fo:font-weight="bold" style:font-weight-asian="bold" style:font-weight-complex="bold"/>
    </style:style>
    <style:style style:name="T4" style:family="text">
      <style:text-properties style:font-name="Padauk Book" fo:font-weight="bold" officeooo:rsid="0033d9e7" style:font-weight-asian="bold" style:font-weight-complex="bold"/>
    </style:style>
    <style:style style:name="T5" style:family="text">
      <style:text-properties style:font-name="Padauk Book" fo:font-size="18pt" fo:font-weight="bold" style:font-name-asian="Noto Serif CJK SC" style:font-size-asian="18pt" style:font-weight-asian="bold" style:font-name-complex="Noto Sans Devanagari1" style:font-size-complex="18pt" style:font-weight-complex="bold"/>
    </style:style>
    <style:style style:name="T6" style:family="text">
      <style:text-properties style:font-name="Padauk Book" fo:font-size="18pt" fo:font-weight="bold" style:font-size-asian="18pt" style:font-weight-asian="bold" style:font-size-complex="18pt" style:font-weight-complex="bold"/>
    </style:style>
    <style:style style:name="T7" style:family="text">
      <style:text-properties style:font-name="Padauk Book" fo:font-size="18pt" fo:font-weight="bold" officeooo:rsid="0033d9e7" style:font-size-asian="18pt" style:font-weight-asian="bold" style:font-size-complex="18pt" style:font-weight-complex="bold"/>
    </style:style>
    <style:style style:name="T8" style:family="text">
      <style:text-properties style:font-name="Padauk Book" fo:font-weight="normal" style:font-weight-asian="normal" style:font-weight-complex="normal"/>
    </style:style>
    <style:style style:name="T9" style:family="text">
      <style:text-properties style:font-name="Padauk Book" fo:font-weight="normal" officeooo:rsid="002f71b4" style:font-weight-asian="normal" style:font-weight-complex="normal"/>
    </style:style>
    <style:style style:name="T10" style:family="text">
      <style:text-properties style:font-name="Padauk Book" officeooo:rsid="002f71b4"/>
    </style:style>
    <style:style style:name="T11" style:family="text">
      <style:text-properties style:font-name="Padauk Book" fo:font-style="italic" fo:font-weight="normal" officeooo:rsid="002f71b4" style:font-style-asian="italic" style:font-weight-asian="normal" style:font-style-complex="italic"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style:font-name="Padauk Book"/>
    </style:style>
    <style:style style:name="T17" style:family="text">
      <style:text-properties style:font-name="Padauk Book" fo:font-weight="bold" style:font-weight-asian="bold" style:font-weight-complex="bold"/>
    </style:style>
    <style:style style:name="T18" style:family="text">
      <style:text-properties style:font-name="Padauk Book" fo:font-weight="normal" style:font-weight-asian="normal" style:font-weight-complex="normal"/>
    </style:style>
    <style:style style:name="T19" style:family="text">
      <style:text-properties style:font-name="Padauk Book" fo:font-weight="normal" officeooo:rsid="00329fe7" style:font-weight-asian="normal" style:font-weight-complex="normal"/>
    </style:style>
    <style:style style:name="T20" style:family="text">
      <style:text-properties style:font-name="Padauk Book" officeooo:rsid="0033d9e7"/>
    </style:style>
    <style:style style:name="T21" style:family="text">
      <style:text-properties style:font-name="Padauk Book" officeooo:rsid="003533f3"/>
    </style:style>
    <style:style style:name="T22" style:family="text">
      <style:text-properties fo:color="#000000" loext:opacity="100%" style:font-name="Padauk Book" fo:font-size="12pt" fo:font-weight="bold" fo:background-color="#fffffe" loext:char-shading-value="0" style:font-size-asian="12pt" style:font-weight-asian="bold" style:font-size-complex="12pt" style:font-weight-complex="bold"/>
    </style:style>
    <style:style style:name="T23" style:family="text">
      <style:text-properties officeooo:rsid="00329fe7"/>
    </style:style>
    <style:style style:name="T24" style:family="text">
      <style:text-properties fo:font-weight="normal" style:font-weight-asian="normal" style:font-weight-complex="normal"/>
    </style:style>
    <style:style style:name="T25" style:family="text">
      <style:text-properties officeooo:rsid="0033d9e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text:bullet-char="•">
        <style:list-level-properties text:space-before="2.002cm" text:min-label-width="0.499cm"/>
        <style:text-properties style:font-name="OpenSymbol"/>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consecutive-numbering="true">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DdeLink__3842_480523685"/><text:bookmark-start text:name="__DdeLink__6162_3622563301"/>📝 COMPENDIO DE PREGUNTAS Y RESPUESTAS DE REFLEXIÓN</text:h>
      <text:h text:style-name="P3" text:outline-level="2">Curso de Discipulado Bíblico: Lecciones 0 a 8</text:h>
      <text:p text:style-name="P2"/>
      <text:h text:style-name="P3" text:outline-level="2">📖 LECCIÓN 0: Orientación e Introducción a la Religión</text:h>
      <text:h text:style-name="P4" text:outline-level="3">🔄 Preguntas de Repaso</text:h>
      <text:p text:style-name="Text_20_body"><text:span text:style-name="Strong_20_Emphasis"><text:span text:style-name="T1">1. ¿Cuáles son las dos definiciones de religión vistas en la lección?</text:span></text:span></text:p>
      <text:list text:style-name="L1">
        <text:list-item>
          <text:p text:style-name="P18"><text:span text:style-name="Strong_20_Emphasis"><text:span text:style-name="T1">Oriente (Jeongkyo):</text:span></text:span><text:span text:style-name="T1"> Las </text:span><text:span text:style-name="Strong_20_Emphasis"><text:span text:style-name="T1">mejores enseñanzas</text:span></text:span><text:span text:style-name="T1"> que vienen del cielo (de Dios). En caracteres chinos significa "cosas que se muestran del cielo". </text:span></text:p>
        </text:list-item>
        <text:list-item>
          <text:p text:style-name="P17"><text:span text:style-name="Strong_20_Emphasis"><text:span text:style-name="T1">Occidente (Religare):</text:span></text:span><text:span text:style-name="T1"> </text:span><text:span text:style-name="Strong_20_Emphasis"><text:span text:style-name="T1">Reconectar</text:span></text:span><text:span text:style-name="T1">. Implica que hubo una conexión original con Dios, luego una desconexión, y la religión es el proceso de volver a conectarse. </text:span></text:p>
        </text:list-item>
      </text:list>
      <text:p text:style-name="Text_20_body"><text:span text:style-name="Strong_20_Emphasis"><text:span text:style-name="T1">2. ¿Cómo podemos comprobar la existencia de Dios?</text:span></text:span></text:p>
      <text:list text:style-name="L2">
        <text:list-item>
          <text:p text:style-name="P20"><text:span text:style-name="Strong_20_Emphasis"><text:span text:style-name="T1">Respuesta:</text:span></text:span><text:span text:style-name="T1"> A través de la </text:span><text:span text:style-name="Strong_20_Emphasis"><text:span text:style-name="T1">Profecía y su Cumplimiento</text:span></text:span><text:span text:style-name="T1">. </text:span></text:p>
        </text:list-item>
        <text:list-item>
          <text:p text:style-name="P19"><text:span text:style-name="Emphasis"><text:span text:style-name="T1">Justificación:</text:span></text:span><text:span text:style-name="T1"> Así como al ver un desayuno listo con una nota sabemos que alguien existe y obró, al ver las profecías cumplidas sabemos que Dios existe y está activo. Ninguna otra religión tiene esta característica. </text:span></text:p>
        </text:list-item>
      </text:list>
      <text:p text:style-name="Text_20_body"><text:span text:style-name="Strong_20_Emphasis"><text:span text:style-name="T1">3. ¿Por qué necesitamos religión?</text:span></text:span></text:p>
      <text:list text:style-name="L3">
        <text:list-item>
          <text:p text:style-name="P21"><text:span text:style-name="Strong_20_Emphasis"><text:span text:style-name="T1">Respuesta:</text:span></text:span><text:span text:style-name="T1"> Porque </text:span><text:span text:style-name="Strong_20_Emphasis"><text:span text:style-name="T1">Dios es la fuente de vida</text:span></text:span><text:span text:style-name="T1">. Estar conectados con Él significa tener vida eterna; desconectarnos (como un teléfono sin corriente) lleva a la muerte espiritual. </text:span></text:p>
        </text:list-item>
      </text:list>
      <text:p text:style-name="P2"/>
      <text:h text:style-name="P3" text:outline-level="2">📖 LECCIÓN 1: Los Dos Dioses (Dios y Satanás)</text:h>
      <text:h text:style-name="P4" text:outline-level="3">🔄 Parte 1: Características de Dios y la Caída</text:h>
      <text:p text:style-name="Text_20_body"><text:span text:style-name="Strong_20_Emphasis"><text:span text:style-name="T1">1. ¿Qué opciones describen correctamente a Dios y a Satanás?</text:span></text:span></text:p>
      <text:list text:style-name="L4">
        <text:list-item>
          <text:p text:style-name="P23"><text:span text:style-name="Strong_20_Emphasis"><text:span text:style-name="T1">Dios:</text:span></text:span><text:span text:style-name="T1"> Es Creador, Espíritu, Autoexistente ("Yo soy") y Único. </text:span><text:span text:style-name="Strong_20_Emphasis"><text:span text:style-name="T1">No es una creación.</text:span></text:span><text:span text:style-name="T1"> </text:span></text:p>
        </text:list-item>
        <text:list-item>
          <text:p text:style-name="P22"><text:soft-page-break/><text:span text:style-name="Strong_20_Emphasis"><text:span text:style-name="T1">Satanás:</text:span></text:span><text:span text:style-name="T1"> Es un ángel caído, espíritu y </text:span><text:span text:style-name="Strong_20_Emphasis"><text:span text:style-name="T1">creación</text:span></text:span><text:span text:style-name="T1"> (no creador). </text:span><text:span text:style-name="Strong_20_Emphasis"><text:span text:style-name="T1">No fue creado malo desde el principio</text:span></text:span><text:span text:style-name="T1">; su orgullo lo corrompió. </text:span></text:p>
        </text:list-item>
      </text:list>
      <text:p text:style-name="Text_20_body"><text:span text:style-name="Strong_20_Emphasis"><text:span text:style-name="T1">2. ¿Qué significa "Yo soy" en Éxodo 3:14?</text:span></text:span></text:p>
      <text:list text:style-name="L5">
        <text:list-item>
          <text:p text:style-name="P24"><text:span text:style-name="Strong_20_Emphasis"><text:span text:style-name="T1">Respuesta:</text:span></text:span><text:span text:style-name="T1"> </text:span><text:span text:style-name="Strong_20_Emphasis"><text:span text:style-name="T1">Dios existe por sí mismo</text:span></text:span><text:span text:style-name="T1"> (autoexistente). Nadie lo creó; Él es el origen sin origen. </text:span></text:p>
        </text:list-item>
      </text:list>
      <text:p text:style-name="Text_20_body"><text:span text:style-name="Strong_20_Emphasis"><text:span text:style-name="T1">3. ¿Cuál fue la causa de la caída de Satanás?</text:span></text:span></text:p>
      <text:list text:style-name="L6">
        <text:list-item>
          <text:p text:style-name="P25"><text:span text:style-name="Strong_20_Emphasis"><text:span text:style-name="T1">Respuesta:</text:span></text:span><text:span text:style-name="T1"> </text:span><text:span text:style-name="Strong_20_Emphasis"><text:span text:style-name="T1">El orgullo</text:span></text:span><text:span text:style-name="T1">. Su corazón se enalteció y quiso ser semejante al Altísimo. </text:span></text:p>
        </text:list-item>
      </text:list>
      <text:p text:style-name="Text_20_body"><text:span text:style-name="Strong_20_Emphasis"><text:span text:style-name="T1">4. ¿Por qué es importante crecer espiritualmente según Hebreos 5:12-14?</text:span></text:span></text:p>
      <text:list text:style-name="L7">
        <text:list-item>
          <text:p text:style-name="P26"><text:span text:style-name="Strong_20_Emphasis"><text:span text:style-name="T1">Respuesta:</text:span></text:span><text:span text:style-name="T1"> Para alcanzar la madurez y tener los </text:span><text:span text:style-name="Strong_20_Emphasis"><text:span text:style-name="T1">sentidos ejercitados en el discernimiento entre el bien y el mal</text:span></text:span><text:span text:style-name="T1"> ante los ojos de Dios, no ante los del mundo. </text:span></text:p>
        </text:list-item>
      </text:list>
      <text:h text:style-name="P4" text:outline-level="3">🔄 Parte 2: La División en el Mundo Físico</text:h>
      <text:p text:style-name="Text_20_body"><text:span text:style-name="Strong_20_Emphasis"><text:span text:style-name="T1">5. ¿Cómo se prueba un espíritu si no podemos verlo?</text:span></text:span></text:p>
      <text:list text:style-name="L8">
        <text:list-item>
          <text:p text:style-name="P27"><text:span text:style-name="Strong_20_Emphasis"><text:span text:style-name="T1">Respuesta:</text:span></text:span><text:span text:style-name="T1"> A través de </text:span><text:span text:style-name="Strong_20_Emphasis"><text:span text:style-name="T1">las palabras que salen de la boca de la persona</text:span></text:span><text:span text:style-name="T1"> (Juan 6:63: "las palabras que yo os he hablado son espíritu y son vida"). </text:span></text:p>
        </text:list-item>
      </text:list>
      <text:p text:style-name="Text_20_body"><text:span text:style-name="Strong_20_Emphasis"><text:span text:style-name="T1">6. ¿Cómo distinguimos entre un pastor verdadero y uno falso?</text:span></text:span></text:p>
      <text:list text:style-name="L9">
        <text:list-item>
          <text:p text:style-name="P28"><text:span text:style-name="Strong_20_Emphasis"><text:span text:style-name="T1">Respuesta:</text:span></text:span><text:span text:style-name="T1"> </text:span><text:span text:style-name="Strong_20_Emphasis"><text:span text:style-name="T1">Por la palabra que enseñan</text:span></text:span><text:span text:style-name="T1">, no por su fama, tamaño de iglesia o riqueza. El estándar es la Biblia. </text:span></text:p>
        </text:list-item>
      </text:list>
      <text:p text:style-name="Text_20_body"><text:span text:style-name="Strong_20_Emphasis"><text:span text:style-name="T1">7. ¿De qué habla una persona enviada por Dios?</text:span></text:span></text:p>
      <text:list text:style-name="L10">
        <text:list-item>
          <text:p text:style-name="P29"><text:span text:style-name="Strong_20_Emphasis"><text:span text:style-name="T1">Respuesta:</text:span></text:span><text:span text:style-name="T1"> Habla las </text:span><text:span text:style-name="Strong_20_Emphasis"><text:span text:style-name="T1">palabras de Dios</text:span></text:span><text:span text:style-name="T1"> (la verdad, profecía y cumplimiento), no las palabras del hombre. </text:span></text:p>
        </text:list-item>
      </text:list>
      <text:p text:style-name="P2"/>
      <text:h text:style-name="P3" text:outline-level="2">📖 LECCIÓN 2: El Entendimiento Básico de la Biblia</text:h>
      <text:h text:style-name="P4" text:outline-level="3">🔄 Parte 1: Pactos y Discernimiento</text:h>
      <text:p text:style-name="Text_20_body"><text:span text:style-name="Strong_20_Emphasis"><text:span text:style-name="T1">1. ¿Qué debemos hacer según 1 Juan 4:1?</text:span></text:span></text:p>
      <text:list text:style-name="L11">
        <text:list-item>
          <text:p text:style-name="P30"><text:span text:style-name="Strong_20_Emphasis"><text:span text:style-name="T1">Respuesta:</text:span></text:span><text:span text:style-name="T1"> </text:span><text:span text:style-name="Strong_20_Emphasis"><text:span text:style-name="T1">Probar los espíritus</text:span></text:span><text:span text:style-name="T1"> si son de Dios, porque muchos falsos profetas han salido al mundo. </text:span></text:p>
        </text:list-item>
      </text:list>
      <text:p text:style-name="Text_20_body"><text:span text:style-name="Strong_20_Emphasis"><text:span text:style-name="T1">2. ¿Cuál es el propósito de Dios según 1 Timoteo 2:4?</text:span></text:span></text:p>
      <text:list text:style-name="L12">
        <text:list-item>
          <text:p text:style-name="P31"><text:soft-page-break/><text:span text:style-name="Strong_20_Emphasis"><text:span text:style-name="T1">Respuesta:</text:span></text:span><text:span text:style-name="T1"> </text:span><text:span text:style-name="Strong_20_Emphasis"><text:span text:style-name="T1">Que todos sean salvos y conozcan la verdad</text:span></text:span><text:span text:style-name="T1"> (la verdad de Dios, no la del hombre). </text:span></text:p>
        </text:list-item>
      </text:list>
      <text:p text:style-name="Text_20_body"><text:span text:style-name="Strong_20_Emphasis"><text:span text:style-name="T1">3. ¿Qué promesa hizo Dios a Israel en Éxodo 19:5-6?</text:span></text:span></text:p>
      <text:list text:style-name="L13">
        <text:list-item>
          <text:p text:style-name="P32"><text:span text:style-name="Strong_20_Emphasis"><text:span text:style-name="T1">Respuesta:</text:span></text:span><text:span text:style-name="T1"> Serían un </text:span><text:span text:style-name="Strong_20_Emphasis"><text:span text:style-name="T1">reino de sacerdotes y nación santa</text:span></text:span><text:span text:style-name="T1">, </text:span><text:span text:style-name="Emphasis"><text:span text:style-name="T1">siempre y cuando</text:span></text:span><text:span text:style-name="T1"> guardaran Su pacto al 100%. </text:span></text:p>
        </text:list-item>
      </text:list>
      <text:p text:style-name="Text_20_body"><text:span text:style-name="Strong_20_Emphasis"><text:span text:style-name="T1">4. ¿Quiénes forman el Israel espiritual según el Nuevo Testamento?</text:span></text:span></text:p>
      <text:list text:style-name="L14">
        <text:list-item>
          <text:p text:style-name="P33"><text:span text:style-name="Strong_20_Emphasis"><text:span text:style-name="T1">Respuesta:</text:span></text:span><text:span text:style-name="T1"> </text:span><text:span text:style-name="Strong_20_Emphasis"><text:span text:style-name="T1">Los creyentes (cristianos)</text:span></text:span><text:span text:style-name="T1"> que reciben y creen en Jesús, no por linaje de sangre, sino por recibir Su semilla (la Palabra). </text:span></text:p>
        </text:list-item>
      </text:list>
      <text:h text:style-name="P4" text:outline-level="3">🔄 Parte 2: Autoría y Contenidos</text:h>
      <text:p text:style-name="Text_20_body"><text:span text:style-name="Strong_20_Emphasis"><text:span text:style-name="T1">5. ¿Qué significa que la Biblia está inspirada por Dios?</text:span></text:span></text:p>
      <text:list text:style-name="L15">
        <text:list-item>
          <text:p text:style-name="P34"><text:span text:style-name="Strong_20_Emphasis"><text:span text:style-name="T1">Respuesta:</text:span></text:span><text:span text:style-name="T1"> Que </text:span><text:span text:style-name="Strong_20_Emphasis"><text:span text:style-name="T1">Dios guió a los escritores (35-40 personas) con su Espíritu Santo</text:span></text:span><text:span text:style-name="T1">. No fue solo razonamiento humano. </text:span></text:p>
        </text:list-item>
      </text:list>
      <text:p text:style-name="Text_20_body"><text:span text:style-name="Strong_20_Emphasis"><text:span text:style-name="T1">6. ¿Cuáles son las cuatro clasificaciones del contenido bíblico?</text:span></text:span></text:p>
      <text:list text:style-name="L16">
        <text:list-item>
          <text:p text:style-name="P35"><text:span text:style-name="Strong_20_Emphasis"><text:span text:style-name="T1">Respuesta:</text:span></text:span><text:span text:style-name="T1"> </text:span><text:span text:style-name="Strong_20_Emphasis"><text:span text:style-name="T1">Historia, Enseñanzas morales, Profecía y Cumplimiento.</text:span></text:span><text:span text:style-name="T1"> (Las dos últimas son las más importantes porque prueban que Dios es real y está vivo). </text:span></text:p>
        </text:list-item>
      </text:list>
      <text:p text:style-name="Text_20_body"><text:span text:style-name="Strong_20_Emphasis"><text:span text:style-name="T1">7. ¿Qué criticó Jesús según Marcos 7:6-9?</text:span></text:span></text:p>
      <text:list text:style-name="L17">
        <text:list-item>
          <text:p text:style-name="P36"><text:span text:style-name="Strong_20_Emphasis"><text:span text:style-name="T1">Respuesta:</text:span></text:span><text:span text:style-name="T1"> </text:span><text:span text:style-name="Strong_20_Emphasis"><text:span text:style-name="T1">Las tradiciones humanas que reemplazan la palabra de Dios</text:span></text:span><text:span text:style-name="T1">. </text:span></text:p>
        </text:list-item>
      </text:list>
      <text:h text:style-name="P4" text:outline-level="3">🔄 Parte 3 y 4: Profecía y Cumplimiento</text:h>
      <text:p text:style-name="Text_20_body"><text:span text:style-name="Strong_20_Emphasis"><text:span text:style-name="T1">8. ¿Por qué Dios anuncia las cosas antes de que sucedan?</text:span></text:span></text:p>
      <text:list text:style-name="L18">
        <text:list-item>
          <text:p text:style-name="P37"><text:span text:style-name="Strong_20_Emphasis"><text:span text:style-name="T1">Respuesta:</text:span></text:span><text:span text:style-name="T1"> </text:span><text:span text:style-name="Strong_20_Emphasis"><text:span text:style-name="T1">Para que creamos cuando sucedan</text:span></text:span><text:span text:style-name="T1"> (Juan 14:29). Esto está directamente ligado a la profecía y el cumplimiento. </text:span></text:p>
        </text:list-item>
      </text:list>
      <text:p text:style-name="Text_20_body"><text:span text:style-name="Strong_20_Emphasis"><text:span text:style-name="T1">9. ¿Qué demuestra el cumplimiento de las profecías?</text:span></text:span></text:p>
      <text:list text:style-name="L19">
        <text:list-item>
          <text:p text:style-name="P38"><text:span text:style-name="Strong_20_Emphasis"><text:span text:style-name="T1">Respuesta:</text:span></text:span><text:span text:style-name="T1"> Que </text:span><text:span text:style-name="Strong_20_Emphasis"><text:span text:style-name="T1">Dios es vivo y Su palabra es verdadera</text:span></text:span><text:span text:style-name="T1">. Si cumplió las del pasado, cumplirá las del futuro. </text:span></text:p>
        </text:list-item>
      </text:list>
      <text:p text:style-name="Text_20_body"><text:span text:style-name="Strong_20_Emphasis"><text:span text:style-name="T1">10. ¿Cuál es el orden correcto de las profecías según 2 Tesalonicenses 2:1-3?</text:span></text:span></text:p>
      <text:list text:style-name="L20">
        <text:list-item>
          <text:p text:style-name="P39"><text:span text:style-name="Strong_20_Emphasis"><text:span text:style-name="T1">Respuesta:</text:span></text:span><text:span text:style-name="T1"> </text:span><text:span text:style-name="Strong_20_Emphasis"><text:span text:style-name="T1">Traición, destrucción y salvación</text:span></text:span><text:span text:style-name="T1">. Este orden nos ayuda a no ser engañados. </text:span></text:p>
        </text:list-item>
      </text:list>
      <text:p text:style-name="Text_20_body"><text:span text:style-name="Strong_20_Emphasis"><text:span text:style-name="T1">11. ¿Qué significa tener una "fe completa"?</text:span></text:span></text:p>
      <text:list text:style-name="L21">
        <text:list-item>
          <text:p text:style-name="P40"><text:soft-page-break/><text:span text:style-name="Strong_20_Emphasis"><text:span text:style-name="T1">Respuesta:</text:span></text:span><text:span text:style-name="T1"> </text:span><text:span text:style-name="Strong_20_Emphasis"><text:span text:style-name="T1">Creer tanto en la profecía como en su cumplimiento (la realidad).</text:span></text:span><text:span text:style-name="T1"> Los judíos creyeron en la profecía, pero no en el cumplimiento (Jesús). </text:span></text:p>
        </text:list-item>
      </text:list>
      <text:p text:style-name="P2"/>
      <text:h text:style-name="P3" text:outline-level="2">📖 LECCIÓN 3: Las Parábolas de los Misterios del Reino</text:h>
      <text:h text:style-name="P4" text:outline-level="3">🔄 Preguntas de Repaso</text:h>
      <text:p text:style-name="Text_20_body"><text:span text:style-name="Strong_20_Emphasis"><text:span text:style-name="T1">1. ¿Qué es una parábola?</text:span></text:span></text:p>
      <text:list text:style-name="L22">
        <text:list-item>
          <text:p text:style-name="P41"><text:span text:style-name="Strong_20_Emphasis"><text:span text:style-name="T1">Respuesta:</text:span></text:span><text:span text:style-name="T1"> Es usar frases como </text:span><text:span text:style-name="Strong_20_Emphasis"><text:span text:style-name="T1">"es como..."</text:span></text:span><text:span text:style-name="T1"> para comparar algo físico con algo espiritual, describiendo características de uno para entender al otro. </text:span></text:p>
        </text:list-item>
      </text:list>
      <text:p text:style-name="Text_20_body"><text:span text:style-name="Strong_20_Emphasis"><text:span text:style-name="T1">2. ¿Cuál es el propósito de las parábolas en Historia/Moral vs. Profecía?</text:span></text:span></text:p>
      <text:list text:style-name="L23">
        <text:list-item>
          <text:p text:style-name="P43"><text:span text:style-name="Strong_20_Emphasis"><text:span text:style-name="T1">Enseñanzas e Historia:</text:span></text:span><text:span text:style-name="T1"> Son para </text:span><text:span text:style-name="Strong_20_Emphasis"><text:span text:style-name="T1">ayudar al entendimiento</text:span></text:span><text:span text:style-name="T1"> (reforzar la idea). </text:span></text:p>
        </text:list-item>
        <text:list-item>
          <text:p text:style-name="P42"><text:span text:style-name="Strong_20_Emphasis"><text:span text:style-name="T1">Profecía:</text:span></text:span><text:span text:style-name="T1"> Son para </text:span><text:span text:style-name="Strong_20_Emphasis"><text:span text:style-name="T1">ocultar los secretos del reino</text:span></text:span><text:span text:style-name="T1"> de Satanás y de aquellos con corazón cerrado. </text:span></text:p>
        </text:list-item>
      </text:list>
      <text:p text:style-name="Text_20_body"><text:span text:style-name="Strong_20_Emphasis"><text:span text:style-name="T1">3. ¿Por qué Jesús habló en parábolas? (Dos razones)</text:span></text:span></text:p>
      <text:list text:style-name="L24">
        <text:list-item>
          <text:p text:style-name="P45"><text:span text:style-name="Strong_20_Emphasis"><text:span text:style-name="T1">Razón 1:</text:span></text:span><text:span text:style-name="T1"> Para </text:span><text:span text:style-name="Strong_20_Emphasis"><text:span text:style-name="T1">esconder los secretos</text:span></text:span><text:span text:style-name="T1"> de los enemigos (como un código de guerra). </text:span></text:p>
        </text:list-item>
        <text:list-item>
          <text:p text:style-name="P44"><text:span text:style-name="Strong_20_Emphasis"><text:span text:style-name="T1">Razón 2:</text:span></text:span><text:span text:style-name="T1"> Porque estaba </text:span><text:span text:style-name="Strong_20_Emphasis"><text:span text:style-name="T1">profetizado</text:span></text:span><text:span text:style-name="T1"> (Salmos 78:2 ➡️ Mateo 13:34). </text:span></text:p>
        </text:list-item>
      </text:list>
      <text:p text:style-name="Text_20_body"><text:span text:style-name="Strong_20_Emphasis"><text:span text:style-name="T1">4. ¿Cuál es la diferencia entre los que saben las parábolas y los que no?</text:span></text:span></text:p>
      <text:list text:style-name="L25">
        <text:list-item>
          <text:p text:style-name="P47"><text:span text:style-name="Strong_20_Emphasis"><text:span text:style-name="T1">Los que saben:</text:span></text:span><text:span text:style-name="T1"> Conocen y hacen la voluntad de Dios ➡️ reciben perdón de pecados ➡️ tienen </text:span><text:span text:style-name="Strong_20_Emphasis"><text:span text:style-name="T1">salvación</text:span></text:span><text:span text:style-name="T1">. </text:span></text:p>
        </text:list-item>
        <text:list-item>
          <text:p text:style-name="P46"><text:span text:style-name="Strong_20_Emphasis"><text:span text:style-name="T1">Los que no saben:</text:span></text:span><text:span text:style-name="T1"> No conocen la voluntad ➡️ no la hacen ➡️ no reciben perdón ➡️ </text:span><text:span text:style-name="Strong_20_Emphasis"><text:span text:style-name="T1">no tienen salvación</text:span></text:span><text:span text:style-name="T1">. </text:span></text:p>
        </text:list-item>
      </text:list>
      <text:p text:style-name="Text_20_body"><text:span text:style-name="Strong_20_Emphasis"><text:span text:style-name="T1">5. ¿Cuándo se pueden entender las parábolas?</text:span></text:span></text:p>
      <text:list text:style-name="L26">
        <text:list-item>
          <text:p text:style-name="P48"><text:span text:style-name="Strong_20_Emphasis"><text:span text:style-name="T1">Respuesta:</text:span></text:span><text:span text:style-name="T1"> En el </text:span><text:span text:style-name="Strong_20_Emphasis"><text:span text:style-name="T1">último tiempo, cuando la profecía se cumple y aparece la realidad</text:span></text:span><text:span text:style-name="T1">. No en cualquier momento. </text:span></text:p>
        </text:list-item>
      </text:list>
      <text:p text:style-name="Text_20_body"><text:span text:style-name="Strong_20_Emphasis"><text:span text:style-name="T1">6. ¿Cuáles son los 5 tipos de parábolas?</text:span></text:span></text:p>
      <text:list text:style-name="L27">
        <text:list-item>
          <text:p text:style-name="P49"><text:span text:style-name="Strong_20_Emphasis"><text:span text:style-name="T1">Respuesta:</text:span></text:span><text:span text:style-name="T1"> 1) Objetos (naturaleza), 2) Profetas, 3) Animales/Bestias, 4) Acontecimientos Históricos, 5) Lugares/Países. </text:span></text:p>
        </text:list-item>
      </text:list>
      <text:p text:style-name="P2"/>
      <text:h text:style-name="P3" text:outline-level="2"><text:soft-page-break/>📖 LECCIÓN 4: Semilla, Campo, Árbol y Ave en Figurativo</text:h>
      <text:h text:style-name="P4" text:outline-level="3">🔄 Parte 1: Semilla y Campo</text:h>
      <text:p text:style-name="Text_20_body"><text:span text:style-name="Strong_20_Emphasis"><text:span text:style-name="T1">1. ¿Qué es la semilla espiritualmente?</text:span></text:span></text:p>
      <text:list text:style-name="L28">
        <text:list-item>
          <text:p text:style-name="P50"><text:span text:style-name="Strong_20_Emphasis"><text:span text:style-name="T1">Respuesta:</text:span></text:span><text:span text:style-name="T1"> </text:span><text:span text:style-name="Strong_20_Emphasis"><text:span text:style-name="T1">La Palabra de Dios</text:span></text:span><text:span text:style-name="T1"> (la verdad del cumplimiento). Lucas 8:11. </text:span></text:p>
        </text:list-item>
      </text:list>
      <text:p text:style-name="Text_20_body"><text:span text:style-name="Strong_20_Emphasis"><text:span text:style-name="T1">2. ¿Cuántas semillas hay?</text:span></text:span></text:p>
      <text:list text:style-name="L29">
        <text:list-item>
          <text:p text:style-name="P51"><text:span text:style-name="Strong_20_Emphasis"><text:span text:style-name="T1">Respuesta:</text:span></text:span><text:span text:style-name="T1"> </text:span><text:span text:style-name="Strong_20_Emphasis"><text:span text:style-name="T1">Dos.</text:span></text:span><text:span text:style-name="T1"> La semilla de Dios (Verdad) y la semilla de Satanás (Mentira/Tergiversación). </text:span></text:p>
        </text:list-item>
      </text:list>
      <text:p text:style-name="Text_20_body"><text:span text:style-name="Strong_20_Emphasis"><text:span text:style-name="T1">3. ¿Qué es el campo?</text:span></text:span></text:p>
      <text:list text:style-name="L30">
        <text:list-item>
          <text:p text:style-name="P52"><text:span text:style-name="Strong_20_Emphasis"><text:span text:style-name="T1">Respuesta:</text:span></text:span><text:span text:style-name="T1"> </text:span><text:span text:style-name="Strong_20_Emphasis"><text:span text:style-name="T1">Nuestro corazón</text:span></text:span><text:span text:style-name="T1"> (individuo) y también </text:span><text:span text:style-name="Strong_20_Emphasis"><text:span text:style-name="T1">el mundo</text:span></text:span><text:span text:style-name="T1"> (el cristianismo, donde conviven buena semilla y cizaña). </text:span></text:p>
        </text:list-item>
      </text:list>
      <text:p text:style-name="Text_20_body"><text:span text:style-name="Strong_20_Emphasis"><text:span text:style-name="T1">4. ¿Cuáles son los cuatro campos (corazones)?</text:span></text:span></text:p>
      <text:list text:style-name="L31">
        <text:list-item>
          <text:p text:style-name="P54"><text:span text:style-name="Strong_20_Emphasis"><text:span text:style-name="T1">Camino:</text:span></text:span><text:span text:style-name="T1"> No entienden, el diablo se la lleva. </text:span></text:p>
        </text:list-item>
        <text:list-item>
          <text:p text:style-name="P54"><text:span text:style-name="Strong_20_Emphasis"><text:span text:style-name="T1">Piedras:</text:span></text:span><text:span text:style-name="T1"> Persecución, se secan. </text:span></text:p>
        </text:list-item>
        <text:list-item>
          <text:p text:style-name="P54"><text:span text:style-name="Strong_20_Emphasis"><text:span text:style-name="T1">Espinos:</text:span></text:span><text:span text:style-name="T1"> Afanes y riquezas, se ahogan. </text:span></text:p>
        </text:list-item>
        <text:list-item>
          <text:p text:style-name="P53"><text:span text:style-name="Strong_20_Emphasis"><text:span text:style-name="T1">Buena Tierra:</text:span></text:span><text:span text:style-name="T1"> Retienen la palabra y dan fruto con perseverancia. </text:span></text:p>
        </text:list-item>
      </text:list>
      <text:h text:style-name="P4" text:outline-level="3">🔄 Parte 2: Árbol, Ramas, Hojas, Frutos y Aves</text:h>
      <text:p text:style-name="Text_20_body"><text:span text:style-name="Strong_20_Emphasis"><text:span text:style-name="T1">5. ¿Qué significa el árbol espiritual?</text:span></text:span></text:p>
      <text:list text:style-name="L32">
        <text:list-item>
          <text:p text:style-name="P55"><text:span text:style-name="Strong_20_Emphasis"><text:span text:style-name="T1">Respuesta:</text:span></text:span><text:span text:style-name="T1"> Una </text:span><text:span text:style-name="Strong_20_Emphasis"><text:span text:style-name="T1">persona interna renacida</text:span></text:span><text:span text:style-name="T1"> por la semilla espiritual, o también representa a un </text:span><text:span text:style-name="Strong_20_Emphasis"><text:span text:style-name="T1">pastor/organización</text:span></text:span><text:span text:style-name="T1">. </text:span></text:p>
        </text:list-item>
      </text:list>
      <text:p text:style-name="Text_20_body"><text:span text:style-name="Strong_20_Emphasis"><text:span text:style-name="T1">6. ¿Cuáles son los dos árboles?</text:span></text:span></text:p>
      <text:list text:style-name="L33">
        <text:list-item>
          <text:p text:style-name="P56"><text:span text:style-name="Strong_20_Emphasis"><text:span text:style-name="T1">Respuesta:</text:span></text:span><text:span text:style-name="T1"> El </text:span><text:span text:style-name="Strong_20_Emphasis"><text:span text:style-name="T1">Árbol de la Vida</text:span></text:span><text:span text:style-name="T1"> (Dios/Jesús/verdadero pastor) y el </text:span><text:span text:style-name="Strong_20_Emphasis"><text:span text:style-name="T1">Árbol de la Ciencia del Bien y del Mal</text:span></text:span><text:span text:style-name="T1"> (Satanás/falsos pastores). </text:span></text:p>
        </text:list-item>
      </text:list>
      <text:p text:style-name="Text_20_body"><text:span text:style-name="Strong_20_Emphasis"><text:span text:style-name="T1">7. ¿Qué son las aves?</text:span></text:span></text:p>
      <text:list text:style-name="L34">
        <text:list-item>
          <text:p text:style-name="P57"><text:span text:style-name="Strong_20_Emphasis"><text:span text:style-name="T1">Respuesta:</text:span></text:span><text:span text:style-name="T1"> </text:span><text:span text:style-name="Strong_20_Emphasis"><text:span text:style-name="T1">Los espíritus</text:span></text:span><text:span text:style-name="T1"> (buenos y malos). Los espíritus de Dios anidan en el árbol de vida; los espíritus malignos roban la semilla. </text:span></text:p>
        </text:list-item>
      </text:list>
      <text:p text:style-name="Text_20_body"><text:span text:style-name="Strong_20_Emphasis"><text:span text:style-name="T1">8. ¿Qué son las ramas, hojas y frutos?</text:span></text:span></text:p>
      <text:list text:style-name="L35">
        <text:list-item>
          <text:p text:style-name="P59"><text:span text:style-name="Strong_20_Emphasis"><text:span text:style-name="T1">Ramas:</text:span></text:span><text:span text:style-name="T1"> Los </text:span><text:span text:style-name="Strong_20_Emphasis"><text:span text:style-name="T1">discípulos/trabajadores</text:span></text:span><text:span text:style-name="T1">. </text:span></text:p>
        </text:list-item>
        <text:list-item>
          <text:p text:style-name="P59"><text:soft-page-break/><text:span text:style-name="Strong_20_Emphasis"><text:span text:style-name="T1">Hojas:</text:span></text:span><text:span text:style-name="T1"> Los </text:span><text:span text:style-name="Strong_20_Emphasis"><text:span text:style-name="T1">evangelistas</text:span></text:span><text:span text:style-name="T1"> (para la sanidad de las naciones). </text:span></text:p>
        </text:list-item>
        <text:list-item>
          <text:p text:style-name="P58"><text:span text:style-name="Strong_20_Emphasis"><text:span text:style-name="T1">Frutos:</text:span></text:span><text:span text:style-name="T1"> La </text:span><text:span text:style-name="Strong_20_Emphasis"><text:span text:style-name="T1">palabra</text:span></text:span><text:span text:style-name="T1"> y la </text:span><text:span text:style-name="Strong_20_Emphasis"><text:span text:style-name="T1">congregación</text:span></text:span><text:span text:style-name="T1"> que nace por ella. </text:span></text:p>
        </text:list-item>
      </text:list>
      <text:p text:style-name="P2"/>
      <text:h text:style-name="P3" text:outline-level="2">📖 LECCIÓN 5: Alimento y Levadura en Figurativo</text:h>
      <text:h text:style-name="P4" text:outline-level="3">🔄 Parte 1: Alimento Espiritual</text:h>
      <text:p text:style-name="Text_20_body"><text:span text:style-name="Strong_20_Emphasis"><text:span text:style-name="T1">1. ¿Cuáles son los dos alimentos espirituales?</text:span></text:span></text:p>
      <text:list text:style-name="L36">
        <text:list-item>
          <text:p text:style-name="P60"><text:span text:style-name="Strong_20_Emphasis"><text:span text:style-name="T1">Respuesta:</text:span></text:span><text:span text:style-name="T1"> El </text:span><text:span text:style-name="Strong_20_Emphasis"><text:span text:style-name="T1">alimento de Dios</text:span></text:span><text:span text:style-name="T1"> (Palabra de verdad, da vida) y el </text:span><text:span text:style-name="Strong_20_Emphasis"><text:span text:style-name="T1">alimento de Satanás</text:span></text:span><text:span text:style-name="T1"> (mentiras, causa muerte espiritual). </text:span></text:p>
        </text:list-item>
      </text:list>
      <text:p text:style-name="Text_20_body"><text:span text:style-name="Strong_20_Emphasis"><text:span text:style-name="T1">2. ¿Qué es el hambre espiritual?</text:span></text:span></text:p>
      <text:list text:style-name="L37">
        <text:list-item>
          <text:p text:style-name="P61"><text:span text:style-name="Strong_20_Emphasis"><text:span text:style-name="T1">Respuesta:</text:span></text:span><text:span text:style-name="T1"> </text:span><text:span text:style-name="Strong_20_Emphasis"><text:span text:style-name="T1">Hambre de oír la Palabra de Dios</text:span></text:span><text:span text:style-name="T1"> (Amós 8:11). No es falta de pan físico, sino de revelación. </text:span></text:p>
        </text:list-item>
      </text:list>
      <text:p text:style-name="Text_20_body"><text:span text:style-name="Strong_20_Emphasis"><text:span text:style-name="T1">3. ¿Cómo discernimos el alimento?</text:span></text:span></text:p>
      <text:list text:style-name="L38">
        <text:list-item>
          <text:p text:style-name="P62"><text:span text:style-name="Strong_20_Emphasis"><text:span text:style-name="T1">Respuesta:</text:span></text:span><text:span text:style-name="T1"> Usando nuestros </text:span><text:span text:style-name="Strong_20_Emphasis"><text:span text:style-name="T1">oídos</text:span></text:span><text:span text:style-name="T1"> y probando las palabras con la Biblia, como el paladar prueba la comida (Job 34:3). </text:span></text:p>
        </text:list-item>
      </text:list>
      <text:p text:style-name="Text_20_body"><text:span text:style-name="Strong_20_Emphasis"><text:span text:style-name="T1">4. ¿Cuál fue el alimento de la Primera Venida?</text:span></text:span></text:p>
      <text:list text:style-name="L39">
        <text:list-item>
          <text:p text:style-name="P63"><text:span text:style-name="Strong_20_Emphasis"><text:span text:style-name="T1">Respuesta:</text:span></text:span><text:span text:style-name="T1"> Las </text:span><text:span text:style-name="Strong_20_Emphasis"><text:span text:style-name="T1">profecías del Antiguo Testamento y su realidad/cumplimiento</text:span></text:span><text:span text:style-name="T1"> (Jesús). </text:span></text:p>
        </text:list-item>
      </text:list>
      <text:p text:style-name="Text_20_body"><text:span text:style-name="Strong_20_Emphasis"><text:span text:style-name="T1">5. ¿Cuál es el alimento de la Segunda Venida?</text:span></text:span></text:p>
      <text:list text:style-name="L40">
        <text:list-item>
          <text:p text:style-name="P64"><text:span text:style-name="Strong_20_Emphasis"><text:span text:style-name="T1">Respuesta:</text:span></text:span><text:span text:style-name="T1"> Las </text:span><text:span text:style-name="Strong_20_Emphasis"><text:span text:style-name="T1">profecías del Nuevo Testamento (Apocalipsis) y su realidad/cumplimiento</text:span></text:span><text:span text:style-name="T1">. </text:span></text:p>
        </text:list-item>
      </text:list>
      <text:p text:style-name="Text_20_body"><text:span text:style-name="Strong_20_Emphasis"><text:span text:style-name="T1">6. ¿Quién da este alimento a tiempo?</text:span></text:span></text:p>
      <text:list text:style-name="L41">
        <text:list-item>
          <text:p text:style-name="P65"><text:span text:style-name="Strong_20_Emphasis"><text:span text:style-name="T1">Respuesta:</text:span></text:span><text:span text:style-name="T1"> El </text:span><text:span text:style-name="Strong_20_Emphasis"><text:span text:style-name="T1">siervo fiel y prudente</text:span></text:span><text:span text:style-name="T1"> (el pastor verdadero enviado por Dios, Mateo 24:45). </text:span></text:p>
        </text:list-item>
      </text:list>
      <text:h text:style-name="P4" text:outline-level="3">🔄 Parte 2: Levadura Espiritual</text:h>
      <text:p text:style-name="Text_20_body"><text:span text:style-name="Strong_20_Emphasis"><text:span text:style-name="T1">7. ¿Qué representa la levadura espiritual?</text:span></text:span></text:p>
      <text:list text:style-name="L42">
        <text:list-item>
          <text:p text:style-name="P66"><text:span text:style-name="Strong_20_Emphasis"><text:span text:style-name="T1">Respuesta:</text:span></text:span><text:span text:style-name="T1"> </text:span><text:span text:style-name="Strong_20_Emphasis"><text:span text:style-name="T1">Enseñanzas morales que cambian el corazón</text:span></text:span><text:span text:style-name="T1">. Así como la levadura cambia la masa, estas enseñanzas nos transforman. </text:span></text:p>
        </text:list-item>
      </text:list>
      <text:p text:style-name="Text_20_body"><text:span text:style-name="Strong_20_Emphasis"><text:span text:style-name="T1">8. ¿Qué representa que "todo fue leudado"?</text:span></text:span></text:p>
      <text:list text:style-name="L43">
        <text:list-item>
          <text:p text:style-name="P67"><text:soft-page-break/><text:span text:style-name="Strong_20_Emphasis"><text:span text:style-name="T1">Respuesta:</text:span></text:span><text:span text:style-name="T1"> </text:span><text:span text:style-name="Strong_20_Emphasis"><text:span text:style-name="T1">La enseñanza influyó completamente</text:span></text:span><text:span text:style-name="T1"> en aquello donde fue puesta. Debe haber un cambio total, no parcial. </text:span></text:p>
        </text:list-item>
      </text:list>
      <text:p text:style-name="Text_20_body"><text:span text:style-name="Strong_20_Emphasis"><text:span text:style-name="T1">9. ¿Por qué es importante tener cuidado con lo que escuchamos?</text:span></text:span></text:p>
      <text:list text:style-name="L44">
        <text:list-item>
          <text:p text:style-name="P68"><text:span text:style-name="Strong_20_Emphasis"><text:span text:style-name="T1">Respuesta:</text:span></text:span><text:span text:style-name="T1"> Porque hay </text:span><text:span text:style-name="Strong_20_Emphasis"><text:span text:style-name="T1">dos tipos de levaduras</text:span></text:span><text:span text:style-name="T1">. Si aceptamos la de Dios, nos transformamos a Su imagen; si aceptamos la de Satanás, nos convertimos más en él. </text:span></text:p>
        </text:list-item>
      </text:list>
      <text:p text:style-name="Text_20_body"><text:span text:style-name="Strong_20_Emphasis"><text:span text:style-name="T1">10. ¿Qué evidencia muestra que una persona recibe la levadura de Dios?</text:span></text:span></text:p>
      <text:list text:style-name="L45">
        <text:list-item>
          <text:p text:style-name="P69"><text:span text:style-name="Strong_20_Emphasis"><text:span text:style-name="T1">Respuesta:</text:span></text:span><text:span text:style-name="T1"> </text:span><text:span text:style-name="Strong_20_Emphasis"><text:span text:style-name="T1">El cambio</text:span></text:span><text:span text:style-name="T1">. Abandonar el "viejo hombre" y renovarse en el espíritu de la mente (Efesios 4:21-24). </text:span></text:p>
        </text:list-item>
      </text:list>
      <text:p text:style-name="P2"/>
      <text:h text:style-name="P3" text:outline-level="2">📖 LECCIÓN 6: Copa, Balanza y Vara en Figurativo</text:h>
      <text:h text:style-name="P4" text:outline-level="3">🔄 Parte 1: Copa (Vasija)</text:h>
      <text:p text:style-name="Text_20_body"><text:span text:style-name="Strong_20_Emphasis"><text:span text:style-name="T1">1. ¿Qué representa la copa?</text:span></text:span></text:p>
      <text:list text:style-name="L46">
        <text:list-item>
          <text:p text:style-name="P70"><text:span text:style-name="Strong_20_Emphasis"><text:span text:style-name="T1">Respuesta:</text:span></text:span><text:span text:style-name="T1"> </text:span><text:span text:style-name="Strong_20_Emphasis"><text:span text:style-name="T1">El corazón de la persona</text:span></text:span><text:span text:style-name="T1"> (contenedor pequeño) y también </text:span><text:span text:style-name="Strong_20_Emphasis"><text:span text:style-name="T1">la Iglesia</text:span></text:span><text:span text:style-name="T1"> (contenedor grande que reúne muchas copas). </text:span></text:p>
        </text:list-item>
      </text:list>
      <text:p text:style-name="Text_20_body"><text:span text:style-name="Strong_20_Emphasis"><text:span text:style-name="T1">2. ¿Qué son los dos tipos de copas?</text:span></text:span></text:p>
      <text:list text:style-name="L47">
        <text:list-item>
          <text:p text:style-name="P72"><text:span text:style-name="Strong_20_Emphasis"><text:span text:style-name="T1">Copa de Dios:</text:span></text:span><text:span text:style-name="T1"> Contiene la </text:span><text:span text:style-name="Strong_20_Emphasis"><text:span text:style-name="T1">Verdad</text:span></text:span><text:span text:style-name="T1"> (profecía y cumplimiento). Resultado: Bendición, vida eterna. </text:span></text:p>
        </text:list-item>
        <text:list-item>
          <text:p text:style-name="P71"><text:span text:style-name="Strong_20_Emphasis"><text:span text:style-name="T1">Copa de Satanás:</text:span></text:span><text:span text:style-name="T1"> Contiene </text:span><text:span text:style-name="Strong_20_Emphasis"><text:span text:style-name="T1">Mentiras</text:span></text:span><text:span text:style-name="T1"> (palabra de Dios tergiversada con pensamientos humanos/sedimentos). Resultado: Maldición, juicio. </text:span></text:p>
        </text:list-item>
      </text:list>
      <text:p text:style-name="Text_20_body"><text:span text:style-name="Strong_20_Emphasis"><text:span text:style-name="T1">3. ¿Qué peligro espiritual muestra el ejemplo de Moab?</text:span></text:span></text:p>
      <text:list text:style-name="L48">
        <text:list-item>
          <text:p text:style-name="P73"><text:span text:style-name="Strong_20_Emphasis"><text:span text:style-name="T1">Respuesta:</text:span></text:span><text:span text:style-name="T1"> Pensar que estamos bien mientras conservamos </text:span><text:span text:style-name="Strong_20_Emphasis"><text:span text:style-name="T1">impurezas y pensamientos contrarios a la verdad</text:span></text:span><text:span text:style-name="T1"> (sedimentos) sin darnos cuenta. </text:span></text:p>
        </text:list-item>
      </text:list>
      <text:h text:style-name="P4" text:outline-level="3">🔄 Parte 2: Balanza y Vara</text:h>
      <text:p text:style-name="Text_20_body"><text:span text:style-name="Strong_20_Emphasis"><text:span text:style-name="T1">4. ¿Qué representa la balanza, la vara y la vara de hierro?</text:span></text:span></text:p>
      <text:list text:style-name="L49">
        <text:list-item>
          <text:p text:style-name="P75"><text:span text:style-name="Strong_20_Emphasis"><text:span text:style-name="T1">Balanza:</text:span></text:span><text:span text:style-name="T1"> La </text:span><text:span text:style-name="Strong_20_Emphasis"><text:span text:style-name="T1">Palabra de Dios</text:span></text:span><text:span text:style-name="T1"> (que nos pesa, mide y juzga). </text:span></text:p>
        </text:list-item>
        <text:list-item>
          <text:p text:style-name="P75"><text:span text:style-name="Strong_20_Emphasis"><text:span text:style-name="T1">Vara:</text:span></text:span><text:span text:style-name="T1"> La </text:span><text:span text:style-name="Strong_20_Emphasis"><text:span text:style-name="T1">Palabra de Dios y la persona (pastor) que la porta</text:span></text:span><text:span text:style-name="T1"> (nos guía y apoya). </text:span></text:p>
        </text:list-item>
        <text:list-item>
          <text:p text:style-name="P74"><text:span text:style-name="Strong_20_Emphasis"><text:span text:style-name="T1">Vara de Hierro:</text:span></text:span><text:span text:style-name="T1"> La </text:span><text:span text:style-name="Strong_20_Emphasis"><text:span text:style-name="T1">autoridad para reinar y juzgar</text:span></text:span><text:span text:style-name="T1"> (el cetro del rey). </text:span></text:p>
        </text:list-item>
      </text:list>
      <text:p text:style-name="Text_20_body"><text:span text:style-name="Strong_20_Emphasis"><text:span text:style-name="T1">5. ¿De dónde venía la autoridad que Jesús recibe en la primera venida?</text:span></text:span></text:p>
      <text:list text:style-name="L50">
        <text:list-item>
          <text:p text:style-name="P76"><text:soft-page-break/><text:span text:style-name="Strong_20_Emphasis"><text:span text:style-name="T1">Respuesta:</text:span></text:span><text:span text:style-name="T1"> De </text:span><text:span text:style-name="Strong_20_Emphasis"><text:span text:style-name="T1">las palabras de Dios</text:span></text:span><text:span text:style-name="T1">. El Padre le dio Su autoridad a través de las palabras reveladas (Juan 17:8). </text:span></text:p>
        </text:list-item>
      </text:list>
      <text:p text:style-name="Text_20_body"><text:span text:style-name="Strong_20_Emphasis"><text:span text:style-name="T1">6. ¿Quién recibe la vara de hierro en la primera venida?</text:span></text:span></text:p>
      <text:list text:style-name="L51">
        <text:list-item>
          <text:p text:style-name="P77"><text:span text:style-name="Strong_20_Emphasis"><text:span text:style-name="T1">Respuesta:</text:span></text:span><text:span text:style-name="T1"> </text:span><text:span text:style-name="Strong_20_Emphasis"><text:span text:style-name="T1">Jesucristo (Jesús)</text:span></text:span><text:span text:style-name="T1">. Dios el Padre le dio la autoridad. </text:span></text:p>
        </text:list-item>
      </text:list>
      <text:p text:style-name="Text_20_body"><text:span text:style-name="Strong_20_Emphasis"><text:span text:style-name="T1">7. ¿A quién promete Jesús darle la vara de hierro en la segunda venida?</text:span></text:span></text:p>
      <text:list text:style-name="L52">
        <text:list-item>
          <text:p text:style-name="P78"><text:span text:style-name="Strong_20_Emphasis"><text:span text:style-name="T1">Respuesta:</text:span></text:span><text:span text:style-name="T1"> </text:span><text:span text:style-name="Strong_20_Emphasis"><text:span text:style-name="T1">Al vencedor</text:span></text:span><text:span text:style-name="T1"> (el que venciere y guardare Sus obras hasta el final, Apocalipsis 2:26-27). </text:span></text:p>
        </text:list-item>
      </text:list>
      <text:p text:style-name="P2"/>
      <text:h text:style-name="P3" text:outline-level="2">📖 LECCIÓN 7: Fuego, Incensario y Olla en Figurativo</text:h>
      <text:h text:style-name="P4" text:outline-level="3">🔄 Parte 1: El Fuego</text:h>
      <text:p text:style-name="Text_20_body"><text:span text:style-name="Strong_20_Emphasis"><text:span text:style-name="T1">1. ¿Qué representa el fuego en figurativo?</text:span></text:span></text:p>
      <text:list text:style-name="L53">
        <text:list-item>
          <text:p text:style-name="P79"><text:span text:style-name="Strong_20_Emphasis"><text:span text:style-name="T1">Respuesta:</text:span></text:span><text:span text:style-name="T1"> </text:span><text:span text:style-name="Strong_20_Emphasis"><text:span text:style-name="T1">La Palabra.</text:span></text:span><text:span text:style-name="T1"> (Puede ser la Palabra de Dios o la palabra de Satanás). </text:span></text:p>
        </text:list-item>
      </text:list>
      <text:p text:style-name="Text_20_body"><text:span text:style-name="Strong_20_Emphasis"><text:span text:style-name="T1">2. ¿Qué significa ser bautizado en fuego?</text:span></text:span></text:p>
      <text:list text:style-name="L54">
        <text:list-item>
          <text:p text:style-name="P80"><text:span text:style-name="Strong_20_Emphasis"><text:span text:style-name="T1">Respuesta:</text:span></text:span><text:span text:style-name="T1"> </text:span><text:span text:style-name="Strong_20_Emphasis"><text:span text:style-name="T1">El bautismo de la Palabra de Dios.</text:span></text:span><text:span text:style-name="T1"> Es el proceso de darse cuenta de nuestras malas acciones e impurezas (sedimentos) y desecharlas a través de la Palabra de verdad. </text:span></text:p>
        </text:list-item>
      </text:list>
      <text:p text:style-name="Text_20_body"><text:span text:style-name="Strong_20_Emphasis"><text:span text:style-name="T1">3. ¿Cuáles son los dos tipos de fuego en figurativo y su resultado?</text:span></text:span></text:p>
      <text:list text:style-name="L55">
        <text:list-item>
          <text:p text:style-name="P82"><text:span text:style-name="Strong_20_Emphasis"><text:span text:style-name="T1">a) Fuego de Dios:</text:span></text:span></text:p>
          <text:list>
            <text:list-item>
              <text:p text:style-name="P82"><text:span text:style-name="Emphasis"><text:span text:style-name="T1">Representa:</text:span></text:span><text:span text:style-name="T1"> La Palabra de Dios (Verdad, profecía y cumplimiento). </text:span></text:p>
            </text:list-item>
            <text:list-item>
              <text:p text:style-name="P82"><text:span text:style-name="Emphasis"><text:span text:style-name="T1">Resultado:</text:span></text:span><text:span text:style-name="T1"> </text:span><text:span text:style-name="Strong_20_Emphasis"><text:span text:style-name="T1">Purifica y salva</text:span></text:span><text:span text:style-name="T1"> a los que la aceptan (limpia el pecado). También </text:span><text:span text:style-name="Strong_20_Emphasis"><text:span text:style-name="T1">juzga y destruye</text:span></text:span><text:span text:style-name="T1"> a los malvados que la rechazan. </text:span></text:p>
            </text:list-item>
          </text:list>
        </text:list-item>
        <text:list-item>
          <text:p text:style-name="P82"><text:span text:style-name="Strong_20_Emphasis"><text:span text:style-name="T1">b) Fuego de Satanás:</text:span></text:span></text:p>
          <text:list>
            <text:list-item>
              <text:p text:style-name="P82"><text:span text:style-name="Emphasis"><text:span text:style-name="T1">Representa:</text:span></text:span><text:span text:style-name="T1"> La palabra de Satanás (mentiras, falsedades, "fuego extraño"). </text:span></text:p>
            </text:list-item>
            <text:list-item>
              <text:p text:style-name="P81"><text:span text:style-name="Emphasis"><text:span text:style-name="T1">Resultado:</text:span></text:span><text:span text:style-name="T1"> </text:span><text:span text:style-name="Strong_20_Emphasis"><text:span text:style-name="T1">Mata el espíritu</text:span></text:span><text:span text:style-name="T1"> del creyente que lo recibe sin discernir (como le pasó a Adán y Eva). </text:span></text:p>
            </text:list-item>
          </text:list>
        </text:list-item>
      </text:list>
      <text:h text:style-name="P4" text:outline-level="3">🔄 Parte 2: Incensario y Olla</text:h>
      <text:p text:style-name="Text_20_body"><text:span text:style-name="Strong_20_Emphasis"><text:span text:style-name="T1">4. ¿Qué representa el incienso?</text:span></text:span></text:p>
      <text:list text:style-name="L56">
        <text:list-item>
          <text:p text:style-name="P83"><text:span text:style-name="Strong_20_Emphasis"><text:span text:style-name="T1">Respuesta:</text:span></text:span><text:span text:style-name="T1"> Las </text:span><text:span text:style-name="Strong_20_Emphasis"><text:span text:style-name="T1">oraciones de los santos</text:span></text:span><text:span text:style-name="T1"> (Apocalipsis 5:8). </text:span></text:p>
        </text:list-item>
      </text:list>
      <text:p text:style-name="Text_20_body"><text:soft-page-break/><text:span text:style-name="Strong_20_Emphasis"><text:span text:style-name="T1">5. ¿Qué representa el incensario?</text:span></text:span></text:p>
      <text:list text:style-name="L57">
        <text:list-item>
          <text:p text:style-name="P84"><text:span text:style-name="Strong_20_Emphasis"><text:span text:style-name="T1">Respuesta:</text:span></text:span><text:span text:style-name="T1"> </text:span><text:span text:style-name="Strong_20_Emphasis"><text:span text:style-name="T1">Una persona</text:span></text:span><text:span text:style-name="T1"> (específicamente, el corazón de la persona, que es el recipiente donde se pone el fuego). </text:span></text:p>
        </text:list-item>
      </text:list>
      <text:p text:style-name="Text_20_body"><text:span text:style-name="Strong_20_Emphasis"><text:span text:style-name="T1">6. ¿Qué representa el humo?</text:span></text:span></text:p>
      <text:list text:style-name="L58">
        <text:list-item>
          <text:p text:style-name="P85"><text:span text:style-name="Strong_20_Emphasis"><text:span text:style-name="T1">Respuesta:</text:span></text:span><text:span text:style-name="T1"> Las </text:span><text:span text:style-name="Strong_20_Emphasis"><text:span text:style-name="T1">oraciones que suben</text:span></text:span><text:span text:style-name="T1"> a la presencia de Dios (resultado de tener la palabra de Dios en el corazón). </text:span></text:p>
        </text:list-item>
      </text:list>
      <text:p text:style-name="Text_20_body"><text:span text:style-name="Strong_20_Emphasis"><text:span text:style-name="T1">7. ¿Qué representa la olla?</text:span></text:span></text:p>
      <text:list text:style-name="L59">
        <text:list-item>
          <text:p text:style-name="P86"><text:span text:style-name="Strong_20_Emphasis"><text:span text:style-name="T1">Respuesta:</text:span></text:span><text:span text:style-name="T1"> </text:span><text:span text:style-name="Strong_20_Emphasis"><text:span text:style-name="T1">La Iglesia.</text:span></text:span><text:span text:style-name="T1"> Un contenedor grande que reúne a muchas "carnes" (personas) para ser cocinadas/preparadas por el fuego de la palabra. </text:span></text:p>
        </text:list-item>
      </text:list>
      <text:p text:style-name="Text_20_body"><text:span text:style-name="Strong_20_Emphasis"><text:span text:style-name="T1">8. ¿Quiénes eran la olla de Dios y la olla de Satanás en la primera venida?</text:span></text:span></text:p>
      <text:list text:style-name="L60">
        <text:list-item>
          <text:p text:style-name="P88"><text:span text:style-name="Strong_20_Emphasis"><text:span text:style-name="T1">Olla de Dios:</text:span></text:span><text:span text:style-name="T1"> </text:span><text:span text:style-name="Strong_20_Emphasis"><text:span text:style-name="T1">Jesús y los 12 discípulos.</text:span></text:span><text:span text:style-name="T1"> De ahí salían las </text:span><text:span text:style-name="Strong_20_Emphasis"><text:span text:style-name="T1">palabras de verdad</text:span></text:span><text:span text:style-name="T1"> (profecía y cumplimiento) que daban vida. </text:span></text:p>
        </text:list-item>
        <text:list-item>
          <text:p text:style-name="P87"><text:span text:style-name="Strong_20_Emphasis"><text:span text:style-name="T1">Olla de Satanás:</text:span></text:span><text:span text:style-name="T1"> </text:span><text:span text:style-name="Strong_20_Emphasis"><text:span text:style-name="T1">Los escribas, fariseos y los miembros que se quedaron con ellos.</text:span></text:span><text:span text:style-name="T1"> De ahí salían </text:span><text:span text:style-name="Strong_20_Emphasis"><text:span text:style-name="T1">falsedades, mentiras y mandamientos de hombres</text:span></text:span><text:span text:style-name="T1"> que cocinaban al pueblo de Dios con palabras de muerte. </text:span></text:p>
        </text:list-item>
      </text:list>
      <text:p text:style-name="P2"/>
      <text:h text:style-name="P3" text:outline-level="2">📖 LECCIÓN 8: Luz, Candelero, Ciegos, Sordos y Vestido de Boda (Parte 1)</text:h>
      <text:h text:style-name="P4" text:outline-level="3">🔄 Mini-Quiz y Conceptos Previos</text:h>
      <text:p text:style-name="Text_20_body"><text:span text:style-name="Strong_20_Emphasis"><text:span text:style-name="T1">1. En la parábola de los cuatro campos, ¿pertenecemos a uno solo de ellos para siempre? (V/F)</text:span></text:span></text:p>
      <text:list text:style-name="L61">
        <text:list-item>
          <text:p text:style-name="P89"><text:span text:style-name="Strong_20_Emphasis"><text:span text:style-name="T1">Respuesta:</text:span></text:span><text:span text:style-name="T1"> </text:span><text:span text:style-name="Strong_20_Emphasis"><text:span text:style-name="T1">Falso.</text:span></text:span><text:span text:style-name="T1"> No estamos estancados; en un solo día podemos pasar por los cuatro campos dependiendo de nuestras decisiones, prioridades y de si dejamos que las preocupaciones del mundo nos dominen. </text:span></text:p>
        </text:list-item>
      </text:list>
      <text:p text:style-name="Text_20_body"><text:span text:style-name="Strong_20_Emphasis"><text:span text:style-name="T1">2. ¿El siervo fiel y prudente que da el alimento a su tiempo en Mateo 24 es Jesús? (V/F)</text:span></text:span></text:p>
      <text:list text:style-name="L62">
        <text:list-item>
          <text:p text:style-name="P90"><text:span text:style-name="Strong_20_Emphasis"><text:span text:style-name="T1">Respuesta:</text:span></text:span><text:span text:style-name="T1"> </text:span><text:span text:style-name="Strong_20_Emphasis"><text:span text:style-name="T1">Falso.</text:span></text:span><text:span text:style-name="T1"> Jesús fue el siervo fiel en la Primera Venida, pero en la Segunda Venida, Jesús pasa la antorcha a otra persona (el vencedor/pastor verdadero de estos tiempos). </text:span></text:p>
        </text:list-item>
      </text:list>
      <text:p text:style-name="Text_20_body"><text:soft-page-break/><text:span text:style-name="Strong_20_Emphasis"><text:span text:style-name="T1">3. La hambruna espiritual del Antiguo Testamento ya no se repite en la segunda venida. (V/F)</text:span></text:span></text:p>
      <text:list text:style-name="L63">
        <text:list-item>
          <text:p text:style-name="P91"><text:span text:style-name="Strong_20_Emphasis"><text:span text:style-name="T1">Respuesta:</text:span></text:span><text:span text:style-name="T1"> </text:span><text:span text:style-name="Strong_20_Emphasis"><text:span text:style-name="T1">Falso.</text:span></text:span><text:span text:style-name="T1"> Dios es consistente. Así como hubo hambruna espiritual en la Primera Venida, habrá una en la Segunda Venida (Mateo 24). </text:span></text:p>
        </text:list-item>
      </text:list>
      <text:p text:style-name="Text_20_body"><text:span text:style-name="Strong_20_Emphasis"><text:span text:style-name="T1">4. La parábola de la levadura (Mateo 13:33) enseña que las mujeres deben empoderarse. (V/F)</text:span></text:span></text:p>
      <text:list text:style-name="L64">
        <text:list-item>
          <text:p text:style-name="P92"><text:span text:style-name="Strong_20_Emphasis"><text:span text:style-name="T1">Respuesta:</text:span></text:span><text:span text:style-name="T1"> </text:span><text:span text:style-name="Strong_20_Emphasis"><text:span text:style-name="T1">Falso.</text:span></text:span><text:span text:style-name="T1"> La "mujer" en las parábolas representa a un </text:span><text:span text:style-name="Strong_20_Emphasis"><text:span text:style-name="T1">pastor</text:span></text:span><text:span text:style-name="T1"> (hombre o mujer) que crea hijos espirituales, no a una mujer física tomando iniciativa social. </text:span></text:p>
        </text:list-item>
      </text:list>
      <text:h text:style-name="P4" text:outline-level="3">🔄 Preguntas de Repaso de la Lección</text:h>
      <text:p text:style-name="Text_20_body"><text:span text:style-name="Strong_20_Emphasis"><text:span text:style-name="T1">5. ¿Qué es la luz en figurativo?</text:span></text:span></text:p>
      <text:list text:style-name="L65">
        <text:list-item>
          <text:p text:style-name="P93"><text:span text:style-name="Strong_20_Emphasis"><text:span text:style-name="T1">Respuesta:</text:span></text:span><text:span text:style-name="T1"> Es la </text:span><text:span text:style-name="Strong_20_Emphasis"><text:span text:style-name="T1">Palabra de vida</text:span></text:span><text:span text:style-name="T1">, pero también es la </text:span><text:span text:style-name="Strong_20_Emphasis"><text:span text:style-name="T1">persona que tiene la palabra</text:span></text:span><text:span text:style-name="T1"> (como Jesús y los 12 discípulos). </text:span></text:p>
        </text:list-item>
      </text:list>
      <text:p text:style-name="Text_20_body"><text:span text:style-name="Strong_20_Emphasis"><text:span text:style-name="T1">6. ¿Qué representan las tinieblas o la oscuridad?</text:span></text:span></text:p>
      <text:list text:style-name="L66">
        <text:list-item>
          <text:p text:style-name="P94"><text:span text:style-name="Strong_20_Emphasis"><text:span text:style-name="T1">Respuesta:</text:span></text:span><text:span text:style-name="T1"> La </text:span><text:span text:style-name="Strong_20_Emphasis"><text:span text:style-name="T1">ausencia de la palabra</text:span></text:span><text:span text:style-name="T1"> o la </text:span><text:span text:style-name="Strong_20_Emphasis"><text:span text:style-name="T1">ignorancia</text:span></text:span><text:span text:style-name="T1"> de la palabra revelada. </text:span></text:p>
        </text:list-item>
      </text:list>
      <text:p text:style-name="Text_20_body"><text:span text:style-name="Strong_20_Emphasis"><text:span text:style-name="T1">7. ¿Qué sucede cuando aparece la luz?</text:span></text:span></text:p>
      <text:list text:style-name="L67">
        <text:list-item>
          <text:p text:style-name="P95"><text:span text:style-name="Strong_20_Emphasis"><text:span text:style-name="T1">Respuesta:</text:span></text:span><text:span text:style-name="T1"> Ocurre una </text:span><text:span text:style-name="Strong_20_Emphasis"><text:span text:style-name="T1">separación</text:span></text:span><text:span text:style-name="T1">. La luz se convierte en el </text:span><text:span text:style-name="Strong_20_Emphasis"><text:span text:style-name="T1">estándar</text:span></text:span><text:span text:style-name="T1"> para distinguir la verdad de las suposiciones humanas. </text:span></text:p>
        </text:list-item>
      </text:list>
      <text:p text:style-name="Text_20_body"><text:span text:style-name="Strong_20_Emphasis"><text:span text:style-name="T1">8. ¿Qué significa la "exposición" de la palabra?</text:span></text:span></text:p>
      <text:list text:style-name="L68">
        <text:list-item>
          <text:p text:style-name="P96"><text:span text:style-name="Strong_20_Emphasis"><text:span text:style-name="T1">Respuesta:</text:span></text:span><text:span text:style-name="T1"> Significa que la palabra está </text:span><text:span text:style-name="Strong_20_Emphasis"><text:span text:style-name="T1">abierta y revelada</text:span></text:span><text:span text:style-name="T1"> (profecía y cumplimiento), haciéndose entendible para los simples. </text:span></text:p>
        </text:list-item>
      </text:list>
      <text:p text:style-name="Text_20_body"><text:span text:style-name="Strong_20_Emphasis"><text:span text:style-name="T1">9. ¿Qué separa a los hijos de luz de los hijos de oscuridad?</text:span></text:span></text:p>
      <text:list text:style-name="L69">
        <text:list-item>
          <text:p text:style-name="P97"><text:span text:style-name="Strong_20_Emphasis"><text:span text:style-name="T1">Respuesta:</text:span></text:span><text:span text:style-name="T1"> Tener o no la </text:span><text:span text:style-name="Strong_20_Emphasis"><text:span text:style-name="T1">palabra revelada</text:span></text:span><text:span text:style-name="T1"> (el entendimiento de la profecía y su cumplimiento). Ambos son creyentes, pero unos están en luz y otros en tinieblas. </text:span></text:p>
        </text:list-item>
      </text:list>
      <text:p text:style-name="Text_20_body"><text:span text:style-name="Strong_20_Emphasis"><text:span text:style-name="T1">10. ¿Qué es el candelero y el ojo en figurativo?</text:span></text:span></text:p>
      <text:list text:style-name="L70">
        <text:list-item>
          <text:p text:style-name="P98"><text:span text:style-name="Strong_20_Emphasis"><text:span text:style-name="T1">Respuesta:</text:span></text:span><text:span text:style-name="T1"> Representa al </text:span><text:span text:style-name="Strong_20_Emphasis"><text:span text:style-name="T1">espíritu y al trabajador</text:span></text:span><text:span text:style-name="T1"> (la persona de carne y hueso con quien el espíritu trabaja para dar la palabra). </text:span></text:p>
        </text:list-item>
      </text:list>
      <text:p text:style-name="Text_20_body"><text:span text:style-name="Strong_20_Emphasis"><text:span text:style-name="T1">11. ¿Dónde estaba el candelero en el tabernáculo y qué hacía?</text:span></text:span></text:p>
      <text:list text:style-name="L71">
        <text:list-item>
          <text:p text:style-name="P99"><text:span text:style-name="Strong_20_Emphasis"><text:span text:style-name="T1">Respuesta:</text:span></text:span><text:span text:style-name="T1"> Estaba en el </text:span><text:span text:style-name="Strong_20_Emphasis"><text:span text:style-name="T1">Lugar Santo</text:span></text:span><text:span text:style-name="T1">. Su propósito era alumbrar y </text:span><text:span text:style-name="Strong_20_Emphasis"><text:span text:style-name="T1">guiar el camino hacia el Lugar Santísimo</text:span></text:span><text:span text:style-name="T1"> (donde moraba Dios). </text:span></text:p>
        </text:list-item>
      </text:list>
      <text:p text:style-name="Text_20_body"><text:soft-page-break/><text:span text:style-name="Strong_20_Emphasis"><text:span text:style-name="T1">12. ¿Quién fue el candelero o antorcha en la primera venida?</text:span></text:span></text:p>
      <text:list text:style-name="L72">
        <text:list-item>
          <text:p text:style-name="P100"><text:span text:style-name="Strong_20_Emphasis"><text:span text:style-name="T1">Respuesta:</text:span></text:span><text:span text:style-name="T1"> </text:span><text:span text:style-name="Strong_20_Emphasis"><text:span text:style-name="T1">Juan el Bautista.</text:span></text:span><text:span text:style-name="T1"> Él no era la gran luz, sino la lámpara que guiaba el camino hacia la verdadera luz, que era Jesús. </text:span></text:p>
        </text:list-item>
      </text:list>
      <text:p text:style-name="P5"/>
      <text:h text:style-name="P3" text:outline-level="2"><text:bookmark-start text:name="__DdeLink__5838_3996189195"/>📖 LECCIÓN 8 (PARTE 2): Ciegos, Sordos y Vestido de Boda en Figurativo</text:h>
      <text:h text:style-name="P4" text:outline-level="3">🔄 Preguntas de Repaso y Reflexión Final<text:bookmark-end text:name="__DdeLink__5838_3996189195"/></text:h>
      <text:p text:style-name="Text_20_body"><text:span text:style-name="Strong_20_Emphasis"><text:span text:style-name="T1">1. ¿Qué es el candelero o la lámpara en figurativo?</text:span></text:span></text:p>
      <text:list text:style-name="L73">
        <text:list-item>
          <text:p text:style-name="P101"><text:span text:style-name="Strong_20_Emphasis"><text:span text:style-name="T1">Respuesta:</text:span></text:span><text:span text:style-name="T1"> Representa al </text:span><text:span text:style-name="Strong_20_Emphasis"><text:span text:style-name="T1">espíritu y al trabajador</text:span></text:span><text:span text:style-name="T1"> (la persona a través de la cual el espíritu de Dios trabaja y entrega la palabra). </text:span></text:p>
        </text:list-item>
      </text:list>
      <text:p text:style-name="Text_20_body"><text:span text:style-name="Strong_20_Emphasis"><text:span text:style-name="T1">2. ¿Quién fue el candelero en la primera venida y cuál era su función?</text:span></text:span></text:p>
      <text:list text:style-name="L74">
        <text:list-item>
          <text:p text:style-name="P102"><text:span text:style-name="Strong_20_Emphasis"><text:span text:style-name="T1">Respuesta:</text:span></text:span><text:span text:style-name="T1"> Fue </text:span><text:span text:style-name="Strong_20_Emphasis"><text:span text:style-name="T1">Juan el Bautista</text:span></text:span><text:span text:style-name="T1">. Su función no era ser la gran luz, sino preparar el camino, alumbrar en medio de las tinieblas y </text:span><text:span text:style-name="Strong_20_Emphasis"><text:span text:style-name="T1">guiar a la gente hacia Jesús</text:span></text:span><text:span text:style-name="T1"> (la Luz verdadera). </text:span></text:p>
        </text:list-item>
      </text:list>
      <text:p text:style-name="Text_20_body"><text:span text:style-name="Strong_20_Emphasis"><text:span text:style-name="T1">3. En la segunda venida, ¿por qué es importante la aparición de los candeleros (las lámparas)?</text:span></text:span></text:p>
      <text:list text:style-name="L75">
        <text:list-item>
          <text:p text:style-name="P103"><text:span text:style-name="Strong_20_Emphasis"><text:span text:style-name="T1">Respuesta:</text:span></text:span><text:span text:style-name="T1"> Porque su aparición indica que el mundo religioso está en </text:span><text:span text:style-name="Strong_20_Emphasis"><text:span text:style-name="T1">tinieblas</text:span></text:span><text:span text:style-name="T1"> (ignorancia espiritual). Los candeleros tienen la misión de alumbrar y guiar a los creyentes hacia la luz (la palabra revelada y el cumplimiento de las profecías de Apocalipsis). </text:span></text:p>
        </text:list-item>
      </text:list>
      <text:p text:style-name="Text_20_body"><text:span text:style-name="Strong_20_Emphasis"><text:span text:style-name="T1">4. ¿Qué son los ciegos y sordos espiritualmente?</text:span></text:span></text:p>
      <text:list text:style-name="L76">
        <text:list-item>
          <text:p text:style-name="P104"><text:span text:style-name="Strong_20_Emphasis"><text:span text:style-name="T1">Respuesta:</text:span></text:span><text:span text:style-name="T1"> Son aquellos que tienen ojos y oídos (leen y escuchan la Biblia), </text:span><text:span text:style-name="Strong_20_Emphasis"><text:span text:style-name="T1">pero no la entienden</text:span></text:span><text:span text:style-name="T1">. Carecen de la revelación espiritual porque la palabra está "sellada" para ellos al no conocer el cumplimiento de las profecías de su tiempo. </text:span></text:p>
        </text:list-item>
      </text:list>
      <text:p text:style-name="Text_20_body"><text:span text:style-name="Strong_20_Emphasis"><text:span text:style-name="T1">5. En la frase "ciegos guían a ciegos", ¿quién es el primer ciego y quién es el segundo?</text:span></text:span></text:p>
      <text:list text:style-name="L77">
        <text:list-item>
          <text:p text:style-name="P106"><text:span text:style-name="Strong_20_Emphasis"><text:span text:style-name="T1">Respuesta:</text:span></text:span><text:span text:style-name="T1"> </text:span></text:p>
          <text:list>
            <text:list-item>
              <text:p text:style-name="P106"><text:span text:style-name="Strong_20_Emphasis"><text:span text:style-name="T1">El primer ciego:</text:span></text:span><text:span text:style-name="T1"> Son los líderes o pastores que no entienden la palabra de Dios y enseñan basándose en sus propios pensamientos o tradiciones humanas. </text:span></text:p>
            </text:list-item>
            <text:list-item>
              <text:p text:style-name="P106"><text:soft-page-break/><text:span text:style-name="Strong_20_Emphasis"><text:span text:style-name="T1">El segundo ciego:</text:span></text:span><text:span text:style-name="T1"> Es el miembro de la congregación que los sigue ciegamente sin verificar la verdad en la Biblia. </text:span></text:p>
            </text:list-item>
            <text:list-item>
              <text:p text:style-name="P105"><text:span text:style-name="Emphasis"><text:span text:style-name="T1">Consecuencia:</text:span></text:span><text:span text:style-name="T1"> Ambos caerán en el hoyo (juicio espiritual / condenación). </text:span></text:p>
            </text:list-item>
          </text:list>
        </text:list-item>
      </text:list>
      <text:p text:style-name="Text_20_body"><text:span text:style-name="Strong_20_Emphasis"><text:span text:style-name="T1">6. ¿Qué representa la "ropa" o vestimenta en figurativo?</text:span></text:span></text:p>
      <text:list text:style-name="L78">
        <text:list-item>
          <text:p text:style-name="P107"><text:span text:style-name="Strong_20_Emphasis"><text:span text:style-name="T1">Respuesta:</text:span></text:span><text:span text:style-name="T1"> Representa tres cosas íntimamente ligadas: </text:span><text:span text:style-name="Strong_20_Emphasis"><text:span text:style-name="T1">el corazón, las acciones y las doctrinas</text:span></text:span><text:span text:style-name="T1"> (lo que creemos, enseñamos y retenemos en nuestro interior). </text:span></text:p>
        </text:list-item>
      </text:list>
      <text:p text:style-name="Text_20_body"><text:span text:style-name="Strong_20_Emphasis"><text:span text:style-name="T1">7. ¿Qué significa "lavar las ropas" y qué es el "vestido de boda" o "lino fino"?</text:span></text:span></text:p>
      <text:list text:style-name="L79">
        <text:list-item>
          <text:p text:style-name="P109"><text:span text:style-name="Strong_20_Emphasis"><text:span text:style-name="T1">Respuesta:</text:span></text:span><text:span text:style-name="T1"> </text:span></text:p>
          <text:list>
            <text:list-item>
              <text:p text:style-name="P109"><text:span text:style-name="Strong_20_Emphasis"><text:span text:style-name="T1">Lavar las ropas:</text:span></text:span><text:span text:style-name="T1"> Significa limpiar nuestro corazón y doctrinas de las mentiras, sedimentos y pensamientos humanos mediante la verdad de la Palabra de Dios (la sangre del Cordero). </text:span></text:p>
            </text:list-item>
            <text:list-item>
              <text:p text:style-name="P108"><text:span text:style-name="Strong_20_Emphasis"><text:span text:style-name="T1">El vestido de boda (o lino fino):</text:span></text:span><text:span text:style-name="T1"> Representa las </text:span><text:span text:style-name="Strong_20_Emphasis"><text:span text:style-name="T1">acciones justas ante los ojos de Dios</text:span></text:span><text:span text:style-name="T1">. Solo podemos vestirnos de estas acciones justas si primero entendemos la voluntad de Dios y nos arrepentimos. </text:span></text:p>
            </text:list-item>
          </text:list>
        </text:list-item>
      </text:list>
      <text:p text:style-name="Text_20_body"><text:span text:style-name="Strong_20_Emphasis"><text:span text:style-name="T1">8. ¿Qué representa la "ropa teñida en sangre" (Apocalipsis 19:13)?</text:span></text:span></text:p>
      <text:list text:style-name="L80">
        <text:list-item>
          <text:p text:style-name="P110"><text:bookmark-start text:name="__DdeLink__6164_3622563301"/><text:span text:style-name="Strong_20_Emphasis"><text:span text:style-name="T1">Respuesta:</text:span></text:span><text:span text:style-name="T1"> </text:span><text:bookmark-end text:name="__DdeLink__6164_3622563301"/><text:span text:style-name="T1">Representa la </text:span><text:span text:style-name="Strong_20_Emphasis"><text:span text:style-name="T1">Palabra de Dios</text:span></text:span><text:span text:style-name="T1">. Jesús está vestido de esta ropa porque Él es el Verbo de Dios y está completamente lleno de Su verdad y justicia. </text:span></text:p>
        </text:list-item>
      </text:list>
      <text:p text:style-name="Text_20_body"><text:span text:style-name="T1"/></text:p>
      <text:p text:style-name="P12"><text:span text:style-name="T2">9</text:span><text:span text:style-name="T1">. ¿Qué es lo que realmente no entiende un ciego y sordo espiritual?</text:span></text:p>
      <text:list text:style-name="L81">
        <text:list-item>
          <text:p text:style-name="P111"><text:span text:style-name="Strong_20_Emphasis"><text:span text:style-name="T1">Respuesta:</text:span></text:span><text:span text:style-name="T1"> <text:s/>a) el verdadero significado y cumplimiento de la profecía. </text:span></text:p>
        </text:list-item>
        <text:list-item>
          <text:p text:style-name="P112">Justificación: Un ciego y sordo espiritual tiene ojos y oídos físicos, y puede leer la Biblia o escuchar sermones, pero no puede comprender "la palabra revelada". Es decir, no entiende el verdadero significado de las parábolas ni cómo se están cumpliendo las profecías en su tiempo (la realidad).</text:p>
        </text:list-item>
      </text:list>
      <text:p text:style-name="Text_20_body"><text:span text:style-name="T1"/></text:p>
      <text:p text:style-name="P12"><text:span text:style-name="T2">10</text:span><text:span text:style-name="T1">. ¿Cuál es la ropa que debemos usar para ir al cielo?</text:span></text:p>
      <text:list text:style-name="L82">
        <text:list-item>
          <text:p text:style-name="P123"><text:span text:style-name="T3">Respuesta</text:span><text:span text:style-name="T1">: Debemos usar el vestido de boda o lino fino.</text:span></text:p>
        </text:list-item>
        <text:list-item>
          <text:p text:style-name="P124"><text:span text:style-name="T1">Significado: En figurativo, la ropa representa nuestro corazón, nuestras acciones y nuestras doctrinas. El "lino fino" representa las acciones justas ante los ojos de Dios. Para obtener esta vestimenta, debemos lavar nuestras ropas espirituales con la "sangre del Cordero" (la palabra de verdad), desechando las doctrinas falsas y los </text:span><text:soft-page-break/><text:span text:style-name="T1">pensamientos humanos (sedimentos) para vestirnos con la voluntad y la verdad de Dios.</text:span></text:p>
        </text:list-item>
      </text:list>
      <text:p text:style-name="P13"><text:span text:style-name="T1"/></text:p>
      <text:h text:style-name="P6" text:outline-level="3">📖 LECCIÓN 9 (PARTE 1): Tesoro y Hombre Rico en Figurativo</text:h>
      <text:h text:style-name="P6" text:outline-level="3"><text:s/><text:span text:style-name="T14">🔄 Preguntas de Repaso</text:span></text:h>
      <text:list xml:id="list1238937276" text:style-name="L83">
        <text:list-item>
          <text:p text:style-name="P113">¿Cuál es el significado figurativo de tesoro? </text:p>
        </text:list-item>
      </text:list>
      <text:list text:style-name="L84">
        <text:list-item>
          <text:list>
            <text:list-item>
              <text:p text:style-name="P125"><text:span text:style-name="T3">Respuesta</text:span><text:span text:style-name="T1">: Son las palabras de Dios (la verdad) y también las personas que tienen esa palabra en su corazón. </text:span></text:p>
            </text:list-item>
          </text:list>
        </text:list-item>
      </text:list>
      <text:list xml:id="list103624996566733" text:continue-list="list1238937276" text:style-name="L83">
        <text:list-item>
          <text:p text:style-name="P115"><text:span text:style-name="T13">Hay 2 tipos de tesoro, el de Dios y el de Satanás. ¿Qué representa cada uno?</text:span> </text:p>
        </text:list-item>
      </text:list>
      <text:list xml:id="list2492986100" text:style-name="L85">
        <text:list-item>
          <text:list>
            <text:list-item>
              <text:p text:style-name="P116"><text:span text:style-name="T13">Tesoro de Dios</text:span>: La palabra de verdad y las personas (pastores verdaderos) que la tienen y la comparten. </text:p>
            </text:list-item>
            <text:list-item>
              <text:p text:style-name="P116"><text:span text:style-name="T13">Tesoro de Satanás</text:span>: Las mentiras (falsedades que mezclan la palabra de Dios con pensamientos humanos) y los pastores falsos que las enseñan. </text:p>
            </text:list-item>
          </text:list>
        </text:list-item>
      </text:list>
      <text:list xml:id="list103624462659663" text:continue-list="list103624996566733" text:style-name="L83">
        <text:list-item>
          <text:p text:style-name="P113">¿De qué está formada la Ciudad Santa Nueva Jerusalén, que es como oro, perlas y cristal? </text:p>
        </text:list-item>
      </text:list>
      <text:list xml:id="list103626144373705" text:continue-list="list2492986100" text:style-name="L85">
        <text:list-item>
          <text:list>
            <text:list-item>
              <text:p text:style-name="P116"><text:span text:style-name="T13">Respuesta</text:span>: No es una ciudad física. Es una organización celestial formada por la palabra de la verdad y la gente (los hijos de Dios) que tiene y entiende esa palabra de verdad. Las perlas representan a las personas preciosas ante los ojos de Dios. </text:p>
              <text:p text:style-name="P116"/>
            </text:list-item>
          </text:list>
        </text:list-item>
      </text:list>
      <text:p text:style-name="P14"><text:span text:style-name="T5">📖 LECCIÓN 9 (PARTE 2): Tesoro y Hombre Rico en Figurativo</text:span> </text:p>
      <text:p text:style-name="P9">🔄 Preguntas de Repaso y Reflexión Final </text:p>
      <text:list xml:id="list103624480701452" text:continue-list="list103624462659663" text:style-name="L83">
        <text:list-item>
          <text:p text:style-name="P113">¿Qué es un hombre rico en sentido figurado? </text:p>
        </text:list-item>
      </text:list>
      <text:list xml:id="list103624387827748" text:continue-list="list103626144373705" text:style-name="L85">
        <text:list-item>
          <text:list>
            <text:list-item>
              <text:p text:style-name="P116"><text:span text:style-name="T13">Respuesta</text:span>: Una persona que tiene abundancia de palabras (tesoros) almacenadas en su corazón.</text:p>
            </text:list-item>
          </text:list>
        </text:list-item>
      </text:list>
      <text:list xml:id="list103624145217364" text:continue-list="list103624480701452" text:style-name="L83">
        <text:list-item>
          <text:p text:style-name="P113"><text:soft-page-break/>¿Cuáles son los dos tipos de ricos?</text:p>
        </text:list-item>
      </text:list>
      <text:list xml:id="list103625425275990" text:continue-list="list103624387827748" text:style-name="L85">
        <text:list-item>
          <text:list>
            <text:list-item>
              <text:p text:style-name="P116"><text:span text:style-name="T13">Respuesta</text:span>: Los que tienen la palabra de Dios (la verdad, profecía y cumplimiento) y los que tienen las mentiras de Satanás (palabras mezcladas con pensamientos humanos). </text:p>
            </text:list-item>
          </text:list>
        </text:list-item>
      </text:list>
      <text:list xml:id="list103625175601834" text:continue-list="list103624145217364" text:style-name="L83">
        <text:list-item>
          <text:p text:style-name="P113">¿Qué dice Apocalipsis 3:18 que debemos comprar?</text:p>
        </text:list-item>
      </text:list>
      <text:list xml:id="list103625317883821" text:continue-list="list103625425275990" text:style-name="L85">
        <text:list-item>
          <text:list>
            <text:list-item>
              <text:p text:style-name="P116"><text:span text:style-name="T13">Respuesta</text:span>: Oro refinado en fuego de Jesús, que representa la verdadera palabra. </text:p>
            </text:list-item>
          </text:list>
        </text:list-item>
      </text:list>
      <text:list xml:id="list103625248763081" text:continue-list="list103625175601834" text:style-name="L83">
        <text:list-item>
          <text:p text:style-name="P113">¿Qué hizo el mercader cuando encontró la perla preciosa?</text:p>
        </text:list-item>
      </text:list>
      <text:list xml:id="list103624773144163" text:continue-list="list103625317883821" text:style-name="L85">
        <text:list-item>
          <text:list>
            <text:list-item>
              <text:p text:style-name="P116"><text:span text:style-name="T13">Respuesta</text:span>: Vendió todo lo que tenía (desechó todo lo que creía que era verdad) para comprarla (aceptar la palabra de verdad). </text:p>
            </text:list-item>
          </text:list>
        </text:list-item>
      </text:list>
      <text:list text:continue-list="list103625248763081" text:style-name="L83">
        <text:list-item>
          <text:p text:style-name="P113">¿Por qué es importante no ser orgullosos como el mensajero de Laodicea?</text:p>
        </text:list-item>
      </text:list>
      <text:list xml:id="list103624401689314" text:continue-list="list103624773144163" text:style-name="L85">
        <text:list-item>
          <text:list>
            <text:list-item>
              <text:p text:style-name="P116"><text:span text:style-name="T13">Respuesta</text:span>: Porque podemos creer que tenemos la palabra, pero en realidad tener otros pensamientos mezclados. Siempre debemos escuchar las palabras y compararlas con la Biblia.</text:p>
            </text:list-item>
          </text:list>
        </text:list-item>
      </text:list>
      <text:p text:style-name="Text_20_body"/>
      <text:p text:style-name="P7"><text:bookmark-start text:name="__DdeLink__4345_4283106415"/>📖 LECCIÓN 10: Agua, Fuente y Río en Figurativo </text:p>
      <text:p text:style-name="P10"><text:bookmark-start text:name="__DdeLink__4018_1040349186"/>🔄 Preguntas de Repaso<text:bookmark-end text:name="__DdeLink__4018_1040349186"/> y Reflexión Final</text:p>
      <text:list xml:id="list1808711466" text:style-name="L86">
        <text:list-item>
          <text:p text:style-name="P114">¿Qué representa el agua en sentido figurativo? </text:p>
        </text:list-item>
      </text:list>
      <text:list xml:id="list103624598686148" text:continue-list="list103624401689314" text:style-name="L85">
        <text:list-item>
          <text:list>
            <text:list-item>
              <text:p text:style-name="P116"><text:span text:style-name="T13">Respuesta</text:span>: La palabra de verdad de Dios. <text:bookmark-end text:name="__DdeLink__4345_4283106415"/></text:p>
            </text:list-item>
          </text:list>
        </text:list-item>
      </text:list>
      <text:list xml:id="list103625778032565" text:continue-list="list1808711466" text:style-name="L86">
        <text:list-item>
          <text:p text:style-name="P114">¿Por qué Dios compara su palabra con el agua? </text:p>
        </text:list-item>
      </text:list>
      <text:list text:continue-list="list103624598686148" text:style-name="L85">
        <text:list-item>
          <text:list>
            <text:list-item>
              <text:p text:style-name="P116"><text:span text:style-name="T13">Respuesta</text:span>: Porque el agua da vida, limpia y es indispensable para vivir. De la misma manera, la palabra de Dios da vida a nuestra alma, limpia nuestro corazón y nos guía hacia la salvación. </text:p>
            </text:list-item>
          </text:list>
        </text:list-item>
      </text:list>
      <text:list xml:id="list103626049755530" text:continue-list="list103625778032565" text:style-name="L86">
        <text:list-item>
          <text:p text:style-name="P114"><text:bookmark-start text:name="__DdeLink__4336_4283106415"/>¿Existe solo un tipo de agua espiritual? </text:p>
        </text:list-item>
      </text:list>
      <text:list text:style-name="L87">
        <text:list-item>
          <text:list>
            <text:list-item>
              <text:p text:style-name="P117"><text:span text:style-name="T13">Respuesta</text:span>: No, existe el agua de Dios y el agua de Satanás. </text:p>
            </text:list-item>
          </text:list>
        </text:list-item>
      </text:list>
      <text:list xml:id="list103624998136617" text:continue-list="list103626049755530" text:style-name="L86">
        <text:list-item>
          <text:p text:style-name="P114">¿Qué significa esta agua de Satanás? </text:p>
        </text:list-item>
      </text:list>
      <text:list text:style-name="L88">
        <text:list-item>
          <text:list>
            <text:list-item>
              <text:p text:style-name="P127"><text:span text:style-name="T3">Respuesta</text:span><text:span text:style-name="T1">: Representa la falsedad, las falsas enseñanzas, las enseñanzas mezcladas con los pensamientos del hombre. </text:span><text:bookmark-end text:name="__DdeLink__4336_4283106415"/></text:p>
            </text:list-item>
          </text:list>
        </text:list-item>
      </text:list>
      <text:list xml:id="list103624404098679" text:continue-list="list103624998136617" text:style-name="L86">
        <text:list-item>
          <text:p text:style-name="P114">¿Qué es una fuente o un manantial en figurativo? </text:p>
        </text:list-item>
      </text:list>
      <text:list text:style-name="L89">
        <text:list-item>
          <text:list>
            <text:list-item>
              <text:p text:style-name="P128"><text:soft-page-break/><text:span text:style-name="T3">Respuesta</text:span><text:span text:style-name="T1">: Es el pastor y el templo (la iglesia), porque de ahí sale la palabra. </text:span></text:p>
            </text:list-item>
          </text:list>
        </text:list-item>
      </text:list>
      <text:list xml:id="list103624757377911" text:continue-list="list103624404098679" text:style-name="L86">
        <text:list-item>
          <text:p text:style-name="P114">¿Qué son los ríos? </text:p>
        </text:list-item>
      </text:list>
      <text:list text:style-name="L90">
        <text:list-item>
          <text:list>
            <text:list-item>
              <text:p text:style-name="P129"><text:span text:style-name="T3">Respuesta</text:span><text:span text:style-name="T1">: Son los discípulos y los evangelistas, porque llevan la palabra a otras personas. </text:span></text:p>
            </text:list-item>
          </text:list>
        </text:list-item>
      </text:list>
      <text:p text:style-name="P15"><text:span text:style-name="T1"/></text:p>
      <text:p text:style-name="P8"><text:bookmark-start text:name="__DdeLink__4340_4283106415"/>📖 LECCIÓN 11 <text:bookmark-start text:name="__DdeLink__4334_4283106415"/>(PARTE 1)<text:bookmark-end text:name="__DdeLink__4334_4283106415"/>: Mar, Pescador, Red, Pez y Barco en Lenguaje Figurativo.</text:p>
      <text:p text:style-name="P11"><text:bookmark-start text:name="__DdeLink__4020_1040349186"/>🔄 Preguntas de Repaso:<text:bookmark-end text:name="__DdeLink__4020_1040349186"/><text:bookmark-end text:name="__DdeLink__4340_4283106415"/></text:p>
      <text:p text:style-name="P15"><text:span text:style-name="Strong_20_Emphasis"><text:span text:style-name="T1">Preguntas de Reflexión y Respuestas:</text:span></text:span></text:p>
      <text:list xml:id="list4215151395" text:style-name="L91">
        <text:list-item>
          <text:p text:style-name="P130"><text:span text:style-name="Strong_20_Emphasis"><text:span text:style-name="T1">¿Qué representa el agua en sentido figurativo?</text:span></text:span></text:p>
          <text:list>
            <text:list-item>
              <text:p text:style-name="P130"><text:span text:style-name="Emphasis"><text:span text:style-name="T1">Respuesta:</text:span></text:span><text:span text:style-name="T1"> La </text:span><text:span text:style-name="Strong_20_Emphasis"><text:span text:style-name="T1">palabra de verdad de Dios</text:span></text:span><text:span text:style-name="T1">. </text:span></text:p>
            </text:list-item>
            <text:list-item>
              <text:p text:style-name="P130"><text:span text:style-name="Emphasis"><text:span text:style-name="T1">Justificación:</text:span></text:span><text:span text:style-name="T1"> Así como el agua física da vida, limpia y es indispensable para vivir, la palabra de Dios da vida a nuestra alma, limpia nuestro corazón y nos guía hacia la salvación. </text:span></text:p>
            </text:list-item>
          </text:list>
        </text:list-item>
        <text:list-item>
          <text:p text:style-name="P130"><text:span text:style-name="Strong_20_Emphasis"><text:span text:style-name="T1">¿Existe solo un tipo de agua espiritual?</text:span></text:span></text:p>
          <text:list>
            <text:list-item>
              <text:p text:style-name="P130"><text:span text:style-name="Emphasis"><text:span text:style-name="T1">Respuesta:</text:span></text:span><text:span text:style-name="T1"> No. Existe el </text:span><text:span text:style-name="Strong_20_Emphasis"><text:span text:style-name="T1">agua de Dios</text:span></text:span><text:span text:style-name="T1"> (verdad) y el </text:span><text:span text:style-name="Strong_20_Emphasis"><text:span text:style-name="T1">agua de Satanás</text:span></text:span><text:span text:style-name="T1"> (falsedad, enseñanzas mezcladas con pensamientos humanos). El agua contaminada enferma el espíritu. </text:span></text:p>
            </text:list-item>
          </text:list>
        </text:list-item>
        <text:list-item>
          <text:p text:style-name="P130"><text:span text:style-name="Strong_20_Emphasis"><text:span text:style-name="T1">¿Qué es una fuente o manantial en figurativo?</text:span></text:span></text:p>
          <text:list>
            <text:list-item>
              <text:p text:style-name="P130"><text:span text:style-name="Emphasis"><text:span text:style-name="T1">Respuesta:</text:span></text:span><text:span text:style-name="T1"> El </text:span><text:span text:style-name="Strong_20_Emphasis"><text:span text:style-name="T1">pastor y el templo (la iglesia)</text:span></text:span><text:span text:style-name="T1">. De la misma manera que el agua nace y brota de una fuente física, la palabra de Dios brota y es dada por el pastor o desde el templo donde él ministra. </text:span></text:p>
            </text:list-item>
          </text:list>
        </text:list-item>
        <text:list-item>
          <text:p text:style-name="P130"><text:span text:style-name="Strong_20_Emphasis"><text:span text:style-name="T1">¿Qué son los ríos en sentido figurativo?</text:span></text:span></text:p>
          <text:list>
            <text:list-item>
              <text:p text:style-name="P130"><text:span text:style-name="Emphasis"><text:span text:style-name="T1">Respuesta:</text:span></text:span><text:span text:style-name="T1"> Los </text:span><text:span text:style-name="Strong_20_Emphasis"><text:span text:style-name="T1">discípulos y evangelistas</text:span></text:span><text:span text:style-name="T1">. Así como un río transmite y guía el agua desde la fuente hacia el mar, los discípulos y evangelistas transmiten y guían la palabra de Dios hacia la gente. </text:span></text:p>
            </text:list-item>
          </text:list>
        </text:list-item>
      </text:list>
      <text:list text:continue-list="list103624757377911" text:style-name="L86">
        <text:list-item>
          <text:p text:style-name="P126"><text:span text:style-name="Strong_20_Emphasis"><text:span text:style-name="T3">¿Cuál es el significado en figurativo de mar?</text:span></text:span></text:p>
        </text:list-item>
      </text:list>
      <text:list text:style-name="L92">
        <text:list-item>
          <text:list>
            <text:list-item>
              <text:list>
                <text:list-item>
                  <text:p text:style-name="P132"><text:soft-page-break/><text:span text:style-name="Strong_20_Emphasis"><text:span text:style-name="T11">Respuesta</text:span></text:span><text:span text:style-name="Strong_20_Emphasis"><text:span text:style-name="T9">: Mar r</text:span></text:span><text:span text:style-name="Strong_20_Emphasis"><text:span text:style-name="T8">epresenta el mundo (específicamente el mundo religioso o el mundo de los creyentes). Es un lugar donde hay muchas "aguas" mezcladas, lo que simboliza la mezcla de diferentes doctrinas, palabras humanas, falsedades y enseñanzas de Satanás mezcladas con un poco de la palabra de Dios. Es un estado de confusión espiritual que le pertenece a Satanás. </text:span></text:span></text:p>
                </text:list-item>
              </text:list>
            </text:list-item>
          </text:list>
        </text:list-item>
      </text:list>
      <text:list xml:id="list103625440620821" text:continue-list="list4215151395" text:style-name="L91">
        <text:list-item>
          <text:p text:style-name="P131"><text:span text:style-name="Strong_20_Emphasis"><text:span text:style-name="T1">¿Qué salió del mar, acorde a Apocalipsis 13?</text:span></text:span></text:p>
          <text:list>
            <text:list-item>
              <text:p text:style-name="P131"><text:span text:style-name="Strong_20_Emphasis"><text:span text:style-name="T11">Respuesta</text:span></text:span><text:span text:style-name="Strong_20_Emphasis"><text:span text:style-name="T10">: </text:span></text:span><text:span text:style-name="Strong_20_Emphasis"><text:span text:style-name="T9">Q</text:span></text:span><text:span text:style-name="Strong_20_Emphasis"><text:span text:style-name="T8">ue? Una bestia que tenía siete cabezas y 10 cuernos (y sobre sus cabezas un nombre blasfemo). Espiritualmente, esto representa entidades, poderes o sistemas que surgen del mundo gobernado por Satanás para oponerse a Dios y engañar a las naciones. </text:span></text:span></text:p>
            </text:list-item>
          </text:list>
        </text:list-item>
        <text:list-item>
          <text:p text:style-name="P131"><text:span text:style-name="Strong_20_Emphasis"><text:span text:style-name="T1">¿A quién le pertenece este mundo en el que vivimos actualmente?</text:span></text:span></text:p>
          <text:list>
            <text:list-item>
              <text:p text:style-name="P131"><text:span text:style-name="Strong_20_Emphasis"><text:span text:style-name="T11">Respuesta</text:span></text:span><text:span text:style-name="Strong_20_Emphasis"><text:span text:style-name="T10">: </text:span></text:span><text:span text:style-name="Strong_20_Emphasis"><text:span text:style-name="T8">A quien: Le pertenece a Satanás. La Biblia enseña que, aunque Dios es el creador, el mundo actual (representado por el mar o Babilonia) está bajo el dominio y la autoridad del diablo, quien engaña a las naciones con sus "aguas" (falsedades y doctrinas humanas). </text:span></text:span></text:p>
            </text:list-item>
          </text:list>
        </text:list-item>
      </text:list>
      <text:p text:style-name="P137"><text:span text:style-name="Strong_20_Emphasis"><text:span text:style-name="T8"/></text:span></text:p>
      <text:p text:style-name="P118">📖 LECCIÓN 11 <text:bookmark-start text:name="__DdeLink__4334_4283106415 Copia 1"/>(PARTE <text:span text:style-name="T23">2</text:span>)<text:bookmark-end text:name="__DdeLink__4334_4283106415 Copia 1"/>: Mar, Pescador, Red, Pez y Barco en Lenguaje Figurativo.</text:p>
      <text:p text:style-name="P120"><text:bookmark-start text:name="__DdeLink__4020_1040349186 Copia 1"/><text:span text:style-name="Strong_20_Emphasis"><text:span text:style-name="T15">🔄 Preguntas de Repaso:</text:span></text:span><text:bookmark-end text:name="__DdeLink__4020_1040349186 Copia 1"/></text:p>
      <text:list text:style-name="L96">
        <text:list-item>
          <text:p text:style-name="P141"><text:span text:style-name="T22">Escriba el significado en figurativo de los siguientes.</text:span></text:p>
        </text:list-item>
      </text:list>
      <text:list text:style-name="L94">
        <text:list-item>
          <text:list>
            <text:list-item>
              <text:p text:style-name="P16"><text:span text:style-name="T13">Pescador: Representa al pastor o evangelista que tiene la misión de guiar y capturar (atraer) a las personas hacia la palabra de Dios.</text:span></text:p>
            </text:list-item>
            <text:list-item>
              <text:p text:style-name="P16"><text:span text:style-name="T12">Red:</text:span> Representa la <text:span text:style-name="T12">palabra de Dios</text:span> (específicamente la palabra revelada, profecía y cumplimiento), que es la herramienta que se utiliza para atraer y reunir a las personas.</text:p>
            </text:list-item>
            <text:list-item>
              <text:p text:style-name="P16"><text:span text:style-name="T12">Pez:</text:span> Representa a las <text:span text:style-name="T12">personas</text:span> (santos o creyentes) que se encuentran en el mundo (el mar) y que necesitan ser guiadas hacia la palabra de vida.</text:p>
            </text:list-item>
            <text:list-item>
              <text:p text:style-name="P16"><text:span text:style-name="T12">Nave / Barca:</text:span> Representa a la <text:span text:style-name="T12">Iglesia u organización</text:span> de Dios, que es el lugar de refugio y reunión donde se predica la palabra verdadera (como el arca de Noé).</text:p>
            </text:list-item>
            <text:list-item>
              <text:p text:style-name="P16"><text:span text:style-name="T12">Piloto / Capitán:</text:span> Representa a los <text:span text:style-name="T12">pastores o líderes principales</text:span> de la organización, quienes dirigen el rumbo de la iglesia.</text:p>
            </text:list-item>
            <text:list-item>
              <text:p text:style-name="P16"><text:soft-page-break/><text:span text:style-name="T12">Marinero:</text:span> Representa a los <text:span text:style-name="T12">funcionarios, colaboradores o líderes</text:span> que tienen misiones, trabajos y responsabilidades específicas dentro de esa iglesia u organización para ayudar en la obra.</text:p>
            </text:list-item>
            <text:list-item>
              <text:p text:style-name="P16"><text:span text:style-name="T12">Pasajero:</text:span> Representa a los <text:span text:style-name="T12">miembros o santos de la iglesia</text:span> que se suben a la barca para recibir la palabra y ser guiados hacia la salvación.</text:p>
              <text:p text:style-name="P119"/>
            </text:list-item>
          </text:list>
        </text:list-item>
      </text:list>
      <text:list text:style-name="L97">
        <text:list-item>
          <text:p text:style-name="P142"><text:span text:style-name="T3">¿</text:span><text:span text:style-name="Strong_20_Emphasis"><text:span text:style-name="T3">De acuerdo a Mateo 13:47-50, ante los ojos de Dios, ¿qué hace a un buen pez?</text:span></text:span><text:span text:style-name="T3"> </text:span></text:p>
        </text:list-item>
      </text:list>
      <text:list xml:id="list1331475247" text:style-name="L95">
        <text:list-item>
          <text:list>
            <text:list-item>
              <text:p text:style-name="P138"><text:span text:style-name="Strong_20_Emphasis"><text:span text:style-name="T1">Respuesta correcta:</text:span></text:span><text:span text:style-name="Strong_20_Emphasis"><text:span text:style-name="T8"> </text:span></text:span><text:span text:style-name="Strong_20_Emphasis"><text:span text:style-name="T1">a) seguir y permanecer en la palabra</text:span></text:span><text:span text:style-name="Strong_20_Emphasis"><text:span text:style-name="T8"> </text:span></text:span></text:p>
            </text:list-item>
            <text:list-item>
              <text:p text:style-name="P139"><text:span text:style-name="Emphasis"><text:span text:style-name="T3">Justificación del texto:</text:span></text:span><text:span text:style-name="T3"> </text:span><text:span text:style-name="T1">La lección explica que los "peces buenos" son aquellos que son justos delante de los ojos de Dios porque se dejan guiar por la palabra, se esfuerzan por renacer completamente, adquieren las cualidades necesarias y </text:span><text:span text:style-name="Strong_20_Emphasis"><text:span text:style-name="T1">permanecen</text:span></text:span><text:span text:style-name="T1"> en ella, siendo recogidos en las "cestas" (el templo/organización de Dios). Por el contrario, los "peces malos" son aquellos que, a pesar de haber estado en la red, no permiten que la palabra los transforme y finalmente son echados de vuelta al mar (el mundo de confusión).</text:span></text:p>
            </text:list-item>
          </text:list>
        </text:list-item>
      </text:list>
      <text:p text:style-name="P137"><text:span text:style-name="Strong_20_Emphasis"><text:span text:style-name="T8"/></text:span></text:p>
      <text:p text:style-name="P137"><text:span text:style-name="Strong_20_Emphasis"><text:span text:style-name="T8"/></text:span></text:p>
      <text:p text:style-name="P143"><text:span text:style-name="T6">📖 LECCIÓN 1</text:span><text:span text:style-name="T7">2</text:span><text:span text:style-name="T6">: </text:span><text:span text:style-name="Strong_20_Emphasis"><text:span text:style-name="T6">Bestia, cabeza, cuerno y cola en figurativo</text:span></text:span><text:span text:style-name="T6"> </text:span></text:p>
      <text:p text:style-name="P121"><text:bookmark-start text:name="__DdeLink__4018_1040349186 Copia 1"/>🔄 Preguntas de Repaso<text:bookmark-end text:name="__DdeLink__4018_1040349186 Copia 1"/> y Reflexión Final</text:p>
      <text:list xml:id="list354176609" text:style-name="L102">
        <text:list-item>
          <text:p text:style-name="P144"><text:span text:style-name="T3">¿</text:span><text:span text:style-name="Strong_20_Emphasis"><text:span text:style-name="T1">Cuáles son los tipos de bestias en profecías vistas en clase?</text:span></text:span><text:span text:style-name="T3"> </text:span></text:p>
        </text:list-item>
      </text:list>
      <text:list text:continue-list="list1331475247" text:style-name="L95">
        <text:list-item>
          <text:list>
            <text:list-item>
              <text:p text:style-name="P140"><text:span text:style-name="Strong_20_Emphasis"><text:span text:style-name="Emphasis"><text:span text:style-name="T8">(Nota: La lección menciona principalmente dos tipos de bestias con connotación negativa en las profecías, y un tercer grupo de animales que representan la salvación).</text:span></text:span></text:span></text:p>
            </text:list-item>
            <text:list-item>
              <text:p text:style-name="P140"><text:span text:style-name="Strong_20_Emphasis"><text:span text:style-name="T1">Bestias que representan a los apóstatas o traidores:</text:span></text:span><text:span text:style-name="T1"> Son personas que pertenecían al pueblo de Dios pero que abandonaron la palabra y traicionaron a Dios (ejemplos bíblicos: perros, cerdos y ovejas perdidas). </text:span></text:p>
            </text:list-item>
            <text:list-item>
              <text:p text:style-name="P140"><text:bookmark-start text:name="__DdeLink__4350_4283106415"/><text:span text:style-name="Strong_20_Emphasis"><text:span text:style-name="T1">Bestias que representan a los destructores:</text:span></text:span><text:span text:style-name="T1"> Son entidades que nunca pertenecieron a Dios y su objetivo es devorar y destruir al pueblo de Dios (ejemp</text:span><text:bookmark-end text:name="__DdeLink__4350_4283106415"/><text:span text:style-name="T1">los bíblicos: lobos, serpientes e insectos como langostas u orugas). </text:span><text:soft-page-break/><text:span text:style-name="Emphasis"><text:span text:style-name="T1">(Adicionalmente, la lección menciona </text:span></text:span><text:span text:style-name="Emphasis"><text:span text:style-name="Strong_20_Emphasis"><text:span text:style-name="T1">animales que representan la salvación</text:span></text:span></text:span><text:span text:style-name="Emphasis"><text:span text:style-name="T1"> y pertenecen a Dios, como el cordero, las ovejas, el buey y el caballo blanco).</text:span></text:span><text:span text:style-name="T1"> </text:span></text:p>
            </text:list-item>
          </text:list>
        </text:list-item>
      </text:list>
      <text:list xml:id="list103625285287643" text:continue-list="list354176609" text:style-name="L102">
        <text:list-item>
          <text:p text:style-name="P145"><text:span text:style-name="Strong_20_Emphasis"><text:span text:style-name="T1">Acorde a 2 Tesalonicenses 2:1-3, cuando Dios cumple su profecía, ¿en qué orden lo cumple?</text:span></text:span></text:p>
        </text:list-item>
      </text:list>
      <text:list text:style-name="L109">
        <text:list-item>
          <text:list>
            <text:list-item>
              <text:p text:style-name="P147"><text:span text:style-name="Strong_20_Emphasis"><text:span text:style-name="T1">Respuesta correcta: b) traición - destrucción – salvación</text:span></text:span></text:p>
            </text:list-item>
            <text:list-item>
              <text:p text:style-name="P147"><text:span text:style-name="Emphasis"><text:span text:style-name="T1">Justificación del texto:</text:span></text:span><text:span text:style-name="T1"> El instructor explica claramente que, según 2 Tesalonicenses, antes de la venida del Señor debe ocurrir primero un evento de apostasía (traición), luego se manifestará el hombre de pecado (evento de destrucción), y finalmente vendrá la reunión con Él (evento de salvación). Este es el orden profético que se debe cumplir.</text:span></text:p>
            </text:list-item>
          </text:list>
        </text:list-item>
      </text:list>
      <text:list text:continue-list="list103625285287643" text:style-name="L102">
        <text:list-header>
          <text:p text:style-name="P146"><text:span text:style-name="T3"/></text:p>
        </text:list-header>
      </text:list>
      <text:p text:style-name="P143"><text:span text:style-name="T3"/></text:p>
      <text:p text:style-name="P143"><text:span text:style-name="T3"/></text:p>
      <text:p text:style-name="P143"><text:span text:style-name="Strong_20_Emphasis"><text:span text:style-name="T8"/></text:span></text:p>
      <text:p text:style-name="P137"><text:span text:style-name="Strong_20_Emphasis"><text:span text:style-name="T8"/></text:span></text:p>
      <text:list text:continue-list="list103625440620821" text:style-name="L91">
        <text:list-header>
          <text:p text:style-name="P133"/>
        </text:list-header>
      </text:list>
      <text:p text:style-name="P2"/>
      <text:h text:style-name="P3" text:outline-level="2">🎯 PREGUNTAS TRANSVERSALES DE REFLEXIÓN PERSONAL</text:h>
      <text:p text:style-name="P5">Estas preguntas aparecen a lo largo de todas las lecciones y son fundamentales para el autoexamen espiritual:</text:p>
      <text:list text:style-name="L93">
        <text:list-item>
          <text:p text:style-name="P135"><text:span text:style-name="Strong_20_Emphasis"><text:span text:style-name="T1">¿Qué estoy permitiendo que llene mi corazón?</text:span></text:span><text:span text:style-name="T1"> (¿Verdad de Dios o sedimentos de Moab/pensamientos humanos?) </text:span></text:p>
        </text:list-item>
        <text:list-item>
          <text:p text:style-name="P135"><text:span text:style-name="Strong_20_Emphasis"><text:span text:style-name="T1">¿De dónde estoy recibiendo mi alimento espiritual? </text:span></text:span><text:span text:style-name="T1">(¿De Dios o de Satanás?) </text:span></text:p>
        </text:list-item>
        <text:list-item>
          <text:p text:style-name="P136"><text:span text:style-name="Strong_20_Emphasis"><text:span text:style-name="T1">¿Pertenezco yo a la iglesia que enseña la verdad pura?</text:span></text:span><text:span text:style-name="T1"> </text:span></text:p>
        </text:list-item>
        <text:list-item>
          <text:p text:style-name="P136"><text:span text:style-name="Strong_20_Emphasis"><text:span text:style-name="T1">¿Están mis oraciones basadas en la palabra de la verdad o en lo que yo quiero?</text:span></text:span><text:span text:style-name="T1"> </text:span></text:p>
        </text:list-item>
        <text:list-item>
          <text:p text:style-name="P136"><text:span text:style-name="Strong_20_Emphasis"><text:span text:style-name="T1">¿Qué clase de campo soy yo en este momento?</text:span></text:span><text:span text:style-name="T1"> (¿Camino, piedras, espinos o buena tierra?) </text:span></text:p>
        </text:list-item>
        <text:list-item>
          <text:p text:style-name="P136"><text:soft-page-break/><text:span text:style-name="Strong_20_Emphasis"><text:span text:style-name="T1">¿Hay algo que he permitido permanecer en mi corazón por mucho tiempo sin cambiarlo?</text:span></text:span><text:span text:style-name="T1"> </text:span></text:p>
        </text:list-item>
        <text:list-item>
          <text:p text:style-name="P134"><text:span text:style-name="Strong_20_Emphasis"><text:span text:style-name="T1">¿Estoy caminando en la luz (palabra revelada) o en tinieblas (ignorancia)?</text:span></text:span><text:span text:style-name="T1"> </text:span></text:p>
        </text:list-item>
      </text:list>
      <text:p text:style-name="P5"><text:bookmark-end text:name="__DdeLink__3842_480523685"/><text:bookmark-end text:name="__DdeLink__6162_362256330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23:05:46.512284902</meta:creation-date>
    <dc:date>2026-07-17T10:15:53.460649198</dc:date>
    <meta:editing-duration>PT1H32M39S</meta:editing-duration>
    <meta:editing-cycles>15</meta:editing-cycles>
    <meta:generator>LibreOffice/24.2.7.2$Linux_X86_64 LibreOffice_project/420$Build-2</meta:generator>
    <meta:document-statistic meta:table-count="0" meta:image-count="0" meta:object-count="0" meta:page-count="19" meta:paragraph-count="307" meta:word-count="4685" meta:character-count="27248" meta:non-whitespace-character-count="22894"/>
  </office:meta>
</office:document-meta>
</file>