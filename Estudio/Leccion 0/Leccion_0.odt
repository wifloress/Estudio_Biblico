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automatic-styles>
    <style:style style:name="P1" style:family="paragraph" style:parent-style-name="Heading_20_2">
      <style:text-properties style:font-name="Padauk Book"/>
    </style:style>
    <style:style style:name="P2" style:family="paragraph" style:parent-style-name="Horizontal_20_Line">
      <style:text-properties style:font-name="Padauk Book"/>
    </style:style>
    <style:style style:name="P3" style:family="paragraph" style:parent-style-name="Heading_20_3">
      <style:text-properties style:font-name="Padauk Book"/>
    </style:style>
    <style:style style:name="P4" style:family="paragraph" style:parent-style-name="Text_20_body">
      <style:text-properties style:font-name="Padauk Book"/>
    </style:style>
    <style:style style:name="P5" style:family="paragraph" style:parent-style-name="Horizontal_20_Line">
      <style:text-properties style:font-name="Padauk Book"/>
    </style:style>
    <style:style style:name="P6" style:family="paragraph" style:parent-style-name="Heading_20_1">
      <style:text-properties style:font-name="Padauk Book"/>
    </style:style>
    <style:style style:name="P7" style:family="paragraph" style:parent-style-name="Heading_20_2">
      <style:text-properties style:font-name="Padauk Book"/>
    </style:style>
    <style:style style:name="P8" style:family="paragraph" style:parent-style-name="Heading_20_3">
      <style:text-properties style:font-name="Padauk Book"/>
    </style:style>
    <style:style style:name="P9" style:family="paragraph" style:parent-style-name="Text_20_body" style:list-style-name="L1"/>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list-style-name="L2"/>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3">
      <style:paragraph-properties fo:margin-top="0cm" fo:margin-bottom="0cm" style:contextual-spacing="false"/>
      <style:text-properties style:font-name="Padauk Book"/>
    </style:style>
    <style:style style:name="P14" style:family="paragraph" style:parent-style-name="Text_20_body" style:list-style-name="L3">
      <style:text-properties style:font-name="Padauk Book"/>
    </style:style>
    <style:style style:name="P15" style:family="paragraph" style:parent-style-name="Text_20_body" style:list-style-name="L6">
      <style:paragraph-properties fo:margin-top="0cm" fo:margin-bottom="0cm" style:contextual-spacing="false"/>
      <style:text-properties style:font-name="Padauk Book"/>
    </style:style>
    <style:style style:name="P16" style:family="paragraph" style:parent-style-name="Text_20_body" style:list-style-name="L6">
      <style:text-properties style:font-name="Padauk Book"/>
    </style:style>
    <style:style style:name="P17" style:family="paragraph" style:parent-style-name="Text_20_body" style:list-style-name="L8">
      <style:paragraph-properties fo:margin-top="0cm" fo:margin-bottom="0cm" style:contextual-spacing="false"/>
      <style:text-properties style:font-name="Padauk Book"/>
    </style:style>
    <style:style style:name="P18" style:family="paragraph" style:parent-style-name="Text_20_body" style:list-style-name="L8">
      <style:text-properties style:font-name="Padauk Book"/>
    </style:style>
    <style:style style:name="P19" style:family="paragraph" style:parent-style-name="Text_20_body" style:list-style-name="L12">
      <style:text-properties style:font-name="Padauk Book"/>
    </style:style>
    <style:style style:name="P20" style:family="paragraph" style:parent-style-name="Text_20_body" style:list-style-name="L4"/>
    <style:style style:name="P21" style:family="paragraph" style:parent-style-name="Text_20_body" style:list-style-name="L4">
      <style:paragraph-properties fo:margin-top="0cm" fo:margin-bottom="0cm" style:contextual-spacing="false"/>
    </style:style>
    <style:style style:name="P22" style:family="paragraph" style:parent-style-name="Text_20_body" style:list-style-name="L5"/>
    <style:style style:name="P23" style:family="paragraph" style:parent-style-name="Text_20_body" style:list-style-name="L5">
      <style:paragraph-properties fo:margin-top="0cm" fo:margin-bottom="0cm" style:contextual-spacing="false"/>
    </style:style>
    <style:style style:name="P24" style:family="paragraph" style:parent-style-name="Text_20_body" style:list-style-name="L7"/>
    <style:style style:name="P25" style:family="paragraph" style:parent-style-name="Text_20_body" style:list-style-name="L7">
      <style:paragraph-properties fo:margin-top="0cm" fo:margin-bottom="0cm" style:contextual-spacing="false"/>
    </style:style>
    <style:style style:name="P26" style:family="paragraph" style:parent-style-name="Text_20_body" style:list-style-name="L9"/>
    <style:style style:name="P27" style:family="paragraph" style:parent-style-name="Text_20_body" style:list-style-name="L9">
      <style:paragraph-properties fo:margin-top="0cm" fo:margin-bottom="0cm" style:contextual-spacing="false"/>
    </style:style>
    <style:style style:name="P28" style:family="paragraph" style:parent-style-name="Text_20_body" style:list-style-name="L10"/>
    <style:style style:name="P29" style:family="paragraph" style:parent-style-name="Text_20_body" style:list-style-name="L10">
      <style:paragraph-properties fo:margin-top="0cm" fo:margin-bottom="0cm" style:contextual-spacing="false"/>
    </style:style>
    <style:style style:name="P30" style:family="paragraph" style:parent-style-name="Text_20_body" style:list-style-name="L11"/>
    <style:style style:name="P31" style:family="paragraph" style:parent-style-name="Text_20_body" style:list-style-name="L11">
      <style:paragraph-properties fo:margin-top="0cm" fo:margin-bottom="0cm" style:contextual-spacing="false"/>
    </style:style>
    <style:style style:name="P32" style:family="paragraph" style:parent-style-name="Text_20_body" style:list-style-name="L12">
      <style:paragraph-properties fo:margin-top="0cm" fo:margin-bottom="0cm" style:contextual-spacing="false"/>
    </style:style>
    <style:style style:name="P33" style:family="paragraph" style:parent-style-name="Text_20_body" style:list-style-name="L13"/>
    <style:style style:name="P34" style:family="paragraph" style:parent-style-name="Text_20_body" style:list-style-name="L13">
      <style:paragraph-properties fo:margin-top="0cm" fo:margin-bottom="0cm" style:contextual-spacing="false"/>
    </style:style>
    <style:style style:name="P35" style:family="paragraph" style:parent-style-name="Text_20_body" style:list-style-name="L14"/>
    <style:style style:name="P36" style:family="paragraph" style:parent-style-name="Text_20_body" style:list-style-name="L14">
      <style:paragraph-properties fo:margin-top="0cm" fo:margin-bottom="0cm" style:contextual-spacing="false"/>
    </style:style>
    <style:style style:name="P37" style:family="paragraph" style:parent-style-name="Text_20_body" style:list-style-name="L15"/>
    <style:style style:name="P38" style:family="paragraph" style:parent-style-name="Text_20_body" style:list-style-name="L15">
      <style:paragraph-properties fo:margin-top="0cm" fo:margin-bottom="0cm" style:contextual-spacing="false"/>
    </style:style>
    <style:style style:name="P39" style:family="paragraph" style:parent-style-name="Text_20_body" style:list-style-name="L16"/>
    <style:style style:name="P40" style:family="paragraph" style:parent-style-name="Text_20_body" style:list-style-name="L16">
      <style:paragraph-properties fo:margin-top="0cm" fo:margin-bottom="0cm" style:contextual-spacing="false"/>
    </style:style>
    <style:style style:name="P41" style:family="paragraph" style:parent-style-name="Text_20_body" style:list-style-name="L17"/>
    <style:style style:name="P42" style:family="paragraph" style:parent-style-name="Text_20_body" style:list-style-name="L17">
      <style:paragraph-properties fo:margin-top="0cm" fo:margin-bottom="0cm" style:contextual-spacing="false"/>
    </style:style>
    <style:style style:name="P43" style:family="paragraph" style:parent-style-name="Text_20_body" style:list-style-name="L19"/>
    <style:style style:name="P44" style:family="paragraph" style:parent-style-name="Text_20_body" style:list-style-name="L19">
      <style:paragraph-properties fo:margin-top="0cm" fo:margin-bottom="0cm" style:contextual-spacing="false"/>
    </style:style>
    <style:style style:name="P45" style:family="paragraph" style:parent-style-name="Text_20_body" style:list-style-name="L20"/>
    <style:style style:name="P46" style:family="paragraph" style:parent-style-name="Text_20_body" style:list-style-name="L20">
      <style:paragraph-properties fo:margin-top="0cm" fo:margin-bottom="0cm" style:contextual-spacing="false"/>
    </style:style>
    <style:style style:name="P47" style:family="paragraph" style:parent-style-name="Text_20_body" style:list-style-name="L22"/>
    <style:style style:name="P48" style:family="paragraph" style:parent-style-name="Text_20_body" style:list-style-name="L22">
      <style:paragraph-properties fo:margin-top="0cm" fo:margin-bottom="0cm" style:contextual-spacing="false"/>
    </style:style>
    <style:style style:name="P49" style:family="paragraph" style:parent-style-name="Text_20_body" style:list-style-name="L24"/>
    <style:style style:name="P50" style:family="paragraph" style:parent-style-name="Text_20_body" style:list-style-name="L24">
      <style:paragraph-properties fo:margin-top="0cm" fo:margin-bottom="0cm" style:contextual-spacing="false"/>
    </style:style>
    <style:style style:name="P51" style:family="paragraph" style:parent-style-name="Text_20_body" style:list-style-name="L25"/>
    <style:style style:name="P52" style:family="paragraph" style:parent-style-name="Text_20_body" style:list-style-name="L25">
      <style:paragraph-properties fo:margin-top="0cm" fo:margin-bottom="0cm" style:contextual-spacing="false"/>
    </style:style>
    <style:style style:name="P53" style:family="paragraph" style:parent-style-name="Text_20_body" style:list-style-name="L26"/>
    <style:style style:name="P54" style:family="paragraph" style:parent-style-name="Text_20_body" style:list-style-name="L26">
      <style:paragraph-properties fo:margin-top="0cm" fo:margin-bottom="0cm" style:contextual-spacing="false"/>
    </style:style>
    <style:style style:name="P55" style:family="paragraph" style:parent-style-name="Text_20_body" style:list-style-name="L27">
      <style:paragraph-properties fo:margin-top="0cm" fo:margin-bottom="0cm" style:contextual-spacing="false"/>
    </style:style>
    <style:style style:name="P56" style:family="paragraph" style:parent-style-name="Text_20_body" style:list-style-name="L28"/>
    <style:style style:name="P57" style:family="paragraph" style:parent-style-name="Text_20_body" style:list-style-name="L28">
      <style:paragraph-properties fo:margin-top="0cm" fo:margin-bottom="0cm" style:contextual-spacing="false"/>
    </style:style>
    <style:style style:name="P58" style:family="paragraph" style:parent-style-name="Text_20_body" style:list-style-name="L29"/>
    <style:style style:name="P59" style:family="paragraph" style:parent-style-name="Text_20_body" style:list-style-name="L29">
      <style:paragraph-properties fo:margin-top="0cm" fo:margin-bottom="0cm" style:contextual-spacing="false"/>
    </style:style>
    <style:style style:name="P60" style:family="paragraph" style:parent-style-name="Text_20_body" style:list-style-name="L30"/>
    <style:style style:name="P61" style:family="paragraph" style:parent-style-name="Text_20_body" style:list-style-name="L30">
      <style:paragraph-properties fo:margin-top="0cm" fo:margin-bottom="0cm" style:contextual-spacing="false"/>
    </style:style>
    <style:style style:name="P62" style:family="paragraph" style:parent-style-name="Text_20_body">
      <style:text-properties style:font-name="Padauk Book"/>
    </style:style>
    <style:style style:name="P63" style:family="paragraph" style:parent-style-name="Text_20_body" style:list-style-name="L18">
      <style:paragraph-properties fo:margin-top="0cm" fo:margin-bottom="0cm" style:contextual-spacing="false"/>
      <style:text-properties style:font-name="Padauk Book"/>
    </style:style>
    <style:style style:name="P64" style:family="paragraph" style:parent-style-name="Text_20_body" style:list-style-name="L18">
      <style:text-properties style:font-name="Padauk Book"/>
    </style:style>
    <style:style style:name="P65" style:family="paragraph" style:parent-style-name="Text_20_body" style:list-style-name="L21">
      <style:paragraph-properties fo:margin-top="0cm" fo:margin-bottom="0cm" style:contextual-spacing="false"/>
      <style:text-properties style:font-name="Padauk Book"/>
    </style:style>
    <style:style style:name="P66" style:family="paragraph" style:parent-style-name="Text_20_body" style:list-style-name="L21">
      <style:text-properties style:font-name="Padauk Book"/>
    </style:style>
    <style:style style:name="P67" style:family="paragraph" style:parent-style-name="Text_20_body" style:list-style-name="L23">
      <style:paragraph-properties fo:margin-top="0cm" fo:margin-bottom="0cm" style:contextual-spacing="false"/>
      <style:text-properties style:font-name="Padauk Book"/>
    </style:style>
    <style:style style:name="P68" style:family="paragraph" style:parent-style-name="Text_20_body" style:list-style-name="L23">
      <style:text-properties style:font-name="Padauk Book"/>
    </style:style>
    <style:style style:name="P69" style:family="paragraph" style:parent-style-name="Text_20_body" style:list-style-name="L27">
      <style:text-properties style:font-name="Padauk Book"/>
    </style:style>
    <style:style style:name="T1" style:family="text">
      <style:text-properties style:font-name="Padauk Book"/>
    </style:style>
    <style:style style:name="T2" style:family="text">
      <style:text-properties style:font-name="Padauk Book"/>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CUADERNO DE ESTUDIO: LECCIÓN 0</text:h>
      <text:h text:style-name="P1" text:outline-level="2">Curso de Discipulado Bíblico: Orientación e Introducción a la Religión</text:h>
      <text:p text:style-name="P2"/>
      <text:h text:style-name="P1" text:outline-level="2">🙏 1. Bienvenida y Oración Inicial</text:h>
      <text:p text:style-name="P4">¡Hola a todos! Bienvenidos. Espero que todos estén emocionados. Hoy es el primer día del curso oficial, el día oficial. Espero que todos estén listos y preparados. Hoy vamos a tener la orientación y después una lección pequeña para empezar.</text:p>
      <text:p text:style-name="Text_20_body"><text:span text:style-name="Strong_20_Emphasis"><text:span text:style-name="T1">Oración de apertura:</text:span></text:span></text:p>
      <text:p text:style-name="Quotations"><text:span text:style-name="Emphasis"><text:span text:style-name="T1">"Santísimo Padre Dios, gracias por esta oportunidad que nos has dado. Tú nos has guiado aquí para venir y escuchar tu palabra verdadera. Gracias por esta oportunidad. Y también hoy, que todas las palabras que vengan del instructor y del evangelista sean palabras tuyas, Dios, no de nuestros propios pensamientos. Oramos por todos los estudiantes que están aquí para aprender sobre ti, y también oramos por los estudiantes que querían venir, pero no pudieron por circunstancias de electricidad o de deberes en la casa. Dios, por favor, protege a esos estudiantes. Ayúdanos a que sus circunstancias se arreglen para que puedan venir y escuchar tu gloriosa verdad, Padre Dios. Te oramos todo esto en Jesucristo. Amén."</text:span></text:span></text:p>
      <text:p text:style-name="P2"/>
      <text:h text:style-name="P1" text:outline-level="2">🏫 2. Orientación del Curso: Logística y Staff</text:h>
      <text:h text:style-name="P3" text:outline-level="3">🕒 Horario y Modalidad</text:h>
      <text:list text:style-name="L16">
        <text:list-item>
          <text:p text:style-name="P40"><text:span text:style-name="Strong_20_Emphasis"><text:span text:style-name="T1">Frecuencia:</text:span></text:span><text:span text:style-name="T1"> Tres clases en total, tres veces por semana (martes, viernes y domingo). </text:span></text:p>
        </text:list-item>
        <text:list-item>
          <text:p text:style-name="P40"><text:span text:style-name="Strong_20_Emphasis"><text:span text:style-name="T1">Duración:</text:span></text:span><text:span text:style-name="T1"> Cada lección dura 1 hora y media.</text:span></text:p>
          <text:list>
            <text:list-item>
              <text:p text:style-name="P40"><text:span text:style-name="Emphasis"><text:span text:style-name="T1">1 hora</text:span></text:span><text:span text:style-name="T1"> con el instructor. </text:span></text:p>
            </text:list-item>
            <text:list-item>
              <text:p text:style-name="P40"><text:span text:style-name="Emphasis"><text:span text:style-name="T1">20 a 30 minutos</text:span></text:span><text:span text:style-name="T1"> de repaso con el evangelista. </text:span></text:p>
            </text:list-item>
          </text:list>
        </text:list-item>
        <text:list-item>
          <text:p text:style-name="P40"><text:span text:style-name="Strong_20_Emphasis"><text:span text:style-name="T1">Zonas Horarias:</text:span></text:span><text:span text:style-name="T1"> Hay horarios disponibles para México, Guatemala, Perú, Bolivia, Uruguay, etc. Se ofrecen dos oportunidades para tomar la misma lección (mañana o noche). </text:span></text:p>
        </text:list-item>
        <text:list-item>
          <text:p text:style-name="P39"><text:soft-page-break/><text:span text:style-name="Strong_20_Emphasis"><text:span text:style-name="T1">Clases de Recuperación:</text:span></text:span><text:span text:style-name="T1"> Si no pueden entrar por circunstancias a los horarios en vivo, existe un horario de recuperación (solo una vez). </text:span></text:p>
        </text:list-item>
      </text:list>
      <text:h text:style-name="P3" text:outline-level="3">👥 Presentación del Staff</text:h>
      <text:list text:style-name="L17">
        <text:list-item>
          <text:p text:style-name="P42"><text:span text:style-name="Strong_20_Emphasis"><text:span text:style-name="T1">Instructor:</text:span></text:span><text:span text:style-name="T1"> Sibiani (Sibi) - </text:span><text:span text:style-name="Emphasis"><text:span text:style-name="T1">Contacto disponible en plataforma.</text:span></text:span><text:span text:style-name="T1"> </text:span></text:p>
        </text:list-item>
        <text:list-item>
          <text:p text:style-name="P42"><text:span text:style-name="Strong_20_Emphasis"><text:span text:style-name="T1">Evangelista:</text:span></text:span><text:span text:style-name="T1"> Christian Howard - </text:span><text:span text:style-name="Emphasis"><text:span text:style-name="T1">Contacto disponible en plataforma.</text:span></text:span><text:span text:style-name="T1"> </text:span></text:p>
        </text:list-item>
        <text:list-item>
          <text:p text:style-name="P41"><text:span text:style-name="Strong_20_Emphasis"><text:span text:style-name="T1">Asistentes:</text:span></text:span><text:span text:style-name="T1"> Clara Yu, Ruby Park y Elizabeth Lugo (quienes ayudan al evangelista y también han impartido clases). </text:span></text:p>
        </text:list-item>
      </text:list>
      <text:h text:style-name="P3" text:outline-level="3">🎯 Propósito y Temario del Discipulado</text:h>
      <text:p text:style-name="Text_20_body"><text:span text:style-name="T1">El propósito es </text:span><text:span text:style-name="Strong_20_Emphasis"><text:span text:style-name="T1">entender el plan de Dios</text:span></text:span><text:span text:style-name="T1">, especialmente para estos tiempos (el tiempo de Apocalipsis). Nos enfocaremos en:</text:span></text:p>
      <text:list text:style-name="L18">
        <text:list-item>
          <text:p text:style-name="P63">Las parábolas de los evangelios. </text:p>
        </text:list-item>
        <text:list-item>
          <text:p text:style-name="P63">Los secretos del reino de los cielos. </text:p>
        </text:list-item>
        <text:list-item>
          <text:p text:style-name="P63">Las profecías. </text:p>
        </text:list-item>
        <text:list-item>
          <text:p text:style-name="P64">Toda la Biblia en general. </text:p>
        </text:list-item>
      </text:list>
      <text:h text:style-name="P3" text:outline-level="3">📈 Proceso y Etapas (Duración: 1 a 1.5 años)</text:h>
      <text:list text:style-name="L19">
        <text:list-item>
          <text:p text:style-name="P44"><text:span text:style-name="Strong_20_Emphasis"><text:span text:style-name="T1">Nivel Introductorio:</text:span></text:span><text:span text:style-name="T1"> Aprenderemos sobre parábolas y lenguaje figurativo (los secretos del reino). Son los </text:span><text:span text:style-name="Emphasis"><text:span text:style-name="T1">"building blocks"</text:span></text:span><text:span text:style-name="T1"> (bloques de construcción) con los que debemos empezar. </text:span></text:p>
        </text:list-item>
        <text:list-item>
          <text:p text:style-name="P44"><text:span text:style-name="Strong_20_Emphasis"><text:span text:style-name="T1">Nivel Intermedio (2 meses):</text:span></text:span><text:span text:style-name="T1"> Combinaremos el lenguaje figurativo con la lógica del trabajo de Dios. Examinaremos capítulos del Antiguo y Nuevo Testamento para entender cómo trabaja Dios (quien nunca cambia; lo que hizo antes, lo hará después). </text:span></text:p>
        </text:list-item>
        <text:list-item>
          <text:p text:style-name="P43"><text:span text:style-name="Strong_20_Emphasis"><text:span text:style-name="T1">Nivel Avanzado (4 meses):</text:span></text:span><text:span text:style-name="T1"> Estudiaré las profecías, la promesa dada para nosotros y el libro de Apocalipsis línea por línea, versículo por versículo. </text:span></text:p>
        </text:list-item>
      </text:list>
      <text:p text:style-name="P2"/>
      <text:h text:style-name="P1" text:outline-level="2">📋 3. Requisitos, Reglas y Ética en Línea</text:h>
      <text:h text:style-name="P3" text:outline-level="3">✅ Requisitos para Graduarse</text:h>
      <text:list text:style-name="L20">
        <text:list-item>
          <text:p text:style-name="P46"><text:span text:style-name="Strong_20_Emphasis"><text:span text:style-name="T1">Asistencia:</text:span></text:span><text:span text:style-name="T1"> Es fundamental. Si un estudiante falta 8 veces, deberá iniciar de nuevo desde el principio del nivel. </text:span><text:span text:style-name="Emphasis"><text:span text:style-name="T1">Nota:</text:span></text:span><text:span text:style-name="T1"> Si hay una emergencia, notifíquennos con antemano para reponer la lección. </text:span></text:p>
        </text:list-item>
        <text:list-item>
          <text:p text:style-name="P46"><text:soft-page-break/><text:span text:style-name="Strong_20_Emphasis"><text:span text:style-name="T1">Preguntas de Reflexión:</text:span></text:span><text:span text:style-name="T1"> Mini-tareas después de cada lección para verificar el entendimiento. Deben compartirse antes de la siguiente clase. La participación debe ser del 100%. </text:span></text:p>
        </text:list-item>
        <text:list-item>
          <text:p text:style-name="P46"><text:span text:style-name="Strong_20_Emphasis"><text:span text:style-name="T1">Exámenes:</text:span></text:span><text:span text:style-name="T1"> Habrá un examen al final de cada nivel. Se requiere una nota de </text:span><text:span text:style-name="Strong_20_Emphasis"><text:span text:style-name="T1">90% o superior</text:span></text:span><text:span text:style-name="T1"> para pasar, ya que es sobre la palabra de Dios y debe estar en nuestra mente y corazón. </text:span></text:p>
        </text:list-item>
        <text:list-item>
          <text:p text:style-name="P46"><text:span text:style-name="Strong_20_Emphasis"><text:span text:style-name="T1">Comunicación:</text:span></text:span><text:span text:style-name="T1"> Se espera que los estudiantes se reúnan fuera de las lecciones con sus evangelistas o asistentes al menos </text:span><text:span text:style-name="Strong_20_Emphasis"><text:span text:style-name="T1">3 veces durante cada nivel</text:span></text:span><text:span text:style-name="T1"> (esto no incluye los repasos normales de 20-30 min). </text:span></text:p>
        </text:list-item>
        <text:list-item>
          <text:p text:style-name="P46"><text:span text:style-name="Strong_20_Emphasis"><text:span text:style-name="T1">Material de Repaso:</text:span></text:span><text:span text:style-name="T1"> Si no pueden asistir en directo, deben participar en la recuperación o ver el Vimeo. Deben tomar apuntes y enviarlos a la persona que los invitó para seguir recibiendo enlaces. </text:span></text:p>
        </text:list-item>
        <text:list-item>
          <text:p text:style-name="P45"><text:span text:style-name="Strong_20_Emphasis"><text:span text:style-name="T1">Premios y Reconocimientos:</text:span></text:span><text:span text:style-name="T1"> Al final del nivel introductorio, habrá premios para quienes organicen bien sus apuntes, mantengan la cámara encendida, lleguen temprano y tengan buena postura. </text:span></text:p>
        </text:list-item>
      </text:list>
      <text:h text:style-name="P3" text:outline-level="3">🎒 Materiales Necesarios</text:h>
      <text:list text:style-name="L21">
        <text:list-item>
          <text:p text:style-name="P65">Biblia (física preferiblemente), cuaderno y bolígrafo. </text:p>
        </text:list-item>
        <text:list-item>
          <text:p text:style-name="P65">Suficientes datos/internet, audífonos, cámara y cargadores. </text:p>
        </text:list-item>
        <text:list-item>
          <text:p text:style-name="P66">Soportes para dispositivos y un buen ambiente (mesa para estudiar, no estar en la cama para poder concentrarse). </text:p>
        </text:list-item>
      </text:list>
      <text:h text:style-name="P3" text:outline-level="3">💻 Etiqueta para Clases en Línea</text:h>
      <text:list text:style-name="L22">
        <text:list-item>
          <text:p text:style-name="P48"><text:span text:style-name="Strong_20_Emphasis"><text:span text:style-name="T1">Puntualidad:</text:span></text:span><text:span text:style-name="T1"> Únase 10 minutos antes. Si llega tarde o falta, contacte al staff. </text:span></text:p>
        </text:list-item>
        <text:list-item>
          <text:p text:style-name="P48"><text:span text:style-name="Strong_20_Emphasis"><text:span text:style-name="T1">Postura:</text:span></text:span><text:span text:style-name="T1"> Sentarse derecho, sin acostarse ni curvarse (evite dormir en clase). </text:span></text:p>
        </text:list-item>
        <text:list-item>
          <text:p text:style-name="P48"><text:span text:style-name="Strong_20_Emphasis"><text:span text:style-name="T1">Cámara y Micrófono:</text:span></text:span><text:span text:style-name="T1"> Cámara siempre encendida. Micrófono en </text:span><text:span text:style-name="Emphasis"><text:span text:style-name="T1">mute</text:span></text:span><text:span text:style-name="T1"> (solo se activará cuando el anfitrión lo permita para responder). </text:span></text:p>
        </text:list-item>
        <text:list-item>
          <text:p text:style-name="P48"><text:span text:style-name="Strong_20_Emphasis"><text:span text:style-name="T1">Vestimenta y Respeto:</text:span></text:span><text:span text:style-name="T1"> Vístase apropiadamente. Estamos ante Dios, así que debemos tener respeto. </text:span></text:p>
        </text:list-item>
        <text:list-item>
          <text:p text:style-name="P48"><text:span text:style-name="Strong_20_Emphasis"><text:span text:style-name="T1">Alimentos:</text:span></text:span><text:span text:style-name="T1"> No se permite comer, pero sí beber té, café o agua. </text:span></text:p>
        </text:list-item>
        <text:list-item>
          <text:p text:style-name="P48"><text:span text:style-name="Strong_20_Emphasis"><text:span text:style-name="T1">Actitud:</text:span></text:span><text:span text:style-name="T1"> Tenga una gran sonrisa, mente y corazón centrados en la Palabra. Deje los nervios y preocupaciones a un lado. </text:span></text:p>
        </text:list-item>
        <text:list-item>
          <text:p text:style-name="P47"><text:span text:style-name="Strong_20_Emphasis"><text:span text:style-name="T1">Participación:</text:span></text:span><text:span text:style-name="T1"> Escriba "Amén" en el chat (afirmar la Palabra, 2 Corintios 1:20). Anote sus preguntas en su cuaderno para hacerlas al final y no interrumpir el flujo de la clase. </text:span></text:p>
        </text:list-item>
      </text:list>
      <text:p text:style-name="P2"/>
      <text:h text:style-name="P1" text:outline-level="2"><text:soft-page-break/>📖 4. Introducción a la Lección: ¿Qué es la Religión?</text:h>
      <text:p text:style-name="Text_20_body"><text:span text:style-name="Emphasis"><text:span text:style-name="T1">(A cargo del Instructor Sibiani)</text:span></text:span></text:p>
      <text:p text:style-name="Text_20_body"><text:span text:style-name="T1">¡Bendiciones a todos! Soy el instructor Sibi. Vamos a iniciar el nivel introductorio viendo muchas parábolas y lenguaje figurativo para entender el plan de Dios. Al principio de cada lección, pregúntense: </text:span><text:span text:style-name="Emphasis"><text:span text:style-name="T1">¿Qué significa esto? ¿Por qué Dios me está mostrando estas cosas?</text:span></text:span></text:p>
      <text:p text:style-name="Text_20_body"><text:span text:style-name="T1">Cuando escuchamos la palabra </text:span><text:span text:style-name="Strong_20_Emphasis"><text:span text:style-name="T1">"Religión"</text:span></text:span><text:span text:style-name="T1">, cada uno tiene un pensamiento diferente. Muchas personas dicen: </text:span><text:span text:style-name="Emphasis"><text:span text:style-name="T1">"Yo no soy religioso, yo tengo una relación con Dios"</text:span></text:span><text:span text:style-name="T1">. Pero, ¿qué significa realmente religión? ¿Cuándo empezó? ¿Es importante? ¿Qué beneficios trae?</text:span></text:p>
      <text:h text:style-name="P3" text:outline-level="3">🧠 Preguntas Existenciales</text:h>
      <text:p text:style-name="P4">Todos nos hemos preguntado:</text:p>
      <text:list text:style-name="L23">
        <text:list-item>
          <text:p text:style-name="P67">¿De dónde vengo y a dónde voy? </text:p>
        </text:list-item>
        <text:list-item>
          <text:p text:style-name="P67">¿Cuál fue mi origen? ¿Por qué estoy aquí? </text:p>
        </text:list-item>
        <text:list-item>
          <text:p text:style-name="P67">¿Qué es la felicidad verdadera? ¿Es mi propio estándar o hay uno celestial? </text:p>
        </text:list-item>
        <text:list-item>
          <text:p text:style-name="P68">¿Por qué le tenemos miedo a la muerte? La muerte no fue parte de la ecuación original de Dios; todos queremos vida. </text:p>
        </text:list-item>
      </text:list>
      <text:p text:style-name="Text_20_body"><text:span text:style-name="Strong_20_Emphasis"><text:span text:style-name="T1">¿Qué puede solucionar todas estas cosas? La religión.</text:span></text:span></text:p>
      <text:p text:style-name="P2"/>
      <text:h text:style-name="P1" text:outline-level="2">🌍 5. Definiciones de Religión: Oriente y Occidente</text:h>
      <text:p text:style-name="Text_20_body"><text:span text:style-name="T1">La religión es </text:span><text:span text:style-name="Strong_20_Emphasis"><text:span text:style-name="T1">la mejor enseñanza que muestra las cosas del cielo</text:span></text:span><text:span text:style-name="T1">. Podemos entenderla desde dos perspectivas:</text:span></text:p>
      <text:h text:style-name="P3" text:outline-level="3">🏮 En Oriente (Caracteres Chinos / Coreanos)</text:h>
      <text:p text:style-name="Text_20_body"><text:span text:style-name="T1">En coreano, religión se dice </text:span><text:span text:style-name="Strong_20_Emphasis"><text:span text:style-name="T1">"Jeongkyo"</text:span></text:span><text:span text:style-name="T1">.</text:span></text:p>
      <text:list text:style-name="L24">
        <text:list-item>
          <text:p text:style-name="P50"><text:span text:style-name="Emphasis"><text:span text:style-name="T1">Jeong</text:span></text:span><text:span text:style-name="T1"> = Enseñanza </text:span></text:p>
        </text:list-item>
        <text:list-item>
          <text:p text:style-name="P50"><text:span text:style-name="Emphasis"><text:span text:style-name="T1">Kyo</text:span></text:span><text:span text:style-name="T1"> = Mejor </text:span></text:p>
        </text:list-item>
        <text:list-item>
          <text:p text:style-name="P49"><text:span text:style-name="Strong_20_Emphasis"><text:span text:style-name="T1">Significado:</text:span></text:span><text:span text:style-name="T1"> Las mejores enseñanzas. Provienen de Dios. En caracteres chinos, se compone del carácter para </text:span><text:span text:style-name="Strong_20_Emphasis"><text:span text:style-name="T1">"Cielo"</text:span></text:span><text:span text:style-name="T1"> y el carácter para </text:span><text:span text:style-name="Strong_20_Emphasis"><text:span text:style-name="T1">"Mostrar"</text:span></text:span><text:span text:style-name="T1">. Es decir, cosas que se muestran del cielo. Debemos recibir estas enseñanzas superiores y desechar los pensamientos humanos que chocan con ellas. </text:span></text:p>
        </text:list-item>
      </text:list>
      <text:h text:style-name="P3" text:outline-level="3"><text:soft-page-break/>🏛️ En Occidente (Latín)</text:h>
      <text:p text:style-name="P4">La palabra viene del latín:</text:p>
      <text:list text:style-name="L25">
        <text:list-item>
          <text:p text:style-name="P52"><text:span text:style-name="Emphasis"><text:span text:style-name="T1">Re</text:span></text:span><text:span text:style-name="T1"> = Otra vez, repetición (como reiniciar). </text:span></text:p>
        </text:list-item>
        <text:list-item>
          <text:p text:style-name="P52"><text:span text:style-name="Emphasis"><text:span text:style-name="T1">Ligare</text:span></text:span><text:span text:style-name="T1"> = Conectar (como ligamentos). </text:span></text:p>
        </text:list-item>
        <text:list-item>
          <text:p text:style-name="P51"><text:span text:style-name="Strong_20_Emphasis"><text:span text:style-name="T1">Significado:</text:span></text:span><text:span text:style-name="T1"> </text:span><text:span text:style-name="Strong_20_Emphasis"><text:span text:style-name="T1">Reconectar</text:span></text:span><text:span text:style-name="T1">. Implica que en un principio hubo una conexión, luego una desconexión, y ahora la religión es el proceso de volver a conectarse. </text:span></text:p>
        </text:list-item>
      </text:list>
      <text:p text:style-name="P2"/>
      <text:h text:style-name="P1" text:outline-level="2">📜 6. El Origen de la Necesidad de Reconexión</text:h>
      <text:p text:style-name="Text_20_body"><text:span text:style-name="T1">Para entender por qué necesitamos reconectarnos, vamos a </text:span><text:span text:style-name="Strong_20_Emphasis"><text:span text:style-name="T1">Génesis 6:1-3</text:span></text:span><text:span text:style-name="T1">:</text:span></text:p>
      <text:p text:style-name="Quotations"><text:span text:style-name="Emphasis"><text:span text:style-name="T1">"Aconteció que cuando comenzaron los hombres a multiplicarse sobre la faz de la tierra y les nacieron hijas, que viendo los hijos de Dios que las hijas de los hombres eran hermosas, tomaron para sí mujeres, escogiendo entre todas. Y dijo Jehová: No contenderé mi espíritu con el hombre para siempre, porque ciertamente él es carne; mas serán sus días ciento veinte años".</text:span></text:span></text:p>
      <text:p text:style-name="Text_20_body"><text:span text:style-name="Strong_20_Emphasis"><text:span text:style-name="T1">Análisis del pasaje:</text:span></text:span></text:p>
      <text:list text:style-name="L26">
        <text:list-item>
          <text:p text:style-name="P54"><text:span text:style-name="Strong_20_Emphasis"><text:span text:style-name="T1">La Desconexión:</text:span></text:span><text:span text:style-name="T1"> En un principio, el Espíritu de Dios moraba naturalmente sobre el hombre. Pero llegó un punto donde Dios dijo: </text:span><text:span text:style-name="Emphasis"><text:span text:style-name="T1">"Ya no puedo estar con ellos, hay algo malo"</text:span></text:span><text:span text:style-name="T1">. </text:span></text:p>
        </text:list-item>
        <text:list-item>
          <text:p text:style-name="P54"><text:span text:style-name="Strong_20_Emphasis"><text:span text:style-name="T1">El concepto de "Carne":</text:span></text:span><text:span text:style-name="T1"> Cuando Dios dice que el hombre es "carne", significa que ya no tiene el Espíritu de Dios ni Su palabra. Solo le queda el cuerpo físico. </text:span></text:p>
        </text:list-item>
        <text:list-item>
          <text:p text:style-name="P53"><text:span text:style-name="Strong_20_Emphasis"><text:span text:style-name="T1">La analogía del teléfono:</text:span></text:span><text:span text:style-name="T1"> Un teléfono conectado a la corriente funciona infinitamente. Si lo desconectas, eventualmente la batería muere. Dios es la fuente de vida. Al desconectarnos de Él, nuestra vida (que antes llegaba a los 900 años como Adán o Matusalén) empezó a disminuir a 120 años. </text:span></text:p>
        </text:list-item>
      </text:list>
      <text:p text:style-name="P2"/>
      <text:h text:style-name="P1" text:outline-level="2">🔍 7. La Evidencia de Dios y la Voluntad Divina</text:h>
      <text:h text:style-name="P3" text:outline-level="3">¿Cómo probar la existencia de Dios?</text:h>
      <text:p text:style-name="Text_20_body"><text:span text:style-name="T1">A través de la </text:span><text:span text:style-name="Strong_20_Emphasis"><text:span text:style-name="T1">Profecía y su Cumplimiento</text:span></text:span><text:span text:style-name="T1">.</text:span></text:p>
      <text:list text:style-name="L27">
        <text:list-item>
          <text:p text:style-name="P55"><text:soft-page-break/><text:span text:style-name="Emphasis"><text:span text:style-name="T1">Analogía del desayuno:</text:span></text:span><text:span text:style-name="T1"> Si despiertas y encuentras el desayuno listo con una nota que dice </text:span><text:span text:style-name="Emphasis"><text:span text:style-name="T1">"Te dejé esto, me fui a trabajar"</text:span></text:span><text:span text:style-name="T1">, no ves a la persona, pero sabes que existe y que obra por sus acciones. </text:span></text:p>
        </text:list-item>
        <text:list-item>
          <text:p text:style-name="P69">Dios promete y cumple. Ninguna otra religión tiene esta característica. Esto nos prueba que Dios existe y está trabajando activamente en la Tierra. </text:p>
        </text:list-item>
      </text:list>
      <text:h text:style-name="P3" text:outline-level="3">Hacer la Voluntad del Padre</text:h>
      <text:p text:style-name="Quotations"><text:span text:style-name="Emphasis"><text:span text:style-name="T1">"No todo el que me dice: Señor, Señor, entrará en el reino de los cielos, sino el que hace la voluntad de mi Padre que está en los cielos".</text:span></text:span><text:span text:style-name="T1"> — </text:span><text:span text:style-name="Strong_20_Emphasis"><text:span text:style-name="T1">Mateo 7:21</text:span></text:span></text:p>
      <text:p text:style-name="P4">No basta con clamar a Dios; hay que hacer Su voluntad. ¿Cómo la hacemos? Entendiendo Su palabra y cómo está obrando hoy, tal como lo entendieron los 12 discípulos.</text:p>
      <text:h text:style-name="P3" text:outline-level="3">Los Misterios del Reino</text:h>
      <text:p text:style-name="Quotations"><text:span text:style-name="Emphasis"><text:span text:style-name="T1">"Porque a vosotros os es dado saber los misterios del reino de los cielos, mas a ellos no les es dado".</text:span></text:span><text:span text:style-name="T1"> — </text:span><text:span text:style-name="Strong_20_Emphasis"><text:span text:style-name="T1">Mateo 13:10</text:span></text:span></text:p>
      <text:p text:style-name="P4">Jesús hablaba en parábolas. A los discípulos ("vosotros") se les daba conocer los secretos, pero a la multitud ("ellos") no. Para entrar al reino de los cielos, es obligatorio conocer estos misterios.</text:p>
      <text:p text:style-name="P2"/>
      <text:h text:style-name="P1" text:outline-level="2">⚠️ 8. Consecuencias de la Falta de Conocimiento</text:h>
      <text:h text:style-name="P3" text:outline-level="3">El Peligro de Ignorar la Palabra</text:h>
      <text:p text:style-name="Quotations"><text:span text:style-name="Emphasis"><text:span text:style-name="T1">"Mi pueblo fue destruido, porque le faltó conocimiento. Por cuanto desechaste el conocimiento, yo te echaré del sacerdocio... porque olvidaste la ley de tu Dios, también yo me olvidaré de tus hijos".</text:span></text:span><text:span text:style-name="T1"> — </text:span><text:span text:style-name="Strong_20_Emphasis"><text:span text:style-name="T1">Oseas 4:6</text:span></text:span></text:p>
      <text:p text:style-name="P4">No habla de conocimientos mundiales, sino de las enseñanzas del cielo. Olvidar el pacto y la ley de Dios trae consecuencias terribles: ser echados de Su lado.</text:p>
      <text:h text:style-name="P3" text:outline-level="3">Leche vs. Alimento Sólido</text:h>
      <text:p text:style-name="Quotations"><text:span text:style-name="Emphasis"><text:span text:style-name="T1">"Porque debiendo ser ya maestros... tenéis necesidad de leche y no de alimento sólido. Y todo aquel que participa de la leche es inexperto en la palabra de justicia, porque es niño. Pero el alimento sólido es para los que han alcanzado madurez..."</text:span></text:span><text:span text:style-name="T1"> — </text:span><text:span text:style-name="Strong_20_Emphasis"><text:span text:style-name="T1">Hebreos 5:12-14</text:span></text:span></text:p>
      <text:list text:style-name="L28">
        <text:list-item>
          <text:p text:style-name="P57"><text:soft-page-break/><text:span text:style-name="Strong_20_Emphasis"><text:span text:style-name="T1">Leche (Niños/Carnales):</text:span></text:span><text:span text:style-name="T1"> Inexpertos en la justicia de Dios, guiados por sus propios pensamientos, celos y contiendas (1 Corintios 3:1-5). </text:span></text:p>
        </text:list-item>
        <text:list-item>
          <text:p text:style-name="P56"><text:span text:style-name="Strong_20_Emphasis"><text:span text:style-name="T1">Alimento Sólido (Maduros/Espirituales):</text:span></text:span><text:span text:style-name="T1"> Tienen los sentidos ejercitados por la palabra del cielo para discernir el bien y el mal ante los ojos de Dios. </text:span></text:p>
        </text:list-item>
      </text:list>
      <text:p text:style-name="P2"/>
      <text:h text:style-name="P1" text:outline-level="2">🤝 9. El Nuevo Pacto y las Promesas de Apocalipsis</text:h>
      <text:h text:style-name="P3" text:outline-level="3">La Ley en la Mente y en el Corazón</text:h>
      <text:p text:style-name="Quotations"><text:span text:style-name="Emphasis"><text:span text:style-name="T1">"Pondré mis leyes en la mente de ellos, y sobre sus corazones las escribiré; y seré a ellos por Dios, y ellos me serán a mí por pueblo... Porque seré propicio a sus injusticias, y nunca más me acordaré de sus pecados".</text:span></text:span><text:span text:style-name="T1"> — </text:span><text:span text:style-name="Strong_20_Emphasis"><text:span text:style-name="T1">Hebreos 8:10-12</text:span></text:span></text:p>
      <text:p text:style-name="P4">Este pacto no es con el Israel físico, sino con el pueblo de Dios en estos tiempos. El pacto consiste en que Su palabra esté en nuestra mente y corazón. Si lo cumplimos, Él perdona nuestros pecados.</text:p>
      <text:h text:style-name="P3" text:outline-level="3">La Bienaventuranza y la Advertencia de Apocalipsis</text:h>
      <text:p text:style-name="Quotations"><text:span text:style-name="Emphasis"><text:span text:style-name="T1">"He aquí, vengo pronto. Bienaventurado el que guarda las palabras de la profecía de este libro".</text:span></text:span><text:span text:style-name="T1"> — </text:span><text:span text:style-name="Strong_20_Emphasis"><text:span text:style-name="T1">Apocalipsis 22:7</text:span></text:span></text:p>
      <text:p text:style-name="P4">La persona bendecida es la que guarda las palabras del libro de Apocalipsis. Por eso es vital estudiarlo.</text:p>
      <text:p text:style-name="Quotations"><text:span text:style-name="Emphasis"><text:span text:style-name="T1">"Si alguno añadiere a estas cosas, Dios traerá sobre él las plagas... Y si alguno quitare de las palabras del libro de esta profecía, Dios quitará su parte del libro de la vida".</text:span></text:span><text:span text:style-name="T1"> — </text:span><text:span text:style-name="Strong_20_Emphasis"><text:span text:style-name="T1">Apocalipsis 22:18-19</text:span></text:span></text:p>
      <text:list text:style-name="L29">
        <text:list-item>
          <text:p text:style-name="P59"><text:span text:style-name="Strong_20_Emphasis"><text:span text:style-name="T1">Añadir:</text:span></text:span><text:span text:style-name="T1"> Agregar nuestros propios pensamientos. </text:span></text:p>
        </text:list-item>
        <text:list-item>
          <text:p text:style-name="P58"><text:span text:style-name="Strong_20_Emphasis"><text:span text:style-name="T1">Quitar:</text:span></text:span><text:span text:style-name="T1"> Ignorar el pacto de Apocalipsis. Ambas acciones tienen consecuencias eternas. </text:span></text:p>
        </text:list-item>
      </text:list>
      <text:h text:style-name="P3" text:outline-level="3">La Gran Conclusión: El Tabernáculo de Dios</text:h>
      <text:p text:style-name="Quotations"><text:span text:style-name="Emphasis"><text:span text:style-name="T1">"Vi un cielo nuevo y una tierra nueva... Y oí una gran voz del cielo que decía: He aquí el tabernáculo de Dios con los hombres, y él morará con ellos... Enjugará Dios toda lágrima de los ojos de ellos, y ya no habrá muerte, ni habrá más llanto, ni clamor, ni dolor".</text:span></text:span><text:span text:style-name="T1"> — </text:span><text:span text:style-name="Strong_20_Emphasis"><text:span text:style-name="T1">Apocalipsis 21:1-4</text:span></text:span></text:p>
      <text:p text:style-name="P4">Esta es nuestra esperanza. La ciudad santa desciende y se cumple la reconexión final. Dios morará con las personas que mantienen el nuevo pacto.</text:p>
      <text:p text:style-name="P2"><text:soft-page-break/></text:p>
      <text:h text:style-name="P1" text:outline-level="2">🔄 10. Repaso Final y Oración de Cierre</text:h>
      <text:p text:style-name="Text_20_body"><text:span text:style-name="Emphasis"><text:span text:style-name="T1">(A cargo del Evangelista Christian Howard)</text:span></text:span></text:p>
      <text:p text:style-name="Text_20_body"><text:span text:style-name="Strong_20_Emphasis"><text:span text:style-name="T1">Resumen de la Lección:</text:span></text:span></text:p>
      <text:list text:style-name="L30">
        <text:list-item>
          <text:p text:style-name="P61"><text:span text:style-name="Strong_20_Emphasis"><text:span text:style-name="T1">Definiciones de Religión:</text:span></text:span></text:p>
          <text:list>
            <text:list-item>
              <text:p text:style-name="P61"><text:span text:style-name="Emphasis"><text:span text:style-name="T1">Oriente:</text:span></text:span><text:span text:style-name="T1"> Las mejores enseñanzas (que vienen del cielo/Dios). </text:span></text:p>
            </text:list-item>
            <text:list-item>
              <text:p text:style-name="P61"><text:span text:style-name="Emphasis"><text:span text:style-name="T1">Occidente:</text:span></text:span><text:span text:style-name="T1"> Religare (Reconexión con Dios). </text:span></text:p>
            </text:list-item>
          </text:list>
        </text:list-item>
        <text:list-item>
          <text:p text:style-name="P61"><text:span text:style-name="Strong_20_Emphasis"><text:span text:style-name="T1">Evidencia de Dios:</text:span></text:span><text:span text:style-name="T1"> Se comprueba a través de la profecía y su cumplimiento (vemos Sus acciones). </text:span></text:p>
        </text:list-item>
        <text:list-item>
          <text:p text:style-name="P60"><text:span text:style-name="Strong_20_Emphasis"><text:span text:style-name="T1">¿Por qué necesitamos religión?:</text:span></text:span><text:span text:style-name="T1"> Porque Dios es la fuente de vida. Estar conectados con Él significa tener vida eterna. </text:span></text:p>
        </text:list-item>
      </text:list>
      <text:p text:style-name="Text_20_body"><text:span text:style-name="Strong_20_Emphasis"><text:span text:style-name="T1">Oración Final (El Padre Nuestro):</text:span></text:span></text:p>
      <text:p text:style-name="Quotations"><text:span text:style-name="Emphasis"><text:span text:style-name="T1">"Padre nuestro que estás en los cielos, santificado sea tu nombre. Venga a nos tu reino, hágase tu voluntad así en el cielo como en la tierra. Danos hoy nuestro pan de cada día, perdona nuestras ofensas y a nuestros deudores, como también nosotros perdonamos a nuestros deudores. No nos dejes caer en tentación, más líbranos de todo mal. Porque tuyo es el reino, el poder y la gloria, por todos los siglos. Amén."</text:span></text:span></text:p>
      <text:p text:style-name="P4">¡Gracias a todos! Cuídense, que Dios los bendiga. Adiós.</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1T13:16:18.510290710</meta:creation-date>
    <dc:date>2026-07-02T09:11:17.962232847</dc:date>
    <meta:editing-duration>PT26M36S</meta:editing-duration>
    <meta:editing-cycles>4</meta:editing-cycles>
    <meta:generator>LibreOffice/24.2.7.2$Linux_X86_64 LibreOffice_project/420$Build-2</meta:generator>
    <meta:document-statistic meta:table-count="0" meta:image-count="0" meta:object-count="0" meta:page-count="8" meta:paragraph-count="121" meta:word-count="2150" meta:character-count="12806" meta:non-whitespace-character-count="10771"/>
  </office:meta>
</office:document-meta>
</file>