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2">
      <style:text-properties style:font-name="Padauk Book"/>
    </style:style>
    <style:style style:name="P2" style:family="paragraph" style:parent-style-name="Heading_20_3">
      <style:text-properties style:font-name="Padauk Book"/>
    </style:style>
    <style:style style:name="P3" style:family="paragraph" style:parent-style-name="Horizontal_20_Line">
      <style:text-properties style:font-name="Padauk Book"/>
    </style:style>
    <style:style style:name="P4" style:family="paragraph" style:parent-style-name="Text_20_body">
      <style:text-properties style:font-name="Padauk Book"/>
    </style:style>
    <style:style style:name="P5" style:family="paragraph" style:parent-style-name="Table_20_Contents">
      <style:paragraph-properties fo:text-align="start" style:justify-single-word="false"/>
      <style:text-properties style:font-name="Padauk Book"/>
    </style:style>
    <style:style style:name="P6" style:family="paragraph" style:parent-style-name="Table_20_Heading">
      <style:paragraph-properties fo:text-align="start" style:justify-single-word="false"/>
      <style:text-properties style:font-name="Padauk Book"/>
    </style:style>
    <style:style style:name="P7" style:family="paragraph" style:parent-style-name="Table_20_Contents">
      <style:paragraph-properties fo:text-align="start" style:justify-single-word="false"/>
    </style:style>
    <style:style style:name="P8" style:family="paragraph" style:parent-style-name="Horizontal_20_Line">
      <style:text-properties style:font-name="Padauk Book"/>
    </style:style>
    <style:style style:name="P9" style:family="paragraph" style:parent-style-name="Heading_20_1">
      <style:text-properties style:font-name="Padauk Book"/>
    </style:style>
    <style:style style:name="P10" style:family="paragraph" style:parent-style-name="Heading_20_2">
      <style:text-properties style:font-name="Padauk Book"/>
    </style:style>
    <style:style style:name="P11" style:family="paragraph" style:parent-style-name="Heading_20_3">
      <style:text-properties style:font-name="Padauk Book"/>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0">
      <style:paragraph-properties fo:margin-top="0cm" fo:margin-bottom="0cm" style:contextual-spacing="false"/>
      <style:text-properties style:font-name="Padauk Book"/>
    </style:style>
    <style:style style:name="P28" style:family="paragraph" style:parent-style-name="Text_20_body" style:list-style-name="L14">
      <style:text-properties style:font-name="Padauk Book"/>
    </style:style>
    <style:style style:name="P29" style:family="paragraph" style:parent-style-name="Text_20_body" style:list-style-name="L11"/>
    <style:style style:name="P30" style:family="paragraph" style:parent-style-name="Text_20_body" style:list-style-name="L11">
      <style:paragraph-properties fo:margin-top="0cm" fo:margin-bottom="0cm" style:contextual-spacing="false"/>
    </style:style>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style style:name="P36" style:family="paragraph" style:parent-style-name="Text_20_body" style:list-style-name="L15">
      <style:paragraph-properties fo:margin-top="0cm" fo:margin-bottom="0cm" style:contextual-spacing="false"/>
    </style:style>
    <style:style style:name="P37" style:family="paragraph" style:parent-style-name="Text_20_body" style:list-style-name="L16"/>
    <style:style style:name="P38" style:family="paragraph" style:parent-style-name="Text_20_body" style:list-style-name="L16">
      <style:paragraph-properties fo:margin-top="0cm" fo:margin-bottom="0cm" style:contextual-spacing="false"/>
    </style:style>
    <style:style style:name="P39" style:family="paragraph" style:parent-style-name="Text_20_body" style:list-style-name="L17"/>
    <style:style style:name="P40" style:family="paragraph" style:parent-style-name="Text_20_body" style:list-style-name="L17">
      <style:paragraph-properties fo:margin-top="0cm" fo:margin-bottom="0cm" style:contextual-spacing="false"/>
    </style:style>
    <style:style style:name="P41" style:family="paragraph" style:parent-style-name="Text_20_body" style:list-style-name="L18"/>
    <style:style style:name="P42" style:family="paragraph" style:parent-style-name="Text_20_body" style:list-style-name="L18">
      <style:paragraph-properties fo:margin-top="0cm" fo:margin-bottom="0cm" style:contextual-spacing="false"/>
    </style:style>
    <style:style style:name="P43" style:family="paragraph" style:parent-style-name="Text_20_body" style:list-style-name="L19"/>
    <style:style style:name="P44" style:family="paragraph" style:parent-style-name="Text_20_body" style:list-style-name="L19">
      <style:paragraph-properties fo:margin-top="0cm" fo:margin-bottom="0cm" style:contextual-spacing="false"/>
    </style:style>
    <style:style style:name="P45" style:family="paragraph" style:parent-style-name="Text_20_body" style:list-style-name="L20"/>
    <style:style style:name="P46" style:family="paragraph" style:parent-style-name="Text_20_body" style:list-style-name="L20">
      <style:paragraph-properties fo:margin-top="0cm" fo:margin-bottom="0cm" style:contextual-spacing="false"/>
    </style:style>
    <style:style style:name="P47" style:family="paragraph" style:parent-style-name="Text_20_body" style:list-style-name="L21"/>
    <style:style style:name="P48" style:family="paragraph" style:parent-style-name="Text_20_body" style:list-style-name="L21">
      <style:paragraph-properties fo:margin-top="0cm" fo:margin-bottom="0cm" style:contextual-spacing="false"/>
    </style:style>
    <style:style style:name="P49" style:family="paragraph" style:parent-style-name="Text_20_body" style:list-style-name="L22"/>
    <style:style style:name="P50" style:family="paragraph" style:parent-style-name="Text_20_body" style:list-style-name="L22">
      <style:paragraph-properties fo:margin-top="0cm" fo:margin-bottom="0cm" style:contextual-spacing="false"/>
    </style:style>
    <style:style style:name="P51" style:family="paragraph" style:parent-style-name="Text_20_body" style:list-style-name="L23"/>
    <style:style style:name="P52" style:family="paragraph" style:parent-style-name="Text_20_body" style:list-style-name="L23">
      <style:paragraph-properties fo:margin-top="0cm" fo:margin-bottom="0cm" style:contextual-spacing="false"/>
    </style:style>
    <style:style style:name="P53" style:family="paragraph" style:parent-style-name="Text_20_body" style:list-style-name="L24"/>
    <style:style style:name="P54" style:family="paragraph" style:parent-style-name="Text_20_body" style:list-style-name="L24">
      <style:paragraph-properties fo:margin-top="0cm" fo:margin-bottom="0cm" style:contextual-spacing="false"/>
    </style:style>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6">
      <style:paragraph-properties fo:margin-top="0cm" fo:margin-bottom="0cm" style:contextual-spacing="false"/>
    </style:style>
    <style:style style:name="P58" style:family="paragraph" style:parent-style-name="Text_20_body">
      <style:text-properties style:font-name="Padauk Book"/>
    </style:style>
    <style:style style:name="P59" style:family="paragraph" style:parent-style-name="Text_20_body" style:list-style-name="L25">
      <style:paragraph-properties fo:margin-top="0cm" fo:margin-bottom="0cm" style:contextual-spacing="false"/>
      <style:text-properties style:font-name="Padauk Book"/>
    </style:style>
    <style:style style:name="T1" style:family="text">
      <style:text-properties style:font-name="Padauk Book"/>
    </style:style>
    <style:style style:name="T2"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 CUADERNO DE ESTUDIO: LECCIÓN 12 (PARTE 1)</text:h>
      <text:h text:style-name="P1" text:outline-level="2">Bestia, Cabeza, Cuerno y Cola en Lenguaje Figurativo</text:h>
      <text:p text:style-name="P3"/>
      <text:h text:style-name="P1" text:outline-level="2">🔄 1. Repaso Inicial: Lección 11</text:h>
      <text:p text:style-name="Text_20_body"><text:span text:style-name="Emphasis"><text:span text:style-name="T1">(A cargo del Evangelista Christian Howard)</text:span></text:span></text:p>
      <text:p text:style-name="P4">Antes de comenzar la nueva lección, repasamos los conceptos fundamentales de la lección anterior sobre el mar, el pescador, la red, el pez y el barco:</text:p>
      <text:p text:style-name="Text_20_body"><text:span text:style-name="Strong_20_Emphasis"><text:span text:style-name="T1">Preguntas de Reflexión y Respuestas:</text:span></text:span></text:p>
      <text:list text:style-name="L15">
        <text:list-item>
          <text:p text:style-name="P36"><text:span text:style-name="Strong_20_Emphasis"><text:span text:style-name="T1">¿Qué fue el pescador?</text:span></text:span><text:span text:style-name="T1"> Pastores y evangelistas que usan la palabra para "pescar". </text:span></text:p>
        </text:list-item>
        <text:list-item>
          <text:p text:style-name="P36"><text:span text:style-name="Strong_20_Emphasis"><text:span text:style-name="T1">¿Qué fue la red?</text:span></text:span><text:span text:style-name="T1"> La palabra de Dios. </text:span></text:p>
        </text:list-item>
        <text:list-item>
          <text:p text:style-name="P36"><text:span text:style-name="Strong_20_Emphasis"><text:span text:style-name="T1">¿Qué fueron los peces?</text:span></text:span><text:span text:style-name="T1"> Las personas que están abiertas a la palabra, aunque aún no la comprendan del todo. </text:span></text:p>
        </text:list-item>
        <text:list-item>
          <text:p text:style-name="P36"><text:span text:style-name="Strong_20_Emphasis"><text:span text:style-name="T1">¿Cuál es el destino final de los peces?</text:span></text:span><text:span text:style-name="T1"> El barco o la nave (la Iglesia). Los que no quieren ir, se quedan en la red y son echados de nuevo al mar (el mundo). </text:span></text:p>
        </text:list-item>
        <text:list-item>
          <text:p text:style-name="P36"><text:span text:style-name="Strong_20_Emphasis"><text:span text:style-name="T1">¿Qué es el piloto o capitán?</text:span></text:span><text:span text:style-name="T1"> El pastor, la persona encargada de la iglesia. </text:span></text:p>
        </text:list-item>
        <text:list-item>
          <text:p text:style-name="P36"><text:span text:style-name="Strong_20_Emphasis"><text:span text:style-name="T1">¿Qué son los marineros?</text:span></text:span><text:span text:style-name="T1"> Los funcionarios y líderes que ayudan a los pastores. </text:span></text:p>
        </text:list-item>
        <text:list-item>
          <text:p text:style-name="P36"><text:span text:style-name="Strong_20_Emphasis"><text:span text:style-name="T1">¿Qué son los pasajeros?</text:span></text:span><text:span text:style-name="T1"> Los santos o miembros de la iglesia. </text:span></text:p>
        </text:list-item>
        <text:list-item>
          <text:p text:style-name="P36"><text:span text:style-name="Strong_20_Emphasis"><text:span text:style-name="T1">De acuerdo a Mateo 13:47-50, ¿qué hace un "buen pez" ante los ojos de Dios?</text:span></text:span></text:p>
          <text:list>
            <text:list-item>
              <text:p text:style-name="P35"><text:span text:style-name="Emphasis"><text:span text:style-name="T1">Respuesta:</text:span></text:span><text:span text:style-name="T1"> </text:span><text:span text:style-name="Strong_20_Emphasis"><text:span text:style-name="T1">A) Seguir y permanecer en la palabra.</text:span></text:span><text:span text:style-name="T1"> (Como las ramas que permanecen en la vid, si no permanecemos en la palabra, no tenemos vida).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gracias por enseñarnos todos estos secretos que has querido revelar a tu gente. Teníamos ideas sobre la red y los pescadores, pero no veíamos qué profundas son estas parábolas. Estamos muy agradecidos de tener esta oportunidad de aprender hoy, de ver que tus parábolas tienen lógica y se pueden entender. Gracias por abrir nuestros ojos y corazones espirituales. Tú eres el único que puede revelarnos todo esto. Por favor, sigue mandando tus Espíritus Santos para que toquen nuestros corazones, nos mantengamos humildes y no </text:span></text:span><text:soft-page-break/><text:span text:style-name="Emphasis"><text:span text:style-name="T1">seamos arrogantes, sino que queramos entender tu palabra. Oramos todo esto en tu nombre precioso, Jesucristo. Amén."</text:span></text:span></text:p>
      <text:p text:style-name="P3"/>
      <text:h text:style-name="P1" text:outline-level="2">🏫 2. Introducción: El Significado de las Bestias</text:h>
      <text:p text:style-name="Text_20_body"><text:span text:style-name="Emphasis"><text:span text:style-name="T1">(A cargo del Instructor Sibiani)</text:span></text:span></text:p>
      <text:h text:style-name="P2" text:outline-level="3">📌 La Actitud ante la Palabra</text:h>
      <text:p text:style-name="Text_20_body"><text:span text:style-name="T1">Vivimos en tiempos muy importantes. Ya no estamos en tiempos donde la palabra está sellada o donde simplemente intentamos adivinar el significado de las parábolas. Ya estamos viviendo en </text:span><text:span text:style-name="Strong_20_Emphasis"><text:span text:style-name="T1">tiempos de cumplimiento</text:span></text:span><text:span text:style-name="T1">, donde Dios está revelando esos mismos secretos. El reino de los cielos ya no es solo un lugar al que se va cuando se muere, sino algo que podemos entender plenamente por medio de la palabra de Dios.</text:span></text:p>
      <text:h text:style-name="P2" text:outline-level="3">📖 El Título de la Lección</text:h>
      <text:p text:style-name="P4">Leamos juntos dos veces:</text:p>
      <text:p text:style-name="Quotations"><text:span text:style-name="Strong_20_Emphasis"><text:span text:style-name="T1">"Bestia, cabeza, cuerno y cola en figurativo"</text:span></text:span></text:p>
      <text:p text:style-name="P4">En la lección anterior vimos que del mar salía una bestia. En la Biblia hay bestias físicas, pero también bestias espirituales con cabezas, cuernos y colas (como en Apocalipsis 12, donde la cola de la bestia hace caer un tercio de las estrellas del cielo). Esto no es físico, es espiritual. Debemos entender cada concepto para no malinterpretar las profecías.</text:p>
      <text:p text:style-name="P3"/>
      <text:h text:style-name="P1" text:outline-level="2">🐺 3. Características Físicas y Espirituales de una Bestia</text:h>
      <text:h text:style-name="P2" text:outline-level="3">🧠 Características Físicas</text:h>
      <text:list text:style-name="L16">
        <text:list-item>
          <text:p text:style-name="P38"><text:span text:style-name="Strong_20_Emphasis"><text:span text:style-name="T1">Actúan por instinto, no con razón:</text:span></text:span><text:span text:style-name="T1"> No se puede razonar con una bestia. Si intentas razonar con un león que te va a atacar, no te escuchará; simplemente actuará por instinto y te devorará. </text:span></text:p>
        </text:list-item>
        <text:list-item>
          <text:p text:style-name="P37"><text:span text:style-name="Strong_20_Emphasis"><text:span text:style-name="T1">No entienden la palabra:</text:span></text:span><text:span text:style-name="T1"> Espiritualmente, una bestia no entiende las palabras de Dios. </text:span></text:p>
        </text:list-item>
      </text:list>
      <text:h text:style-name="P2" text:outline-level="3"><text:soft-page-break/>📜 Bestia en Enseñanzas Morales</text:h>
      <text:p text:style-name="Text_20_body"><text:span text:style-name="T1">Cuando la Biblia habla de bestias en un contexto moral, se refiere a </text:span><text:span text:style-name="Strong_20_Emphasis"><text:span text:style-name="T1">una persona que no entiende la palabra de Dios</text:span></text:span><text:span text:style-name="T1">.</text:span></text:p>
      <text:list text:style-name="L17">
        <text:list-item>
          <text:p text:style-name="P40"><text:span text:style-name="Strong_20_Emphasis"><text:span text:style-name="T1">Salmos 49:20:</text:span></text:span><text:span text:style-name="T1"> </text:span><text:span text:style-name="Emphasis"><text:span text:style-name="T1">"El hombre que está en honra y no entiende, semejante es a las bestias que perecen"</text:span></text:span><text:span text:style-name="T1">. No se refiere a ateos necesariamente, sino a creyentes que, aunque adoran y leen la Biblia, no la entienden. </text:span></text:p>
        </text:list-item>
        <text:list-item>
          <text:p text:style-name="P39"><text:span text:style-name="Strong_20_Emphasis"><text:span text:style-name="T1">Proverbios 30:2-3:</text:span></text:span><text:span text:style-name="T1"> </text:span><text:span text:style-name="Emphasis"><text:span text:style-name="T1">"Ciertamente más rudo soy yo que ninguno, ni tengo entendimiento de hombre. Yo ni aprendí sabiduría, ni conozco la ciencia del Santo"</text:span></text:span><text:span text:style-name="T1">. La "ciencia del Santo" no es ciencia natural, es la palabra de Dios que nos santifica. </text:span></text:p>
        </text:list-item>
      </text:list>
      <text:p text:style-name="Text_20_body"><text:span text:style-name="Strong_20_Emphasis"><text:span text:style-name="T1">Diferencia clave:</text:span></text:span><text:span text:style-name="T1"> Una bestia actúa por instinto y no entiende; un hombre (espiritualmente) es una persona que sí conoce y entiende a Dios y su palabra.</text:span></text:p>
      <text:p text:style-name="P3"/>
      <text:h text:style-name="P1" text:outline-level="2">⚙️ 4. Bestia en Profecías: El Orden del Cumplimiento</text:h>
      <text:p text:style-name="Text_20_body"><text:span text:style-name="T1">Cuando hablamos de profecías, las bestias representan eventos y entidades específicas. </text:span><text:span text:style-name="Strong_20_Emphasis"><text:span text:style-name="T1">2 Tesalonicenses 2:2-3</text:span></text:span><text:span text:style-name="T1"> nos muestra el orden que debe cumplirse antes de la venida del Señor:</text:span></text:p>
      <text:list text:style-name="L18">
        <text:list-item>
          <text:p text:style-name="P42"><text:span text:style-name="Strong_20_Emphasis"><text:span text:style-name="T1">Apostasía (Traición):</text:span></text:span><text:span text:style-name="T1"> Un evento de traición por parte de quienes pertenecían a Dios. </text:span></text:p>
        </text:list-item>
        <text:list-item>
          <text:p text:style-name="P42"><text:span text:style-name="Strong_20_Emphasis"><text:span text:style-name="T1">El hombre de pecado (Destrucción):</text:span></text:span><text:span text:style-name="T1"> Un evento de destrucción llevado a cabo por el lado de Satanás. </text:span></text:p>
        </text:list-item>
        <text:list-item>
          <text:p text:style-name="P41"><text:span text:style-name="Strong_20_Emphasis"><text:span text:style-name="T1">La venida del Señor (Salvación):</text:span></text:span><text:span text:style-name="T1"> La reunión de los escogidos. </text:span></text:p>
        </text:list-item>
      </text:list>
      <text:p text:style-name="Text_20_body"><text:span text:style-name="T1">Por lo tanto, en las profecías hay </text:span><text:span text:style-name="Strong_20_Emphasis"><text:span text:style-name="T1">tres tipos de bestias</text:span></text:span><text:span text:style-name="T1"> que representan estos tres tipos de eventos y entidades:</text:span></text:p>
      <text:list text:style-name="L19">
        <text:list-item>
          <text:p text:style-name="P44"><text:span text:style-name="T1">Bestias que representan </text:span><text:span text:style-name="Strong_20_Emphasis"><text:span text:style-name="T1">apóstatas/traidores</text:span></text:span><text:span text:style-name="T1">. </text:span></text:p>
        </text:list-item>
        <text:list-item>
          <text:p text:style-name="P44"><text:span text:style-name="T1">Bestias que representan </text:span><text:span text:style-name="Strong_20_Emphasis"><text:span text:style-name="T1">destructores</text:span></text:span><text:span text:style-name="T1">. </text:span></text:p>
        </text:list-item>
        <text:list-item>
          <text:p text:style-name="P43"><text:span text:style-name="T1">Bestias que representan </text:span><text:span text:style-name="Strong_20_Emphasis"><text:span text:style-name="T1">salvación</text:span></text:span><text:span text:style-name="T1">. </text:span></text:p>
        </text:list-item>
      </text:list>
      <text:p text:style-name="P3"/>
      <text:h text:style-name="P1" text:outline-level="2"><text:soft-page-break/>🐕 5. Bestias que Representan a los Apóstatas (Traidores)</text:h>
      <text:p text:style-name="P4">Para traicionar, primero hay que pertenecer al bando. Un enemigo no puede traicionar; solo un amigo o alguien del mismo bando puede hacerlo. Estos son los que caminaron con Dios pero le dieron la espalda.</text:p>
      <text:list text:style-name="L20">
        <text:list-item>
          <text:p text:style-name="P46"><text:span text:style-name="Strong_20_Emphasis"><text:span text:style-name="T1">2 Pedro 2:20-22:</text:span></text:span><text:span text:style-name="T1"> Habla de aquellos que escaparon de las contaminaciones del mundo por el conocimiento de Jesús, pero se enredaron de nuevo. Su estado final es peor que el primero. Se les compara con el proverbio: </text:span><text:span text:style-name="Emphasis"><text:span text:style-name="T1">"El perro vuelve a su vómito, y la puerca lavada a revolcarse en el cieno"</text:span></text:span><text:span text:style-name="T1">. El perro y el cerdo representan a los que, habiendo sido limpiados por la palabra, vuelven a aceptar las mentiras y pensamientos humanos que habían desechado. </text:span></text:p>
        </text:list-item>
        <text:list-item>
          <text:p text:style-name="P46"><text:span text:style-name="Strong_20_Emphasis"><text:span text:style-name="T1">Isaías 56:9-11:</text:span></text:span><text:span text:style-name="T1"> Llama a estos apóstatas </text:span><text:span text:style-name="Emphasis"><text:span text:style-name="T1">"perros mudos"</text:span></text:span><text:span text:style-name="T1">, </text:span><text:span text:style-name="Emphasis"><text:span text:style-name="T1">"soñolientos"</text:span></text:span><text:span text:style-name="T1"> y </text:span><text:span text:style-name="Emphasis"><text:span text:style-name="T1">"pastores que no saben entender"</text:span></text:span><text:span text:style-name="T1">. Al no entender, enseñan sus propios caminos y buscan su propio provecho, no el de Dios. </text:span></text:p>
        </text:list-item>
        <text:list-item>
          <text:p text:style-name="P45"><text:span text:style-name="Strong_20_Emphasis"><text:span text:style-name="T1">Mateo 15:24:</text:span></text:span><text:span text:style-name="T1"> Jesús dice que fue enviado a las </text:span><text:span text:style-name="Emphasis"><text:span text:style-name="T1">"ovejas perdidas de la casa de Israel"</text:span></text:span><text:span text:style-name="T1">. Las ovejas perdidas son aquellos que, siendo del pueblo de Dios, se alejaron y traicionaron el pacto (como en los tiempos de Salomón, adorando dioses gentiles). </text:span></text:p>
        </text:list-item>
      </text:list>
      <text:p text:style-name="P3"/>
      <text:h text:style-name="P1" text:outline-level="2">🐍 6. Bestias que Representan a los Destructores</text:h>
      <text:p text:style-name="Text_20_body"><text:span text:style-name="T1">A diferencia de los apóstatas, los destructores </text:span><text:span text:style-name="Strong_20_Emphasis"><text:span text:style-name="T1">nunca pertenecieron a Dios</text:span></text:span><text:span text:style-name="T1">; pertenecen a Satanás desde el principio y su objetivo es devorar al pueblo de Dios.</text:span></text:p>
      <text:list text:style-name="L21">
        <text:list-item>
          <text:p text:style-name="P48"><text:span text:style-name="Strong_20_Emphasis"><text:span text:style-name="T1">Mateo 7:15:</text:span></text:span><text:span text:style-name="T1"> </text:span><text:span text:style-name="Emphasis"><text:span text:style-name="T1">"Guardaos de los falsos profetas, que vienen a vosotros con vestidos de ovejas, pero por dentro son lobos rapaces"</text:span></text:span><text:span text:style-name="T1">. El lobo es una bestia salvaje que devora a las ovejas (las ovejas perdidas son las primeras en ser devoradas). </text:span></text:p>
        </text:list-item>
        <text:list-item>
          <text:p text:style-name="P48"><text:span text:style-name="Strong_20_Emphasis"><text:span text:style-name="T1">Génesis 3:1:</text:span></text:span><text:span text:style-name="T1"> La serpiente era </text:span><text:span text:style-name="Emphasis"><text:span text:style-name="T1">"astuta"</text:span></text:span><text:span text:style-name="T1">. No era una serpiente literal que hablaba, sino una entidad espiritual (Satanás) que usó la astucia y la falsedad (veneno) para engañar y destruir espiritualmente a Adán y Eva. Jesús llamó a los fariseos </text:span><text:span text:style-name="Emphasis"><text:span text:style-name="T1">"generación de víboras"</text:span></text:span><text:span text:style-name="T1"> porque de su boca salía falsedad (veneno) que mataba el espíritu. </text:span></text:p>
        </text:list-item>
        <text:list-item>
          <text:p text:style-name="P48"><text:span text:style-name="Strong_20_Emphasis"><text:span text:style-name="T1">Apocalipsis 13:1-2:</text:span></text:span><text:span text:style-name="T1"> La bestia que sube del mar tiene siete cabezas y diez cuernos, y es semejante a un </text:span><text:span text:style-name="Strong_20_Emphasis"><text:span text:style-name="T1">leopardo</text:span></text:span><text:span text:style-name="T1">, con pies de </text:span><text:span text:style-name="Strong_20_Emphasis"><text:span text:style-name="T1">oso</text:span></text:span><text:span text:style-name="T1"> y boca de </text:span><text:span text:style-name="Strong_20_Emphasis"><text:span text:style-name="T1">león</text:span></text:span><text:span text:style-name="T1">. Estas son bestias </text:span><text:soft-page-break/><text:span text:style-name="T1">salvajes que cazan y devoran. Representa a los falsos pastores y entidades de Satanás que buscan devorar a los que no tienen bien la palabra de Dios. </text:span></text:p>
        </text:list-item>
        <text:list-item>
          <text:p text:style-name="P47"><text:span text:style-name="Strong_20_Emphasis"><text:span text:style-name="T1">Joel 1:4-7:</text:span></text:span><text:span text:style-name="T1"> Menciona la </text:span><text:span text:style-name="Strong_20_Emphasis"><text:span text:style-name="T1">oruga, el saltón, la langosta y el revolton</text:span></text:span><text:span text:style-name="T1">. Estos insectos no devoran animales, sino </text:span><text:span text:style-name="Strong_20_Emphasis"><text:span text:style-name="T1">plantas y árboles</text:span></text:span><text:span text:style-name="T1">. En la Biblia, el pueblo de Dios se compara con árboles y plantas (Isaías 5). Estos destructores son falsos pastores que, con sus palabras de falsedad, "comen" y dañan espiritualmente al pueblo escogido de Dios. </text:span></text:p>
        </text:list-item>
      </text:list>
      <text:p text:style-name="P3"/>
      <text:h text:style-name="P1" text:outline-level="2">🐑 7. Bestias que Representan la Salvación</text:h>
      <text:p text:style-name="P4">No todas las bestias o animales en la Biblia son malos. Dios también utiliza figuras de animales para representar a aquellos que obran para Él, pertenecen a Él y permanecen fieles hasta el fin.</text:p>
      <text:list text:style-name="L22">
        <text:list-item>
          <text:p text:style-name="P50"><text:span text:style-name="Strong_20_Emphasis"><text:span text:style-name="T1">El Cordero (Juan 1:29):</text:span></text:span><text:span text:style-name="T1"> </text:span><text:span text:style-name="Emphasis"><text:span text:style-name="T1">"He aquí el Cordero de Dios, que quita el pecado del mundo"</text:span></text:span><text:span text:style-name="T1">. Jesús es el cordero inmolado, el animal de salvación por excelencia que pertenece a Dios de inicio a fin. </text:span></text:p>
        </text:list-item>
        <text:list-item>
          <text:p text:style-name="P50"><text:span text:style-name="Strong_20_Emphasis"><text:span text:style-name="T1">Las Ovejas (Mateo 25:31-34):</text:span></text:span><text:span text:style-name="T1"> Jesús es el buen pastor, y las ovejas que permanecen cerca del pastor (los discípulos y creyentes fieles) son utilizadas por Dios para hacer su obra de salvación, compartiendo la palabra con otros. </text:span></text:p>
        </text:list-item>
        <text:list-item>
          <text:p text:style-name="P50"><text:span text:style-name="Strong_20_Emphasis"><text:span text:style-name="T1">El Buey (1 Corintios 9:9-10):</text:span></text:span><text:span text:style-name="T1"> </text:span><text:span text:style-name="Emphasis"><text:span text:style-name="T1">"No pondrás bozal al buey que trilla"</text:span></text:span><text:span text:style-name="T1">. Pablo explica que esto no es por los bueyes literales, sino por nosotros. El buey representa a los </text:span><text:span text:style-name="Strong_20_Emphasis"><text:span text:style-name="T1">trabajadores de Dios</text:span></text:span><text:span text:style-name="T1"> que aran y preparan el campo (el corazón de las personas) para sembrar la semilla (la palabra). No se les debe tapar la boca, porque sus palabras son para salvación y bendición. </text:span></text:p>
        </text:list-item>
        <text:list-item>
          <text:p text:style-name="P49"><text:span text:style-name="Strong_20_Emphasis"><text:span text:style-name="T1">El Caballo Blanco (Apocalipsis 19:11):</text:span></text:span><text:span text:style-name="T1"> </text:span><text:span text:style-name="Emphasis"><text:span text:style-name="T1">"Vi el cielo abierto, y he aquí un caballo blanco, y el que lo montaba se llamaba Fiel y Verdadero, y con justicia juzga y pelea"</text:span></text:span><text:span text:style-name="T1">. El jinete es Jesús. El caballo representa la carne (la persona) que es dirigida y controlada por el espíritu (el jinete). Representa al verdadero pastor y al pueblo de Dios que tiene la palabra revelada y pelea con justicia. </text:span></text:p>
        </text:list-item>
      </text:list>
      <text:p text:style-name="P3"/>
      <text:h text:style-name="P1" text:outline-level="2"><text:soft-page-break/>🎯 8. Conclusiones y Repaso Final</text:h>
      <text:h text:style-name="P2" text:outline-level="3">📌 Resumen de la Primera Venida</text:h>
      <text:list text:style-name="L23">
        <text:list-item>
          <text:p text:style-name="P52"><text:span text:style-name="Strong_20_Emphasis"><text:span text:style-name="T1">Apóstatas (Traidores):</text:span></text:span><text:span text:style-name="T1"> Las ovejas perdidas de Israel que se alejaron de Dios. </text:span></text:p>
        </text:list-item>
        <text:list-item>
          <text:p text:style-name="P52"><text:span text:style-name="Strong_20_Emphasis"><text:span text:style-name="T1">Destructores:</text:span></text:span><text:span text:style-name="T1"> Los lobos rapaces, fariseos y maestros de la ley que engañaban y devoraban al pueblo con falsedad (la serpiente). </text:span></text:p>
        </text:list-item>
        <text:list-item>
          <text:p text:style-name="P51"><text:span text:style-name="Strong_20_Emphasis"><text:span text:style-name="T1">Salvación:</text:span></text:span><text:span text:style-name="T1"> El Cordero de Dios (Jesús) y sus ovejas (los 12 discípulos) que lucharon contra la oscuridad y llevaron a las personas de las tinieblas a la luz. </text:span></text:p>
        </text:list-item>
      </text:list>
      <text:h text:style-name="P2" text:outline-level="3">📌 Resumen de los Animales en Figurativo</text:h>
      <text:list text:style-name="L24">
        <text:list-item>
          <text:p text:style-name="P54"><text:span text:style-name="Strong_20_Emphasis"><text:span text:style-name="T1">Apóstatas:</text:span></text:span><text:span text:style-name="T1"> Perros, cerdos, ovejas perdidas. </text:span></text:p>
        </text:list-item>
        <text:list-item>
          <text:p text:style-name="P54"><text:span text:style-name="Strong_20_Emphasis"><text:span text:style-name="T1">Destructores:</text:span></text:span><text:span text:style-name="T1"> Lobos, serpientes, insectos (langostas, orugas) que devoran plantas. </text:span></text:p>
        </text:list-item>
        <text:list-item>
          <text:p text:style-name="P53"><text:span text:style-name="Strong_20_Emphasis"><text:span text:style-name="T1">Salvación:</text:span></text:span><text:span text:style-name="T1"> Cordero, ovejas fieles, buey, caballo blanco. </text:span></text:p>
        </text:list-item>
      </text:list>
      <text:p text:style-name="Text_20_body"><text:span text:style-name="Strong_20_Emphasis"><text:span text:style-name="T1">Reflexión Final:</text:span></text:span><text:span text:style-name="T1"> No todos los animales o bestias en la Biblia tienen un significado malo. Debemos observar las </text:span><text:span text:style-name="Strong_20_Emphasis"><text:span text:style-name="T1">acciones y las palabras</text:span></text:span><text:span text:style-name="T1"> de las personas para discernir si se están alejando de Dios (apostasía), si son lobos que destruyen, o si son parte del rebaño que permanece fiel. El estándar para distinguir siempre es la </text:span><text:span text:style-name="Strong_20_Emphasis"><text:span text:style-name="T1">palabra de verdad</text:span></text:span><text:span text:style-name="T1">.</text:span></text:p>
      <text:p text:style-name="Text_20_body"><text:span text:style-name="Strong_20_Emphasis"><text:span text:style-name="T1">📢 Anuncios:</text:span></text:span></text:p>
      <text:list text:style-name="L25">
        <text:list-item>
          <text:p text:style-name="P59">La próxima semana nos reuniremos todos para resolver dudas sobre las lecciones vistas. Se recomienda volver a ver los videos y repasar los apuntes. </text:p>
        </text:list-item>
        <text:list-item>
          <text:p text:style-name="P55"><text:span text:style-name="T1">La próxima lección continuaremos con el significado de </text:span><text:span text:style-name="Strong_20_Emphasis"><text:span text:style-name="T1">Cabeza, Cuerno y Cola</text:span></text:span><text:span text:style-name="T1"> en figurativo. </text:span></text:p>
        </text:list-item>
      </text:list>
      <text:p text:style-name="P3"/>
      <text:h text:style-name="P1" text:outline-level="2">🔄 9. Repaso Interactivo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26">
        <text:list-item>
          <text:p text:style-name="P57"><text:span text:style-name="Strong_20_Emphasis"><text:span text:style-name="T1">¿Cuál es la diferencia entre una bestia y un hombre en sentido figurativo?</text:span></text:span><text:span text:style-name="T1"> La bestia no entiende la palabra de Dios (aunque la haya escuchado), mientras que el hombre sí la entiende. </text:span></text:p>
        </text:list-item>
        <text:list-item>
          <text:p text:style-name="P57"><text:span text:style-name="Strong_20_Emphasis"><text:span text:style-name="T1">¿Cuál es el orden de cumplimiento en las profecías?</text:span></text:span><text:span text:style-name="T1"> Traición (apóstatas), Destrucción (destructores) y Salvación. </text:span></text:p>
        </text:list-item>
        <text:list-item>
          <text:p text:style-name="P57"><text:soft-page-break/><text:span text:style-name="Strong_20_Emphasis"><text:span text:style-name="T1">¿Cuál es la diferencia clave entre un apóstata y un destructor?</text:span></text:span><text:span text:style-name="T1"> El apóstata pertenecía a Dios y se alejó; el destructor nunca fue de Dios. </text:span></text:p>
        </text:list-item>
        <text:list-item>
          <text:p text:style-name="P57"><text:span text:style-name="Strong_20_Emphasis"><text:span text:style-name="T1">¿Qué animales representan a los apóstatas?</text:span></text:span><text:span text:style-name="T1"> Perros, cerdos y ovejas perdidas. </text:span></text:p>
        </text:list-item>
        <text:list-item>
          <text:p text:style-name="P57"><text:span text:style-name="Strong_20_Emphasis"><text:span text:style-name="T1">¿Qué animales representan a los destructores?</text:span></text:span><text:span text:style-name="T1"> Lobos, serpientes e insectos (langostas, orugas). </text:span></text:p>
        </text:list-item>
        <text:list-item>
          <text:p text:style-name="P56"><text:span text:style-name="Strong_20_Emphasis"><text:span text:style-name="T1">¿Qué animales representan a los que pertenecen a Dios (salvación)?</text:span></text:span><text:span text:style-name="T1"> Cordero, ovejas, buey y caballo blanco. </text:span></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span></text:p>
      <text:p text:style-name="P4">¡Gracias a todos! Cuídense, sigan estudiando y repasando. ¡Nos vemos la próxima semana!</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17T09:09:17.930760351</dc:date>
    <meta:editing-duration>PT2H58M16S</meta:editing-duration>
    <meta:editing-cycles>16</meta:editing-cycles>
    <meta:generator>LibreOffice/24.2.7.2$Linux_X86_64 LibreOffice_project/420$Build-2</meta:generator>
    <meta:document-statistic meta:table-count="0" meta:image-count="0" meta:object-count="0" meta:page-count="7" meta:paragraph-count="85" meta:word-count="1931" meta:character-count="11305" meta:non-whitespace-character-count="9460"/>
  </office:meta>
</office:document-meta>
</file>