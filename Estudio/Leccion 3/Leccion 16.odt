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Tabla1" style:family="table">
      <style:table-properties style:width="17cm" table:align="left"/>
    </style:style>
    <style:style style:name="Tabla1.A" style:family="table-column">
      <style:table-column-properties style:column-width="2.205cm"/>
    </style:style>
    <style:style style:name="Tabla1.B" style:family="table-column">
      <style:table-column-properties style:column-width="6.865cm"/>
    </style:style>
    <style:style style:name="Tabla1.C" style:family="table-column">
      <style:table-column-properties style:column-width="7.93cm"/>
    </style:style>
    <style:style style:name="Tabla1.A1" style:family="table-cell">
      <style:table-cell-properties style:vertical-align="middle" fo:padding="0.049cm" fo:border="none"/>
    </style:style>
    <style:style style:name="P1" style:family="paragraph" style:parent-style-name="Heading_20_2">
      <style:text-properties style:font-name="Padauk Book"/>
    </style:style>
    <style:style style:name="P2" style:family="paragraph" style:parent-style-name="Heading_20_3">
      <style:text-properties style:font-name="Padauk Book"/>
    </style:style>
    <style:style style:name="P3" style:family="paragraph" style:parent-style-name="Horizontal_20_Line">
      <style:text-properties style:font-name="Padauk Book"/>
    </style:style>
    <style:style style:name="P4" style:family="paragraph" style:parent-style-name="Text_20_body">
      <style:text-properties style:font-name="Padauk Book"/>
    </style:style>
    <style:style style:name="P5" style:family="paragraph" style:parent-style-name="Table_20_Contents">
      <style:paragraph-properties fo:text-align="start" style:justify-single-word="false"/>
      <style:text-properties style:font-name="Padauk Book"/>
    </style:style>
    <style:style style:name="P6" style:family="paragraph" style:parent-style-name="Table_20_Heading">
      <style:paragraph-properties fo:text-align="start" style:justify-single-word="false"/>
      <style:text-properties style:font-name="Padauk Book"/>
    </style:style>
    <style:style style:name="P7" style:family="paragraph" style:parent-style-name="Table_20_Contents">
      <style:paragraph-properties fo:text-align="start" style:justify-single-word="false"/>
    </style:style>
    <style:style style:name="P8" style:family="paragraph" style:parent-style-name="Horizontal_20_Line">
      <style:text-properties style:font-name="Padauk Book"/>
    </style:style>
    <style:style style:name="P9" style:family="paragraph" style:parent-style-name="Heading_20_1">
      <style:text-properties style:font-name="Padauk Book"/>
    </style:style>
    <style:style style:name="P10" style:family="paragraph" style:parent-style-name="Heading_20_2">
      <style:text-properties style:font-name="Padauk Book"/>
    </style:style>
    <style:style style:name="P11" style:family="paragraph" style:parent-style-name="Heading_20_3">
      <style:text-properties style:font-name="Padauk Book"/>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style:font-name="Padauk Book"/>
    </style:style>
    <style:style style:name="P14" style:family="paragraph" style:parent-style-name="Table_20_Heading">
      <style:paragraph-properties fo:text-align="start" style:justify-single-word="false"/>
      <style:text-properties style:font-name="Padauk Book"/>
    </style:style>
    <style:style style:name="P15" style:family="paragraph" style:parent-style-name="Text_20_body" style:list-style-name="L1"/>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paragraph-properties fo:margin-top="0cm" fo:margin-bottom="0cm" style:contextual-spacing="false"/>
    </style:style>
    <style:style style:name="P20" style:family="paragraph" style:parent-style-name="Text_20_body" style:list-style-name="L4"/>
    <style:style style:name="P21" style:family="paragraph" style:parent-style-name="Text_20_body" style:list-style-name="L4">
      <style:paragraph-properties fo:margin-top="0cm" fo:margin-bottom="0cm" style:contextual-spacing="false"/>
      <style:text-properties style:font-name="Padauk Book"/>
    </style:style>
    <style:style style:name="P22" style:family="paragraph" style:parent-style-name="Text_20_body" style:list-style-name="L5">
      <style:text-properties style:font-name="Padauk Book"/>
    </style:style>
    <style:style style:name="P23" style:family="paragraph" style:parent-style-name="Text_20_body" style:list-style-name="L7">
      <style:text-properties style:font-name="Padauk Book"/>
    </style:style>
    <style:style style:name="P24" style:family="paragraph" style:parent-style-name="Text_20_body" style:list-style-name="L15">
      <style:paragraph-properties fo:margin-top="0cm" fo:margin-bottom="0cm" style:contextual-spacing="false"/>
      <style:text-properties style:font-name="Padauk Book"/>
    </style:style>
    <style:style style:name="P25" style:family="paragraph" style:parent-style-name="Text_20_body" style:list-style-name="L15">
      <style:text-properties style:font-name="Padauk Book"/>
    </style:style>
    <style:style style:name="P26" style:family="paragraph" style:parent-style-name="Text_20_body" style:list-style-name="L6"/>
    <style:style style:name="P27" style:family="paragraph" style:parent-style-name="Text_20_body" style:list-style-name="L8"/>
    <style:style style:name="P28" style:family="paragraph" style:parent-style-name="Text_20_body" style:list-style-name="L8">
      <style:paragraph-properties fo:margin-top="0cm" fo:margin-bottom="0cm" style:contextual-spacing="false"/>
    </style:style>
    <style:style style:name="P29" style:family="paragraph" style:parent-style-name="Text_20_body" style:list-style-name="L9"/>
    <style:style style:name="P30" style:family="paragraph" style:parent-style-name="Text_20_body" style:list-style-name="L9">
      <style:paragraph-properties fo:margin-top="0cm" fo:margin-bottom="0cm" style:contextual-spacing="false"/>
    </style:style>
    <style:style style:name="P31" style:family="paragraph" style:parent-style-name="Text_20_body" style:list-style-name="L10"/>
    <style:style style:name="P32" style:family="paragraph" style:parent-style-name="Text_20_body" style:list-style-name="L10">
      <style:paragraph-properties fo:margin-top="0cm" fo:margin-bottom="0cm" style:contextual-spacing="false"/>
    </style:style>
    <style:style style:name="P33" style:family="paragraph" style:parent-style-name="Text_20_body" style:list-style-name="L11"/>
    <style:style style:name="P34" style:family="paragraph" style:parent-style-name="Text_20_body" style:list-style-name="L11">
      <style:paragraph-properties fo:margin-top="0cm" fo:margin-bottom="0cm" style:contextual-spacing="false"/>
    </style:style>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3">
      <style:paragraph-properties fo:margin-top="0cm" fo:margin-bottom="0cm" style:contextual-spacing="false"/>
    </style:style>
    <style:style style:name="P38" style:family="paragraph" style:parent-style-name="Text_20_body" style:list-style-name="L14"/>
    <style:style style:name="P39" style:family="paragraph" style:parent-style-name="Text_20_body" style:list-style-name="L14">
      <style:paragraph-properties fo:margin-top="0cm" fo:margin-bottom="0cm" style:contextual-spacing="false"/>
    </style:style>
    <style:style style:name="P40" style:family="paragraph" style:parent-style-name="Text_20_body" style:list-style-name="L15">
      <style:paragraph-properties fo:margin-top="0cm" fo:margin-bottom="0cm" style:contextual-spacing="false"/>
    </style:style>
    <style:style style:name="P41" style:family="paragraph" style:parent-style-name="Text_20_body" style:list-style-name="L16"/>
    <style:style style:name="P42" style:family="paragraph" style:parent-style-name="Text_20_body" style:list-style-name="L16">
      <style:paragraph-properties fo:margin-top="0cm" fo:margin-bottom="0cm" style:contextual-spacing="false"/>
    </style:style>
    <style:style style:name="P43" style:family="paragraph" style:parent-style-name="Text_20_body" style:list-style-name="L17"/>
    <style:style style:name="P44" style:family="paragraph" style:parent-style-name="Text_20_body" style:list-style-name="L17">
      <style:paragraph-properties fo:margin-top="0cm" fo:margin-bottom="0cm" style:contextual-spacing="false"/>
    </style:style>
    <style:style style:name="P45" style:family="paragraph" style:parent-style-name="Text_20_body" style:list-style-name="L18"/>
    <style:style style:name="P46" style:family="paragraph" style:parent-style-name="Text_20_body" style:list-style-name="L18">
      <style:paragraph-properties fo:margin-top="0cm" fo:margin-bottom="0cm" style:contextual-spacing="false"/>
    </style:style>
    <style:style style:name="P47" style:family="paragraph" style:parent-style-name="Text_20_body" style:list-style-name="L19"/>
    <style:style style:name="P48" style:family="paragraph" style:parent-style-name="Text_20_body" style:list-style-name="L19">
      <style:paragraph-properties fo:margin-top="0cm" fo:margin-bottom="0cm" style:contextual-spacing="false"/>
    </style:style>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3">
      <style:paragraph-properties fo:margin-top="0cm" fo:margin-bottom="0cm" style:contextual-spacing="false"/>
    </style:style>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6">
      <style:paragraph-properties fo:margin-top="0cm" fo:margin-bottom="0cm" style:contextual-spacing="false"/>
    </style:style>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8">
      <style:paragraph-properties fo:margin-top="0cm" fo:margin-bottom="0cm" style:contextual-spacing="false"/>
    </style:style>
    <style:style style:name="P61" style:family="paragraph" style:parent-style-name="Text_20_body" style:list-style-name="L29">
      <style:paragraph-properties fo:margin-top="0cm" fo:margin-bottom="0cm" style:contextual-spacing="false"/>
    </style:style>
    <style:style style:name="P62" style:family="paragraph" style:parent-style-name="Text_20_body">
      <style:text-properties style:font-name="Padauk Book"/>
    </style:style>
    <style:style style:name="P63" style:family="paragraph" style:parent-style-name="Text_20_body" style:list-style-name="L25">
      <style:paragraph-properties fo:margin-top="0cm" fo:margin-bottom="0cm" style:contextual-spacing="false"/>
      <style:text-properties style:font-name="Padauk Book"/>
    </style:style>
    <style:style style:name="P64" style:family="paragraph" style:parent-style-name="Text_20_body" style:list-style-name="L29">
      <style:text-properties style:font-name="Padauk Book"/>
    </style:style>
    <style:style style:name="T1" style:family="text">
      <style:text-properties style:font-name="Padauk Book"/>
    </style:style>
    <style:style style:name="T2"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 CUADERNO DE ESTUDIO: LECCIÓN 11 (PARTE 2)</text:h>
      <text:h text:style-name="P1" text:outline-level="2">Mar, Pescador, Red, Pez y Barco en Lenguaje Figurativo</text:h>
      <text:p text:style-name="P3"/>
      <text:h text:style-name="P1" text:outline-level="2">🔄 1. Repaso Inicial: Tesoro y Hombre Rico</text:h>
      <text:p text:style-name="Text_20_body"><text:span text:style-name="Emphasis"><text:span text:style-name="T1">(A cargo del Evangelista Christian Howard)</text:span></text:span></text:p>
      <text:p text:style-name="P4">Antes de comenzar la segunda parte de la lección, repasamos los conceptos fundamentales de la lección anterior sobre el tesoro y el hombre rico:</text:p>
      <text:p text:style-name="Text_20_body"><text:span text:style-name="Strong_20_Emphasis"><text:span text:style-name="T1">Preguntas de Reflexión y Respuestas:</text:span></text:span></text:p>
      <text:list text:style-name="L16">
        <text:list-item>
          <text:p text:style-name="P42"><text:span text:style-name="Strong_20_Emphasis"><text:span text:style-name="T1">¿Cuál es el significado figurativo de tesoro?</text:span></text:span></text:p>
          <text:list>
            <text:list-item>
              <text:p text:style-name="P42"><text:span text:style-name="Emphasis"><text:span text:style-name="T1">Respuesta:</text:span></text:span><text:span text:style-name="T1"> Son las </text:span><text:span text:style-name="Strong_20_Emphasis"><text:span text:style-name="T1">palabras</text:span></text:span><text:span text:style-name="T1"> y también las </text:span><text:span text:style-name="Strong_20_Emphasis"><text:span text:style-name="T1">personas que tienen esa palabra</text:span></text:span><text:span text:style-name="T1"> en su corazón. </text:span></text:p>
            </text:list-item>
          </text:list>
        </text:list-item>
        <text:list-item>
          <text:p text:style-name="P42"><text:span text:style-name="Strong_20_Emphasis"><text:span text:style-name="T1">¿Qué representa cada tesoro (el de Dios y el de Satanás)?</text:span></text:span></text:p>
          <text:list>
            <text:list-item>
              <text:p text:style-name="P42"><text:span text:style-name="Emphasis"><text:span text:style-name="T1">Tesoro de Dios:</text:span></text:span><text:span text:style-name="T1"> La palabra de verdad y las personas (pastores verdaderos) que la tienen y la comparten. </text:span></text:p>
            </text:list-item>
            <text:list-item>
              <text:p text:style-name="P42"><text:span text:style-name="Emphasis"><text:span text:style-name="T1">Tesoro de Satanás:</text:span></text:span><text:span text:style-name="T1"> Las mentiras (falsedades que mezclan la palabra de Dios con pensamientos humanos) y los pastores falsos que las enseñan. </text:span></text:p>
            </text:list-item>
          </text:list>
        </text:list-item>
        <text:list-item>
          <text:p text:style-name="P42"><text:span text:style-name="Strong_20_Emphasis"><text:span text:style-name="T1">¿De qué está formada la Ciudad Santa Nueva Jerusalén (que es como oro, perlas y cristal)?</text:span></text:span></text:p>
          <text:list>
            <text:list-item>
              <text:p text:style-name="P41"><text:span text:style-name="Emphasis"><text:span text:style-name="T1">Respuesta:</text:span></text:span><text:span text:style-name="T1"> No es una ciudad física, sino una </text:span><text:span text:style-name="Strong_20_Emphasis"><text:span text:style-name="T1">organización celestial</text:span></text:span><text:span text:style-name="T1"> formada por la palabra de la verdad y la gente (los hijos de Dios) que tiene y entiende esa palabra de verdad. </text:span></text:p>
            </text:list-item>
          </text:list>
        </text:list-item>
      </text:list>
      <text:p text:style-name="Text_20_body"><text:span text:style-name="Strong_20_Emphasis"><text:span text:style-name="T1">Oración de apertura:</text:span></text:span></text:p>
      <text:p text:style-name="Quotations"><text:span text:style-name="Emphasis"><text:span text:style-name="T1">"Santísimo Padre Dios, creador de toda la creación, gracias por darnos esta palabra. Gracias por enseñarnos qué significan estas riquezas, qué significa este oro y plata. Muchas veces pensamos muy físico, pero ya podemos entender que este oro es tu palabra verdadera. Dios, gracias por esta oportunidad, por darnos tu palabra y estar sellados con ella para entenderte más y más cada día. Sabemos que tenemos muchos sedimentos y poco a poco los estamos quitando y vaciando de nuestra copa para que tú puedas poner más y más tu palabra </text:span></text:span><text:soft-page-break/><text:span text:style-name="Emphasis"><text:span text:style-name="T1">dentro de nosotros. Oramos por los hermanos y hermanas que no han podido venir por problemas de conexión o de salud; por favor, cuídalos y guíalos para que puedan venir y escuchar tu palabra. Oramos todo esto en tu hijo perfecto, Jesucristo. Amén."</text:span></text:span></text:p>
      <text:p text:style-name="P3"/>
      <text:h text:style-name="P1" text:outline-level="2">🌊 2. Introducción: El Mar y sus Características Espirituales</text:h>
      <text:p text:style-name="Text_20_body"><text:span text:style-name="Emphasis"><text:span text:style-name="T1">(A cargo del Instructor Sibiani)</text:span></text:span></text:p>
      <text:h text:style-name="P2" text:outline-level="3">📌 Recordatorios de Etiqueta</text:h>
      <text:list text:style-name="L17">
        <text:list-item>
          <text:p text:style-name="P44"><text:span text:style-name="Strong_20_Emphasis"><text:span text:style-name="T1">Actitud:</text:span></text:span><text:span text:style-name="T1"> Estamos delante de la Palabra de Dios, por lo que debemos mostrar respeto (cámara encendida, Biblia y cuaderno a mano). </text:span></text:p>
        </text:list-item>
        <text:list-item>
          <text:p text:style-name="P43"><text:span text:style-name="Strong_20_Emphasis"><text:span text:style-name="T1">Enfoque:</text:span></text:span><text:span text:style-name="T1"> No nos cansemos de repasar. Satanás siempre está listo para llevarse la semilla si no la retenemos con esfuerzo y oración. </text:span></text:p>
        </text:list-item>
      </text:list>
      <text:h text:style-name="P2" text:outline-level="3">📖 El Título de la Lección</text:h>
      <text:p text:style-name="P4">Leamos juntos dos veces:</text:p>
      <text:p text:style-name="Quotations"><text:span text:style-name="Strong_20_Emphasis"><text:span text:style-name="T1">"Mar, pescador, red, pez y barco en figurativo. Parte dos"</text:span></text:span></text:p>
      <text:p text:style-name="Text_20_body"><text:span text:style-name="T1">En la primera parte vimos que el </text:span><text:span text:style-name="Strong_20_Emphasis"><text:span text:style-name="T1">mar representa al mundo</text:span></text:span><text:span text:style-name="T1">, pero específicamente al </text:span><text:span text:style-name="Strong_20_Emphasis"><text:span text:style-name="T1">mundo religioso o el mundo de los creyentes</text:span></text:span><text:span text:style-name="T1">. No estamos hablando solo de ateos o de otras religiones, sino del entorno donde hay muchas denominaciones y muchas "aguas" (palabras) mezcladas.</text:span></text:p>
      <text:h text:style-name="P2" text:outline-level="3">🧂 La Analogía de la Sal y el Veneno</text:h>
      <text:list text:style-name="L18">
        <text:list-item>
          <text:p text:style-name="P46"><text:span text:style-name="Strong_20_Emphasis"><text:span text:style-name="T1">Físicamente:</text:span></text:span><text:span text:style-name="T1"> El mar tiene aproximadamente un 3% de sal. Aunque parezca poco, esa pequeña cantidad lo hace </text:span><text:span text:style-name="Strong_20_Emphasis"><text:span text:style-name="T1">intomable</text:span></text:span><text:span text:style-name="T1">. Si le agregamos una gota de veneno a un vaso de agua, el agua sigue viéndose cristalina, pero se vuelve mortal. </text:span></text:p>
        </text:list-item>
        <text:list-item>
          <text:p text:style-name="P46"><text:span text:style-name="Strong_20_Emphasis"><text:span text:style-name="T1">Espiritualmente:</text:span></text:span><text:span text:style-name="T1"> La palabra de Dios es como agua limpia. Pero si se mezcla con pensamientos humanos, tradiciones o falsedades (aunque sea un pequeño porcentaje), se vuelve espiritualmente tóxica. </text:span></text:p>
        </text:list-item>
        <text:list-item>
          <text:p text:style-name="P45"><text:span text:style-name="Emphasis"><text:span text:style-name="T1">Lección:</text:span></text:span><text:span text:style-name="T1"> No importa qué tan "cristalina" o bonita se vea una enseñanza por fuera; si tiene mezclas que no vienen de Dios, dañará nuestro espíritu. </text:span></text:p>
        </text:list-item>
      </text:list>
      <text:p text:style-name="P3"/>
      <text:h text:style-name="P1" text:outline-level="2"><text:soft-page-break/>🎣 3. Los Elementos de la Parábola: Definiciones Clave</text:h>
      <text:p text:style-name="P4">Para entender la lógica de esta parábola del reino de los cielos, debemos definir cada elemento:</text:p>
      <text:list text:style-name="L19">
        <text:list-item>
          <text:p text:style-name="P48"><text:span text:style-name="Strong_20_Emphasis"><text:span text:style-name="T1">El Pescador:</text:span></text:span><text:span text:style-name="T1"> Representa al </text:span><text:span text:style-name="Strong_20_Emphasis"><text:span text:style-name="T1">pastor o evangelista</text:span></text:span><text:span text:style-name="T1">. Su trabajo es capturar peces (personas) para llevarlos a un lugar seguro. </text:span></text:p>
        </text:list-item>
        <text:list-item>
          <text:p text:style-name="P48"><text:span text:style-name="Strong_20_Emphasis"><text:span text:style-name="T1">La Red:</text:span></text:span><text:span text:style-name="T1"> Representa la </text:span><text:span text:style-name="Strong_20_Emphasis"><text:span text:style-name="T1">Palabra de Dios</text:span></text:span><text:span text:style-name="T1"> (específicamente la palabra revelada, profecía y cumplimiento). Es la herramienta que atrae y recoge. </text:span></text:p>
        </text:list-item>
        <text:list-item>
          <text:p text:style-name="P48"><text:span text:style-name="Strong_20_Emphasis"><text:span text:style-name="T1">El Pez:</text:span></text:span><text:span text:style-name="T1"> Representa a las </text:span><text:span text:style-name="Strong_20_Emphasis"><text:span text:style-name="T1">personas o santos</text:span></text:span><text:span text:style-name="T1"> que están en el mar (el mundo religioso) y que necesitan ser guiados hacia la palabra de vida. </text:span></text:p>
        </text:list-item>
        <text:list-item>
          <text:p text:style-name="P47"><text:span text:style-name="Strong_20_Emphasis"><text:span text:style-name="T1">El Barco:</text:span></text:span><text:span text:style-name="T1"> Representa a la </text:span><text:span text:style-name="Strong_20_Emphasis"><text:span text:style-name="T1">Iglesia u organización</text:span></text:span><text:span text:style-name="T1"> donde el pescador trabaja y donde se reúne a los peces capturados para ser alimentados con la palabra. </text:span></text:p>
        </text:list-item>
      </text:list>
      <text:p text:style-name="P3"/>
      <text:h text:style-name="P1" text:outline-level="2">📜 4. Ejemplos Bíblicos y Profecías</text:h>
      <text:h text:style-name="P2" text:outline-level="3">🌊 El Hambre Espiritual (Amós 8:11-12)</text:h>
      <text:p text:style-name="Quotations"><text:span text:style-name="Emphasis"><text:span text:style-name="T1">"He aquí vienen días, dice Jehová, en los cuales enviaré hambre a la tierra; no hambre de pan, ni sed de agua, sino de oír la palabra de Jehová... E irán errantes de mar en mar... buscando palabra de Jehová, y no la hallarán".</text:span></text:span></text:p>
      <text:list text:style-name="L20">
        <text:list-item>
          <text:p text:style-name="P49"><text:span text:style-name="Strong_20_Emphasis"><text:span text:style-name="T1">Significado:</text:span></text:span><text:span text:style-name="T1"> En los tiempos del fin, habrá una escasez de la palabra revelada. Las personas (creyentes) irán de "mar en mar" (de iglesia en iglesia, de denominación en denominación) buscando la verdad, pero no la hallarán porque solo encontrarán mezclas humanas. </text:span></text:p>
        </text:list-item>
      </text:list>
      <text:h text:style-name="P2" text:outline-level="3">🐟 Hombres como Peces (Habacuc 1:14)</text:h>
      <text:p text:style-name="Quotations"><text:span text:style-name="Emphasis"><text:span text:style-name="T1">"Y haces que sean los hombres como los peces del mar, como reptiles que no tienen quién los gobierne".</text:span></text:span></text:p>
      <text:list text:style-name="L21">
        <text:list-item>
          <text:p text:style-name="P50"><text:span text:style-name="Strong_20_Emphasis"><text:span text:style-name="T1">Significado:</text:span></text:span><text:span text:style-name="T1"> Sin un pastor verdadero que les dé la palabra de Dios, las personas están a la deriva, sin gobierno espiritual, vulnerables a ser capturadas por cualquier red falsa. </text:span></text:p>
        </text:list-item>
      </text:list>
      <text:h text:style-name="P2" text:outline-level="3">🎣 Pescadores de Hombres (Mateo 4:19)</text:h>
      <text:p text:style-name="Quotations"><text:span text:style-name="Emphasis"><text:span text:style-name="T1">"Y les dijo: Venid en pos de mí, y os haré pescadores de hombres".</text:span></text:span></text:p>
      <text:list text:style-name="L22">
        <text:list-item>
          <text:p text:style-name="P51"><text:soft-page-break/><text:span text:style-name="Strong_20_Emphasis"><text:span text:style-name="T1">Significado:</text:span></text:span><text:span text:style-name="T1"> Jesús llamó a sus discípulos (que eran pescadores físicos) para una misión espiritual: usar la red de la palabra de Dios para guiar a las personas hacia la salvación. </text:span></text:p>
        </text:list-item>
      </text:list>
      <text:h text:style-name="P2" text:outline-level="3">🕸️ La Red y la Separación Final (Mateo 13:47-50)</text:h>
      <text:p text:style-name="Quotations"><text:span text:style-name="Emphasis"><text:span text:style-name="T1">"Asimismo, el reino de los cielos es semejante a una red, que echada en el mar, recoge de toda clase de peces; y una vez llena, la sacan a la orilla y sentados recogen lo bueno en cestas y lo malo echan fuera. Así será al fin del siglo: saldrán los ángeles y apartarán a los malos de entre los justos, y los echarán en el horno de fuego".</text:span></text:span></text:p>
      <text:list text:style-name="L23">
        <text:list-item>
          <text:p text:style-name="P53"><text:span text:style-name="Strong_20_Emphasis"><text:span text:style-name="T1">La Red:</text:span></text:span><text:span text:style-name="T1"> Recoge a "toda clase de peces" (buenos y malos, sinceros y hipócritas) dentro de la iglesia. </text:span></text:p>
        </text:list-item>
        <text:list-item>
          <text:p text:style-name="P53"><text:span text:style-name="Strong_20_Emphasis"><text:span text:style-name="T1">La Separación:</text:span></text:span><text:span text:style-name="T1"> Al fin del siglo, los ángeles separarán. </text:span></text:p>
          <text:list>
            <text:list-item>
              <text:p text:style-name="P53"><text:span text:style-name="Emphasis"><text:span text:style-name="T1">Los buenos (justos):</text:span></text:span><text:span text:style-name="T1"> Son puestos en </text:span><text:span text:style-name="Strong_20_Emphasis"><text:span text:style-name="T1">cestas</text:span></text:span><text:span text:style-name="T1"> (el templo de Dios, el reino de los cielos, la organización verdadera). </text:span></text:p>
            </text:list-item>
            <text:list-item>
              <text:p text:style-name="P52"><text:span text:style-name="Emphasis"><text:span text:style-name="T1">Los malos:</text:span></text:span><text:span text:style-name="T1"> Son echados de vuelta al </text:span><text:span text:style-name="Strong_20_Emphasis"><text:span text:style-name="T1">mar</text:span></text:span><text:span text:style-name="T1"> (el mundo de confusión, el juicio, el infierno). </text:span></text:p>
            </text:list-item>
          </text:list>
        </text:list-item>
      </text:list>
      <text:h text:style-name="P2" text:outline-level="3">⛵ El Barco como Refugio de Salvación (Génesis 7)</text:h>
      <text:list text:style-name="L24">
        <text:list-item>
          <text:p text:style-name="P54"><text:span text:style-name="Strong_20_Emphasis"><text:span text:style-name="T1">El Arca de Noé:</text:span></text:span><text:span text:style-name="T1"> En medio del juicio (el diluvio), el arca era el único barco de salvación. Noé predicó la palabra de Dios, pero solo aquellos que "entraron al barco" (creyeron y obedecieron) fueron salvos. Los que se burlaron y se quedaron fuera fueron destruidos. </text:span></text:p>
        </text:list-item>
      </text:list>
      <text:h text:style-name="P2" text:outline-level="3">🚢 Los Mercaderes de Babilonia (Apocalipsis 18:15-17)</text:h>
      <text:list text:style-name="L25">
        <text:list-item>
          <text:p text:style-name="P63">En los tiempos de Apocalipsis, vemos "pilotos, marineros y mercaderes" que se enriquecieron a costa de Babilonia (el sistema de Satanás). </text:p>
        </text:list-item>
        <text:list-item>
          <text:p text:style-name="P55"><text:span text:style-name="Strong_20_Emphasis"><text:span text:style-name="T1">Significado:</text:span></text:span><text:span text:style-name="T1"> Representa a los falsos pastores y líderes religiosos que acumulan "riquezas" espirituales falsas (doctrinas de hombres, lino fino, púrpura, oro) y que, al llegar el juicio, se pararán lejos llorando, porque sus riquezas eran en realidad "moho" y sedimentos espirituales. </text:span></text:p>
        </text:list-item>
      </text:list>
      <text:p text:style-name="P3"/>
      <text:h text:style-name="P1" text:outline-level="2"><text:soft-page-break/>⚔️ 5. La Realidad en la Primera Venida</text:h>
      <text:p text:style-name="P4">La lógica de la primera venida se repite en la segunda venida. Debemos identificar quién era quién:</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6">Elemento</text:p>
            </table:table-cell>
            <table:table-cell table:style-name="Tabla1.A1" office:value-type="string">
              <text:p text:style-name="P6">Lado de Dios (Verdad)</text:p>
            </table:table-cell>
            <table:table-cell table:style-name="Tabla1.A1" office:value-type="string">
              <text:p text:style-name="P6">Lado de Satanás (Falsedad)</text:p>
            </table:table-cell>
          </table:table-row>
        </table:table-header-rows>
        <table:table-row>
          <table:table-cell table:style-name="Tabla1.A1" office:value-type="string">
            <text:p text:style-name="P7"><text:span text:style-name="Strong_20_Emphasis"><text:span text:style-name="T1">Pescadores</text:span></text:span></text:p>
          </table:table-cell>
          <table:table-cell table:style-name="Tabla1.A1" office:value-type="string">
            <text:p text:style-name="P7"><text:span text:style-name="Strong_20_Emphasis"><text:span text:style-name="T1">Jesús y los 12 discípulos.</text:span></text:span><text:span text:style-name="T1"> Daban la palabra revelada y el cumplimiento de las profecías.</text:span></text:p>
          </table:table-cell>
          <table:table-cell table:style-name="Tabla1.A1" office:value-type="string">
            <text:p text:style-name="P7"><text:span text:style-name="Strong_20_Emphasis"><text:span text:style-name="T1">Escribas y fariseos.</text:span></text:span><text:span text:style-name="T1"> Daban enseñanzas humanas mezcladas con un poco de verdad, pero sin revelación.</text:span></text:p>
          </table:table-cell>
        </table:table-row>
        <table:table-row>
          <table:table-cell table:style-name="Tabla1.A1" office:value-type="string">
            <text:p text:style-name="P7"><text:span text:style-name="Strong_20_Emphasis"><text:span text:style-name="T1">La Red</text:span></text:span></text:p>
          </table:table-cell>
          <table:table-cell table:style-name="Tabla1.A1" office:value-type="string">
            <text:p text:style-name="P5">La palabra abierta y revelada del Antiguo Testamento cumplida en Jesús.</text:p>
          </table:table-cell>
          <table:table-cell table:style-name="Tabla1.A1" office:value-type="string">
            <text:p text:style-name="P5">Tradiciones de los ancianos, mandamientos de hombres y orgullo religioso.</text:p>
          </table:table-cell>
        </table:table-row>
        <table:table-row>
          <table:table-cell table:style-name="Tabla1.A1" office:value-type="string">
            <text:p text:style-name="P7"><text:span text:style-name="Strong_20_Emphasis"><text:span text:style-name="T1">El Barco</text:span></text:span></text:p>
          </table:table-cell>
          <table:table-cell table:style-name="Tabla1.A1" office:value-type="string">
            <text:p text:style-name="P5">La organización de Jesús (aunque no tenía templo físico, era el verdadero templo espiritual).</text:p>
          </table:table-cell>
          <table:table-cell table:style-name="Tabla1.A1" office:value-type="string">
            <text:p text:style-name="P5">Las sinagogas grandes, con estatus, dinero y reconocimiento social, pero vacías de la verdad revelada.</text:p>
          </table:table-cell>
        </table:table-row>
        <table:table-row>
          <table:table-cell table:style-name="Tabla1.A1" office:value-type="string">
            <text:p text:style-name="P7"><text:span text:style-name="Strong_20_Emphasis"><text:span text:style-name="T1">Los Peces</text:span></text:span></text:p>
          </table:table-cell>
          <table:table-cell table:style-name="Tabla1.A1" office:value-type="string">
            <text:p text:style-name="P5">Aquellos que escucharon, entendieron el cumplimiento y siguieron a Jesús (ej. los 12).</text:p>
          </table:table-cell>
          <table:table-cell table:style-name="Tabla1.A1" office:value-type="string">
            <text:p text:style-name="P5">Aquellos que se quedaron con los fariseos porque "se veían bien" y tenían títulos, rechazando al Nazareno.</text:p>
          </table:table-cell>
        </table:table-row>
      </table:table>
      <text:p text:style-name="P3"/>
      <text:h text:style-name="P1" text:outline-level="2">🎯 6. Conclusiones y Aplicación Personal</text:h>
      <text:list text:style-name="L26">
        <text:list-item>
          <text:p text:style-name="P57"><text:span text:style-name="Strong_20_Emphasis"><text:span text:style-name="T1">La Palabra es el Único Tesoro:</text:span></text:span><text:span text:style-name="T1"> El oro, la plata y las perlas terrenales no pueden perdonar pecados ni dar vida eterna. Solo la palabra inmutable y preciosa de Dios (la verdad del cumplimiento) puede salvarnos. </text:span></text:p>
        </text:list-item>
        <text:list-item>
          <text:p text:style-name="P57"><text:span text:style-name="Strong_20_Emphasis"><text:span text:style-name="T1">¿Dónde estoy yo?</text:span></text:span><text:span text:style-name="T1"> Debemos preguntarnos constantemente: ¿Estoy en el mar (confundido), en la red (escuchando la palabra) o ya en la cesta (perteneciendo a la organización verdadera con la palabra revelada)? </text:span></text:p>
        </text:list-item>
        <text:list-item>
          <text:p text:style-name="P57"><text:span text:style-name="Strong_20_Emphasis"><text:span text:style-name="T1">El Esfuerzo por Renacer:</text:span></text:span><text:span text:style-name="T1"> No basta con estar en la red. Debemos esforzarnos por adquirir las cualidades de un "buen pez": retener la palabra, desechar los sedimentos humanos y permitir que la palabra revelada transforme nuestro corazón. </text:span></text:p>
        </text:list-item>
        <text:list-item>
          <text:p text:style-name="P56"><text:span text:style-name="Strong_20_Emphasis"><text:span text:style-name="T1">Discernimiento:</text:span></text:span><text:span text:style-name="T1"> No nos guiemos por lo visual (títulos, edificios grandes, fama). El único estándar para distinguir el barco de Dios del barco de Satanás es </text:span><text:span text:style-name="Strong_20_Emphasis"><text:span text:style-name="T1">la palabra de verdad</text:span></text:span><text:span text:style-name="T1"> que se predica en ellos. </text:span></text:p>
        </text:list-item>
      </text:list>
      <text:p text:style-name="Text_20_body"><text:span text:style-name="Strong_20_Emphasis"><text:span text:style-name="T1">📢 Anuncio para la Próxima Lección:</text:span></text:span><text:span text:style-name="T1"> La próxima vez aprenderemos sobre </text:span><text:span text:style-name="Strong_20_Emphasis"><text:span text:style-name="T1">Bestia, Cabeza, Cuernos y Cola en figurativo</text:span></text:span><text:span text:style-name="T1">. </text:span></text:p>
      <text:list text:style-name="L27">
        <text:list-item>
          <text:p text:style-name="P58"><text:soft-page-break/><text:span text:style-name="Emphasis"><text:span text:style-name="T1">Pista para reflexionar:</text:span></text:span><text:span text:style-name="T1"> En Apocalipsis vemos bestias que salen del mar y de la tierra. ¿Qué representan espiritualmente estas partes del cuerpo de la bestia? ¡Prepárense para seguir descubriendo los secretos del reino! </text:span></text:p>
        </text:list-item>
      </text:list>
      <text:p text:style-name="P3"/>
      <text:h text:style-name="P1" text:outline-level="2">🔄 7. Repaso Final Interactivo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28">
        <text:list-item>
          <text:p text:style-name="P60"><text:span text:style-name="Strong_20_Emphasis"><text:span text:style-name="T1">¿Qué representa el mar?</text:span></text:span><text:span text:style-name="T1"> El mundo, específicamente el mundo religioso donde hay mezcla de aguas (palabras). </text:span></text:p>
        </text:list-item>
        <text:list-item>
          <text:p text:style-name="P60"><text:span text:style-name="Strong_20_Emphasis"><text:span text:style-name="T1">¿Quién es el pescador?</text:span></text:span><text:span text:style-name="T1"> El pastor o evangelista que tiene la misión de guiar a las personas. </text:span></text:p>
        </text:list-item>
        <text:list-item>
          <text:p text:style-name="P60"><text:span text:style-name="Strong_20_Emphasis"><text:span text:style-name="T1">¿Qué es la red?</text:span></text:span><text:span text:style-name="T1"> La Palabra de Dios, que es lo que atrae y recoge a las personas. </text:span></text:p>
        </text:list-item>
        <text:list-item>
          <text:p text:style-name="P60"><text:span text:style-name="Strong_20_Emphasis"><text:span text:style-name="T1">¿Qué son los peces?</text:span></text:span><text:span text:style-name="T1"> Las personas (santos) que necesitan ser guiadas hacia la palabra de vida. </text:span></text:p>
        </text:list-item>
        <text:list-item>
          <text:p text:style-name="P60"><text:span text:style-name="Strong_20_Emphasis"><text:span text:style-name="T1">¿Qué es el barco?</text:span></text:span><text:span text:style-name="T1"> La Iglesia u organización donde se da la palabra verdadera. </text:span></text:p>
        </text:list-item>
        <text:list-item>
          <text:p text:style-name="P59"><text:span text:style-name="Strong_20_Emphasis"><text:span text:style-name="T1">¿Cuál es el peligro de ser un creyente pasivo?</text:span></text:span><text:span text:style-name="T1"> Si no dejamos que la palabra nos cambie (como la levadura), podemos estar en la red pero ser echados de vuelta al mar en el día del juicio, porque no nos esforzamos por retener la verdad y desechar los sedimentos. </text:span></text:p>
        </text:list-item>
      </text:list>
      <text:p text:style-name="Text_20_body"><text:span text:style-name="Strong_20_Emphasis"><text:span text:style-name="T1">📢 Anuncios:</text:span></text:span></text:p>
      <text:list text:style-name="L29">
        <text:list-item>
          <text:p text:style-name="P61"><text:span text:style-name="T1">La próxima semana (lunes en la noche / martes en la mañana en Corea) habrá una </text:span><text:span text:style-name="Strong_20_Emphasis"><text:span text:style-name="T1">reunión especial con los pastores</text:span></text:span><text:span text:style-name="T1"> para conversar sobre las lecciones y resolver dudas. </text:span></text:p>
        </text:list-item>
        <text:list-item>
          <text:p text:style-name="P64">La semana siguiente habrá una reunión general con todos los estudiantes. </text:p>
        </text:list-item>
      </text:list>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los siglos de los siglos. Amén."</text:span></text:span></text:p>
      <text:p text:style-name="P4"><text:soft-page-break/>¡Gracias a todos! Sabemos que no es fácil tener que conseguir datos y electricidad, pero Dios mira los esfuerzos que todos están haciendo. Cuídense, sigan estudiando y que Dios los bendiga. ¡Nos vemos en la próxima lecció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16T20:23:35.061143914</dc:date>
    <meta:editing-duration>PT2H58M</meta:editing-duration>
    <meta:editing-cycles>15</meta:editing-cycles>
    <meta:generator>LibreOffice/24.2.7.2$Linux_X86_64 LibreOffice_project/420$Build-2</meta:generator>
    <meta:document-statistic meta:table-count="1" meta:image-count="0" meta:object-count="0" meta:page-count="7" meta:paragraph-count="94" meta:word-count="1818" meta:character-count="10603" meta:non-whitespace-character-count="8881"/>
  </office:meta>
</office:document-meta>
</file>