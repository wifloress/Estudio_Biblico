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7 (PARTE 1)</text:h>
      <text:h text:style-name="P2" text:outline-level="2">Fuego, Incensario y Olla en Lenguaje Figurativo</text:h>
      <text:p text:style-name="P4"/>
      <text:h text:style-name="P2" text:outline-level="2">🔄 1. Repaso y Mini-Quiz de Retención</text:h>
      <text:p text:style-name="Text_20_body"><text:span text:style-name="Emphasis"><text:span text:style-name="T1">(A cargo del Evangelista Christian Howard)</text:span></text:span></text:p>
      <text:p text:style-name="Text_20_body"><text:span text:style-name="T1">Antes de comenzar la nueva lección, realizamos un repaso de la lección anterior (Copa, Balanza y Vara) y un </text:span><text:span text:style-name="Strong_20_Emphasis"><text:span text:style-name="T1">mini-quiz de Verdadero/Falso</text:span></text:span><text:span text:style-name="T1"> para evaluar si estamos reteniendo la palabra o si "el ave vino y se la llevó":</text:span></text:p>
      <text:h text:style-name="P3" text:outline-level="3">📝 Preguntas de Reflexión y Respuestas:</text:h>
      <text:list text:style-name="L1">
        <text:list-item>
          <text:p text:style-name="P6"><text:span text:style-name="Strong_20_Emphasis"><text:span text:style-name="T1">¿Qué representan la balanza, la vara y la vara de hierro?</text:span></text:span></text:p>
          <text:list>
            <text:list-item>
              <text:p text:style-name="P6"><text:span text:style-name="Emphasis"><text:span text:style-name="T1">Balanza:</text:span></text:span><text:span text:style-name="T1"> La Palabra de Dios (que nos pesa y mide). </text:span></text:p>
            </text:list-item>
            <text:list-item>
              <text:p text:style-name="P6"><text:span text:style-name="Emphasis"><text:span text:style-name="T1">Vara:</text:span></text:span><text:span text:style-name="T1"> La Palabra de Dios y la persona (pastor) que la porta. </text:span></text:p>
            </text:list-item>
            <text:list-item>
              <text:p text:style-name="P6"><text:span text:style-name="Emphasis"><text:span text:style-name="T1">Vara de Hierro:</text:span></text:span><text:span text:style-name="T1"> La autoridad para reinar y juzgar. En la 1ª Venida vino de Dios para Jesús; en la 2ª Venida, Jesús se la promete al vencedor. </text:span></text:p>
            </text:list-item>
          </text:list>
        </text:list-item>
        <text:list-item>
          <text:p text:style-name="P6"><text:span text:style-name="Strong_20_Emphasis"><text:span text:style-name="T1">Mini-Quiz (Verdadero o Falso):</text:span></text:span></text:p>
          <text:list>
            <text:list-item>
              <text:p text:style-name="P6"><text:span text:style-name="Emphasis"><text:span text:style-name="T1">Pregunta 1:</text:span></text:span><text:span text:style-name="T1"> La razón por la que no entendemos las parábolas es porque las realidades físicas aún no han aparecido. ➡️ </text:span><text:span text:style-name="Strong_20_Emphasis"><text:span text:style-name="T1">VERDADERO.</text:span></text:span><text:span text:style-name="T1"> (Jesús prometió que llegaría un tiempo en el que las parábolas se revelarían claramente al ver la realidad). </text:span></text:p>
            </text:list-item>
            <text:list-item>
              <text:p text:style-name="P6"><text:span text:style-name="Emphasis"><text:span text:style-name="T1">Pregunta 2:</text:span></text:span><text:span text:style-name="T1"> Dios y Jesús hablaron en parábolas para que todas las personas entendieran el reino y entraran al cielo. ➡️ </text:span><text:span text:style-name="Strong_20_Emphasis"><text:span text:style-name="T1">FALSO.</text:span></text:span><text:span text:style-name="T1"> (Las parábolas en profecía sirven para </text:span><text:span text:style-name="Emphasis"><text:span text:style-name="T1">esconder</text:span></text:span><text:span text:style-name="T1"> los misterios de los enemigos y porque estaba profetizado). </text:span></text:p>
            </text:list-item>
            <text:list-item>
              <text:p text:style-name="P6"><text:span text:style-name="Emphasis"><text:span text:style-name="T1">Pregunta 3:</text:span></text:span><text:span text:style-name="T1"> Para llevar a cabo una vida de fe apropiada, nunca debe faltar la palabra de Dios. ➡️ </text:span><text:span text:style-name="Strong_20_Emphasis"><text:span text:style-name="T1">VERDADERO.</text:span></text:span><text:span text:style-name="T1"> (Debemos humillarnos, quitar nuestros "sedimentos" y volver siempre a la fuente). </text:span></text:p>
            </text:list-item>
            <text:list-item>
              <text:p text:style-name="P6"><text:span text:style-name="Emphasis"><text:span text:style-name="T1">Pregunta 4:</text:span></text:span><text:span text:style-name="T1"> Las dos semillas sembradas en las iglesias se pueden distinguir en cualquier momento con oración. ➡️ </text:span><text:span text:style-name="Strong_20_Emphasis"><text:span text:style-name="T1">FALSO.</text:span></text:span><text:span text:style-name="T1"> (Hay un tiempo de cosecha </text:span><text:soft-page-break/><text:span text:style-name="T1">designado por Dios para separarlas. No se distinguen por apariencias, sino por los frutos/palabras en el tiempo correcto). </text:span></text:p>
            </text:list-item>
            <text:list-item>
              <text:p text:style-name="P6"><text:span text:style-name="Emphasis"><text:span text:style-name="T1">Pregunta 5:</text:span></text:span><text:span text:style-name="T1"> "Por sus frutos los conoceréis" se refiere a las acciones que glorifican a Dios. ➡️ </text:span><text:span text:style-name="Strong_20_Emphasis"><text:span text:style-name="T1">FALSO.</text:span></text:span><text:span text:style-name="T1"> (Los frutos son </text:span><text:span text:style-name="Strong_20_Emphasis"><text:span text:style-name="T1">las palabras</text:span></text:span><text:span text:style-name="T1">. Las acciones son exteriores, pero las palabras revelan lo que hay en el interior del corazón). </text:span></text:p>
            </text:list-item>
            <text:list-item>
              <text:p text:style-name="P5"><text:span text:style-name="Emphasis"><text:span text:style-name="T1">Pregunta 6:</text:span></text:span><text:span text:style-name="T1"> El "campo del hombre" en Mateo 13 es el mundo del cristianismo, no el globo terráqueo. ➡️ </text:span><text:span text:style-name="Strong_20_Emphasis"><text:span text:style-name="T1">VERDADERO.</text:span></text:span><text:span text:style-name="T1"> (Es el campo de Jesús, donde conviven la buena semilla y la cizaña).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este tiempo que podemos repasar y entender más y más tu palabra. Gracias por mandar tus espíritus santos que vienen a cada uno de nosotros para ayudarnos a enfocarnos en tu palabra, a quitar nuestras preocupaciones y pensamientos. Oramos por todos los santos que no pudieron venir; enciende sus corazones para que vengan hambrientos a aprender. Te oramos en el nombre de tu hijo Jesucristo. Amén."</text:span></text:span></text:p>
      <text:p text:style-name="P4"/>
      <text:h text:style-name="P2" text:outline-level="2">🔥 2. Introducción al Fuego: Características Físicas y Espirituales</text:h>
      <text:p text:style-name="Text_20_body"><text:span text:style-name="Emphasis"><text:span text:style-name="T1">(A cargo del Instructor Sibiani)</text:span></text:span></text:p>
      <text:h text:style-name="P3" text:outline-level="3">📌 La Actitud ante la Palabra</text:h>
      <text:p text:style-name="Text_20_body"><text:span text:style-name="T1">A pesar de que todos estamos muy ocupados (trabajo, familia, negocios), en medio de esta ocupación siempre tenemos que hacer el esfuerzo de pensar en la Palabra de Dios. Una relación con Dios es como una relación de pareja: tenemos que escucharle, entender qué le gusta y qué no, para no caer en el error de </text:span><text:span text:style-name="Emphasis"><text:span text:style-name="T1">asumir</text:span></text:span><text:span text:style-name="T1"> lo que Dios quiere.</text:span></text:p>
      <text:h text:style-name="P3" text:outline-level="3">📖 El Título de la Lección</text:h>
      <text:p text:style-name="P27">Leamos juntos dos veces:</text:p>
      <text:p text:style-name="Quotations"><text:span text:style-name="Strong_20_Emphasis"><text:span text:style-name="T1">"Fuego, incensario y olla en figurativo"</text:span></text:span></text:p>
      <text:p text:style-name="Text_20_body"><text:span text:style-name="T1">Hoy nos enfocaremos en el </text:span><text:span text:style-name="Strong_20_Emphasis"><text:span text:style-name="T1">Fuego</text:span></text:span><text:span text:style-name="T1">. Todos conocemos el fuego físico: es peligroso, quema, pero también es sumamente útil. En la Biblia, especialmente en la Segunda Venida, Dios utiliza mucho el fuego. ¿Es literal o espiritual? Debemos descubrirlo.</text:span></text:p>
      <text:h text:style-name="P3" text:outline-level="3"><text:soft-page-break/>🌡️ Características Físicas del Fuego</text:h>
      <text:list text:style-name="L2">
        <text:list-item>
          <text:p text:style-name="P8"><text:span text:style-name="Strong_20_Emphasis"><text:span text:style-name="T1">Es caliente y destructivo:</text:span></text:span><text:span text:style-name="T1"> Quema, hierre, destruye y consume la leña. </text:span></text:p>
        </text:list-item>
        <text:list-item>
          <text:p text:style-name="P7"><text:span text:style-name="Strong_20_Emphasis"><text:span text:style-name="T1">Es purificador (Positivo):</text:span></text:span><text:span text:style-name="T1"> Se usa para esterilizar (ej. pasar un encendedor a una aguja para matar bacterias) y para eliminar virus (quemando cuerpos en pandemias antiguas). El fuego limpia las impurezas. </text:span></text:p>
        </text:list-item>
      </text:list>
      <text:p text:style-name="P4"/>
      <text:h text:style-name="P2" text:outline-level="2">🕊️ 3. El Fuego de Dios: La Palabra que Purifica y Juzga</text:h>
      <text:h text:style-name="P3" text:outline-level="3">📜 Jeremías 5:14 (La Palabra como Fuego)</text:h>
      <text:p text:style-name="Quotations"><text:span text:style-name="Emphasis"><text:span text:style-name="T1">"He aquí yo pongo mis palabras en tu boca por fuego, y a este pueblo por leña, y los consumirá".</text:span></text:span></text:p>
      <text:list text:style-name="L3">
        <text:list-item>
          <text:p text:style-name="P10"><text:span text:style-name="Strong_20_Emphasis"><text:span text:style-name="T1">El Fuego:</text:span></text:span><text:span text:style-name="T1"> Son las Palabras de Dios puestas en la boca del profeta. </text:span></text:p>
        </text:list-item>
        <text:list-item>
          <text:p text:style-name="P10"><text:span text:style-name="Strong_20_Emphasis"><text:span text:style-name="T1">La Leña:</text:span></text:span><text:span text:style-name="T1"> Es el pueblo (las personas/árboles). </text:span></text:p>
        </text:list-item>
        <text:list-item>
          <text:p text:style-name="P9"><text:span text:style-name="Strong_20_Emphasis"><text:span text:style-name="T1">El Propósito:</text:span></text:span><text:span text:style-name="T1"> La Palabra de Dios actúa como fuego que </text:span><text:span text:style-name="Strong_20_Emphasis"><text:span text:style-name="T1">juzga, destruye el pecado y purifica</text:span></text:span><text:span text:style-name="T1"> las impurezas del corazón. </text:span></text:p>
        </text:list-item>
      </text:list>
      <text:h text:style-name="P3" text:outline-level="3">🌋 Isaías 6:6-7 (El Carbón Encendido del Altar)</text:h>
      <text:p text:style-name="Text_20_body"><text:span text:style-name="T1">Un serafín toma un carbón encendido del altar con tenazas y toca los labios del profeta Isaías, diciendo: </text:span><text:span text:style-name="Emphasis"><text:span text:style-name="T1">"He aquí que esto tocó tus labios, y es quitada tu culpa, y limpio tu pecado"</text:span></text:span><text:span text:style-name="T1">.</text:span></text:p>
      <text:list text:style-name="L4">
        <text:list-item>
          <text:p text:style-name="P12"><text:span text:style-name="Strong_20_Emphasis"><text:span text:style-name="T1">Significado:</text:span></text:span><text:span text:style-name="T1"> Literalmente es imposible comer fuego. Espiritualmente, Dios pone Su Palabra (fuego) en la boca de Su pueblo para </text:span><text:span text:style-name="Strong_20_Emphasis"><text:span text:style-name="T1">quitar la culpa y limpiar el pecado</text:span></text:span><text:span text:style-name="T1">. </text:span></text:p>
        </text:list-item>
        <text:list-item>
          <text:p text:style-name="P11"><text:span text:style-name="Strong_20_Emphasis"><text:span text:style-name="T1">El Bautismo de Fuego:</text:span></text:span><text:span text:style-name="T1"> Es este proceso de limpieza espiritual a través de la Palabra de Dios. El agua física no puede limpiar el pecado; solo el "fuego" (la Palabra) puede hacerlo (Juan 15:3). </text:span></text:p>
        </text:list-item>
      </text:list>
      <text:h text:style-name="P3" text:outline-level="3">🌅 Malaquías 4:1-2 (El Día Ardiente como un Horno)</text:h>
      <text:p text:style-name="Quotations"><text:span text:style-name="Emphasis"><text:span text:style-name="T1">"Porque he aquí, viene el día ardiente como un horno, y todos los soberbios y todos los que hacen maldad serán estopa... Mas a vosotros los que teméis mi nombre, nacerá el Sol de justicia, y en sus alas traerá salvación".</text:span></text:span></text:p>
      <text:list text:style-name="L5">
        <text:list-item>
          <text:p text:style-name="P14"><text:span text:style-name="Strong_20_Emphasis"><text:span text:style-name="T1">Para los soberbios/malvados:</text:span></text:span><text:span text:style-name="T1"> El fuego los consume como a estopa (juicio y destrucción). </text:span></text:p>
        </text:list-item>
        <text:list-item>
          <text:p text:style-name="P14"><text:soft-page-break/><text:span text:style-name="Strong_20_Emphasis"><text:span text:style-name="T1">Para los que temen a Dios:</text:span></text:span><text:span text:style-name="T1"> El mismo fuego no los destruye, sino que los </text:span><text:span text:style-name="Strong_20_Emphasis"><text:span text:style-name="T1">cura, purifica y trae salvación</text:span></text:span><text:span text:style-name="T1">. </text:span></text:p>
        </text:list-item>
        <text:list-item>
          <text:p text:style-name="P13"><text:span text:style-name="Strong_20_Emphasis"><text:span text:style-name="T1">La Simultaneidad:</text:span></text:span><text:span text:style-name="T1"> El juicio y la salvación ocurren al mismo tiempo ante el mismo evento (como en los días de Noé: el diluvio juzgó a unos, pero salvó a otros en el arca). </text:span></text:p>
        </text:list-item>
      </text:list>
      <text:p text:style-name="P4"/>
      <text:h text:style-name="P2" text:outline-level="2">⚔️ 4. El Cumplimiento en la Primera Venida</text:h>
      <text:h text:style-name="P3" text:outline-level="3">🐍 El Juicio a los Fariseos (Mateo 23:33)</text:h>
      <text:p text:style-name="Text_20_body"><text:span text:style-name="T1">Jesús lanza el "fuego" de la Palabra contra los escribas y fariseos, llamándolos </text:span><text:span text:style-name="Emphasis"><text:span text:style-name="T1">"serpientes, generación de víboras"</text:span></text:span><text:span text:style-name="T1">. Esto fue el juicio de fuego espiritual de la Primera Venida: la Palabra de Dios expuso y juzgó a los que hacían maldad.</text:span></text:p>
      <text:h text:style-name="P3" text:outline-level="3">💧 El Bautismo de Fuego (Mateo 3:11-12)</text:h>
      <text:p text:style-name="Text_20_body"><text:span text:style-name="T1">Juan el Bautista testificó: </text:span><text:span text:style-name="Emphasis"><text:span text:style-name="T1">"Él [Jesús] os bautizará en Espíritu Santo y fuego... Su aventador está en su mano, y limpiará su era, y recogerá su trigo en el granero, pero quemará la paja en fuego que nunca se apagará"</text:span></text:span><text:span text:style-name="T1">.</text:span></text:p>
      <text:list text:style-name="L6">
        <text:list-item>
          <text:p text:style-name="P16"><text:span text:style-name="Strong_20_Emphasis"><text:span text:style-name="T1">El Trigo:</text:span></text:span><text:span text:style-name="T1"> Los que reciben la Palabra y son guardados en el granero. </text:span></text:p>
        </text:list-item>
        <text:list-item>
          <text:p text:style-name="P15"><text:span text:style-name="Strong_20_Emphasis"><text:span text:style-name="T1">La Paja:</text:span></text:span><text:span text:style-name="T1"> Los que rechazan la Palabra y son quemados (juzgados) por el fuego inextinguible. </text:span></text:p>
        </text:list-item>
      </text:list>
      <text:p text:style-name="P4"/>
      <text:h text:style-name="P2" text:outline-level="2">⚠️ 5. El Fuego Extraño y el Fuego de Satanás</text:h>
      <text:h text:style-name="P3" text:outline-level="3">🚫 Levítico 10:1-2 (El Fuego Extraño)</text:h>
      <text:p text:style-name="Text_20_body"><text:span text:style-name="T1">Nadab y Abihu (hijos de Aarón) ofrecieron delante de Jehová </text:span><text:span text:style-name="Emphasis"><text:span text:style-name="T1">"fuego extraño, que él nunca les mandó"</text:span></text:span><text:span text:style-name="T1">. Como resultado, salió fuego de Jehová y los consumió.</text:span></text:p>
      <text:list text:style-name="L7">
        <text:list-item>
          <text:p text:style-name="P18"><text:span text:style-name="Strong_20_Emphasis"><text:span text:style-name="T1">La Lección Espiritual:</text:span></text:span><text:span text:style-name="T1"> No debemos aceptar ni poner en nuestro corazón ninguna enseñanza ("fuego") que Dios no haya mandado. </text:span></text:p>
        </text:list-item>
        <text:list-item>
          <text:p text:style-name="P17"><text:span text:style-name="Strong_20_Emphasis"><text:span text:style-name="T1">La Consecuencia:</text:span></text:span><text:span text:style-name="T1"> Si recibimos este fuego extraño, no morimos físicamente, pero </text:span><text:span text:style-name="Strong_20_Emphasis"><text:span text:style-name="T1">nuestro espíritu muere</text:span></text:span><text:span text:style-name="T1"> (tal como le pasó a Adán y Eva al escuchar a la serpiente). </text:span></text:p>
        </text:list-item>
      </text:list>
      <text:h text:style-name="P3" text:outline-level="3"><text:soft-page-break/>🐎 Apocalipsis 9:17-18 (Los Caballos que Respiran Fuego)</text:h>
      <text:p text:style-name="P27">En la visión, los caballos tienen colas como serpientes con cabezas, y de sus bocas sale fuego, humo y azufre, matando a la tercera parte de los hombres.</text:p>
      <text:list text:style-name="L8">
        <text:list-item>
          <text:p text:style-name="P20"><text:span text:style-name="Strong_20_Emphasis"><text:span text:style-name="T1">Los Caballos:</text:span></text:span><text:span text:style-name="T1"> Representan a los </text:span><text:span text:style-name="Strong_20_Emphasis"><text:span text:style-name="T1">falsos pastores</text:span></text:span><text:span text:style-name="T1"> (hombres/carne, como lo indica Isaías 31:3). </text:span></text:p>
        </text:list-item>
        <text:list-item>
          <text:p text:style-name="P20"><text:span text:style-name="Strong_20_Emphasis"><text:span text:style-name="T1">El Fuego, Humo y Azufre:</text:span></text:span><text:span text:style-name="T1"> Representan las </text:span><text:span text:style-name="Strong_20_Emphasis"><text:span text:style-name="T1">mentiras, falsedades y tergiversaciones de Satanás</text:span></text:span><text:span text:style-name="T1">. </text:span></text:p>
        </text:list-item>
        <text:list-item>
          <text:p text:style-name="P19"><text:span text:style-name="Strong_20_Emphasis"><text:span text:style-name="T1">El Peligro:</text:span></text:span><text:span text:style-name="T1"> Estas palabras no matan el cuerpo, pero </text:span><text:span text:style-name="Strong_20_Emphasis"><text:span text:style-name="T1">asesinan el espíritu</text:span></text:span><text:span text:style-name="T1"> de los creyentes que no tienen la Palabra de Dios para defenderse. </text:span></text:p>
        </text:list-item>
      </text:list>
      <text:p text:style-name="P4"/>
      <text:h text:style-name="P2" text:outline-level="2">🛡️ 6. Conclusiones de la Lección</text:h>
      <text:list text:style-name="L9">
        <text:list-item>
          <text:p text:style-name="P22"><text:span text:style-name="Strong_20_Emphasis"><text:span text:style-name="T1">El Fuego es la Palabra.</text:span></text:span><text:span text:style-name="T1"> Hay dos tipos de fuego espiritual: el de Dios y el de Satanás. </text:span></text:p>
        </text:list-item>
        <text:list-item>
          <text:p text:style-name="P22"><text:span text:style-name="Strong_20_Emphasis"><text:span text:style-name="T1">El Juicio de Fuego:</text:span></text:span><text:span text:style-name="T1"> Es el juicio de la Palabra. Dios utilizará Su Palabra para separar a los justos de los injustos en los tiempos del fin. </text:span></text:p>
        </text:list-item>
        <text:list-item>
          <text:p text:style-name="P22"><text:span text:style-name="Strong_20_Emphasis"><text:span text:style-name="T1">El Bautismo de Fuego:</text:span></text:span><text:span text:style-name="T1"> Es el proceso de limpiarnos y purificarnos a través de la Palabra de Dios, desechando nuestras malas acciones y "sedimentos". </text:span></text:p>
        </text:list-item>
        <text:list-item>
          <text:p text:style-name="P22"><text:span text:style-name="Strong_20_Emphasis"><text:span text:style-name="T1">El Fuego de Dios vs. El Fuego de Satanás:</text:span></text:span></text:p>
          <text:list>
            <text:list-item>
              <text:p text:style-name="P22"><text:span text:style-name="Emphasis"><text:span text:style-name="T1">Fuego de Dios (Verdad/Profecía y Cumplimiento):</text:span></text:span><text:span text:style-name="T1"> Limpia el pecado, purifica al creyente y trae salvación. </text:span></text:p>
            </text:list-item>
            <text:list-item>
              <text:p text:style-name="P21"><text:span text:style-name="Emphasis"><text:span text:style-name="T1">Fuego de Satanás (Mentiras/Tergiversación):</text:span></text:span><text:span text:style-name="T1"> Quema y mata el espíritu sin que la persona se dé cuenta. </text:span></text:p>
            </text:list-item>
          </text:list>
        </text:list-item>
      </text:list>
      <text:p text:style-name="Text_20_body"><text:span text:style-name="Strong_20_Emphasis"><text:span text:style-name="T1">📢 Anuncio para la Próxima Lección:</text:span></text:span><text:span text:style-name="T1"> La próxima vez continuaremos con el </text:span><text:span text:style-name="Strong_20_Emphasis"><text:span text:style-name="T1">Incensario</text:span></text:span><text:span text:style-name="T1"> (que aparece en Apocalipsis) y la </text:span><text:span text:style-name="Strong_20_Emphasis"><text:span text:style-name="T1">Olla</text:span></text:span><text:span text:style-name="T1"> (¿para qué se usa la olla en el reino espiritual?). ¡Prepárense para seguir descubriendo los secretos de Dios!</text:span></text:p>
      <text:p text:style-name="P4"/>
      <text:h text:style-name="P2" text:outline-level="2">🔄 7.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0">
        <text:list-item>
          <text:p text:style-name="P24"><text:span text:style-name="Strong_20_Emphasis"><text:span text:style-name="T1">¿Qué es el fuego espiritualmente?</text:span></text:span></text:p>
          <text:list>
            <text:list-item>
              <text:p text:style-name="P24"><text:span text:style-name="Emphasis"><text:span text:style-name="T1">Respuesta:</text:span></text:span><text:span text:style-name="T1"> </text:span><text:span text:style-name="Strong_20_Emphasis"><text:span text:style-name="T1">La Palabra.</text:span></text:span><text:span text:style-name="T1"> (Puede ser la Palabra de Dios o la palabra de Satanás). </text:span></text:p>
            </text:list-item>
          </text:list>
        </text:list-item>
        <text:list-item>
          <text:p text:style-name="P24"><text:soft-page-break/><text:span text:style-name="Strong_20_Emphasis"><text:span text:style-name="T1">¿Qué hace el fuego de Dios en nosotros?</text:span></text:span></text:p>
          <text:list>
            <text:list-item>
              <text:p text:style-name="P24"><text:span text:style-name="Emphasis"><text:span text:style-name="T1">Respuesta:</text:span></text:span><text:span text:style-name="T1"> </text:span><text:span text:style-name="Strong_20_Emphasis"><text:span text:style-name="T1">Nos purifica, destruye el pecado y juzga a los malvados.</text:span></text:span><text:span text:style-name="T1"> (Si aceptamos la Palabra, nos limpia; si la rechazamos, nos juzga). </text:span></text:p>
            </text:list-item>
          </text:list>
        </text:list-item>
        <text:list-item>
          <text:p text:style-name="P24"><text:span text:style-name="Strong_20_Emphasis"><text:span text:style-name="T1">¿Qué hace el fuego de Satanás?</text:span></text:span></text:p>
          <text:list>
            <text:list-item>
              <text:p text:style-name="P24"><text:span text:style-name="Emphasis"><text:span text:style-name="T1">Respuesta:</text:span></text:span><text:span text:style-name="T1"> </text:span><text:span text:style-name="Strong_20_Emphasis"><text:span text:style-name="T1">Mata nuestro espíritu.</text:span></text:span><text:span text:style-name="T1"> (Son las mentiras que engañan, como le pasó a Adán y Eva). </text:span></text:p>
            </text:list-item>
          </text:list>
        </text:list-item>
        <text:list-item>
          <text:p text:style-name="P24"><text:span text:style-name="Strong_20_Emphasis"><text:span text:style-name="T1">¿Qué es el bautismo de fuego?</text:span></text:span></text:p>
          <text:list>
            <text:list-item>
              <text:p text:style-name="P24"><text:span text:style-name="Emphasis"><text:span text:style-name="T1">Respuesta:</text:span></text:span><text:span text:style-name="T1"> </text:span><text:span text:style-name="Strong_20_Emphasis"><text:span text:style-name="T1">El bautismo de la Palabra de Dios.</text:span></text:span><text:span text:style-name="T1"> (Es la limpieza espiritual, ya que el agua física no puede quitar el pecado). </text:span></text:p>
            </text:list-item>
          </text:list>
        </text:list-item>
        <text:list-item>
          <text:p text:style-name="P24"><text:span text:style-name="Strong_20_Emphasis"><text:span text:style-name="T1">¿Qué es el juicio de fuego?</text:span></text:span></text:p>
          <text:list>
            <text:list-item>
              <text:p text:style-name="P23"><text:span text:style-name="Emphasis"><text:span text:style-name="T1">Respuesta:</text:span></text:span><text:span text:style-name="T1"> </text:span><text:span text:style-name="Strong_20_Emphasis"><text:span text:style-name="T1">El juicio de la Palabra.</text:span></text:span><text:span text:style-name="T1"> (Separa a los creyentes que tienen mentiras/pensamientos erróneos de los que tienen la Palabra verdadera: profecía y cumplimiento). </text:span></text:p>
            </text:list-item>
          </text:list>
        </text:list-item>
      </text:list>
      <text:p text:style-name="Text_20_body"><text:span text:style-name="Strong_20_Emphasis"><text:span text:style-name="T1">📢 Anuncios:</text:span></text:span></text:p>
      <text:list text:style-name="L11">
        <text:list-item>
          <text:p text:style-name="P26"><text:span text:style-name="T1">La próxima semana tendremos otro </text:span><text:span text:style-name="Strong_20_Emphasis"><text:span text:style-name="T1">quiz</text:span></text:span><text:span text:style-name="T1"> para practicar más. </text:span></text:p>
        </text:list-item>
        <text:list-item>
          <text:p text:style-name="P25"><text:span text:style-name="T1">También tendremos una </text:span><text:span text:style-name="Strong_20_Emphasis"><text:span text:style-name="T1">reunión general</text:span></text:span><text:span text:style-name="T1"> para aclarar dudas y conversar. </text:span></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todos los siglos. Amén."</text:span></text:span></text:p>
      <text:p text:style-name="P27">¡Gracias a todos! Cuídense siempre y que Dios los bendiga. ¡Nos vemos la próxima semana!</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6:09.471649425</dc:date>
    <meta:editing-duration>PT1H35M22S</meta:editing-duration>
    <meta:editing-cycles>7</meta:editing-cycles>
    <meta:generator>LibreOffice/24.2.7.2$Linux_X86_64 LibreOffice_project/420$Build-2</meta:generator>
    <meta:document-statistic meta:table-count="0" meta:image-count="0" meta:object-count="0" meta:page-count="6" meta:paragraph-count="89" meta:word-count="1679" meta:character-count="9570" meta:non-whitespace-character-count="7988"/>
  </office:meta>
</office:document-meta>
</file>