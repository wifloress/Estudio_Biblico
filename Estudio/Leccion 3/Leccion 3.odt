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orizontal_20_Line">
      <style:text-properties style:font-name="Padauk Book"/>
    </style:style>
    <style:style style:name="P5" style:family="paragraph" style:parent-style-name="Standard">
      <style:text-properties style:font-name="Padauk Book"/>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3"/>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text-properties style:font-name="Padauk Book"/>
    </style:style>
    <style:style style:name="P32" style:family="paragraph" style:parent-style-name="Text_20_body" style:list-style-name="L11">
      <style:text-properties style:font-name="Padauk Book"/>
    </style:style>
    <style:style style:name="P33" style:family="paragraph" style:parent-style-name="Text_20_body" style:list-style-name="L14">
      <style:paragraph-properties fo:margin-top="0cm" fo:margin-bottom="0cm" style:contextual-spacing="false"/>
      <style:text-properties style:font-name="Padauk Book"/>
    </style:style>
    <style:style style:name="P34" style:family="paragraph" style:parent-style-name="Text_20_body" style:list-style-name="L14">
      <style:text-properties style:font-name="Padauk Book"/>
    </style:style>
    <style:style style:name="T1"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4 (PARTE 2)</text:h>
      <text:h text:style-name="P2" text:outline-level="2">Semilla, Campo, Árbol y Ave en Lenguaje Figurativo</text:h>
      <text:p text:style-name="P4"/>
      <text:h text:style-name="P2" text:outline-level="2">🔄 1. Repaso Inicial y Oración</text:h>
      <text:p text:style-name="Text_20_body"><text:span text:style-name="Emphasis"><text:span text:style-name="T1">(A cargo del Evangelista Christian Howard)</text:span></text:span></text:p>
      <text:p text:style-name="P31">Antes de comenzar la segunda parte de la lección, repasamos los conceptos fundamentales sobre los cuatro tipos de terrenos y las dos semillas espirituales:</text:p>
      <text:p text:style-name="Text_20_body"><text:span text:style-name="Strong_20_Emphasis"><text:span text:style-name="T1">Preguntas de Reflexión y Respuestas:</text:span></text:span></text:p>
      <text:list text:style-name="L1">
        <text:list-item>
          <text:p text:style-name="P7"><text:span text:style-name="Strong_20_Emphasis"><text:span text:style-name="T1">¿Qué enseñanza principal deja la parábola de los cuatro terrenos?</text:span></text:span></text:p>
          <text:list>
            <text:list-item>
              <text:p text:style-name="P7"><text:span text:style-name="Emphasis"><text:span text:style-name="T1">Respuesta:</text:span></text:span><text:span text:style-name="T1"> </text:span><text:span text:style-name="Strong_20_Emphasis"><text:span text:style-name="T1">B) El resultado depende de la condición del corazón.</text:span></text:span><text:span text:style-name="T1"> </text:span></text:p>
            </text:list-item>
          </text:list>
        </text:list-item>
        <text:list-item>
          <text:p text:style-name="P7"><text:span text:style-name="Strong_20_Emphasis"><text:span text:style-name="T1">¿Qué debe hacer la "buena tierra" además de escuchar la palabra?</text:span></text:span></text:p>
          <text:list>
            <text:list-item>
              <text:p text:style-name="P7"><text:span text:style-name="Emphasis"><text:span text:style-name="T1">Respuesta:</text:span></text:span><text:span text:style-name="T1"> </text:span><text:span text:style-name="Strong_20_Emphasis"><text:span text:style-name="T1">C) Retenerla y perseverar.</text:span></text:span><text:span text:style-name="T1"> (No solo escucharla, sino repasarla constantemente para dar fruto). </text:span></text:p>
            </text:list-item>
          </text:list>
        </text:list-item>
        <text:list-item>
          <text:p text:style-name="P7"><text:span text:style-name="Strong_20_Emphasis"><text:span text:style-name="T1">¿Cuáles son los dos tipos de semillas espirituales?</text:span></text:span></text:p>
          <text:list>
            <text:list-item>
              <text:p text:style-name="P7"><text:span text:style-name="Emphasis"><text:span text:style-name="T1">Respuesta:</text:span></text:span><text:span text:style-name="T1"> </text:span><text:span text:style-name="Strong_20_Emphasis"><text:span text:style-name="T1">La semilla de Dios (la Verdad) y la semilla de Satanás (la mentira/tergiversación).</text:span></text:span><text:span text:style-name="T1"> </text:span></text:p>
            </text:list-item>
          </text:list>
        </text:list-item>
        <text:list-item>
          <text:p text:style-name="P7"><text:span text:style-name="Strong_20_Emphasis"><text:span text:style-name="T1">Reflexión:</text:span></text:span><text:span text:style-name="T1"> </text:span><text:span text:style-name="Emphasis"><text:span text:style-name="T1">¿Cómo ha cambiado tu pensamiento sobre "recibir la palabra de Dios"?</text:span></text:span></text:p>
          <text:list>
            <text:list-item>
              <text:p text:style-name="P6"><text:span text:style-name="Emphasis"><text:span text:style-name="T1">Conclusión:</text:span></text:span><text:span text:style-name="T1"> No basta con escuchar cualquier palabra; debemos tener un oído atento para verificar si lo que se dice está acorde a la Biblia, ya que hay palabras de Dios y palabras de hombres. </text:span></text:p>
            </text:list-item>
          </text:list>
        </text:list-item>
      </text:list>
      <text:p text:style-name="Text_20_body"><text:span text:style-name="Strong_20_Emphasis"><text:span text:style-name="T1">Oración de apertura:</text:span></text:span></text:p>
      <text:p text:style-name="Quotations"><text:span text:style-name="Emphasis"><text:span text:style-name="T1">"Santísimo Padre Dios, gracias por guiarnos a este estudio. Sabemos que solo podemos hacer esto porque tú nos has guiado. Es usted quien nos inspira a aprender más sobre ti, Dios. Es usted quien nos da este corazón hambriento que tenemos para ti, y te agradecemos muchísimo. Dios, por favor, manda tus espíritus santos a nuestros miembros que tienen ese corazón hambriento, pero no pueden por dificultades del mundo. Dios, por favor, ayuda a esos miembros a tener datos para conectarse, que tengan electricidad para reunirse y escuchar esta palabra, Dios. Y siempre oramos para que esta semilla tuya entre en </text:span></text:span><text:soft-page-break/><text:span text:style-name="Emphasis"><text:span text:style-name="T1">nuestros corazones, crezca en nosotros y podamos ser esa buena tierra para ti. Dios, usted es el cosechador. Por favor, ayúdanos a cosechar esta semilla bien para que crezca. Y oramos todo esto en tu hijo Jesucristo. Amén."</text:span></text:span></text:p>
      <text:p text:style-name="P4"/>
      <text:h text:style-name="P2" text:outline-level="2">🌳 2. El Árbol en Figurativo: Significado y Características</text:h>
      <text:p text:style-name="Text_20_body"><text:span text:style-name="Emphasis"><text:span text:style-name="T1">(A cargo del Instructor Sibiani)</text:span></text:span></text:p>
      <text:h text:style-name="P3" text:outline-level="3">📌 ¿Qué representa el "Árbol"?</text:h>
      <text:p text:style-name="Text_20_body"><text:span text:style-name="T1">En lenguaje figurativo, el árbol representa </text:span><text:span text:style-name="Strong_20_Emphasis"><text:span text:style-name="T1">una persona interna renacida por medio de la semilla de la palabra</text:span></text:span><text:span text:style-name="T1"> (su espíritu), o también puede representar a un </text:span><text:span text:style-name="Strong_20_Emphasis"><text:span text:style-name="T1">pastor</text:span></text:span><text:span text:style-name="T1"> (alguien que comparte esa palabra).</text:span></text:p>
      <text:list text:style-name="L2">
        <text:list-item>
          <text:p text:style-name="P9"><text:span text:style-name="Strong_20_Emphasis"><text:span text:style-name="T1">La Regla de la Semilla:</text:span></text:span><text:span text:style-name="T1"> Así como en la naturaleza no puede haber un árbol sin una semilla, espiritualmente una persona solo se convierte en un "árbol" cuando recibe la semilla de la palabra de Dios en su corazón y renace. </text:span></text:p>
        </text:list-item>
        <text:list-item>
          <text:p text:style-name="P9"><text:span text:style-name="Strong_20_Emphasis"><text:span text:style-name="T1">Características Físicas vs. Espirituales:</text:span></text:span></text:p>
          <text:list>
            <text:list-item>
              <text:p text:style-name="P9"><text:span text:style-name="Emphasis"><text:span text:style-name="T1">Físico:</text:span></text:span><text:span text:style-name="T1"> Un árbol da sombra, es el lugar favorito de las aves para anidar, tiene ramas, hojas y frutos. </text:span></text:p>
            </text:list-item>
            <text:list-item>
              <text:p text:style-name="P8"><text:span text:style-name="Emphasis"><text:span text:style-name="T1">Espiritual:</text:span></text:span><text:span text:style-name="T1"> Un árbol espiritual provee refugio, se extiende (ramas), sana (hojas) y produce más vida (frutos). </text:span></text:p>
            </text:list-item>
          </text:list>
        </text:list-item>
      </text:list>
      <text:h text:style-name="P3" text:outline-level="3">🍇 La Analogía del Árbol de Mangos</text:h>
      <text:p text:style-name="Text_20_body"><text:span text:style-name="T1">¿Cómo sabemos qué clase de semilla tenemos? Cuando ves una semilla en tu mano, es difícil saber qué es. Pero cuando la siembras, crece y da frutos, ahí sabes exactamente qué semilla era (una semilla de manzana no da limones). De la misma manera, </text:span><text:span text:style-name="Strong_20_Emphasis"><text:span text:style-name="T1">por los frutos (las palabras y acciones) conoceremos qué clase de árbol espiritual es una persona.</text:span></text:span></text:p>
      <text:p text:style-name="P4"/>
      <text:h text:style-name="P2" text:outline-level="2">⚖️ 3. Los Dos Tipos de Árboles Espirituales</text:h>
      <text:p text:style-name="P31">En la Biblia existen dos tipos de árboles que representan dos organizaciones y dos tipos de pastores:</text:p>
      <text:h text:style-name="P3" text:outline-level="3"><text:soft-page-break/>✅ 1. El Árbol de la Vida (Lado de Dios)</text:h>
      <text:list text:style-name="L3">
        <text:list-item>
          <text:p text:style-name="P11"><text:span text:style-name="Strong_20_Emphasis"><text:span text:style-name="T1">Representa a:</text:span></text:span><text:span text:style-name="T1"> Jesús (la Vid Verdadera) y su organización (el pastor verdadero y sus discípulos). </text:span></text:p>
        </text:list-item>
        <text:list-item>
          <text:p text:style-name="P11"><text:span text:style-name="Strong_20_Emphasis"><text:span text:style-name="T1">Juan 15:1:</text:span></text:span><text:span text:style-name="T1"> </text:span><text:span text:style-name="Emphasis"><text:span text:style-name="T1">"Yo soy la vid verdadera, y mi Padre es el labrador"</text:span></text:span><text:span text:style-name="T1">. </text:span></text:p>
        </text:list-item>
        <text:list-item>
          <text:p text:style-name="P11"><text:span text:style-name="Strong_20_Emphasis"><text:span text:style-name="T1">Juan 14:6:</text:span></text:span><text:span text:style-name="T1"> </text:span><text:span text:style-name="Emphasis"><text:span text:style-name="T1">"Yo soy el camino, la verdad y la vida"</text:span></text:span><text:span text:style-name="T1">. </text:span></text:p>
        </text:list-item>
        <text:list-item>
          <text:p text:style-name="P10"><text:span text:style-name="Strong_20_Emphasis"><text:span text:style-name="T1">Características:</text:span></text:span><text:span text:style-name="T1"> Da 12 frutos cada mes (Apocalipsis 22:2) y sus hojas son para la sanidad de las naciones. </text:span></text:p>
        </text:list-item>
      </text:list>
      <text:h text:style-name="P3" text:outline-level="3">❌ 2. El Árbol de la Ciencia del Bien y del Mal (Lado de Satanás)</text:h>
      <text:list text:style-name="L4">
        <text:list-item>
          <text:p text:style-name="P13"><text:span text:style-name="Strong_20_Emphasis"><text:span text:style-name="T1">Representa a:</text:span></text:span><text:span text:style-name="T1"> Los falsos pastores, la organización de los fariseos/escribas en la Primera Venida, y el reino de Babilonia. </text:span></text:p>
        </text:list-item>
        <text:list-item>
          <text:p text:style-name="P13"><text:span text:style-name="Strong_20_Emphasis"><text:span text:style-name="T1">Daniel 4:20-22 (El árbol de Babilonia):</text:span></text:span><text:span text:style-name="T1"> El rey Nabucodonosor vio en sueños un árbol enorme cuya copa llegaba al cielo, donde anidaban las aves. Daniel le explica: </text:span><text:span text:style-name="Emphasis"><text:span text:style-name="T1">"Tú mismo eres, oh rey... tu grandeza ha llegado hasta el cielo"</text:span></text:span><text:span text:style-name="T1">. Representa un reino gentil, orgulloso, que no pertenece a Dios, pero que parece hermoso y alimenta a las bestias del campo (falsas enseñanzas que el mundo acepta). </text:span></text:p>
        </text:list-item>
        <text:list-item>
          <text:p text:style-name="P13"><text:span text:style-name="Strong_20_Emphasis"><text:span text:style-name="T1">Deuteronomio 32:32-33:</text:span></text:span><text:span text:style-name="T1"> </text:span><text:span text:style-name="Emphasis"><text:span text:style-name="T1">"Porque de la vid de Sodoma es la vid de ellos... su fruto es veneno de serpientes, y veneno ponzoñoso"</text:span></text:span><text:span text:style-name="T1">. </text:span></text:p>
        </text:list-item>
        <text:list-item>
          <text:p text:style-name="P12"><text:span text:style-name="Strong_20_Emphasis"><text:span text:style-name="T1">El Peligro:</text:span></text:span><text:span text:style-name="T1"> Este árbol no se ve "feo" ni satánico por fuera. Al contrario, parece muy atractivo, pero su fruto (sus palabras) es veneno espiritual que engaña y mata. </text:span></text:p>
        </text:list-item>
      </text:list>
      <text:p text:style-name="P4"/>
      <text:h text:style-name="P2" text:outline-level="2">🌿 4. Los Elementos del Árbol: Ramas, Hojas y Frutos</text:h>
      <text:p text:style-name="P31">Para entender completamente la parábola, debemos analizar cada elemento del árbol:</text:p>
      <text:h text:style-name="P3" text:outline-level="3">🌿 Las Ramas (Los Discípulos)</text:h>
      <text:list text:style-name="L5">
        <text:list-item>
          <text:p text:style-name="P15"><text:span text:style-name="Strong_20_Emphasis"><text:span text:style-name="T1">Juan 15:5:</text:span></text:span><text:span text:style-name="T1"> </text:span><text:span text:style-name="Emphasis"><text:span text:style-name="T1">"Yo soy la vid, vosotros los pámpanos [ramas]"</text:span></text:span><text:span text:style-name="T1">. </text:span></text:p>
        </text:list-item>
        <text:list-item>
          <text:p text:style-name="P15"><text:span text:style-name="Strong_20_Emphasis"><text:span text:style-name="T1">Significado:</text:span></text:span><text:span text:style-name="T1"> Las ramas son los discípulos que se extienden desde el tronco (Jesús/el pastor verdadero). </text:span></text:p>
        </text:list-item>
        <text:list-item>
          <text:p text:style-name="P14"><text:span text:style-name="Strong_20_Emphasis"><text:span text:style-name="T1">La Condición:</text:span></text:span><text:span text:style-name="T1"> </text:span><text:span text:style-name="Emphasis"><text:span text:style-name="T1">"El que permanece en mí, y yo en él, este lleva mucho fruto"</text:span></text:span><text:span text:style-name="T1">. ¿Cómo permanecemos en Él? Recibiendo y guardando Sus palabras. Separados de Su palabra, nada podemos hacer. </text:span></text:p>
        </text:list-item>
      </text:list>
      <text:h text:style-name="P3" text:outline-level="3">🍃 Las Hojas (Los Evangelistas / La Sanidad)</text:h>
      <text:list text:style-name="L6">
        <text:list-item>
          <text:p text:style-name="P17"><text:span text:style-name="Strong_20_Emphasis"><text:span text:style-name="T1">Ezequiel 47:12:</text:span></text:span><text:span text:style-name="T1"> </text:span><text:span text:style-name="Emphasis"><text:span text:style-name="T1">"Sus hojas nunca caerán... y su hoja para medicina"</text:span></text:span><text:span text:style-name="T1">. </text:span></text:p>
        </text:list-item>
        <text:list-item>
          <text:p text:style-name="P17"><text:soft-page-break/><text:span text:style-name="Strong_20_Emphasis"><text:span text:style-name="T1">Apocalipsis 22:2:</text:span></text:span><text:span text:style-name="T1"> </text:span><text:span text:style-name="Emphasis"><text:span text:style-name="T1">"Y las hojas del árbol eran para la sanidad de las naciones"</text:span></text:span><text:span text:style-name="T1">. </text:span></text:p>
        </text:list-item>
        <text:list-item>
          <text:p text:style-name="P17"><text:span text:style-name="Strong_20_Emphasis"><text:span text:style-name="T1">Significado:</text:span></text:span><text:span text:style-name="T1"> En la naturaleza, se necesitan aproximadamente 40 hojas para producir la energía de un solo fruto. Espiritualmente, las hojas representan a los </text:span><text:span text:style-name="Strong_20_Emphasis"><text:span text:style-name="T1">evangelistas</text:span></text:span><text:span text:style-name="T1"> y a la </text:span><text:span text:style-name="Strong_20_Emphasis"><text:span text:style-name="T1">palabra de vida</text:span></text:span><text:span text:style-name="T1"> que comparten. </text:span></text:p>
        </text:list-item>
        <text:list-item>
          <text:p text:style-name="P16"><text:span text:style-name="Emphasis"><text:span text:style-name="T1">Reflexión:</text:span></text:span><text:span text:style-name="T1"> ¿Qué puede sanar espiritualmente a las naciones enfermas? No es medicina física, es la palabra de Dios que los evangelistas llevan. </text:span></text:p>
        </text:list-item>
      </text:list>
      <text:h text:style-name="P3" text:outline-level="3">🍎 El Fruto (Las Palabras y la Congregación)</text:h>
      <text:list text:style-name="L7">
        <text:list-item>
          <text:p text:style-name="P19"><text:span text:style-name="Strong_20_Emphasis"><text:span text:style-name="T1">Santiago 1:18:</text:span></text:span><text:span text:style-name="T1"> </text:span><text:span text:style-name="Emphasis"><text:span text:style-name="T1">"Él, de su voluntad, nos hizo nacer por la palabra de verdad, para que seamos primicias de sus criaturas"</text:span></text:span><text:span text:style-name="T1">. (El fruto son las personas que renacen por la palabra). </text:span></text:p>
        </text:list-item>
        <text:list-item>
          <text:p text:style-name="P19"><text:span text:style-name="Strong_20_Emphasis"><text:span text:style-name="T1">Proverbios 12:14:</text:span></text:span><text:span text:style-name="T1"> </text:span><text:span text:style-name="Emphasis"><text:span text:style-name="T1">"El hombre será saciado de bien del fruto de su boca"</text:span></text:span><text:span text:style-name="T1">. (El fruto también son las palabras que salen de la boca). </text:span></text:p>
        </text:list-item>
        <text:list-item>
          <text:p text:style-name="P19"><text:span text:style-name="Strong_20_Emphasis"><text:span text:style-name="T1">Mateo 7:20:</text:span></text:span><text:span text:style-name="T1"> </text:span><text:span text:style-name="Emphasis"><text:span text:style-name="T1">"Así que, por sus frutos los conoceréis"</text:span></text:span><text:span text:style-name="T1">. </text:span></text:p>
        </text:list-item>
        <text:list-item>
          <text:p text:style-name="P18"><text:span text:style-name="Emphasis"><text:span text:style-name="T1">Conclusión:</text:span></text:span><text:span text:style-name="T1"> Si un árbol tiene la semilla de Dios, su fruto (lo que habla) será la verdad de Dios. Si tiene la semilla de Satanás, su fruto será veneno/mentira. </text:span></text:p>
        </text:list-item>
      </text:list>
      <text:p text:style-name="P4"/>
      <text:h text:style-name="P2" text:outline-level="2">🕊️ 5. Las Aves en Figurativo: Los Espíritus</text:h>
      <text:p text:style-name="Text_20_body"><text:span text:style-name="T1">Las aves representan a los </text:span><text:span text:style-name="Strong_20_Emphasis"><text:span text:style-name="T1">espíritus</text:span></text:span><text:span text:style-name="T1"> (tanto santos como inmundos), ya que vuelan (son del cielo/mundo espiritual) y buscan posarse en los árboles (las personas/pastores).</text:span></text:p>
      <text:h text:style-name="P3" text:outline-level="3">🕊️ Las Aves de Dios (Espíritus Santos)</text:h>
      <text:list text:style-name="L8">
        <text:list-item>
          <text:p text:style-name="P21"><text:span text:style-name="Strong_20_Emphasis"><text:span text:style-name="T1">Mateo 3:16:</text:span></text:span><text:span text:style-name="T1"> En el bautismo de Jesús, </text:span><text:span text:style-name="Emphasis"><text:span text:style-name="T1">"vio al Espíritu de Dios que descendía como paloma, y venía sobre él"</text:span></text:span><text:span text:style-name="T1">. </text:span></text:p>
        </text:list-item>
        <text:list-item>
          <text:p text:style-name="P20"><text:span text:style-name="Emphasis"><text:span text:style-name="T1">Significado:</text:span></text:span><text:span text:style-name="T1"> El Espíritu Santo desciende y reposa sobre el árbol verdadero (Jesús). </text:span></text:p>
        </text:list-item>
      </text:list>
      <text:h text:style-name="P3" text:outline-level="3">🦅 Las Aves de Satanás (Espíritus Inmundos)</text:h>
      <text:list text:style-name="L9">
        <text:list-item>
          <text:p text:style-name="P23"><text:span text:style-name="Strong_20_Emphasis"><text:span text:style-name="T1">Lucas 8:5-12:</text:span></text:span><text:span text:style-name="T1"> En la parábola del sembrador, </text:span><text:span text:style-name="Emphasis"><text:span text:style-name="T1">"las aves del cielo la comieron [la semilla junto al camino]"</text:span></text:span><text:span text:style-name="T1">. Jesús explica que estas aves son el diablo que viene y quita la palabra del corazón de las personas. </text:span></text:p>
        </text:list-item>
        <text:list-item>
          <text:p text:style-name="P23"><text:span text:style-name="Strong_20_Emphasis"><text:span text:style-name="T1">Apocalipsis 18:2:</text:span></text:span><text:span text:style-name="T1"> Describe a Babilonia (el reino de Satanás) como </text:span><text:span text:style-name="Emphasis"><text:span text:style-name="T1">"habitación de demonios y guarida de todo espíritu inmundo y albergue de toda ave inmunda y aborrecible"</text:span></text:span><text:span text:style-name="T1">. </text:span></text:p>
        </text:list-item>
        <text:list-item>
          <text:p text:style-name="P22"><text:soft-page-break/><text:span text:style-name="Emphasis"><text:span text:style-name="T1">El Peligro:</text:span></text:span><text:span text:style-name="T1"> Cada vez que recibimos la verdadera palabra, Satanás envía sus "aves" (distracciones, dudas, pensamientos mundanos) para robar la semilla de nuestro corazón antes de que eche raíz. </text:span></text:p>
        </text:list-item>
      </text:list>
      <text:p text:style-name="P4"/>
      <text:h text:style-name="P2" text:outline-level="2">🛡️ 6. La Realidad de los Dos Árboles y Cómo Distinguirlos</text:h>
      <text:h text:style-name="P3" text:outline-level="3">🎭 La Realidad en la Primera Venida</text:h>
      <text:list text:style-name="L10">
        <text:list-item>
          <text:p text:style-name="P25"><text:span text:style-name="Strong_20_Emphasis"><text:span text:style-name="T1">Árbol de la Vida:</text:span></text:span><text:span text:style-name="T1"> Jesús y los 12 discípulos. Daban fruto de vida eterna. </text:span></text:p>
        </text:list-item>
        <text:list-item>
          <text:p text:style-name="P24"><text:span text:style-name="Strong_20_Emphasis"><text:span text:style-name="T1">Árbol de la Ciencia del Bien y del Mal:</text:span></text:span><text:span text:style-name="T1"> Los fariseos, saduceos y escribas. Parecían religiosos y respetables, pero su fruto (enseñanzas) era veneno que llevó a crucificar a la Verdad. </text:span></text:p>
        </text:list-item>
      </text:list>
      <text:h text:style-name="P3" text:outline-level="3">🔍 ¿Cómo Distinguir los Dos Árboles Hoy?</text:h>
      <text:p text:style-name="P31">Es muy difícil mirar un árbol y saber qué clase de semilla tiene solo mirando su corteza o sus hojas. Todos los pastores dicen "creo en Dios", todos tienen biblias.</text:p>
      <text:list text:style-name="L11">
        <text:list-item>
          <text:p text:style-name="P26"><text:span text:style-name="Strong_20_Emphasis"><text:span text:style-name="T1">La Solución:</text:span></text:span><text:span text:style-name="T1"> </text:span><text:span text:style-name="Strong_20_Emphasis"><text:span text:style-name="T1">Mateo 7:15-20</text:span></text:span><text:span text:style-name="T1"> </text:span><text:span text:style-name="Emphasis"><text:span text:style-name="T1">"Por sus frutos los conoceréis"</text:span></text:span><text:span text:style-name="T1">. </text:span></text:p>
        </text:list-item>
        <text:list-item>
          <text:p text:style-name="P26"><text:span text:style-name="T1">Debemos evaluar </text:span><text:span text:style-name="Strong_20_Emphasis"><text:span text:style-name="T1">las palabras que salen de su boca</text:span></text:span><text:span text:style-name="T1"> (el fruto). ¿Están acorde a la profecía y el cumplimiento de la Biblia? ¿Son palabras de vida o son tradiciones humanas/veneno? </text:span></text:p>
        </text:list-item>
        <text:list-item>
          <text:p text:style-name="P32">Si comemos del fruto del árbol equivocado, moriremos espiritualmente. Debemos comer del Árbol de la Vida (la palabra del verdadero pastor). </text:p>
        </text:list-item>
      </text:list>
      <text:p text:style-name="P4"/>
      <text:h text:style-name="P2" text:outline-level="2">🎯 7. Conclusiones de la Lección</text:h>
      <text:list text:style-name="L12">
        <text:list-item>
          <text:p text:style-name="P28"><text:span text:style-name="Strong_20_Emphasis"><text:span text:style-name="T1">El Reino de los Cielos</text:span></text:span><text:span text:style-name="T1"> es como el Árbol de la Vida que da 12 frutos cada mes (Apocalipsis 22:2). </text:span></text:p>
        </text:list-item>
        <text:list-item>
          <text:p text:style-name="P28"><text:span text:style-name="Strong_20_Emphasis"><text:span text:style-name="T1">Nuestro Deber:</text:span></text:span><text:span text:style-name="T1"> Distinguir a los dos pastores (representados por los dos árboles) a través de la Biblia. </text:span></text:p>
        </text:list-item>
        <text:list-item>
          <text:p text:style-name="P28"><text:span text:style-name="Strong_20_Emphasis"><text:span text:style-name="T1">La Acción:</text:span></text:span><text:span text:style-name="T1"> Debemos comer del fruto del Árbol de la Vida (la palabra del verdadero pastor) y pertenecer a Él. </text:span></text:p>
        </text:list-item>
        <text:list-item>
          <text:p text:style-name="P27"><text:span text:style-name="Strong_20_Emphasis"><text:span text:style-name="T1">El Renacimiento:</text:span></text:span><text:span text:style-name="T1"> Dependiendo de la semilla que recibas, tu padre será diferente. Si esperas el cielo, debes renacer obligatoriamente de la semilla de Dios (la Verdad). </text:span></text:p>
        </text:list-item>
      </text:list>
      <text:p text:style-name="Text_20_body"><text:soft-page-break/><text:span text:style-name="Strong_20_Emphasis"><text:span text:style-name="T1">📢 Anuncio para la Próxima Lección:</text:span></text:span><text:span text:style-name="T1"> La próxima vez veremos sobre </text:span><text:span text:style-name="Strong_20_Emphasis"><text:span text:style-name="T1">Alimento y Levadura Espiritual</text:span></text:span><text:span text:style-name="T1"> en figurativo. ¡Vengan con el "estómago hambriento" para recibir la palabra!</text:span></text:p>
      <text:p text:style-name="P4"/>
      <text:h text:style-name="P2" text:outline-level="2">🔄 8. Repaso Final Interactivo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13">
        <text:list-item>
          <text:p text:style-name="P30"><text:span text:style-name="Strong_20_Emphasis"><text:span text:style-name="T1">¿Qué significa el árbol espiritual?</text:span></text:span><text:span text:style-name="T1"> Una persona renacida por la semilla espiritual, o un pastor. </text:span></text:p>
        </text:list-item>
        <text:list-item>
          <text:p text:style-name="P30"><text:span text:style-name="Strong_20_Emphasis"><text:span text:style-name="T1">¿Cuáles son los dos árboles?</text:span></text:span><text:span text:style-name="T1"> El Árbol de la Vida (Dios) y el Árbol de la Ciencia del Bien y del Mal (Satanás). </text:span></text:p>
        </text:list-item>
        <text:list-item>
          <text:p text:style-name="P30"><text:span text:style-name="Strong_20_Emphasis"><text:span text:style-name="T1">¿Qué son las aves?</text:span></text:span><text:span text:style-name="T1"> Los espíritus (buenos y malos). </text:span></text:p>
        </text:list-item>
        <text:list-item>
          <text:p text:style-name="P30"><text:span text:style-name="Strong_20_Emphasis"><text:span text:style-name="T1">¿Qué son las ramas?</text:span></text:span><text:span text:style-name="T1"> Los discípulos. </text:span></text:p>
        </text:list-item>
        <text:list-item>
          <text:p text:style-name="P30"><text:span text:style-name="Strong_20_Emphasis"><text:span text:style-name="T1">¿Qué son las hojas?</text:span></text:span><text:span text:style-name="T1"> Los evangelistas (para la sanidad de las naciones). </text:span></text:p>
        </text:list-item>
        <text:list-item>
          <text:p text:style-name="P30"><text:span text:style-name="Strong_20_Emphasis"><text:span text:style-name="T1">¿Qué son los frutos?</text:span></text:span><text:span text:style-name="T1"> La palabra y la congregación que se da por la palabra. </text:span></text:p>
        </text:list-item>
        <text:list-item>
          <text:p text:style-name="P29"><text:span text:style-name="Strong_20_Emphasis"><text:span text:style-name="T1">¿Cómo distinguimos los árboles?</text:span></text:span><text:span text:style-name="T1"> Por sus frutos (las palabras), refiriéndonos siempre a la Biblia. </text:span></text:p>
        </text:list-item>
      </text:list>
      <text:p text:style-name="Text_20_body"><text:span text:style-name="Strong_20_Emphasis"><text:span text:style-name="T1">📢 Anuncios Logísticos:</text:span></text:span></text:p>
      <text:list text:style-name="L14">
        <text:list-item>
          <text:p text:style-name="P33">Por favor, cambien sus nombres en Zoom para incluir el número que les asignaron (los ayudantes les enviarán un video tutorial si no saben cómo hacerlo). </text:p>
        </text:list-item>
        <text:list-item>
          <text:p text:style-name="P34">Después del Padre Nuestro, nos quedaremos para una breve reunión de preguntas y respuestas. </text:p>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deudas, como también nosotros perdonamos a nuestros deudores. No nos dejes caer en la tentación, mas líbranos del mal. Porque tuyo es el reino, el poder y la gloria, por los siglos de los siglos. Amén."</text:span></text:span></text:p>
      <text:p text:style-name="P31">¡Gracias a todos! Cuídense, que Dios los bendiga. ¡Nos vemos en la próxima lección!</text:p>
      <text:p text:style-name="P4"/>
      <text:p text:style-name="Text_20_body"><text:soft-page-break/><text:span text:style-name="T1">💡 </text:span><text:span text:style-name="Strong_20_Emphasis"><text:span text:style-name="T1">Nota:</text:span></text:span><text:span text:style-name="T1"> </text:span><text:span text:style-name="Emphasis"><text:span text:style-name="T1">Este es el archivo correspondiente a la Lección 4 Parte 2. Copia y pega este texto en tu procesador de textos para mantener tu cuaderno actualizado. Cuando estés listo para continuar, </text:span></text:span><text:span text:style-name="Emphasis"><text:span text:style-name="Strong_20_Emphasis"><text:span text:style-name="T1">responde a este mensaje con la palabra "continua"</text:span></text:span></text:span><text:span text:style-name="Emphasis"><text:span text:style-name="T1"> (y sube el siguiente archivo si es necesario) y te enviaré la siguiente parte con el mismo formato profesional.</text:span></text:spa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02T08:57:24.820681338</dc:date>
    <meta:editing-duration>PT1M38S</meta:editing-duration>
    <meta:editing-cycles>2</meta:editing-cycles>
    <meta:generator>LibreOffice/24.2.7.2$Linux_X86_64 LibreOffice_project/420$Build-2</meta:generator>
    <meta:document-statistic meta:table-count="0" meta:image-count="0" meta:object-count="0" meta:page-count="7" meta:paragraph-count="95" meta:word-count="1832" meta:character-count="10632" meta:non-whitespace-character-count="8900"/>
  </office:meta>
</office:document-meta>
</file>