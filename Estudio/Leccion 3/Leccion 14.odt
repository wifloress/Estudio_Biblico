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Horizontal_20_Line">
      <style:text-properties style:font-name="Padauk Book"/>
    </style:style>
    <style:style style:name="P6" style:family="paragraph" style:parent-style-name="Heading_20_1">
      <style:text-properties style:font-name="Padauk Book"/>
    </style:style>
    <style:style style:name="P7" style:family="paragraph" style:parent-style-name="Heading_20_2">
      <style:text-properties style:font-name="Padauk Book"/>
    </style:style>
    <style:style style:name="P8" style:family="paragraph" style:parent-style-name="Heading_20_3">
      <style:text-properties style:font-name="Padauk Book"/>
    </style:style>
    <style:style style:name="P9" style:family="paragraph" style:parent-style-name="Heading_20_4">
      <style:text-properties style:font-name="Padauk Book"/>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text-properties style:font-name="Padauk Book"/>
    </style:style>
    <style:style style:name="P23" style:family="paragraph" style:parent-style-name="Text_20_body" style:list-style-name="L7">
      <style:text-properties style:font-name="Padauk Book"/>
    </style:style>
    <style:style style:name="P24" style:family="paragraph" style:parent-style-name="Text_20_body" style:list-style-name="L8">
      <style:paragraph-properties fo:margin-top="0cm" fo:margin-bottom="0cm" style:contextual-spacing="false"/>
      <style:text-properties style:font-name="Padauk Book"/>
    </style:style>
    <style:style style:name="P25" style:family="paragraph" style:parent-style-name="Text_20_body" style:list-style-name="L8">
      <style:text-properties style:font-name="Padauk Book"/>
    </style:style>
    <style:style style:name="P26" style:family="paragraph" style:parent-style-name="Text_20_body" style:list-style-name="L10">
      <style:paragraph-properties fo:margin-top="0cm" fo:margin-bottom="0cm" style:contextual-spacing="false"/>
      <style:text-properties style:font-name="Padauk Book"/>
    </style:style>
    <style:style style:name="P27" style:family="paragraph" style:parent-style-name="Text_20_body" style:list-style-name="L10">
      <style:text-properties style:font-name="Padauk Book"/>
    </style:style>
    <style:style style:name="P28" style:family="paragraph" style:parent-style-name="Text_20_body" style:list-style-name="L13">
      <style:paragraph-properties fo:margin-top="0cm" fo:margin-bottom="0cm" style:contextual-spacing="false"/>
      <style:text-properties style:font-name="Padauk Book"/>
    </style:style>
    <style:style style:name="P29" style:family="paragraph" style:parent-style-name="Text_20_body" style:list-style-name="L13">
      <style:text-properties style:font-name="Padauk Book"/>
    </style:style>
    <style:style style:name="P30" style:family="paragraph" style:parent-style-name="Text_20_body" style:list-style-name="L19">
      <style:paragraph-properties fo:margin-top="0cm" fo:margin-bottom="0cm" style:contextual-spacing="false"/>
      <style:text-properties style:font-name="Padauk Book"/>
    </style:style>
    <style:style style:name="P31" style:family="paragraph" style:parent-style-name="Text_20_body" style:list-style-name="L19">
      <style:text-properties style:font-name="Padauk Book"/>
    </style:style>
    <style:style style:name="P32" style:family="paragraph" style:parent-style-name="Text_20_body" style:list-style-name="L9"/>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6"/>
    <style:style style:name="P44" style:family="paragraph" style:parent-style-name="Text_20_body" style:list-style-name="L16">
      <style:paragraph-properties fo:margin-top="0cm" fo:margin-bottom="0cm" style:contextual-spacing="false"/>
    </style:style>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8">
      <style:paragraph-properties fo:margin-top="0cm" fo:margin-bottom="0cm" style:contextual-spacing="false"/>
    </style:style>
    <style:style style:name="P48" style:family="paragraph" style:parent-style-name="Text_20_body" style:list-style-name="L20">
      <style:paragraph-properties fo:margin-top="0cm" fo:margin-bottom="0cm" style:contextual-spacing="false"/>
    </style:style>
    <style:style style:name="P49" style:family="paragraph" style:parent-style-name="Text_20_body" style:list-style-name="L21"/>
    <style:style style:name="P50" style:family="paragraph" style:parent-style-name="Text_20_body" style:list-style-name="L21">
      <style:paragraph-properties fo:margin-top="0cm" fo:margin-bottom="0cm" style:contextual-spacing="false"/>
    </style:style>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P54" style:family="paragraph" style:parent-style-name="Text_20_body" style:list-style-name="L24"/>
    <style:style style:name="P55" style:family="paragraph" style:parent-style-name="Text_20_body" style:list-style-name="L24">
      <style:paragraph-properties fo:margin-top="0cm" fo:margin-bottom="0cm" style:contextual-spacing="false"/>
    </style:style>
    <style:style style:name="P56" style:family="paragraph" style:parent-style-name="Text_20_body" style:list-style-name="L25"/>
    <style:style style:name="P57" style:family="paragraph" style:parent-style-name="Text_20_body" style:list-style-name="L25">
      <style:paragraph-properties fo:margin-top="0cm" fo:margin-bottom="0cm" style:contextual-spacing="false"/>
    </style:style>
    <style:style style:name="P58" style:family="paragraph" style:parent-style-name="Text_20_body" style:list-style-name="L26"/>
    <style:style style:name="P59" style:family="paragraph" style:parent-style-name="Text_20_body" style:list-style-name="L26">
      <style:paragraph-properties fo:margin-top="0cm" fo:margin-bottom="0cm" style:contextual-spacing="false"/>
    </style:style>
    <style:style style:name="P60" style:family="paragraph" style:parent-style-name="Text_20_body" style:list-style-name="L27">
      <style:paragraph-properties fo:margin-top="0cm" fo:margin-bottom="0cm" style:contextual-spacing="false"/>
    </style:style>
    <style:style style:name="P61" style:family="paragraph" style:parent-style-name="Text_20_body" style:list-style-name="L28"/>
    <style:style style:name="P62" style:family="paragraph" style:parent-style-name="Text_20_body" style:list-style-name="L28">
      <style:paragraph-properties fo:margin-top="0cm" fo:margin-bottom="0cm" style:contextual-spacing="false"/>
    </style:style>
    <style:style style:name="P63" style:family="paragraph" style:parent-style-name="Text_20_body" style:list-style-name="L29"/>
    <style:style style:name="P64" style:family="paragraph" style:parent-style-name="Text_20_body" style:list-style-name="L29">
      <style:paragraph-properties fo:margin-top="0cm" fo:margin-bottom="0cm" style:contextual-spacing="false"/>
    </style:style>
    <style:style style:name="P65" style:family="paragraph" style:parent-style-name="Text_20_body" style:list-style-name="L31"/>
    <style:style style:name="P66" style:family="paragraph" style:parent-style-name="Text_20_body" style:list-style-name="L31">
      <style:paragraph-properties fo:margin-top="0cm" fo:margin-bottom="0cm" style:contextual-spacing="false"/>
    </style:style>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4">
      <style:paragraph-properties fo:margin-top="0cm" fo:margin-bottom="0cm" style:contextual-spacing="false"/>
    </style:style>
    <style:style style:name="P71" style:family="paragraph" style:parent-style-name="Text_20_body" style:list-style-name="L35"/>
    <style:style style:name="P72" style:family="paragraph" style:parent-style-name="Text_20_body" style:list-style-name="L35">
      <style:paragraph-properties fo:margin-top="0cm" fo:margin-bottom="0cm" style:contextual-spacing="false"/>
    </style:style>
    <style:style style:name="P73" style:family="paragraph" style:parent-style-name="Text_20_body" style:list-style-name="L37"/>
    <style:style style:name="P74" style:family="paragraph" style:parent-style-name="Text_20_body" style:list-style-name="L37">
      <style:paragraph-properties fo:margin-top="0cm" fo:margin-bottom="0cm" style:contextual-spacing="false"/>
    </style:style>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2">
      <style:paragraph-properties fo:margin-top="0cm" fo:margin-bottom="0cm" style:contextual-spacing="false"/>
    </style:style>
    <style:style style:name="P81" style:family="paragraph" style:parent-style-name="Text_20_body" style:list-style-name="L43"/>
    <style:style style:name="P82" style:family="paragraph" style:parent-style-name="Text_20_body" style:list-style-name="L43">
      <style:paragraph-properties fo:margin-top="0cm" fo:margin-bottom="0cm" style:contextual-spacing="false"/>
    </style:style>
    <style:style style:name="P83" style:family="paragraph" style:parent-style-name="Text_20_body" style:list-style-name="L44"/>
    <style:style style:name="P84" style:family="paragraph" style:parent-style-name="Text_20_body" style:list-style-name="L44">
      <style:paragraph-properties fo:margin-top="0cm" fo:margin-bottom="0cm" style:contextual-spacing="false"/>
    </style:style>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6">
      <style:paragraph-properties fo:margin-top="0cm" fo:margin-bottom="0cm" style:contextual-spacing="false"/>
    </style:style>
    <style:style style:name="P88" style:family="paragraph" style:parent-style-name="Text_20_body">
      <style:text-properties style:font-name="Padauk Book"/>
    </style:style>
    <style:style style:name="P89" style:family="paragraph" style:parent-style-name="Text_20_body" style:list-style-name="L20">
      <style:paragraph-properties fo:margin-top="0cm" fo:margin-bottom="0cm" style:contextual-spacing="false"/>
      <style:text-properties style:font-name="Padauk Book"/>
    </style:style>
    <style:style style:name="P90" style:family="paragraph" style:parent-style-name="Text_20_body" style:list-style-name="L20">
      <style:text-properties style:font-name="Padauk Book"/>
    </style:style>
    <style:style style:name="P91" style:family="paragraph" style:parent-style-name="Text_20_body" style:list-style-name="L27">
      <style:text-properties style:font-name="Padauk Book"/>
    </style:style>
    <style:style style:name="P92" style:family="paragraph" style:parent-style-name="Text_20_body" style:list-style-name="L30">
      <style:paragraph-properties fo:margin-top="0cm" fo:margin-bottom="0cm" style:contextual-spacing="false"/>
      <style:text-properties style:font-name="Padauk Book"/>
    </style:style>
    <style:style style:name="P93" style:family="paragraph" style:parent-style-name="Text_20_body" style:list-style-name="L30">
      <style:text-properties style:font-name="Padauk Book"/>
    </style:style>
    <style:style style:name="P94" style:family="paragraph" style:parent-style-name="Text_20_body" style:list-style-name="L36">
      <style:paragraph-properties fo:margin-top="0cm" fo:margin-bottom="0cm" style:contextual-spacing="false"/>
      <style:text-properties style:font-name="Padauk Book"/>
    </style:style>
    <style:style style:name="P95" style:family="paragraph" style:parent-style-name="Text_20_body" style:list-style-name="L36">
      <style:text-properties style:font-name="Padauk Book"/>
    </style:style>
    <style:style style:name="P96" style:family="paragraph" style:parent-style-name="Text_20_body" style:list-style-name="L38">
      <style:paragraph-properties fo:margin-top="0cm" fo:margin-bottom="0cm" style:contextual-spacing="false"/>
      <style:text-properties style:font-name="Padauk Book"/>
    </style:style>
    <style:style style:name="P97" style:family="paragraph" style:parent-style-name="Text_20_body" style:list-style-name="L44">
      <style:paragraph-properties fo:margin-top="0cm" fo:margin-bottom="0cm" style:contextual-spacing="false"/>
      <style:text-properties style:font-name="Padauk Book"/>
    </style:style>
    <style:style style:name="P98" style:family="paragraph" style:parent-style-name="Text_20_body" style:list-style-name="L47">
      <style:paragraph-properties fo:margin-top="0cm" fo:margin-bottom="0cm" style:contextual-spacing="false"/>
      <style:text-properties style:font-name="Padauk Book"/>
    </style:style>
    <style:style style:name="P99" style:family="paragraph" style:parent-style-name="Text_20_body" style:list-style-name="L47">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CUADERNO DE ESTUDIO: LECCIÓN 10</text:h>
      <text:h text:style-name="P1" text:outline-level="2">Agua, Fuente y Río en Lenguaje Figurativo</text:h>
      <text:p text:style-name="P3"/>
      <text:h text:style-name="P1" text:outline-level="2">🔄 1. Repaso Inicial: Tesoro y Hombre Rico</text:h>
      <text:p text:style-name="Text_20_body"><text:span text:style-name="Emphasis"><text:span text:style-name="T1">(A cargo del Evangelista Christian Howard)</text:span></text:span></text:p>
      <text:p text:style-name="P4">Antes de comenzar la nueva lección, repasamos los conceptos fundamentales de la lección anterior sobre el tesoro y el hombre rico:</text:p>
      <text:p text:style-name="Text_20_body"><text:span text:style-name="Strong_20_Emphasis"><text:span text:style-name="T1">Preguntas de Reflexión y Respuestas:</text:span></text:span></text:p>
      <text:list text:style-name="L20">
        <text:list-item>
          <text:p text:style-name="P48"><text:span text:style-name="Strong_20_Emphasis"><text:span text:style-name="T1">¿Cuál es el significado figurativo de tesoro?</text:span></text:span></text:p>
          <text:list>
            <text:list-item>
              <text:p text:style-name="P48"><text:span text:style-name="Emphasis"><text:span text:style-name="T1">Respuesta:</text:span></text:span><text:span text:style-name="T1"> Son las </text:span><text:span text:style-name="Strong_20_Emphasis"><text:span text:style-name="T1">palabras de Dios</text:span></text:span><text:span text:style-name="T1"> (la verdad) y también las </text:span><text:span text:style-name="Strong_20_Emphasis"><text:span text:style-name="T1">personas</text:span></text:span><text:span text:style-name="T1"> que tienen esa palabra en su corazón. </text:span></text:p>
            </text:list-item>
          </text:list>
        </text:list-item>
        <text:list-item>
          <text:p text:style-name="P48"><text:span text:style-name="Strong_20_Emphasis"><text:span text:style-name="T1">¿Qué representa cada tesoro (el de Dios y el de Satanás)?</text:span></text:span></text:p>
          <text:list>
            <text:list-item>
              <text:p text:style-name="P48"><text:span text:style-name="Strong_20_Emphasis"><text:span text:style-name="T1">Tesoro de Dios:</text:span></text:span><text:span text:style-name="T1"> La palabra de verdad y las personas (pastores verdaderos) que la tienen y la comparten. </text:span></text:p>
            </text:list-item>
            <text:list-item>
              <text:p text:style-name="P48"><text:span text:style-name="Strong_20_Emphasis"><text:span text:style-name="T1">Tesoro de Satanás:</text:span></text:span><text:span text:style-name="T1"> Las mentiras (falsedades que mezclan la palabra de Dios con pensamientos humanos) y los pastores falsos que las enseñan. </text:span></text:p>
            </text:list-item>
          </text:list>
        </text:list-item>
        <text:list-item>
          <text:p text:style-name="P48"><text:span text:style-name="Strong_20_Emphasis"><text:span text:style-name="T1">¿De qué está formada la Ciudad Santa Nueva Jerusalén (oro, perlas y cristal)?</text:span></text:span></text:p>
          <text:list>
            <text:list-item>
              <text:p text:style-name="P48"><text:span text:style-name="Emphasis"><text:span text:style-name="T1">Respuesta:</text:span></text:span><text:span text:style-name="T1"> No es una ciudad física. Es una </text:span><text:span text:style-name="Strong_20_Emphasis"><text:span text:style-name="T1">organización celestial</text:span></text:span><text:span text:style-name="T1"> formada por la palabra de la verdad y la gente (los hijos de Dios) que tiene y entiende esa palabra de verdad. </text:span></text:p>
            </text:list-item>
          </text:list>
        </text:list-item>
        <text:list-item>
          <text:p text:style-name="P48"><text:span text:style-name="Strong_20_Emphasis"><text:span text:style-name="T1">¿Qué es un hombre rico en sentido figurado?</text:span></text:span></text:p>
          <text:list>
            <text:list-item>
              <text:p text:style-name="P48"><text:span text:style-name="Emphasis"><text:span text:style-name="T1">Respuesta:</text:span></text:span><text:span text:style-name="T1"> Es un hombre con </text:span><text:span text:style-name="Strong_20_Emphasis"><text:span text:style-name="T1">muchas palabras</text:span></text:span><text:span text:style-name="T1"> (tesoros) en su corazón. </text:span></text:p>
            </text:list-item>
          </text:list>
        </text:list-item>
        <text:list-item>
          <text:p text:style-name="P48"><text:span text:style-name="Strong_20_Emphasis"><text:span text:style-name="T1">¿Qué clase de hombre rico no puede ir al cielo?</text:span></text:span></text:p>
          <text:list>
            <text:list-item>
              <text:p text:style-name="P48"><text:span text:style-name="Emphasis"><text:span text:style-name="T1">Respuesta:</text:span></text:span><text:span text:style-name="T1"> Aquel que:</text:span></text:p>
              <text:list>
                <text:list-item>
                  <text:p text:style-name="P89">Ama el dinero físico más que la palabra de Dios. </text:p>
                </text:list-item>
                <text:list-item>
                  <text:p text:style-name="P90">Tiene mentiras en lugar de la palabra verdadera y no las rechaza (como el mercader que no vendió todo para comprar la perla). </text:p>
                </text:list-item>
              </text:list>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darnos estas revelaciones. Nos estás enseñando qué significa ser una persona rica, qué es una persona pobre. Dios, ya </text:span></text:span><text:soft-page-break/><text:span text:style-name="Emphasis"><text:span text:style-name="T1">estamos entendiendo más y más cuando dice la Biblia que bienaventurados los pobres. ¿Por qué son bienaventurados? Porque ellos no tienen nada adentro. Entonces, cuando ellos agarran riquezas, no hay nada que tengan que rechazar, porque ya están vacíos, Dios. Gracias por enseñarnos esto. Ya todas esas parábolas están teniendo más sentido, Dios. Ya podemos entender más, nuestros ojos espirituales se están abriendo, Dios, estamos tan agradecidos por esto. Dios, por favor, sigue enviando tu Espíritu Santo sobre nosotros para que abras todo nuestro corazón, porque poquito a poquito estás abriendo nuestros corazones, estás abriendo nuestros ojos, Dios, y cada vez estamos más y más agradecidos. Sabemos que todavía somos humanos y a veces es difícil entender y aceptar lo que nos estás enseñando. Pero, ¿qué más podemos decir? Si de verdad nos estás enseñando tu verdad y si de verdad se puede ver claramente en la Biblia, no podemos negarlo, Dios. Y por eso estamos agradecidos por de verdad entender. Por favor, Dios, también cuida a los hermanos y hermanas que están teniendo tiempos difíciles, que tienen tiempos de preocupaciones. Dios, quítales esas espinas para que vuelvan a ti, para que vuelvan a escuchar tu palabra y renovar su fe. Oramos todo esto, Dios, en tu hijo maravilloso Jesucristo. Amén."</text:span></text:span></text:p>
      <text:p text:style-name="P3"/>
      <text:h text:style-name="P1" text:outline-level="2">💧 2. Introducción a la Lección: Agua, Fuente y Río</text:h>
      <text:p text:style-name="Text_20_body"><text:span text:style-name="Emphasis"><text:span text:style-name="T1">(A cargo del Instructor Sibiani)</text:span></text:span></text:p>
      <text:h text:style-name="P2" text:outline-level="3">📌 Recordatorios de Etiqueta</text:h>
      <text:list text:style-name="L21">
        <text:list-item>
          <text:p text:style-name="P50"><text:span text:style-name="Strong_20_Emphasis"><text:span text:style-name="T1">Actitud:</text:span></text:span><text:span text:style-name="T1"> Estamos delante de la Palabra de Dios, por lo que debemos mostrar respeto (cámara encendida, Biblia y cuaderno a mano). </text:span></text:p>
        </text:list-item>
        <text:list-item>
          <text:p text:style-name="P49"><text:span text:style-name="Strong_20_Emphasis"><text:span text:style-name="T1">Enfoque:</text:span></text:span><text:span text:style-name="T1"> Casi todos los elementos que hemos visto tienen que ver con la </text:span><text:span text:style-name="Strong_20_Emphasis"><text:span text:style-name="T1">palabra de Dios</text:span></text:span><text:span text:style-name="T1">. El reino de los cielos es como una semilla (palabra), como fuego (palabra), como una perla o tesoro (palabra). Todo el reino de los cielos se inicia con tener la palabra de Dios en nuestro corazón. </text:span></text:p>
        </text:list-item>
      </text:list>
      <text:h text:style-name="P2" text:outline-level="3">📖 El Título de la Lección</text:h>
      <text:p text:style-name="P4">Leamos juntos dos veces:</text:p>
      <text:p text:style-name="Quotations"><text:span text:style-name="Strong_20_Emphasis"><text:span text:style-name="T1">"Agua, fuente y río en figurativo"</text:span></text:span></text:p>
      <text:list text:style-name="L22">
        <text:list-item>
          <text:p text:style-name="P51"><text:span text:style-name="Emphasis"><text:span text:style-name="T1">Reflexión:</text:span></text:span><text:span text:style-name="T1"> ¿Todos han tomado agua hoy? ¿Qué pasa si no toman agua? Nada bueno va a pasar. En la Biblia hay agua, fuentes y ríos. Todos esos tres elementos tienen </text:span><text:soft-page-break/><text:span text:style-name="T1">mucho que ver entre sí. Si seguimos un río hacia arriba, eventualmente llegaremos a una fuente, que es donde mana el agua. </text:span></text:p>
        </text:list-item>
      </text:list>
      <text:p text:style-name="P3"/>
      <text:h text:style-name="P1" text:outline-level="2">🌊 3. Características Físicas y Espirituales del Agua</text:h>
      <text:h text:style-name="P2" text:outline-level="3">💦 Características Físicas del Agua</text:h>
      <text:list text:style-name="L23">
        <text:list-item>
          <text:p text:style-name="P53"><text:span text:style-name="Strong_20_Emphasis"><text:span text:style-name="T1">Da vida:</text:span></text:span><text:span text:style-name="T1"> El agua es un componente esencial para la vida. Donde hay agua, siempre hay vida (árboles, animales). </text:span></text:p>
        </text:list-item>
        <text:list-item>
          <text:p text:style-name="P53"><text:span text:style-name="Strong_20_Emphasis"><text:span text:style-name="T1">Limpia y lava:</text:span></text:span><text:span text:style-name="T1"> Utilizamos el agua para lavar la ropa, el cuerpo, las manos. Quita la suciedad, la contaminación, los gérmenes. </text:span></text:p>
        </text:list-item>
        <text:list-item>
          <text:p text:style-name="P52"><text:span text:style-name="Strong_20_Emphasis"><text:span text:style-name="T1">Es indispensable:</text:span></text:span><text:span text:style-name="T1"> Si no tomamos agua, nos deshidratamos y eventualmente morimos. El cuerpo humano es aproximadamente 80% agua. </text:span></text:p>
        </text:list-item>
      </text:list>
      <text:h text:style-name="P2" text:outline-level="3">🙌 Significado Espiritual del Agua</text:h>
      <text:list text:style-name="L24">
        <text:list-item>
          <text:p text:style-name="P55"><text:span text:style-name="Strong_20_Emphasis"><text:span text:style-name="T1">Respuesta:</text:span></text:span><text:span text:style-name="T1"> El agua representa la </text:span><text:span text:style-name="Strong_20_Emphasis"><text:span text:style-name="T1">Palabra de Dios</text:span></text:span><text:span text:style-name="T1">. </text:span></text:p>
        </text:list-item>
        <text:list-item>
          <text:p text:style-name="P55"><text:span text:style-name="Emphasis"><text:span text:style-name="T1">¿Por qué?</text:span></text:span><text:span text:style-name="T1"> Así como el agua física da vida al cuerpo y lo limpia, la palabra de Dios da vida a nuestro espíritu y limpia nuestras impurezas (pecados). </text:span></text:p>
        </text:list-item>
        <text:list-item>
          <text:p text:style-name="P54"><text:span text:style-name="Strong_20_Emphasis"><text:span text:style-name="T1">Juan 6:63:</text:span></text:span><text:span text:style-name="T1"> </text:span><text:span text:style-name="Emphasis"><text:span text:style-name="T1">"El espíritu es el que da vida... las palabras que yo os he hablado son espíritu y son vida".</text:span></text:span><text:span text:style-name="T1"> </text:span></text:p>
        </text:list-item>
      </text:list>
      <text:p text:style-name="P3"/>
      <text:h text:style-name="P1" text:outline-level="2">📜 4. Ejemplos Bíblicos del Agua de Dios</text:h>
      <text:h text:style-name="P2" text:outline-level="3">🌧️ Deuteronomio 32:1-2 (La Enseñanza como Lluvia)</text:h>
      <text:p text:style-name="Quotations"><text:span text:style-name="Emphasis"><text:span text:style-name="T1">"Escuchad, cielos, y hablaré; y oiga la tierra los dichos de mi boca. Goteará como la lluvia mi enseñanza; destilará como el rocío mi razonamiento; como la llovizna sobre la grama, y como las gotas sobre la hierba".</text:span></text:span></text:p>
      <text:list text:style-name="L25">
        <text:list-item>
          <text:p text:style-name="P57"><text:span text:style-name="Strong_20_Emphasis"><text:span text:style-name="T1">La lluvia y el rocío:</text:span></text:span><text:span text:style-name="T1"> Vienen del cielo, no de la tierra. Representan las enseñanzas de Dios que provienen del cielo. </text:span></text:p>
        </text:list-item>
        <text:list-item>
          <text:p text:style-name="P56"><text:span text:style-name="Strong_20_Emphasis"><text:span text:style-name="T1">Conclusión:</text:span></text:span><text:span text:style-name="T1"> El agua de Dios es como la verdad, la palabra revelada que viene del cielo. </text:span></text:p>
        </text:list-item>
      </text:list>
      <text:h text:style-name="P2" text:outline-level="3"><text:soft-page-break/>🏜️ Amós 8:11 (La Hambruna de Agua)</text:h>
      <text:p text:style-name="Quotations"><text:span text:style-name="Emphasis"><text:span text:style-name="T1">"He aquí vienen días, dice Jehová, el Señor, en los cuales enviaré hambre a la tierra; no hambre de pan, ni sed de agua, sino de oír las palabras de Jehová".</text:span></text:span></text:p>
      <text:list text:style-name="L26">
        <text:list-item>
          <text:p text:style-name="P59"><text:span text:style-name="Strong_20_Emphasis"><text:span text:style-name="T1">Ausencia de agua = Ausencia de la palabra:</text:span></text:span><text:span text:style-name="T1"> Cuando no hay agua espiritual, hay hambruna espiritual. </text:span></text:p>
        </text:list-item>
        <text:list-item>
          <text:p text:style-name="P58"><text:span text:style-name="Strong_20_Emphasis"><text:span text:style-name="T1">La hambruna espiritual:</text:span></text:span><text:span text:style-name="T1"> No es falta de pan físico, sino de entender la palabra de Dios. En los tiempos de la primera venida, la gente tenía la Biblia (Antiguo Testamento), pero no la entendía. Eso es hambruna. </text:span></text:p>
        </text:list-item>
      </text:list>
      <text:h text:style-name="P2" text:outline-level="3">✝️ Juan 3:5 (Nacer de Agua y del Espíritu)</text:h>
      <text:p text:style-name="Quotations"><text:span text:style-name="Emphasis"><text:span text:style-name="T1">"Respondió Jesús: 'De cierto, de cierto te digo, que el que no naciere de agua y del Espíritu, no puede entrar en el reino de Dios'".</text:span></text:span></text:p>
      <text:list text:style-name="L27">
        <text:list-item>
          <text:p text:style-name="P60"><text:span text:style-name="Strong_20_Emphasis"><text:span text:style-name="T1">Para entrar al reino de Dios:</text:span></text:span><text:span text:style-name="T1"> Hay que nacer de agua (palabra) y del Espíritu (palabra). </text:span></text:p>
        </text:list-item>
        <text:list-item>
          <text:p text:style-name="P60"><text:span text:style-name="Strong_20_Emphasis"><text:span text:style-name="T1">1 Pedro 1:22:</text:span></text:span><text:span text:style-name="T1"> </text:span><text:span text:style-name="Emphasis"><text:span text:style-name="T1">"Habiendo purificado vuestras almas por la obediencia a la verdad...".</text:span></text:span></text:p>
          <text:list>
            <text:list-item>
              <text:p text:style-name="P91">No es el agua física la que purifica el alma, sino la obediencia a la verdad (la palabra de Dios). </text:p>
            </text:list-item>
          </text:list>
        </text:list-item>
      </text:list>
      <text:p text:style-name="P3"/>
      <text:h text:style-name="P1" text:outline-level="2">☠️ 5. El Agua de Satanás (Falsedad)</text:h>
      <text:h text:style-name="P2" text:outline-level="3">🍷 Isaías 1:22 (Vino Mezclado con Agua)</text:h>
      <text:p text:style-name="Quotations"><text:span text:style-name="Emphasis"><text:span text:style-name="T1">"Tu plata se ha convertido en escorias. Ahora tu vino está mezclado con agua".</text:span></text:span></text:p>
      <text:list text:style-name="L28">
        <text:list-item>
          <text:p text:style-name="P62"><text:span text:style-name="Strong_20_Emphasis"><text:span text:style-name="T1">El pueblo de Dios:</text:span></text:span><text:span text:style-name="T1"> Tenía la palabra de Dios (plata y vino espiritual). </text:span></text:p>
        </text:list-item>
        <text:list-item>
          <text:p text:style-name="P62"><text:span text:style-name="Strong_20_Emphasis"><text:span text:style-name="T1">El problema:</text:span></text:span><text:span text:style-name="T1"> Se mezcló con "agua" que no viene de Dios. </text:span></text:p>
        </text:list-item>
        <text:list-item>
          <text:p text:style-name="P62"><text:span text:style-name="Strong_20_Emphasis"><text:span text:style-name="T1">Significado:</text:span></text:span><text:span text:style-name="T1"> La palabra de Dios se mezcló con falsedad, con las palabras de Satanás, con pensamientos del hombre. </text:span></text:p>
        </text:list-item>
        <text:list-item>
          <text:p text:style-name="P61"><text:span text:style-name="Emphasis"><text:span text:style-name="T1">Analogía:</text:span></text:span><text:span text:style-name="T1"> Si pones una gota de veneno en un vaso de agua, el agua se ve igual, pero te puede matar. Así es la falsedad de Satanás: se ve inofensiva, pero mata el espíritu. </text:span></text:p>
        </text:list-item>
      </text:list>
      <text:h text:style-name="P2" text:outline-level="3">⭐ Apocalipsis 8:10-11 (La Estrella Ajenjo)</text:h>
      <text:p text:style-name="Quotations"><text:span text:style-name="Emphasis"><text:span text:style-name="T1">"Y el nombre de la estrella es Ajenjo. Y la tercera parte de las aguas se convirtió en ajenjo. Y muchos hombres murieron a causa de esas aguas porque se hicieron amargas".</text:span></text:span></text:p>
      <text:list text:style-name="L29">
        <text:list-item>
          <text:p text:style-name="P64"><text:soft-page-break/><text:span text:style-name="Strong_20_Emphasis"><text:span text:style-name="T1">Las aguas amargas:</text:span></text:span><text:span text:style-name="T1"> Son las falsedades de Satanás que hacen que muchas personas mueran espiritualmente. </text:span></text:p>
        </text:list-item>
        <text:list-item>
          <text:p text:style-name="P63"><text:span text:style-name="Strong_20_Emphasis"><text:span text:style-name="T1">El peligro:</text:span></text:span><text:span text:style-name="T1"> La gente sigue tomando de estas aguas porque no puede distinguir la falsedad. </text:span></text:p>
        </text:list-item>
      </text:list>
      <text:p text:style-name="P3"/>
      <text:h text:style-name="P1" text:outline-level="2">⛲ 6. La Fuente (Manantial) en Figurativo</text:h>
      <text:h text:style-name="P2" text:outline-level="3">🌄 Características de una Fuente</text:h>
      <text:list text:style-name="L30">
        <text:list-item>
          <text:p text:style-name="P92">Es un lugar donde brota el agua, donde nace el agua. </text:p>
        </text:list-item>
        <text:list-item>
          <text:p text:style-name="P93">Por lo general está en las montañas y de ahí fluye el agua río abajo. </text:p>
        </text:list-item>
      </text:list>
      <text:h text:style-name="P2" text:outline-level="3">👨‍🏫 Significado Espiritual de la Fuente</text:h>
      <text:list text:style-name="L31">
        <text:list-item>
          <text:p text:style-name="P66"><text:span text:style-name="Strong_20_Emphasis"><text:span text:style-name="T1">Respuesta:</text:span></text:span><text:span text:style-name="T1"> La fuente representa al </text:span><text:span text:style-name="Strong_20_Emphasis"><text:span text:style-name="T1">pastor</text:span></text:span><text:span text:style-name="T1"> y al </text:span><text:span text:style-name="Strong_20_Emphasis"><text:span text:style-name="T1">templo</text:span></text:span><text:span text:style-name="T1"> (la iglesia) donde está el pastor con la palabra de Dios. </text:span></text:p>
        </text:list-item>
        <text:list-item>
          <text:p text:style-name="P65"><text:span text:style-name="Emphasis"><text:span text:style-name="T1">¿Por qué?</text:span></text:span><text:span text:style-name="T1"> La palabra de Dios no flota por ahí sola; tiene que salir de alguien. Dios escoge a un pastor para dar su palabra a las personas. </text:span></text:p>
        </text:list-item>
      </text:list>
      <text:h text:style-name="P2" text:outline-level="3">📖 Ejemplos Bíblicos de la Fuente</text:h>
      <text:h text:style-name="P9" text:outline-level="4">✅ Proverbios 10:11 (Manantial de Vida)</text:h>
      <text:p text:style-name="Quotations"><text:span text:style-name="Emphasis"><text:span text:style-name="T1">"Manantial de vida es la boca del justo, pero violencia cubrirá la boca de los impíos".</text:span></text:span></text:p>
      <text:list text:style-name="L32">
        <text:list-item>
          <text:p text:style-name="P67"><text:span text:style-name="Strong_20_Emphasis"><text:span text:style-name="T1">La boca del justo:</text:span></text:span><text:span text:style-name="T1"> De ahí sale agua de vida (palabra de Dios). </text:span></text:p>
        </text:list-item>
      </text:list>
      <text:h text:style-name="P9" text:outline-level="4">✅ Zacarías 13:1 (Manantial Abierto)</text:h>
      <text:p text:style-name="Quotations"><text:span text:style-name="Emphasis"><text:span text:style-name="T1">"En aquel tiempo habrá un manantial abierto para la casa de David y para los habitantes de Jerusalén, para la purificación del pecado y de la inmundicia".</text:span></text:span></text:p>
      <text:list text:style-name="L33">
        <text:list-item>
          <text:p text:style-name="P68"><text:span text:style-name="Strong_20_Emphasis"><text:span text:style-name="T1">Un manantial abierto:</text:span></text:span><text:span text:style-name="T1"> Dios prometió que en el tiempo del cumplimiento habría un manantial accesible para purificar los pecados del pueblo de Dios. </text:span></text:p>
        </text:list-item>
      </text:list>
      <text:h text:style-name="P9" text:outline-level="4">✅ Juan 4:14 (Fuente de Agua que Salta para Vida Eterna)</text:h>
      <text:p text:style-name="Quotations"><text:span text:style-name="Emphasis"><text:span text:style-name="T1">"Mas el que bebiere del agua que yo le daré, no tendrá sed jamás, sino que el agua que yo le daré será en él una fuente de agua que salte para vida eterna".</text:span></text:span></text:p>
      <text:list text:style-name="L34">
        <text:list-item>
          <text:p text:style-name="P70"><text:span text:style-name="Strong_20_Emphasis"><text:span text:style-name="T1">Jesús como la fuente:</text:span></text:span><text:span text:style-name="T1"> Él tenía el agua de vida. </text:span></text:p>
        </text:list-item>
        <text:list-item>
          <text:p text:style-name="P69"><text:soft-page-break/><text:span text:style-name="Strong_20_Emphasis"><text:span text:style-name="T1">El creyente como fuente:</text:span></text:span><text:span text:style-name="T1"> Toda persona que reciba esta agua también puede convertirse en una fuente, compartiendo la palabra con otros. </text:span></text:p>
        </text:list-item>
      </text:list>
      <text:h text:style-name="P9" text:outline-level="4">❌ 2 Pedro 2:1 y 17 (Fuentes sin Agua)</text:h>
      <text:p text:style-name="Quotations"><text:span text:style-name="Emphasis"><text:span text:style-name="T1">"Estos son fuentes sin agua y nubes empujadas para la tormenta, para los cuales la más densa oscuridad está reservada para siempre".</text:span></text:span></text:p>
      <text:list text:style-name="L35">
        <text:list-item>
          <text:p text:style-name="P72"><text:span text:style-name="Strong_20_Emphasis"><text:span text:style-name="T1">Fuentes sin agua:</text:span></text:span><text:span text:style-name="T1"> Son los falsos profetas y pastores que dicen hablar la palabra de Dios, pero no tienen agua (no tienen la verdad). </text:span></text:p>
        </text:list-item>
        <text:list-item>
          <text:p text:style-name="P71"><text:span text:style-name="Strong_20_Emphasis"><text:span text:style-name="T1">La apariencia:</text:span></text:span><text:span text:style-name="T1"> Se ven bien, hablan de la Biblia, pero están secos espiritualmente. </text:span></text:p>
        </text:list-item>
      </text:list>
      <text:p text:style-name="P3"/>
      <text:h text:style-name="P1" text:outline-level="2">🏞️ 7. El Río en Figurativo</text:h>
      <text:h text:style-name="P2" text:outline-level="3">🌊 Características de un Río</text:h>
      <text:list text:style-name="L36">
        <text:list-item>
          <text:p text:style-name="P94">Es el camino por donde fluye el agua después de salir de la fuente. </text:p>
        </text:list-item>
        <text:list-item>
          <text:p text:style-name="P95">Eventualmente desemboca en el mar. </text:p>
        </text:list-item>
      </text:list>
      <text:h text:style-name="P2" text:outline-level="3">🏃 Significado Espiritual del Río</text:h>
      <text:list text:style-name="L37">
        <text:list-item>
          <text:p text:style-name="P74"><text:span text:style-name="Strong_20_Emphasis"><text:span text:style-name="T1">Respuesta:</text:span></text:span><text:span text:style-name="T1"> El río representa a los </text:span><text:span text:style-name="Strong_20_Emphasis"><text:span text:style-name="T1">discípulos y evangelistas</text:span></text:span><text:span text:style-name="T1">. </text:span></text:p>
        </text:list-item>
        <text:list-item>
          <text:p text:style-name="P73"><text:span text:style-name="Emphasis"><text:span text:style-name="T1">¿Por qué?</text:span></text:span><text:span text:style-name="T1"> Ellos son los que hacen fluir la palabra de Dios de corazón en corazón, de persona en persona, hasta llegar a todo el mundo (el mar). </text:span></text:p>
        </text:list-item>
      </text:list>
      <text:h text:style-name="P2" text:outline-level="3">📖 Ejemplos Bíblicos del Río</text:h>
      <text:h text:style-name="P9" text:outline-level="4">✅ Ezequiel 47:1-12 (El Río que Sale del Templo)</text:h>
      <text:list text:style-name="L38">
        <text:list-item>
          <text:p text:style-name="P96">Ezequiel vio un templo y de ahí salió agua que formó un río. </text:p>
        </text:list-item>
        <text:list-item>
          <text:p text:style-name="P96">Este río llegó hasta el Mar Muerto y empezó a sanarlo, trayendo criaturas vivientes. </text:p>
        </text:list-item>
        <text:list-item>
          <text:p text:style-name="P75"><text:span text:style-name="Strong_20_Emphasis"><text:span text:style-name="T1">Significado:</text:span></text:span><text:span text:style-name="T1"> El templo de Dios (de donde sale la palabra) envía un río que sana las naciones muertas espiritualmente. </text:span></text:p>
        </text:list-item>
      </text:list>
      <text:h text:style-name="P9" text:outline-level="4">✅ Juan 7:37-38 (Ríos de Agua Viva)</text:h>
      <text:p text:style-name="Quotations"><text:span text:style-name="Emphasis"><text:span text:style-name="T1">"El que cree en mí, como dice la Escritura, de su interior correrán ríos de agua viva".</text:span></text:span></text:p>
      <text:list text:style-name="L39">
        <text:list-item>
          <text:p text:style-name="P76"><text:span text:style-name="Strong_20_Emphasis"><text:span text:style-name="T1">Los discípulos:</text:span></text:span><text:span text:style-name="T1"> Al recibir las palabras de Jesús, se convirtieron en ríos de agua viva, difundiendo la verdad por todo el mundo. </text:span></text:p>
        </text:list-item>
      </text:list>
      <text:h text:style-name="P9" text:outline-level="4"><text:soft-page-break/>✅ Apocalipsis 22:1-2 (El Río de la Ciudad Santa)</text:h>
      <text:p text:style-name="Quotations"><text:span text:style-name="Emphasis"><text:span text:style-name="T1">"Después me mostró un río limpio de agua de vida, resplandeciente como cristal, que salía del trono de Dios y del Cordero... Y las hojas del árbol son para la sanidad de las naciones".</text:span></text:span></text:p>
      <text:list text:style-name="L40">
        <text:list-item>
          <text:p text:style-name="P77"><text:span text:style-name="Strong_20_Emphasis"><text:span text:style-name="T1">El río de Dios:</text:span></text:span><text:span text:style-name="T1"> Sale del trono de Dios y del Cordero, y tiene como objetivo sanar todas las naciones (el mar de Satanás). </text:span></text:p>
        </text:list-item>
      </text:list>
      <text:h text:style-name="P9" text:outline-level="4">❌ Ezequiel 29:3 y Apocalipsis 12:15 (El Río de Satanás)</text:h>
      <text:p text:style-name="Quotations"><text:span text:style-name="Emphasis"><text:span text:style-name="T1">"Y la serpiente arrojó de su boca, tras la mujer, agua como un río, para que fuese arrastrada por el río".</text:span></text:span></text:p>
      <text:list text:style-name="L41">
        <text:list-item>
          <text:p text:style-name="P78"><text:span text:style-name="Strong_20_Emphasis"><text:span text:style-name="T1">El río de Satanás:</text:span></text:span><text:span text:style-name="T1"> La serpiente (Satanás) también tiene sus ríos. Son los falsos pastores y evangelistas que difunden las falsedades de Satanás para arrastrar a las personas. </text:span></text:p>
        </text:list-item>
      </text:list>
      <text:p text:style-name="P3"/>
      <text:h text:style-name="P1" text:outline-level="2">🎯 8. La Realidad de la Primera Venida</text:h>
      <text:h text:style-name="P2" text:outline-level="3">💧 El Agua, la Fuente y el Río de Dios (1ª Venida)</text:h>
      <text:list text:style-name="L42">
        <text:list-item>
          <text:p text:style-name="P80"><text:span text:style-name="Strong_20_Emphasis"><text:span text:style-name="T1">Agua:</text:span></text:span><text:span text:style-name="T1"> La palabra de la verdad (el cumplimiento de las profecías). </text:span></text:p>
        </text:list-item>
        <text:list-item>
          <text:p text:style-name="P80"><text:span text:style-name="Strong_20_Emphasis"><text:span text:style-name="T1">Fuente:</text:span></text:span><text:span text:style-name="T1"> Jesús, quien tenía la palabra revelada. </text:span></text:p>
        </text:list-item>
        <text:list-item>
          <text:p text:style-name="P79"><text:span text:style-name="Strong_20_Emphasis"><text:span text:style-name="T1">Río:</text:span></text:span><text:span text:style-name="T1"> Los 12 discípulos y los evangelistas que difundieron esa palabra por todo el mundo. </text:span></text:p>
        </text:list-item>
      </text:list>
      <text:h text:style-name="P2" text:outline-level="3">☠️ El Agua, la Fuente y el Río de Satanás (1ª Venida)</text:h>
      <text:list text:style-name="L43">
        <text:list-item>
          <text:p text:style-name="P82"><text:span text:style-name="Strong_20_Emphasis"><text:span text:style-name="T1">Agua:</text:span></text:span><text:span text:style-name="T1"> Falsedades, mentiras, palabras del hombre mezcladas con la Biblia. </text:span></text:p>
        </text:list-item>
        <text:list-item>
          <text:p text:style-name="P82"><text:span text:style-name="Strong_20_Emphasis"><text:span text:style-name="T1">Fuente:</text:span></text:span><text:span text:style-name="T1"> Los escribas y fariseos, que tenían títulos y sinagogas bonitas, pero no tenían agua (verdad). </text:span></text:p>
        </text:list-item>
        <text:list-item>
          <text:p text:style-name="P81"><text:span text:style-name="Strong_20_Emphasis"><text:span text:style-name="T1">Río:</text:span></text:span><text:span text:style-name="T1"> Sus seguidores y evangelistas que propagaban esas mentiras. </text:span></text:p>
        </text:list-item>
      </text:list>
      <text:p text:style-name="P3"/>
      <text:h text:style-name="P1" text:outline-level="2">🛡️ 9. Conclusiones de la Lección</text:h>
      <text:list text:style-name="L44">
        <text:list-item>
          <text:p text:style-name="P84"><text:span text:style-name="Strong_20_Emphasis"><text:span text:style-name="T1">La palabra proviene de la boca del pastor y se difunde ampliamente por todo el mundo a través de los discípulos y evangelistas.</text:span></text:span></text:p>
          <text:list>
            <text:list-item>
              <text:p text:style-name="P97"><text:soft-page-break/>Es una parábola del principio mundano de que el agua brota de un manantial o pozo y fluye por un río hasta el mar. </text:p>
            </text:list-item>
          </text:list>
        </text:list-item>
        <text:list-item>
          <text:p text:style-name="P84"><text:span text:style-name="Strong_20_Emphasis"><text:span text:style-name="T1">Así como hay agua en el mundo que no se puede beber, hay falsedades en la palabra que dañan el alma humana.</text:span></text:span></text:p>
          <text:list>
            <text:list-item>
              <text:p text:style-name="P97">Estas falsas doctrinas, falsos pastores y evangelistas que difunden mentiras son aguas, manantiales y ríos de Satanás. </text:p>
            </text:list-item>
          </text:list>
        </text:list-item>
        <text:list-item>
          <text:p text:style-name="P83"><text:span text:style-name="Strong_20_Emphasis"><text:span text:style-name="T1">Para que mi alma viva, debo beber el agua de vida que proviene del pastor y del templo (manantiales de Dios) a través de los discípulos y evangelistas (ríos), y lavar mi alma contaminada antes de poder entrar al cielo.</text:span></text:span><text:span text:style-name="T1"> </text:span></text:p>
        </text:list-item>
      </text:list>
      <text:p text:style-name="Text_20_body"><text:span text:style-name="Strong_20_Emphasis"><text:span text:style-name="T1">📢 Anuncio para la Próxima Lección:</text:span></text:span><text:span text:style-name="T1"> La próxima vez aprenderemos sobre </text:span><text:span text:style-name="Strong_20_Emphasis"><text:span text:style-name="T1">mar, pescador, red, pez y barco en figurativo</text:span></text:span><text:span text:style-name="T1">.</text:span></text:p>
      <text:list text:style-name="L45">
        <text:list-item>
          <text:p text:style-name="P85"><text:span text:style-name="Emphasis"><text:span text:style-name="T1">Pista para reflexionar:</text:span></text:span><text:span text:style-name="T1"> ¿Alguno de ustedes ha pescado? La lógica es lanzar redes desde un bote para capturar peces. ¿Por qué Dios utiliza esta lógica para describir el reino de los cielos? </text:span></text:p>
        </text:list-item>
      </text:list>
      <text:p text:style-name="P3"/>
      <text:h text:style-name="P1" text:outline-level="2">🔄 10.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46">
        <text:list-item>
          <text:p text:style-name="P87"><text:span text:style-name="Strong_20_Emphasis"><text:span text:style-name="T1">¿Qué representa el agua en sentido figurativo?</text:span></text:span></text:p>
          <text:list>
            <text:list-item>
              <text:p text:style-name="P87"><text:span text:style-name="Emphasis"><text:span text:style-name="T1">Respuesta:</text:span></text:span><text:span text:style-name="T1"> La </text:span><text:span text:style-name="Strong_20_Emphasis"><text:span text:style-name="T1">palabra de verdad de Dios</text:span></text:span><text:span text:style-name="T1">. </text:span></text:p>
            </text:list-item>
          </text:list>
        </text:list-item>
        <text:list-item>
          <text:p text:style-name="P87"><text:span text:style-name="Strong_20_Emphasis"><text:span text:style-name="T1">¿Por qué Dios compara su palabra con el agua?</text:span></text:span></text:p>
          <text:list>
            <text:list-item>
              <text:p text:style-name="P87"><text:span text:style-name="Emphasis"><text:span text:style-name="T1">Respuesta:</text:span></text:span><text:span text:style-name="T1"> Porque el agua da vida, limpia y es indispensable para vivir. De la misma manera, la palabra de Dios da vida a nuestra alma, limpia nuestro corazón y nos guía hacia la salvación. </text:span></text:p>
            </text:list-item>
          </text:list>
        </text:list-item>
        <text:list-item>
          <text:p text:style-name="P87"><text:span text:style-name="Strong_20_Emphasis"><text:span text:style-name="T1">¿Existe solo un tipo de agua espiritual?</text:span></text:span></text:p>
          <text:list>
            <text:list-item>
              <text:p text:style-name="P87"><text:span text:style-name="Emphasis"><text:span text:style-name="T1">Respuesta:</text:span></text:span><text:span text:style-name="T1"> No. Existe el agua de Dios y el agua de Satanás (falsedad, enseñanzas mezcladas con pensamientos del hombre). </text:span></text:p>
            </text:list-item>
          </text:list>
        </text:list-item>
        <text:list-item>
          <text:p text:style-name="P87"><text:span text:style-name="Strong_20_Emphasis"><text:span text:style-name="T1">¿Qué es una fuente o manantial en figurativo?</text:span></text:span></text:p>
          <text:list>
            <text:list-item>
              <text:p text:style-name="P87"><text:span text:style-name="Emphasis"><text:span text:style-name="T1">Respuesta:</text:span></text:span><text:span text:style-name="T1"> El </text:span><text:span text:style-name="Strong_20_Emphasis"><text:span text:style-name="T1">pastor</text:span></text:span><text:span text:style-name="T1"> y el </text:span><text:span text:style-name="Strong_20_Emphasis"><text:span text:style-name="T1">templo</text:span></text:span><text:span text:style-name="T1">. De ahí sale la palabra. </text:span></text:p>
            </text:list-item>
          </text:list>
        </text:list-item>
        <text:list-item>
          <text:p text:style-name="P87"><text:span text:style-name="Strong_20_Emphasis"><text:span text:style-name="T1">¿Qué son los ríos?</text:span></text:span></text:p>
          <text:list>
            <text:list-item>
              <text:p text:style-name="P86"><text:span text:style-name="Emphasis"><text:span text:style-name="T1">Respuesta:</text:span></text:span><text:span text:style-name="T1"> Los </text:span><text:span text:style-name="Strong_20_Emphasis"><text:span text:style-name="T1">discípulos y evangelistas</text:span></text:span><text:span text:style-name="T1"> que llevan la palabra a otras personas. </text:span></text:p>
            </text:list-item>
          </text:list>
        </text:list-item>
      </text:list>
      <text:p text:style-name="Text_20_body"><text:soft-page-break/><text:span text:style-name="Strong_20_Emphasis"><text:span text:style-name="T1">📢 Anuncios:</text:span></text:span></text:p>
      <text:list text:style-name="L47">
        <text:list-item>
          <text:p text:style-name="P98">La próxima semana tendremos reunión con los pastores (lunes en la noche / martes en Corea). </text:p>
        </text:list-item>
        <text:list-item>
          <text:p text:style-name="P99">Sigan estudiando y repasando, aunque pasen obstáculos. Tenemos que mantener ese hambre por la palabra.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4">¡Gracias a todos! Cuídense y que Dios los bendiga. ¡Nos vemos la próxima semana para estudiar el mar, el pescador, la red, el pez y el barco! ¡Adió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10T10:46:53.089630277</dc:date>
    <meta:editing-duration>PT1H44M29S</meta:editing-duration>
    <meta:editing-cycles>13</meta:editing-cycles>
    <meta:generator>LibreOffice/24.2.7.2$Linux_X86_64 LibreOffice_project/420$Build-2</meta:generator>
    <meta:document-statistic meta:table-count="0" meta:image-count="0" meta:object-count="0" meta:page-count="9" meta:paragraph-count="143" meta:word-count="2481" meta:character-count="13747" meta:non-whitespace-character-count="11423"/>
  </office:meta>
</office:document-meta>
</file>