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Heading_20_1">
      <style:text-properties style:font-name="Padauk Book"/>
    </style:style>
    <style:style style:name="P2" style:family="paragraph" style:parent-style-name="Heading_20_2">
      <style:text-properties style:font-name="Padauk Book"/>
    </style:style>
    <style:style style:name="P3" style:family="paragraph" style:parent-style-name="Heading_20_3">
      <style:text-properties style:font-name="Padauk Book"/>
    </style:style>
    <style:style style:name="P4" style:family="paragraph" style:parent-style-name="Horizontal_20_Line">
      <style:text-properties style:font-name="Padauk Book"/>
    </style:style>
    <style:style style:name="P5" style:family="paragraph" style:parent-style-name="Quotations" style:list-style-name="L14"/>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3"/>
    <style:style style:name="P24" style:family="paragraph" style:parent-style-name="Text_20_body" style:list-style-name="L13">
      <style:paragraph-properties fo:margin-top="0cm" fo:margin-bottom="0cm" style:contextual-spacing="false"/>
    </style:style>
    <style:style style:name="P25" style:family="paragraph" style:parent-style-name="Text_20_body" style:list-style-name="L14"/>
    <style:style style:name="P26" style:family="paragraph" style:parent-style-name="Text_20_body" style:list-style-name="L14">
      <style:paragraph-properties fo:margin-top="0cm" fo:margin-bottom="0cm" style:contextual-spacing="false"/>
    </style:style>
    <style:style style:name="P27" style:family="paragraph" style:parent-style-name="Text_20_body" style:list-style-name="L15"/>
    <style:style style:name="P28" style:family="paragraph" style:parent-style-name="Text_20_body" style:list-style-name="L15">
      <style:paragraph-properties fo:margin-top="0cm" fo:margin-bottom="0cm" style:contextual-spacing="false"/>
    </style:style>
    <style:style style:name="P29" style:family="paragraph" style:parent-style-name="Text_20_body" style:list-style-name="L16"/>
    <style:style style:name="P30" style:family="paragraph" style:parent-style-name="Text_20_body" style:list-style-name="L16">
      <style:paragraph-properties fo:margin-top="0cm" fo:margin-bottom="0cm" style:contextual-spacing="false"/>
    </style:style>
    <style:style style:name="P31" style:family="paragraph" style:parent-style-name="Text_20_body">
      <style:text-properties style:font-name="Padauk Book"/>
    </style:style>
    <style:style style:name="P32" style:family="paragraph" style:parent-style-name="Text_20_body" style:list-style-name="L7">
      <style:text-properties style:font-name="Padauk Book"/>
    </style:style>
    <style:style style:name="P33" style:family="paragraph" style:parent-style-name="Text_20_body" style:list-style-name="L10">
      <style:text-properties style:font-name="Padauk Book"/>
    </style:style>
    <style:style style:name="P34" style:family="paragraph" style:parent-style-name="Text_20_body" style:list-style-name="L11">
      <style:text-properties style:font-name="Padauk Book"/>
    </style:style>
    <style:style style:name="P35" style:family="paragraph" style:parent-style-name="Text_20_body" style:list-style-name="L12">
      <style:text-properties style:font-name="Padauk Book"/>
    </style:style>
    <style:style style:name="P36" style:family="paragraph" style:parent-style-name="Text_20_body" style:list-style-name="L14">
      <style:text-properties style:font-name="Padauk Book"/>
    </style:style>
    <style:style style:name="T1" style:family="text">
      <style:text-properties style:font-name="Padauk Book"/>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CUADERNO DE ESTUDIO: LECCIÓN 5 (PARTE 1)</text:h>
      <text:h text:style-name="P2" text:outline-level="2">Alimento y Levadura en Lenguaje Figurativo</text:h>
      <text:p text:style-name="P4"/>
      <text:h text:style-name="P2" text:outline-level="2">🔄 1. Repaso Inicial: Los Fundamentos de la Parábola Anterior</text:h>
      <text:p text:style-name="Text_20_body"><text:span text:style-name="Emphasis"><text:span text:style-name="T1">(A cargo del Evangelista Christian Howard)</text:span></text:span></text:p>
      <text:p text:style-name="P31">Antes de comenzar la nueva lección, repasamos los conceptos fundamentales de la lección anterior sobre la semilla, el campo, el árbol y las aves:</text:p>
      <text:p text:style-name="Text_20_body"><text:span text:style-name="Strong_20_Emphasis"><text:span text:style-name="T1">Preguntas de Reflexión y Respuestas:</text:span></text:span></text:p>
      <text:list text:style-name="L1">
        <text:list-item>
          <text:p text:style-name="P7"><text:span text:style-name="Strong_20_Emphasis"><text:span text:style-name="T1">¿Qué es la semilla espiritualmente?</text:span></text:span></text:p>
          <text:list>
            <text:list-item>
              <text:p text:style-name="P7"><text:span text:style-name="Emphasis"><text:span text:style-name="T1">Respuesta:</text:span></text:span><text:span text:style-name="T1"> </text:span><text:span text:style-name="Strong_20_Emphasis"><text:span text:style-name="T1">La Palabra de Dios</text:span></text:span><text:span text:style-name="T1"> (La Verdad del cumplimiento). </text:span></text:p>
            </text:list-item>
          </text:list>
        </text:list-item>
        <text:list-item>
          <text:p text:style-name="P7"><text:span text:style-name="Strong_20_Emphasis"><text:span text:style-name="T1">¿Qué es el campo?</text:span></text:span></text:p>
          <text:list>
            <text:list-item>
              <text:p text:style-name="P7"><text:span text:style-name="Emphasis"><text:span text:style-name="T1">Respuesta:</text:span></text:span><text:span text:style-name="T1"> </text:span><text:span text:style-name="Strong_20_Emphasis"><text:span text:style-name="T1">Nuestro corazón</text:span></text:span><text:span text:style-name="T1">, pero también representa </text:span><text:span text:style-name="Strong_20_Emphasis"><text:span text:style-name="T1">el mundo</text:span></text:span><text:span text:style-name="T1"> (el cristianismo). </text:span></text:p>
            </text:list-item>
          </text:list>
        </text:list-item>
        <text:list-item>
          <text:p text:style-name="P7"><text:span text:style-name="Strong_20_Emphasis"><text:span text:style-name="T1">¿Qué es un árbol espiritual?</text:span></text:span></text:p>
          <text:list>
            <text:list-item>
              <text:p text:style-name="P7"><text:span text:style-name="Emphasis"><text:span text:style-name="T1">Respuesta:</text:span></text:span><text:span text:style-name="T1"> </text:span><text:span text:style-name="Strong_20_Emphasis"><text:span text:style-name="T1">Una persona interna renacida</text:span></text:span><text:span text:style-name="T1"> por la semilla de la Palabra, o también representa a un </text:span><text:span text:style-name="Strong_20_Emphasis"><text:span text:style-name="T1">pastor</text:span></text:span><text:span text:style-name="T1">. </text:span></text:p>
            </text:list-item>
          </text:list>
        </text:list-item>
        <text:list-item>
          <text:p text:style-name="P7"><text:span text:style-name="Strong_20_Emphasis"><text:span text:style-name="T1">¿Qué son las ramas, las hojas y los frutos?</text:span></text:span></text:p>
          <text:list>
            <text:list-item>
              <text:p text:style-name="P7"><text:span text:style-name="Emphasis"><text:span text:style-name="T1">Respuesta:</text:span></text:span><text:span text:style-name="T1"> Las </text:span><text:span text:style-name="Strong_20_Emphasis"><text:span text:style-name="T1">ramas</text:span></text:span><text:span text:style-name="T1"> son los discípulos/trabajadores; las </text:span><text:span text:style-name="Strong_20_Emphasis"><text:span text:style-name="T1">hojas</text:span></text:span><text:span text:style-name="T1"> son los evangelistas (para la sanidad de las naciones); el </text:span><text:span text:style-name="Strong_20_Emphasis"><text:span text:style-name="T1">fruto</text:span></text:span><text:span text:style-name="T1"> es la palabra y la congregación que nace por ella. </text:span></text:p>
            </text:list-item>
          </text:list>
        </text:list-item>
        <text:list-item>
          <text:p text:style-name="P7"><text:span text:style-name="Strong_20_Emphasis"><text:span text:style-name="T1">¿Qué son las aves?</text:span></text:span></text:p>
          <text:list>
            <text:list-item>
              <text:p text:style-name="P7"><text:span text:style-name="Emphasis"><text:span text:style-name="T1">Respuesta:</text:span></text:span><text:span text:style-name="T1"> </text:span><text:span text:style-name="Strong_20_Emphasis"><text:span text:style-name="T1">Los espíritus</text:span></text:span><text:span text:style-name="T1"> (buenos y malos). </text:span></text:p>
            </text:list-item>
          </text:list>
        </text:list-item>
        <text:list-item>
          <text:p text:style-name="P7"><text:span text:style-name="Strong_20_Emphasis"><text:span text:style-name="T1">¿Con qué podemos renacer?</text:span></text:span></text:p>
          <text:list>
            <text:list-item>
              <text:p text:style-name="P6"><text:span text:style-name="Emphasis"><text:span text:style-name="T1">Respuesta:</text:span></text:span><text:span text:style-name="T1"> </text:span><text:span text:style-name="Strong_20_Emphasis"><text:span text:style-name="T1">Solo con la semilla de Dios</text:span></text:span><text:span text:style-name="T1"> (la Palabra de verdad). </text:span></text:p>
            </text:list-item>
          </text:list>
        </text:list-item>
      </text:list>
      <text:p text:style-name="Text_20_body"><text:span text:style-name="Strong_20_Emphasis"><text:span text:style-name="T1">Oración de apertura:</text:span></text:span></text:p>
      <text:p text:style-name="Quotations"><text:span text:style-name="Emphasis"><text:span text:style-name="T1">"Santísimo Padre Dios, gracias por guiarnos aquí. Gracias por enseñarnos todos estos secretos. Muchas veces no entendíamos qué eran estas cosas, pero tú nos </text:span></text:span><text:soft-page-break/><text:span text:style-name="Emphasis"><text:span text:style-name="T1">estás enseñando que todas son importantes. La semilla es tu palabra y tenemos que ponerla en nuestro campo, que es el corazón, para crecer en un árbol grande y que vengan las aves, que son tus espíritus. Dios, también oro por los estudiantes que no han podido venir; ayúdalos a vencer sus situaciones para escuchar tu palabra. Ellos están hambrientos de tu palabra, por favor, cuídalos para que mantengan su fe. Te agradecemos porque mandaste a tu hijo Jesús y oramos todo esto en el nombre de tu hijo Jesucristo. Amén."</text:span></text:span></text:p>
      <text:p text:style-name="P4"/>
      <text:h text:style-name="P2" text:outline-level="2">🏫 2. Introducción: El Hambre Espiritual</text:h>
      <text:p text:style-name="Text_20_body"><text:span text:style-name="Emphasis"><text:span text:style-name="T1">(A cargo del Instructor Sibiani)</text:span></text:span></text:p>
      <text:h text:style-name="P3" text:outline-level="3">📌 La Actitud ante la Palabra</text:h>
      <text:p text:style-name="P31">Siempre me alegra verlos aquí, porque muestra que están hambrientos por la Palabra de Dios. Cuando escuchemos las lecciones, siempre debemos hacernos la pregunta clave: </text:p>
      <text:list text:style-name="L2">
        <text:list-item>
          <text:p text:style-name="P8"><text:span text:style-name="Emphasis"><text:span text:style-name="T1">¿Por qué Dios me está mostrando esto? ¿Qué tiene que ver esto conmigo?</text:span></text:span><text:span text:style-name="T1"> Si no hacemos esto, la información simplemente entrará por un oído y saldrá por el otro. Pero si la hacemos personal, la Palabra entrará en nuestro corazón y permanecerá allí. </text:span></text:p>
        </text:list-item>
      </text:list>
      <text:h text:style-name="P3" text:outline-level="3">📖 El Título de la Lección</text:h>
      <text:p text:style-name="P31">Leamos juntos dos veces:</text:p>
      <text:p text:style-name="Quotations"><text:span text:style-name="Strong_20_Emphasis"><text:span text:style-name="T1">"Alimento y levadura en figurativo"</text:span></text:span></text:p>
      <text:p text:style-name="Text_20_body"><text:span text:style-name="T1">Hoy vamos a ver sobre </text:span><text:span text:style-name="Strong_20_Emphasis"><text:span text:style-name="T1">alimento</text:span></text:span><text:span text:style-name="T1">. </text:span></text:p>
      <text:list text:style-name="L3">
        <text:list-item>
          <text:p text:style-name="P10"><text:span text:style-name="Strong_20_Emphasis"><text:span text:style-name="T1">Reflexión física:</text:span></text:span><text:span text:style-name="T1"> Todos comemos. Por lo general, tres veces al día (desayuno, almuerzo, cena). Si no comemos, eventualmente morimos. </text:span></text:p>
        </text:list-item>
        <text:list-item>
          <text:p text:style-name="P10"><text:span text:style-name="Strong_20_Emphasis"><text:span text:style-name="T1">Reflexión espiritual:</text:span></text:span><text:span text:style-name="T1"> Cuando vean esta lección, pregúntense: </text:span><text:span text:style-name="Emphasis"><text:span text:style-name="T1">¿Qué es lo que Dios quiere mostrarme con el alimento? ¿Estoy yo recibiendo este alimento espiritual o no? ¿Es importante recibirlo?</text:span></text:span><text:span text:style-name="T1"> </text:span></text:p>
        </text:list-item>
        <text:list-item>
          <text:p text:style-name="P9"><text:span text:style-name="Strong_20_Emphasis"><text:span text:style-name="T1">El Pacto:</text:span></text:span><text:span text:style-name="T1"> Ya vimos que Dios es un Dios de pactos. Para comprender y mantener ese pacto, necesitamos entender este lenguaje espiritual. Dios lo va a cumplir, pero ¿qué hay de nosotros? ¿Estamos comiendo el alimento correcto? </text:span></text:p>
        </text:list-item>
      </text:list>
      <text:p text:style-name="P4"/>
      <text:h text:style-name="P2" text:outline-level="2"><text:soft-page-break/>🍞 3. El Versículo Principal: Trabajad por el Alimento Eterno</text:h>
      <text:p text:style-name="Text_20_body"><text:span text:style-name="Strong_20_Emphasis"><text:span text:style-name="T1">Juan 6:27</text:span></text:span></text:p>
      <text:p text:style-name="Quotations"><text:span text:style-name="Emphasis"><text:span text:style-name="T1">"Trabajad, no por la comida que perece, sino por la comida que a vida eterna permanece, la cual el Hijo del Hombre os dará, porque a este señaló Dios el Padre".</text:span></text:span></text:p>
      <text:h text:style-name="P3" text:outline-level="3">🍔 Comida Física vs. Comida Espiritual</text:h>
      <text:p text:style-name="P31">Jesús dijo esto justo después de multiplicar los panes y los pecados. La multitud lo siguió porque querían comer físicamente. Pero Jesús les advirtió:</text:p>
      <text:list text:style-name="L4">
        <text:list-item>
          <text:p text:style-name="P12"><text:span text:style-name="T1">No trabajen solo por la comida física (la que perece, como el brócoli, las hamburguesas o el </text:span><text:span text:style-name="Emphasis"><text:span text:style-name="T1">bingsu</text:span></text:span><text:span text:style-name="T1"> coreano). </text:span></text:p>
        </text:list-item>
        <text:list-item>
          <text:p text:style-name="P12"><text:span text:style-name="T1">Trabajen por el alimento que da </text:span><text:span text:style-name="Strong_20_Emphasis"><text:span text:style-name="T1">vida eterna</text:span></text:span><text:span text:style-name="T1">. </text:span></text:p>
        </text:list-item>
        <text:list-item>
          <text:p text:style-name="P11"><text:span text:style-name="Strong_20_Emphasis"><text:span text:style-name="T1">¿Quién da este alimento?</text:span></text:span><text:span text:style-name="T1"> No se consigue en el mercado. Solo lo puede dar </text:span><text:span text:style-name="Strong_20_Emphasis"><text:span text:style-name="T1">Jesucristo</text:span></text:span><text:span text:style-name="T1">, el Hijo del Hombre, a quien Dios el Padre selló y envió. </text:span></text:p>
        </text:list-item>
      </text:list>
      <text:p text:style-name="P4"/>
      <text:h text:style-name="P2" text:outline-level="2">🍄 4. Características del Alimento: Físico y Espiritual</text:h>
      <text:p text:style-name="P31">Para entender el significado espiritual, primero veamos las características físicas del alimento:</text:p>
      <text:h text:style-name="P3" text:outline-level="3">🌎 En el Mundo Físico</text:h>
      <text:list text:style-name="L5">
        <text:list-item>
          <text:p text:style-name="P14"><text:span text:style-name="Strong_20_Emphasis"><text:span text:style-name="T1">Necesidad vital:</text:span></text:span><text:span text:style-name="T1"> Si no comemos, nuestro cuerpo consume sus reservas y eventualmente morimos. </text:span></text:p>
        </text:list-item>
        <text:list-item>
          <text:p text:style-name="P14"><text:span text:style-name="Strong_20_Emphasis"><text:span text:style-name="T1">Alimentos buenos:</text:span></text:span><text:span text:style-name="T1"> Frutas, verduras, legumbres. Nos dan salud, fuerza y longevidad. </text:span></text:p>
        </text:list-item>
        <text:list-item>
          <text:p text:style-name="P14"><text:span text:style-name="Strong_20_Emphasis"><text:span text:style-name="T1">Alimentos malos:</text:span></text:span><text:span text:style-name="T1"> Comida chatarra diaria. Deteriora la salud (colesterol, diabetes, cardiopatías). </text:span></text:p>
        </text:list-item>
        <text:list-item>
          <text:p text:style-name="P13"><text:span text:style-name="Strong_20_Emphasis"><text:span text:style-name="T1">Alimentos letales:</text:span></text:span><text:span text:style-name="T1"> </text:span><text:span text:style-name="Emphasis"><text:span text:style-name="T1">Analogía de los hongos.</text:span></text:span><text:span text:style-name="T1"> En las montañas hay hongos que se ven muy bonitos, pero son venenosos. Si los comes, mueres. La apariencia muchas veces engaña; hay alimentos que se ven bien pero son mortales. </text:span></text:p>
        </text:list-item>
      </text:list>
      <text:h text:style-name="P3" text:outline-level="3">🕊️ En el Mundo Espiritual</text:h>
      <text:p text:style-name="Text_20_body"><text:span text:style-name="T1">Así como hay dos tipos de semillas y dos tipos de árboles, hay </text:span><text:span text:style-name="Strong_20_Emphasis"><text:span text:style-name="T1">dos tipos de alimentos espirituales</text:span></text:span><text:span text:style-name="T1">:</text:span></text:p>
      <text:list text:style-name="L6">
        <text:list-item>
          <text:p text:style-name="P16"><text:soft-page-break/><text:span text:style-name="T1">✅ </text:span><text:span text:style-name="Strong_20_Emphasis"><text:span text:style-name="T1">El Alimento de Dios:</text:span></text:span><text:span text:style-name="T1"> Nos da </text:span><text:span text:style-name="Strong_20_Emphasis"><text:span text:style-name="T1">vida espiritual</text:span></text:span><text:span text:style-name="T1">, salud y fortaleza en la fe. </text:span></text:p>
        </text:list-item>
        <text:list-item>
          <text:p text:style-name="P15"><text:span text:style-name="T1">❌ </text:span><text:span text:style-name="Strong_20_Emphasis"><text:span text:style-name="T1">El Alimento de Satanás:</text:span></text:span><text:span text:style-name="T1"> Son "hongos venenosos" espirituales. Parecen atractivos, pero si los "comes" (escuchas y aceptas), matan tu espíritu y te llevan a la muerte espiritual. </text:span></text:p>
        </text:list-item>
      </text:list>
      <text:p text:style-name="P4"/>
      <text:h text:style-name="P2" text:outline-level="2">👂 5. ¿Cómo se "Come" la Palabra? Ejemplos Bíblicos</text:h>
      <text:p text:style-name="Text_20_body"><text:span text:style-name="T1">Si el alimento espiritual es la Palabra, ¿cómo la comemos? No se mastica con la boca, </text:span><text:span text:style-name="Strong_20_Emphasis"><text:span text:style-name="T1">se come con los oídos</text:span></text:span><text:span text:style-name="T1"> (escuchando y prestando atención).</text:span></text:p>
      <text:h text:style-name="P3" text:outline-level="3">📜 Jeremías 15:16 (El Gozo de Comer la Palabra)</text:h>
      <text:p text:style-name="Quotations"><text:span text:style-name="Emphasis"><text:span text:style-name="T1">"Fueron halladas tus palabras, y yo las comí; y tu palabra me fue por gozo y por alegría de mi corazón..."</text:span></text:span></text:p>
      <text:list text:style-name="L7">
        <text:list-item>
          <text:p text:style-name="P32">Jeremías "comió" las palabras de Dios. Cuando comemos algo delicioso, sentimos gozo. Así debe ser nuestra actitud al escuchar la verdad: con alegría espiritual. </text:p>
        </text:list-item>
      </text:list>
      <text:h text:style-name="P3" text:outline-level="3">🍷 Isaías 55:1-3 (El Llamado a los Sedientos)</text:h>
      <text:p text:style-name="Quotations"><text:span text:style-name="Emphasis"><text:span text:style-name="T1">"A todos los sedientos: Venid a las aguas... Venid, comprad sin dinero y sin precio, vino y leche... Inclinad vuestro oído y venid a mí; oíd y vivirá vuestra alma..."</text:span></text:span></text:p>
      <text:list text:style-name="L8">
        <text:list-item>
          <text:p text:style-name="P18"><text:span text:style-name="Strong_20_Emphasis"><text:span text:style-name="T1">Los sedientos:</text:span></text:span><text:span text:style-name="T1"> Son los que sienten necesidad espiritual (como la sed indescriptible después de correr una maratón). </text:span></text:p>
        </text:list-item>
        <text:list-item>
          <text:p text:style-name="P18"><text:span text:style-name="Strong_20_Emphasis"><text:span text:style-name="T1">Sin dinero:</text:span></text:span><text:span text:style-name="T1"> La Palabra de Dios se da gratis, por gracia. </text:span></text:p>
        </text:list-item>
        <text:list-item>
          <text:p text:style-name="P17"><text:span text:style-name="Strong_20_Emphasis"><text:span text:style-name="T1">Inclinar el oído:</text:span></text:span><text:span text:style-name="T1"> No dice "preparen su boca", dice "inclinen su oído". Al escuchar, el alma (espíritu) vive y se deleita. </text:span></text:p>
        </text:list-item>
      </text:list>
      <text:h text:style-name="P3" text:outline-level="3">🌳 Génesis 3:22 y 2:17 (Los Dos Árboles y sus Frutos)</text:h>
      <text:list text:style-name="L9">
        <text:list-item>
          <text:p text:style-name="P20"><text:span text:style-name="Strong_20_Emphasis"><text:span text:style-name="T1">El Árbol de la Vida:</text:span></text:span><text:span text:style-name="T1"> Si Adán y Eva comían de este fruto, vivirían para siempre. Representa el alimento espiritual de Dios que da vida eterna. </text:span></text:p>
        </text:list-item>
        <text:list-item>
          <text:p text:style-name="P19"><text:span text:style-name="Strong_20_Emphasis"><text:span text:style-name="T1">El Árbol de la Ciencia del Bien y el Mal:</text:span></text:span><text:span text:style-name="T1"> </text:span><text:span text:style-name="Emphasis"><text:span text:style-name="T1">"El día que de él comieres, ciertamente morirás"</text:span></text:span><text:span text:style-name="T1">. No murieron físicamente en el acto, pero su </text:span><text:span text:style-name="Strong_20_Emphasis"><text:span text:style-name="T1">espíritu murió</text:span></text:span><text:span text:style-name="T1"> al escuchar y aceptar las palabras de la serpiente (Satanás). </text:span></text:p>
        </text:list-item>
      </text:list>
      <text:h text:style-name="P3" text:outline-level="3"><text:soft-page-break/>🍞 Proverbios 4:17 (El Alimento del Enemigo)</text:h>
      <text:p text:style-name="Quotations"><text:span text:style-name="Emphasis"><text:span text:style-name="T1">"Porque comen pan de maldad y beben vino de robos".</text:span></text:span></text:p>
      <text:list text:style-name="L10">
        <text:list-item>
          <text:p text:style-name="P33">Representa el alimento espiritual de Satanás: mentiras, falsedades y tergiversaciones que parecen pan y vino, pero son maldad. </text:p>
        </text:list-item>
      </text:list>
      <text:p text:style-name="P4"/>
      <text:h text:style-name="P2" text:outline-level="2">🏜️ 6. La Hambruna Espiritual</text:h>
      <text:p text:style-name="P31">Si comer es escuchar la Palabra, ¿qué es una hambruna espiritual?</text:p>
      <text:p text:style-name="Text_20_body"><text:span text:style-name="Strong_20_Emphasis"><text:span text:style-name="T1">Amós 8:11</text:span></text:span></text:p>
      <text:p text:style-name="Quotations"><text:span text:style-name="Emphasis"><text:span text:style-name="T1">"He aquí vienen días, dice Jehová, en los cuales enviaré hambre a la tierra; no hambre de pan, ni sed de agua, sino de oír la palabra de Jehová".</text:span></text:span></text:p>
      <text:list text:style-name="L11">
        <text:list-item>
          <text:p text:style-name="P21"><text:span text:style-name="T1">No es una hambruna física. Es un tiempo donde, aunque la Biblia exista, </text:span><text:span text:style-name="Strong_20_Emphasis"><text:span text:style-name="T1">no hay revelación ni entendimiento de la Palabra verdadera</text:span></text:span><text:span text:style-name="T1">. </text:span></text:p>
        </text:list-item>
        <text:list-item>
          <text:p text:style-name="P34">La gente buscará escuchar a Dios, pero no podrán encontrar la verdad porque los pastores están dando "alimento" humano o falso. </text:p>
        </text:list-item>
      </text:list>
      <text:p text:style-name="P4"/>
      <text:h text:style-name="P2" text:outline-level="2">👅 7. El Paladar Espiritual: Cómo Discernir</text:h>
      <text:p text:style-name="Text_20_body"><text:span text:style-name="Strong_20_Emphasis"><text:span text:style-name="T1">Job 34:3</text:span></text:span></text:p>
      <text:p text:style-name="Quotations"><text:span text:style-name="Emphasis"><text:span text:style-name="T1">"Porque el oído prueba las palabras, como el paladar gusta lo que uno come".</text:span></text:span></text:p>
      <text:list text:style-name="L12">
        <text:list-item>
          <text:p text:style-name="P22"><text:span text:style-name="T1">Así como la lengua detecta si la comida está envenenada o podrida, </text:span><text:span text:style-name="Strong_20_Emphasis"><text:span text:style-name="T1">nuestro oído espiritual (entrenado por la Biblia) debe probar las palabras</text:span></text:span><text:span text:style-name="T1">. </text:span></text:p>
        </text:list-item>
        <text:list-item>
          <text:p text:style-name="P35">No podemos taparnos los oídos; debemos escuchar, pero luego ir a la Biblia para separar qué palabra viene de Dios y cuál viene de Satanás. </text:p>
        </text:list-item>
      </text:list>
      <text:p text:style-name="P4"/>
      <text:h text:style-name="P2" text:outline-level="2">⏳ 8. El Alimento "A su Tiempo": Primera y Segunda Venida</text:h>
      <text:p text:style-name="Text_20_body"><text:span text:style-name="T1">Dios promete un alimento específico para un tiempo específico. No es cualquier palabra; es la </text:span><text:span text:style-name="Strong_20_Emphasis"><text:span text:style-name="T1">realidad del cumplimiento</text:span></text:span><text:span text:style-name="T1"> de Sus promesas.</text:span></text:p>
      <text:h text:style-name="P3" text:outline-level="3"><text:soft-page-break/>✝️ El Alimento de la Primera Venida</text:h>
      <text:p text:style-name="Text_20_body"><text:span text:style-name="Strong_20_Emphasis"><text:span text:style-name="T1">Juan 6:55 y 63</text:span></text:span></text:p>
      <text:p text:style-name="Quotations"><text:span text:style-name="Emphasis"><text:span text:style-name="T1">"Porque mi carne es verdadera comida y mi sangre es verdadera bebida... El Espíritu es el que da vida; la carne para nada aprovecha; las palabras que yo os he hablado son espíritu y son vida".</text:span></text:span></text:p>
      <text:list text:style-name="L13">
        <text:list-item>
          <text:p text:style-name="P24"><text:span text:style-name="T1">La gente se escandalizó porque pensaron en carne física (canibalismo). Pero Jesús hablaba de Su </text:span><text:span text:style-name="Strong_20_Emphasis"><text:span text:style-name="T1">Palabra</text:span></text:span><text:span text:style-name="T1">. </text:span></text:p>
        </text:list-item>
        <text:list-item>
          <text:p text:style-name="P24"><text:span text:style-name="Strong_20_Emphasis"><text:span text:style-name="T1">Juan 17:8:</text:span></text:span><text:span text:style-name="T1"> </text:span><text:span text:style-name="Emphasis"><text:span text:style-name="T1">"Porque las palabras que me diste, les he dado; y ellos las recibieron"</text:span></text:span><text:span text:style-name="T1">. </text:span></text:p>
        </text:list-item>
        <text:list-item>
          <text:p text:style-name="P23"><text:span text:style-name="Strong_20_Emphasis"><text:span text:style-name="T1">¿Cuál era el alimento a su tiempo en la Primera Venida?</text:span></text:span><text:span text:style-name="T1"> No era solo la Ley de Moisés (que los fariseos también tenían). El alimento exclusivo de Jesús eran </text:span><text:span text:style-name="Strong_20_Emphasis"><text:span text:style-name="T1">las profecías del Antiguo Testamento y la REALIDAD de su cumplimiento</text:span></text:span><text:span text:style-name="T1"> (Él mismo como el Mesías). Solo los 12 discípulos "comieron" esto y tuvieron vida eterna. </text:span></text:p>
        </text:list-item>
      </text:list>
      <text:h text:style-name="P3" text:outline-level="3">👑 El Alimento de la Segunda Venida (Nuestro Tiempo)</text:h>
      <text:p text:style-name="Text_20_body"><text:span text:style-name="Strong_20_Emphasis"><text:span text:style-name="T1">Mateo 24:45-47</text:span></text:span></text:p>
      <text:p text:style-name="Quotations"><text:span text:style-name="Emphasis"><text:span text:style-name="T1">"¿Quién es, pues, el siervo fiel y prudente, al cual puso su señor sobre su casa para que les dé el alimento a tiempo? Bienaventurado aquel siervo al cual, cuando su señor venga, le halle haciendo así".</text:span></text:span></text:p>
      <text:list text:style-name="L14">
        <text:list-item>
          <text:p text:style-name="P26"><text:span text:style-name="T1">Estamos en tiempos de la Segunda Venida. Hay una </text:span><text:span text:style-name="Strong_20_Emphasis"><text:span text:style-name="T1">hambruna espiritual</text:span></text:span><text:span text:style-name="T1"> y Dios ha puesto a un "siervo fiel y prudente" (el pastor verdadero enviado por Dios) para dar el </text:span><text:span text:style-name="Strong_20_Emphasis"><text:span text:style-name="T1">alimento a tiempo</text:span></text:span><text:span text:style-name="T1">. </text:span></text:p>
        </text:list-item>
        <text:list-item>
          <text:p text:style-name="P26"><text:span text:style-name="Strong_20_Emphasis"><text:span text:style-name="T1">¿Cuál es el alimento a tiempo para hoy?</text:span></text:span><text:span text:style-name="T1"> Las </text:span><text:span text:style-name="Strong_20_Emphasis"><text:span text:style-name="T1">profecías del Nuevo Testamento (Apocalipsis) y la REALIDAD de su cumplimiento</text:span></text:span><text:span text:style-name="T1">. </text:span></text:p>
        </text:list-item>
        <text:list-item>
          <text:p text:style-name="P25"><text:span text:style-name="Strong_20_Emphasis"><text:span text:style-name="T1">Apocalipsis 2:17</text:span></text:span></text:p>
          <text:p text:style-name="P5"><text:span text:style-name="Emphasis"><text:span text:style-name="T1">"Al que venciere, daré a comer del maná escondido..."</text:span></text:span></text:p>
          <text:list>
            <text:list-item>
              <text:p text:style-name="P36">Este "maná escondido" es la revelación de los misterios de Apocalipsis que estaban sellados y ahora se abren para el pueblo de Dios en estos tiempos. </text:p>
            </text:list-item>
          </text:list>
        </text:list-item>
      </text:list>
      <text:p text:style-name="P4"/>
      <text:h text:style-name="P2" text:outline-level="2">⚠️ 9. Conclusión y Advertencia Solemne</text:h>
      <text:p text:style-name="Text_20_body"><text:span text:style-name="Strong_20_Emphasis"><text:span text:style-name="T1">Oseas 4:6</text:span></text:span></text:p>
      <text:p text:style-name="Quotations"><text:soft-page-break/><text:span text:style-name="Emphasis"><text:span text:style-name="T1">"Mi pueblo fue destruido, porque le faltó conocimiento. Por cuanto desechaste el conocimiento, yo te echaré del sacerdocio... porque olvidaste la ley de tu Dios, también yo me olvidaré de tus hijos".</text:span></text:span></text:p>
      <text:list text:style-name="L15">
        <text:list-item>
          <text:p text:style-name="P28"><text:span text:style-name="Strong_20_Emphasis"><text:span text:style-name="T1">Aplicación personal:</text:span></text:span><text:span text:style-name="T1"> "Mi pueblo" somos nosotros, los cristianos de hoy. </text:span></text:p>
        </text:list-item>
        <text:list-item>
          <text:p text:style-name="P28"><text:span text:style-name="Strong_20_Emphasis"><text:span text:style-name="T1">La consecuencia:</text:span></text:span><text:span text:style-name="T1"> Ser destruidos y echados del sacerdocio por falta de conocimiento (por no comer el alimento verdadero, por malentender el pacto). </text:span></text:p>
        </text:list-item>
        <text:list-item>
          <text:p text:style-name="P27"><text:span text:style-name="Strong_20_Emphasis"><text:span text:style-name="T1">El Llamado:</text:span></text:span><text:span text:style-name="T1"> No comamos a medias. No escojamos solo las partes de la Biblia que nos gustan (como comer solo el pollo y dejar el resto). Debemos comer todo el alimento que Dios está dando en este tiempo para estar 100% saciados y listos para el cumplimiento. </text:span></text:p>
        </text:list-item>
      </text:list>
      <text:p text:style-name="Text_20_body"><text:span text:style-name="Strong_20_Emphasis"><text:span text:style-name="T1">📢 Anuncio para la Próxima Lección:</text:span></text:span><text:span text:style-name="T1"> La próxima vez continuaremos con el tema de la </text:span><text:span text:style-name="Strong_20_Emphasis"><text:span text:style-name="T1">Levadura en figurativo</text:span></text:span><text:span text:style-name="T1"> (la parábola de la mujer que escondió levadura en tres medidas de harina). ¡Vengan preparados!</text:span></text:p>
      <text:p text:style-name="P4"/>
      <text:h text:style-name="P2" text:outline-level="2">🔄 10. Repaso Final Interactivo y Oración de Cierre</text:h>
      <text:p text:style-name="Text_20_body"><text:span text:style-name="Emphasis"><text:span text:style-name="T1">(A cargo del Evangelista Christian Howard)</text:span></text:span></text:p>
      <text:p text:style-name="Text_20_body"><text:span text:style-name="Strong_20_Emphasis"><text:span text:style-name="T1">Resumen Interactivo con los Estudiantes:</text:span></text:span></text:p>
      <text:list text:style-name="L16">
        <text:list-item>
          <text:p text:style-name="P30"><text:span text:style-name="Strong_20_Emphasis"><text:span text:style-name="T1">¿Cuáles son los dos alimentos espirituales?</text:span></text:span></text:p>
          <text:list>
            <text:list-item>
              <text:p text:style-name="P30"><text:span text:style-name="Emphasis"><text:span text:style-name="T1">Respuesta:</text:span></text:span><text:span text:style-name="T1"> El alimento de Dios (la Palabra de verdad, que da vida) y el alimento de Satanás (mentiras, que causa muerte espiritual). </text:span></text:p>
            </text:list-item>
          </text:list>
        </text:list-item>
        <text:list-item>
          <text:p text:style-name="P30"><text:span text:style-name="Strong_20_Emphasis"><text:span text:style-name="T1">¿Qué es el hambre espiritual?</text:span></text:span></text:p>
          <text:list>
            <text:list-item>
              <text:p text:style-name="P30"><text:span text:style-name="Emphasis"><text:span text:style-name="T1">Respuesta:</text:span></text:span><text:span text:style-name="T1"> Hambre de oír la Palabra de Dios (Amós 8:11). </text:span></text:p>
            </text:list-item>
          </text:list>
        </text:list-item>
        <text:list-item>
          <text:p text:style-name="P30"><text:span text:style-name="Strong_20_Emphasis"><text:span text:style-name="T1">¿Cómo discernimos el alimento?</text:span></text:span></text:p>
          <text:list>
            <text:list-item>
              <text:p text:style-name="P30"><text:span text:style-name="Emphasis"><text:span text:style-name="T1">Respuesta:</text:span></text:span><text:span text:style-name="T1"> Usando nuestros oídos y probando las palabras con la Biblia, como el paladar prueba la comida. </text:span></text:p>
            </text:list-item>
          </text:list>
        </text:list-item>
        <text:list-item>
          <text:p text:style-name="P30"><text:span text:style-name="Strong_20_Emphasis"><text:span text:style-name="T1">¿Cuál fue el alimento de la Primera Venida?</text:span></text:span></text:p>
          <text:list>
            <text:list-item>
              <text:p text:style-name="P30"><text:span text:style-name="Emphasis"><text:span text:style-name="T1">Respuesta:</text:span></text:span><text:span text:style-name="T1"> Las profecías del Antiguo Testamento y su </text:span><text:span text:style-name="Strong_20_Emphasis"><text:span text:style-name="T1">realidad/cumplimiento</text:span></text:span><text:span text:style-name="T1"> (Jesús). </text:span></text:p>
            </text:list-item>
          </text:list>
        </text:list-item>
        <text:list-item>
          <text:p text:style-name="P30"><text:span text:style-name="Strong_20_Emphasis"><text:span text:style-name="T1">¿Cuál es el alimento de la Segunda Venida?</text:span></text:span></text:p>
          <text:list>
            <text:list-item>
              <text:p text:style-name="P30"><text:span text:style-name="Emphasis"><text:span text:style-name="T1">Respuesta:</text:span></text:span><text:span text:style-name="T1"> Las profecías del Nuevo Testamento (Apocalipsis) y su </text:span><text:span text:style-name="Strong_20_Emphasis"><text:span text:style-name="T1">realidad/cumplimiento</text:span></text:span><text:span text:style-name="T1">. </text:span></text:p>
            </text:list-item>
          </text:list>
        </text:list-item>
        <text:list-item>
          <text:p text:style-name="P30"><text:span text:style-name="Strong_20_Emphasis"><text:span text:style-name="T1">¿Quién da este alimento a tiempo?</text:span></text:span></text:p>
          <text:list>
            <text:list-item>
              <text:p text:style-name="P29"><text:span text:style-name="Emphasis"><text:span text:style-name="T1">Respuesta:</text:span></text:span><text:span text:style-name="T1"> El siervo fiel y prudente puesto por el Señor (Mateo 24). </text:span></text:p>
            </text:list-item>
          </text:list>
        </text:list-item>
      </text:list>
      <text:p text:style-name="Text_20_body"><text:soft-page-break/><text:span text:style-name="Strong_20_Emphasis"><text:span text:style-name="T1">Reflexión sobre el Padre Nuestro:</text:span></text:span><text:span text:style-name="T1"> Cuando oramos </text:span><text:span text:style-name="Emphasis"><text:span text:style-name="T1">"Danos hoy nuestro pan de cada día"</text:span></text:span><text:span text:style-name="T1">, no solo pedimos comida física. Le pedimos a Dios nuestro </text:span><text:span text:style-name="Strong_20_Emphasis"><text:span text:style-name="T1">alimento espiritual diario</text:span></text:span><text:span text:style-name="T1">, la Palabra que nos mantiene vivos para la vida eterna.</text:span></text:p>
      <text:p text:style-name="Text_20_body"><text:span text:style-name="Strong_20_Emphasis"><text:span text:style-name="T1">Oración de Cierre (El Padre Nuestro):</text:span></text:span></text:p>
      <text:p text:style-name="Quotations"><text:span text:style-name="Emphasis"><text:span text:style-name="T1">"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span></text:p>
      <text:p text:style-name="P31">¡Gracias a todos! Cuídense, que Dios los bendiga. ¡Nos vemos la próxima semana para estudiar la levadura!</text:p>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7-02T08:57:11.952959026</dc:date>
    <meta:editing-duration>PT3M39S</meta:editing-duration>
    <meta:editing-cycles>3</meta:editing-cycles>
    <meta:generator>LibreOffice/24.2.7.2$Linux_X86_64 LibreOffice_project/420$Build-2</meta:generator>
    <meta:document-statistic meta:table-count="0" meta:image-count="0" meta:object-count="0" meta:page-count="8" meta:paragraph-count="120" meta:word-count="2001" meta:character-count="11633" meta:non-whitespace-character-count="9764"/>
  </office:meta>
</office:document-meta>
</file>