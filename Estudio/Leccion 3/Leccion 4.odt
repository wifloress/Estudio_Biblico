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list-style-name="L28"/>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7">
      <style:paragraph-properties fo:margin-top="0cm" fo:margin-bottom="0cm" style:contextual-spacing="false"/>
    </style:style>
    <style:style style:name="P53" style:family="paragraph" style:parent-style-name="Text_20_body" style:list-style-name="L28"/>
    <style:style style:name="P54" style:family="paragraph" style:parent-style-name="Text_20_body" style:list-style-name="L28">
      <style:paragraph-properties fo:margin-top="0cm" fo:margin-bottom="0cm" style:contextual-spacing="false"/>
    </style:style>
    <style:style style:name="P55" style:family="paragraph" style:parent-style-name="Text_20_body" style:list-style-name="L29"/>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30"/>
    <style:style style:name="P58" style:family="paragraph" style:parent-style-name="Text_20_body" style:list-style-name="L30">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5 (PARTE 1)</text:h>
      <text:h text:style-name="Heading_20_2" text:outline-level="2">Alimento y Levadura en Lenguaje Figurativo</text:h>
      <text:p text:style-name="Horizontal_20_Line"/>
      <text:h text:style-name="Heading_20_2" text:outline-level="2">🔄 1. Repaso Inicial: Los Fundamentos de la Parábola Anterior</text:h>
      <text:p text:style-name="Text_20_body"><text:span text:style-name="Emphasis">(A cargo del Evangelista Christian Howard)</text:span></text:p>
      <text:p text:style-name="Text_20_body">Antes de comenzar la nueva lección, repasamos los conceptos fundamentales de la lección anterior sobre la semilla, el campo, el árbol y las aves:</text:p>
      <text:p text:style-name="Text_20_body"><text:span text:style-name="Strong_20_Emphasis">Preguntas de Reflexión y Respuestas:</text:span></text:p>
      <text:list text:style-name="L15">
        <text:list-item>
          <text:p text:style-name="P31"><text:span text:style-name="Strong_20_Emphasis">¿Qué es la semilla espiritualmente?</text:span></text:p>
          <text:list>
            <text:list-item>
              <text:p text:style-name="P31"><text:span text:style-name="Emphasis">Respuesta:</text:span> <text:span text:style-name="Strong_20_Emphasis">La Palabra de Dios</text:span> (La Verdad del cumplimiento). </text:p>
            </text:list-item>
          </text:list>
        </text:list-item>
        <text:list-item>
          <text:p text:style-name="P31"><text:span text:style-name="Strong_20_Emphasis">¿Qué es el campo?</text:span></text:p>
          <text:list>
            <text:list-item>
              <text:p text:style-name="P31"><text:span text:style-name="Emphasis">Respuesta:</text:span> <text:span text:style-name="Strong_20_Emphasis">Nuestro corazón</text:span>, pero también representa <text:span text:style-name="Strong_20_Emphasis">el mundo</text:span> (el cristianismo). </text:p>
            </text:list-item>
          </text:list>
        </text:list-item>
        <text:list-item>
          <text:p text:style-name="P31"><text:span text:style-name="Strong_20_Emphasis">¿Qué es un árbol espiritual?</text:span></text:p>
          <text:list>
            <text:list-item>
              <text:p text:style-name="P31"><text:span text:style-name="Emphasis">Respuesta:</text:span> <text:span text:style-name="Strong_20_Emphasis">Una persona interna renacida</text:span> por la semilla de la Palabra, o también representa a un <text:span text:style-name="Strong_20_Emphasis">pastor</text:span>. </text:p>
            </text:list-item>
          </text:list>
        </text:list-item>
        <text:list-item>
          <text:p text:style-name="P31"><text:span text:style-name="Strong_20_Emphasis">¿Qué son las ramas, las hojas y los frutos?</text:span></text:p>
          <text:list>
            <text:list-item>
              <text:p text:style-name="P31"><text:span text:style-name="Emphasis">Respuesta:</text:span> Las <text:span text:style-name="Strong_20_Emphasis">ramas</text:span> son los discípulos/trabajadores; las <text:span text:style-name="Strong_20_Emphasis">hojas</text:span> son los evangelistas (para la sanidad de las naciones); el <text:span text:style-name="Strong_20_Emphasis">fruto</text:span> es la palabra y la congregación que nace por ella. </text:p>
            </text:list-item>
          </text:list>
        </text:list-item>
        <text:list-item>
          <text:p text:style-name="P31"><text:span text:style-name="Strong_20_Emphasis">¿Qué son las aves?</text:span></text:p>
          <text:list>
            <text:list-item>
              <text:p text:style-name="P31"><text:span text:style-name="Emphasis">Respuesta:</text:span> <text:span text:style-name="Strong_20_Emphasis">Los espíritus</text:span> (buenos y malos). </text:p>
            </text:list-item>
          </text:list>
        </text:list-item>
        <text:list-item>
          <text:p text:style-name="P31"><text:span text:style-name="Strong_20_Emphasis">¿Con qué podemos renacer?</text:span></text:p>
          <text:list>
            <text:list-item>
              <text:p text:style-name="P30"><text:span text:style-name="Emphasis">Respuesta:</text:span> <text:span text:style-name="Strong_20_Emphasis">Solo con la semilla de Dios</text:span> (la Palabra de verdad). </text:p>
            </text:list-item>
          </text:list>
        </text:list-item>
      </text:list>
      <text:p text:style-name="Text_20_body"><text:span text:style-name="Strong_20_Emphasis">Oración de apertura:</text:span></text:p>
      <text:p text:style-name="Quotations"><text:span text:style-name="Emphasis">"Santísimo Padre Dios, gracias por guiarnos aquí. Gracias por enseñarnos todos estos secretos. Muchas veces no entendíamos qué eran estas cosas, pero tú nos estás enseñando que todas son importantes. La semilla es tu palabra y tenemos que ponerla en nuestro campo, que es el corazón, para crecer en un árbol grande y que vengan las aves, que son tus espíritus. Dios, también oro por los estudiantes que no han podido venir; ayúdalos a vencer sus situaciones para escuchar tu palabra. Ellos están hambrientos de tu palabra, por favor, cuídalos para que mantengan su fe. Te agradecemos porque mandaste a tu hijo Jesús y oramos todo esto en el nombre de tu hijo Jesucristo. Amén."</text:span></text:p>
      <text:p text:style-name="Horizontal_20_Line"/>
      <text:h text:style-name="Heading_20_2" text:outline-level="2"><text:soft-page-break/>🏫 2. Introducción: El Hambre Espiritual</text:h>
      <text:p text:style-name="Text_20_body"><text:span text:style-name="Emphasis">(A cargo del Instructor Sibiani)</text:span></text:p>
      <text:h text:style-name="Heading_20_3" text:outline-level="3">📌 La Actitud ante la Palabra</text:h>
      <text:p text:style-name="Text_20_body">Siempre me alegra verlos aquí, porque muestra que están hambrientos por la Palabra de Dios. Cuando escuchemos las lecciones, siempre debemos hacernos la pregunta clave: </text:p>
      <text:list text:style-name="L16">
        <text:list-item>
          <text:p text:style-name="P32"><text:span text:style-name="Emphasis">¿Por qué Dios me está mostrando esto? ¿Qué tiene que ver esto conmigo?</text:span> Si no hacemos esto, la información simplemente entrará por un oído y saldrá por el otro. Pero si la hacemos personal, la Palabra entrará en nuestro corazón y permanecerá allí. </text:p>
        </text:list-item>
      </text:list>
      <text:h text:style-name="Heading_20_3" text:outline-level="3">📖 El Título de la Lección</text:h>
      <text:p text:style-name="Text_20_body">Leamos juntos dos veces:</text:p>
      <text:p text:style-name="Quotations"><text:span text:style-name="Strong_20_Emphasis">"Alimento y levadura en figurativo"</text:span></text:p>
      <text:p text:style-name="Text_20_body">Hoy vamos a ver sobre <text:span text:style-name="Strong_20_Emphasis">alimento</text:span>. </text:p>
      <text:list text:style-name="L17">
        <text:list-item>
          <text:p text:style-name="P34"><text:span text:style-name="Strong_20_Emphasis">Reflexión física:</text:span> Todos comemos. Por lo general, tres veces al día (desayuno, almuerzo, cena). Si no comemos, eventualmente morimos. </text:p>
        </text:list-item>
        <text:list-item>
          <text:p text:style-name="P34"><text:span text:style-name="Strong_20_Emphasis">Reflexión espiritual:</text:span> Cuando vean esta lección, pregúntense: <text:span text:style-name="Emphasis">¿Qué es lo que Dios quiere mostrarme con el alimento? ¿Estoy yo recibiendo este alimento espiritual o no? ¿Es importante recibirlo?</text:span> </text:p>
        </text:list-item>
        <text:list-item>
          <text:p text:style-name="P33"><text:span text:style-name="Strong_20_Emphasis">El Pacto:</text:span> Ya vimos que Dios es un Dios de pactos. Para comprender y mantener ese pacto, necesitamos entender este lenguaje espiritual. Dios lo va a cumplir, pero ¿qué hay de nosotros? ¿Estamos comiendo el alimento correcto? </text:p>
        </text:list-item>
      </text:list>
      <text:p text:style-name="Horizontal_20_Line"/>
      <text:h text:style-name="Heading_20_2" text:outline-level="2">🍞 3. El Versículo Principal: Trabajad por el Alimento Eterno</text:h>
      <text:p text:style-name="Text_20_body"><text:span text:style-name="Strong_20_Emphasis">Juan 6:27</text:span></text:p>
      <text:p text:style-name="Quotations"><text:span text:style-name="Emphasis">"Trabajad, no por la comida que perece, sino por la comida que a vida eterna permanece, la cual el Hijo del Hombre os dará, porque a este señaló Dios el Padre".</text:span></text:p>
      <text:h text:style-name="Heading_20_3" text:outline-level="3">🍔 Comida Física vs. Comida Espiritual</text:h>
      <text:p text:style-name="Text_20_body">Jesús dijo esto justo después de multiplicar los panes y los pecados. La multitud lo siguió porque querían comer físicamente. Pero Jesús les advirtió:</text:p>
      <text:list text:style-name="L18">
        <text:list-item>
          <text:p text:style-name="P36">No trabajen solo por la comida física (la que perece, como el brócoli, las hamburguesas o el <text:span text:style-name="Emphasis">bingsu</text:span> coreano). </text:p>
        </text:list-item>
        <text:list-item>
          <text:p text:style-name="P36">Trabajen por el alimento que da <text:span text:style-name="Strong_20_Emphasis">vida eterna</text:span>. </text:p>
        </text:list-item>
        <text:list-item>
          <text:p text:style-name="P35"><text:span text:style-name="Strong_20_Emphasis">¿Quién da este alimento?</text:span> No se consigue en el mercado. Solo lo puede dar <text:span text:style-name="Strong_20_Emphasis">Jesucristo</text:span>, el Hijo del Hombre, a quien Dios el Padre selló y envió. </text:p>
        </text:list-item>
      </text:list>
      <text:p text:style-name="Horizontal_20_Line"/>
      <text:h text:style-name="Heading_20_2" text:outline-level="2"><text:soft-page-break/>🍄 4. Características del Alimento: Físico y Espiritual</text:h>
      <text:p text:style-name="Text_20_body">Para entender el significado espiritual, primero veamos las características físicas del alimento:</text:p>
      <text:h text:style-name="Heading_20_3" text:outline-level="3">🌎 En el Mundo Físico</text:h>
      <text:list text:style-name="L19">
        <text:list-item>
          <text:p text:style-name="P38"><text:span text:style-name="Strong_20_Emphasis">Necesidad vital:</text:span> Si no comemos, nuestro cuerpo consume sus reservas y eventualmente morimos. </text:p>
        </text:list-item>
        <text:list-item>
          <text:p text:style-name="P38"><text:span text:style-name="Strong_20_Emphasis">Alimentos buenos:</text:span> Frutas, verduras, legumbres. Nos dan salud, fuerza y longevidad. </text:p>
        </text:list-item>
        <text:list-item>
          <text:p text:style-name="P38"><text:span text:style-name="Strong_20_Emphasis">Alimentos malos:</text:span> Comida chatarra diaria. Deteriora la salud (colesterol, diabetes, cardiopatías). </text:p>
        </text:list-item>
        <text:list-item>
          <text:p text:style-name="P37"><text:span text:style-name="Strong_20_Emphasis">Alimentos letales:</text:span> <text:span text:style-name="Emphasis">Analogía de los hongos.</text:span> En las montañas hay hongos que se ven muy bonitos, pero son venenosos. Si los comes, mueres. La apariencia muchas veces engaña; hay alimentos que se ven bien pero son mortales. </text:p>
        </text:list-item>
      </text:list>
      <text:h text:style-name="Heading_20_3" text:outline-level="3">🕊️ En el Mundo Espiritual</text:h>
      <text:p text:style-name="Text_20_body">Así como hay dos tipos de semillas y dos tipos de árboles, hay <text:span text:style-name="Strong_20_Emphasis">dos tipos de alimentos espirituales</text:span>:</text:p>
      <text:list text:style-name="L20">
        <text:list-item>
          <text:p text:style-name="P40">✅ <text:span text:style-name="Strong_20_Emphasis">El Alimento de Dios:</text:span> Nos da <text:span text:style-name="Strong_20_Emphasis">vida espiritual</text:span>, salud y fortaleza en la fe. </text:p>
        </text:list-item>
        <text:list-item>
          <text:p text:style-name="P39">❌ <text:span text:style-name="Strong_20_Emphasis">El Alimento de Satanás:</text:span> Son "hongos venenosos" espirituales. Parecen atractivos, pero si los "comes" (escuchas y aceptas), matan tu espíritu y te llevan a la muerte espiritual. </text:p>
        </text:list-item>
      </text:list>
      <text:p text:style-name="Horizontal_20_Line"/>
      <text:h text:style-name="Heading_20_2" text:outline-level="2">👂 5. ¿Cómo se "Come" la Palabra? Ejemplos Bíblicos</text:h>
      <text:p text:style-name="Text_20_body">Si el alimento espiritual es la Palabra, ¿cómo la comemos? No se mastica con la boca, <text:span text:style-name="Strong_20_Emphasis">se come con los oídos</text:span> (escuchando y prestando atención).</text:p>
      <text:h text:style-name="Heading_20_3" text:outline-level="3">📜 Jeremías 15:16 (El Gozo de Comer la Palabra)</text:h>
      <text:p text:style-name="Quotations"><text:span text:style-name="Emphasis">"Fueron halladas tus palabras, y yo las comí; y tu palabra me fue por gozo y por alegría de mi corazón..."</text:span></text:p>
      <text:list text:style-name="L21">
        <text:list-item>
          <text:p text:style-name="P41">Jeremías "comió" las palabras de Dios. Cuando comemos algo delicioso, sentimos gozo. Así debe ser nuestra actitud al escuchar la verdad: con alegría espiritual. </text:p>
        </text:list-item>
      </text:list>
      <text:h text:style-name="Heading_20_3" text:outline-level="3">🍷 Isaías 55:1-3 (El Llamado a los Sedientos)</text:h>
      <text:p text:style-name="Quotations"><text:span text:style-name="Emphasis">"A todos los sedientos: Venid a las aguas... Venid, comprad sin dinero y sin precio, vino y leche... Inclinad vuestro oído y venid a mí; oíd y vivirá vuestra alma..."</text:span></text:p>
      <text:list text:style-name="L22">
        <text:list-item>
          <text:p text:style-name="P43"><text:span text:style-name="Strong_20_Emphasis">Los sedientos:</text:span> Son los que sienten necesidad espiritual (como la sed indescriptible después de correr una maratón). </text:p>
        </text:list-item>
        <text:list-item>
          <text:p text:style-name="P43"><text:span text:style-name="Strong_20_Emphasis">Sin dinero:</text:span> La Palabra de Dios se da gratis, por gracia. </text:p>
        </text:list-item>
        <text:list-item>
          <text:p text:style-name="P42"><text:span text:style-name="Strong_20_Emphasis">Inclinar el oído:</text:span> No dice "preparen su boca", dice "inclinen su oído". Al escuchar, el alma (espíritu) vive y se deleita. </text:p>
        </text:list-item>
      </text:list>
      <text:h text:style-name="Heading_20_3" text:outline-level="3"><text:soft-page-break/>🌳 Génesis 3:22 y 2:17 (Los Dos Árboles y sus Frutos)</text:h>
      <text:list text:style-name="L23">
        <text:list-item>
          <text:p text:style-name="P45"><text:span text:style-name="Strong_20_Emphasis">El Árbol de la Vida:</text:span> Si Adán y Eva comían de este fruto, vivirían para siempre. Representa el alimento espiritual de Dios que da vida eterna. </text:p>
        </text:list-item>
        <text:list-item>
          <text:p text:style-name="P44"><text:span text:style-name="Strong_20_Emphasis">El Árbol de la Ciencia del Bien y el Mal:</text:span> <text:span text:style-name="Emphasis">"El día que de él comieres, ciertamente morirás"</text:span>. No murieron físicamente en el acto, pero su <text:span text:style-name="Strong_20_Emphasis">espíritu murió</text:span> al escuchar y aceptar las palabras de la serpiente (Satanás). </text:p>
        </text:list-item>
      </text:list>
      <text:h text:style-name="Heading_20_3" text:outline-level="3">🍞 Proverbios 4:17 (El Alimento del Enemigo)</text:h>
      <text:p text:style-name="Quotations"><text:span text:style-name="Emphasis">"Porque comen pan de maldad y beben vino de robos".</text:span></text:p>
      <text:list text:style-name="L24">
        <text:list-item>
          <text:p text:style-name="P46">Representa el alimento espiritual de Satanás: mentiras, falsedades y tergiversaciones que parecen pan y vino, pero son maldad. </text:p>
        </text:list-item>
      </text:list>
      <text:p text:style-name="Horizontal_20_Line"/>
      <text:h text:style-name="Heading_20_2" text:outline-level="2">🏜️ 6. La Hambruna Espiritual</text:h>
      <text:p text:style-name="Text_20_body">Si comer es escuchar la Palabra, ¿qué es una hambruna espiritual?</text:p>
      <text:p text:style-name="Text_20_body"><text:span text:style-name="Strong_20_Emphasis">Amós 8:11</text:span></text:p>
      <text:p text:style-name="Quotations"><text:span text:style-name="Emphasis">"He aquí vienen días, dice Jehová, en los cuales enviaré hambre a la tierra; no hambre de pan, ni sed de agua, sino de oír la palabra de Jehová".</text:span></text:p>
      <text:list text:style-name="L25">
        <text:list-item>
          <text:p text:style-name="P48">No es una hambruna física. Es un tiempo donde, aunque la Biblia exista, <text:span text:style-name="Strong_20_Emphasis">no hay revelación ni entendimiento de la Palabra verdadera</text:span>. </text:p>
        </text:list-item>
        <text:list-item>
          <text:p text:style-name="P47">La gente buscará escuchar a Dios, pero no podrán encontrar la verdad porque los pastores están dando "alimento" humano o falso. </text:p>
        </text:list-item>
      </text:list>
      <text:p text:style-name="Horizontal_20_Line"/>
      <text:h text:style-name="Heading_20_2" text:outline-level="2">👅 7. El Paladar Espiritual: Cómo Discernir</text:h>
      <text:p text:style-name="Text_20_body"><text:span text:style-name="Strong_20_Emphasis">Job 34:3</text:span></text:p>
      <text:p text:style-name="Quotations"><text:span text:style-name="Emphasis">"Porque el oído prueba las palabras, como el paladar gusta lo que uno come".</text:span></text:p>
      <text:list text:style-name="L26">
        <text:list-item>
          <text:p text:style-name="P50">Así como la lengua detecta si la comida está envenenada o podrida, <text:span text:style-name="Strong_20_Emphasis">nuestro oído espiritual (entrenado por la Biblia) debe probar las palabras</text:span>. </text:p>
        </text:list-item>
        <text:list-item>
          <text:p text:style-name="P49">No podemos taparnos los oídos; debemos escuchar, pero luego ir a la Biblia para separar qué palabra viene de Dios y cuál viene de Satanás. </text:p>
        </text:list-item>
      </text:list>
      <text:p text:style-name="Horizontal_20_Line"/>
      <text:h text:style-name="Heading_20_2" text:outline-level="2">⏳ 8. El Alimento "A su Tiempo": Primera y Segunda Venida</text:h>
      <text:p text:style-name="Text_20_body">Dios promete un alimento específico para un tiempo específico. No es cualquier palabra; es la <text:span text:style-name="Strong_20_Emphasis">realidad del cumplimiento</text:span> de Sus promesas.</text:p>
      <text:h text:style-name="Heading_20_3" text:outline-level="3"><text:soft-page-break/>✝️ El Alimento de la Primera Venida</text:h>
      <text:p text:style-name="Text_20_body"><text:span text:style-name="Strong_20_Emphasis">Juan 6:55 y 63</text:span></text:p>
      <text:p text:style-name="Quotations"><text:span text:style-name="Emphasis">"Porque mi carne es verdadera comida y mi sangre es verdadera bebida... El Espíritu es el que da vida; la carne para nada aprovecha; las palabras que yo os he hablado son espíritu y son vida".</text:span></text:p>
      <text:list text:style-name="L27">
        <text:list-item>
          <text:p text:style-name="P52">La gente se escandalizó porque pensaron en carne física (canibalismo). Pero Jesús hablaba de Su <text:span text:style-name="Strong_20_Emphasis">Palabra</text:span>. </text:p>
        </text:list-item>
        <text:list-item>
          <text:p text:style-name="P52"><text:span text:style-name="Strong_20_Emphasis">Juan 17:8:</text:span> <text:span text:style-name="Emphasis">"Porque las palabras que me diste, les he dado; y ellos las recibieron"</text:span>. </text:p>
        </text:list-item>
        <text:list-item>
          <text:p text:style-name="P51"><text:span text:style-name="Strong_20_Emphasis">¿Cuál era el alimento a su tiempo en la Primera Venida?</text:span> No era solo la Ley de Moisés (que los fariseos también tenían). El alimento exclusivo de Jesús eran <text:span text:style-name="Strong_20_Emphasis">las profecías del Antiguo Testamento y la REALIDAD de su cumplimiento</text:span> (Él mismo como el Mesías). Solo los 12 discípulos "comieron" esto y tuvieron vida eterna. </text:p>
        </text:list-item>
      </text:list>
      <text:h text:style-name="Heading_20_3" text:outline-level="3">👑 El Alimento de la Segunda Venida (Nuestro Tiempo)</text:h>
      <text:p text:style-name="Text_20_body"><text:span text:style-name="Strong_20_Emphasis">Mateo 24:45-47</text:span></text:p>
      <text:p text:style-name="Quotations"><text:span text:style-name="Emphasis">"¿Quién es, pues, el siervo fiel y prudente, al cual puso su señor sobre su casa para que les dé el alimento a tiempo? Bienaventurado aquel siervo al cual, cuando su señor venga, le halle haciendo así".</text:span></text:p>
      <text:list text:style-name="L28">
        <text:list-item>
          <text:p text:style-name="P54">Estamos en tiempos de la Segunda Venida. Hay una <text:span text:style-name="Strong_20_Emphasis">hambruna espiritual</text:span> y Dios ha puesto a un "siervo fiel y prudente" (el pastor verdadero enviado por Dios) para dar el <text:span text:style-name="Strong_20_Emphasis">alimento a tiempo</text:span>. </text:p>
        </text:list-item>
        <text:list-item>
          <text:p text:style-name="P54"><text:span text:style-name="Strong_20_Emphasis">¿Cuál es el alimento a tiempo para hoy?</text:span> Las <text:span text:style-name="Strong_20_Emphasis">profecías del Nuevo Testamento (Apocalipsis) y la REALIDAD de su cumplimiento</text:span>. </text:p>
        </text:list-item>
        <text:list-item>
          <text:p text:style-name="P53"><text:span text:style-name="Strong_20_Emphasis">Apocalipsis 2:17</text:span></text:p>
          <text:p text:style-name="P1"><text:span text:style-name="Emphasis">"Al que venciere, daré a comer del maná escondido..."</text:span></text:p>
          <text:list>
            <text:list-item>
              <text:p text:style-name="P53">Este "maná escondido" es la revelación de los misterios de Apocalipsis que estaban sellados y ahora se abren para el pueblo de Dios en estos tiempos. </text:p>
            </text:list-item>
          </text:list>
        </text:list-item>
      </text:list>
      <text:p text:style-name="Horizontal_20_Line"/>
      <text:h text:style-name="Heading_20_2" text:outline-level="2">⚠️ 9. Conclusión y Advertencia Solemne</text:h>
      <text:p text:style-name="Text_20_body"><text:span text:style-name="Strong_20_Emphasis">Oseas 4:6</text:span></text:p>
      <text:p text:style-name="Quotations"><text:span text:style-name="Emphasis">"Mi pueblo fue destruido, porque le faltó conocimiento. Por cuanto desechaste el conocimiento, yo te echaré del sacerdocio... porque olvidaste la ley de tu Dios, también yo me olvidaré de tus hijos".</text:span></text:p>
      <text:list text:style-name="L29">
        <text:list-item>
          <text:p text:style-name="P56"><text:span text:style-name="Strong_20_Emphasis">Aplicación personal:</text:span> "Mi pueblo" somos nosotros, los cristianos de hoy. </text:p>
        </text:list-item>
        <text:list-item>
          <text:p text:style-name="P56"><text:span text:style-name="Strong_20_Emphasis">La consecuencia:</text:span> Ser destruidos y echados del sacerdocio por falta de conocimiento (por no comer el alimento verdadero, por malentender el pacto). </text:p>
        </text:list-item>
        <text:list-item>
          <text:p text:style-name="P55"><text:span text:style-name="Strong_20_Emphasis">El Llamado:</text:span> No comamos a medias. No escojamos solo las partes de la Biblia que nos gustan (como comer solo el pollo y dejar el resto). Debemos comer todo el alimento que Dios está dando en este tiempo para estar 100% saciados y listos para el cumplimiento. </text:p>
        </text:list-item>
      </text:list>
      <text:p text:style-name="Text_20_body"><text:soft-page-break/><text:span text:style-name="Strong_20_Emphasis">📢 Anuncio para la Próxima Lección:</text:span> La próxima vez continuaremos con el tema de la <text:span text:style-name="Strong_20_Emphasis">Levadura en figurativo</text:span> (la parábola de la mujer que escondió levadura en tres medidas de harina). ¡Vengan preparados!</text:p>
      <text:p text:style-name="Horizontal_20_Line"/>
      <text:h text:style-name="Heading_20_2" text:outline-level="2">🔄 10. Repaso Final Interactivo y Oración de Cierre</text:h>
      <text:p text:style-name="Text_20_body"><text:span text:style-name="Emphasis">(A cargo del Evangelista Christian Howard)</text:span></text:p>
      <text:p text:style-name="Text_20_body"><text:span text:style-name="Strong_20_Emphasis">Resumen Interactivo con los Estudiantes:</text:span></text:p>
      <text:list text:style-name="L30">
        <text:list-item>
          <text:p text:style-name="P58"><text:span text:style-name="Strong_20_Emphasis">¿Cuáles son los dos alimentos espirituales?</text:span></text:p>
          <text:list>
            <text:list-item>
              <text:p text:style-name="P58"><text:span text:style-name="Emphasis">Respuesta:</text:span> El alimento de Dios (la Palabra de verdad, que da vida) y el alimento de Satanás (mentiras, que causa muerte espiritual). </text:p>
            </text:list-item>
          </text:list>
        </text:list-item>
        <text:list-item>
          <text:p text:style-name="P58"><text:span text:style-name="Strong_20_Emphasis">¿Qué es el hambre espiritual?</text:span></text:p>
          <text:list>
            <text:list-item>
              <text:p text:style-name="P58"><text:span text:style-name="Emphasis">Respuesta:</text:span> Hambre de oír la Palabra de Dios (Amós 8:11). </text:p>
            </text:list-item>
          </text:list>
        </text:list-item>
        <text:list-item>
          <text:p text:style-name="P58"><text:span text:style-name="Strong_20_Emphasis">¿Cómo discernimos el alimento?</text:span></text:p>
          <text:list>
            <text:list-item>
              <text:p text:style-name="P58"><text:span text:style-name="Emphasis">Respuesta:</text:span> Usando nuestros oídos y probando las palabras con la Biblia, como el paladar prueba la comida. </text:p>
            </text:list-item>
          </text:list>
        </text:list-item>
        <text:list-item>
          <text:p text:style-name="P58"><text:span text:style-name="Strong_20_Emphasis">¿Cuál fue el alimento de la Primera Venida?</text:span></text:p>
          <text:list>
            <text:list-item>
              <text:p text:style-name="P58"><text:span text:style-name="Emphasis">Respuesta:</text:span> Las profecías del Antiguo Testamento y su <text:span text:style-name="Strong_20_Emphasis">realidad/cumplimiento</text:span> (Jesús). </text:p>
            </text:list-item>
          </text:list>
        </text:list-item>
        <text:list-item>
          <text:p text:style-name="P58"><text:span text:style-name="Strong_20_Emphasis">¿Cuál es el alimento de la Segunda Venida?</text:span></text:p>
          <text:list>
            <text:list-item>
              <text:p text:style-name="P58"><text:span text:style-name="Emphasis">Respuesta:</text:span> Las profecías del Nuevo Testamento (Apocalipsis) y su <text:span text:style-name="Strong_20_Emphasis">realidad/cumplimiento</text:span>. </text:p>
            </text:list-item>
          </text:list>
        </text:list-item>
        <text:list-item>
          <text:p text:style-name="P58"><text:span text:style-name="Strong_20_Emphasis">¿Quién da este alimento a tiempo?</text:span></text:p>
          <text:list>
            <text:list-item>
              <text:p text:style-name="P57"><text:span text:style-name="Emphasis">Respuesta:</text:span> El siervo fiel y prudente puesto por el Señor (Mateo 24). </text:p>
            </text:list-item>
          </text:list>
        </text:list-item>
      </text:list>
      <text:p text:style-name="Text_20_body"><text:span text:style-name="Strong_20_Emphasis">Reflexión sobre el Padre Nuestro:</text:span> Cuando oramos <text:span text:style-name="Emphasis">"Danos hoy nuestro pan de cada día"</text:span>, no solo pedimos comida física. Le pedimos a Dios nuestro <text:span text:style-name="Strong_20_Emphasis">alimento espiritual diario</text:span>, la Palabra que nos mantiene vivos para la vida eterna.</text:p>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ofensas, como también nosotros perdonamos a los que nos ofenden. No nos dejes caer en la tentación, mas líbranos del mal. Porque tuyo es el reino, el poder y la gloria, por los siglos de los siglos. Amén."</text:span></text:p>
      <text:p text:style-name="Text_20_body">¡Gracias a todos! Cuídense, que Dios los bendiga. ¡Nos vemos la próxima semana para estudiar la levadur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7T10:07:57.002700876</meta:creation-date>
    <dc:date>2026-06-19T10:23:49.312828904</dc:date>
    <meta:editing-duration>PT3M31S</meta:editing-duration>
    <meta:editing-cycles>2</meta:editing-cycles>
    <meta:generator>LibreOffice/24.2.7.2$Linux_X86_64 LibreOffice_project/420$Build-2</meta:generator>
    <meta:document-statistic meta:table-count="0" meta:image-count="0" meta:object-count="0" meta:page-count="6" meta:paragraph-count="120" meta:word-count="2001" meta:character-count="11633" meta:non-whitespace-character-count="9764"/>
  </office:meta>
</office:document-meta>
</file>