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style style:name="P16" style:family="paragraph" style:parent-style-name="Text_20_body" style:list-style-name="L9">
      <style:paragraph-properties fo:margin-top="0cm" fo:margin-bottom="0cm" style:contextual-spacing="false"/>
    </style:style>
    <style:style style:name="P17" style:family="paragraph" style:parent-style-name="Text_20_body" style:list-style-name="L10"/>
    <style:style style:name="P18" style:family="paragraph" style:parent-style-name="Text_20_body" style:list-style-name="L10">
      <style:paragraph-properties fo:margin-top="0cm" fo:margin-bottom="0cm" style:contextual-spacing="false"/>
    </style:style>
    <style:style style:name="P19" style:family="paragraph" style:parent-style-name="Text_20_body" style:list-style-name="L11"/>
    <style:style style:name="P20" style:family="paragraph" style:parent-style-name="Text_20_body" style:list-style-name="L11">
      <style:paragraph-properties fo:margin-top="0cm" fo:margin-bottom="0cm" style:contextual-spacing="false"/>
    </style:style>
    <style:style style:name="P21" style:family="paragraph" style:parent-style-name="Text_20_body" style:list-style-name="L12"/>
    <style:style style:name="P22" style:family="paragraph" style:parent-style-name="Text_20_body" style:list-style-name="L12">
      <style:paragraph-properties fo:margin-top="0cm" fo:margin-bottom="0cm" style:contextual-spacing="false"/>
    </style:style>
    <style:style style:name="P23" style:family="paragraph" style:parent-style-name="Text_20_body" style:list-style-name="L13"/>
    <style:style style:name="P24" style:family="paragraph" style:parent-style-name="Text_20_body" style:list-style-name="L13">
      <style:paragraph-properties fo:margin-top="0cm" fo:margin-bottom="0cm" style:contextual-spacing="false"/>
    </style:style>
    <style:style style:name="P25" style:family="paragraph" style:parent-style-name="Text_20_body" style:list-style-name="L14"/>
    <style:style style:name="P26" style:family="paragraph" style:parent-style-name="Text_20_body" style:list-style-name="L14">
      <style:paragraph-properties fo:margin-top="0cm" fo:margin-bottom="0cm" style:contextual-spacing="false"/>
    </style:style>
    <style:style style:name="P27" style:family="paragraph" style:parent-style-name="Text_20_body" style:list-style-name="L15">
      <style:paragraph-properties fo:margin-top="0cm" fo:margin-bottom="0cm" style:contextual-spacing="false"/>
    </style:style>
    <style:style style:name="P28" style:family="paragraph" style:parent-style-name="Text_20_body" style:list-style-name="L16">
      <style:paragraph-properties fo:margin-top="0cm" fo:margin-bottom="0cm" style:contextual-spacing="false"/>
    </style:style>
    <style:style style:name="P29" style:family="paragraph" style:parent-style-name="Text_20_body" style:list-style-name="L17">
      <style:paragraph-properties fo:margin-top="0cm" fo:margin-bottom="0cm" style:contextual-spacing="false"/>
    </style:style>
    <style:style style:name="P30" style:family="paragraph" style:parent-style-name="Text_20_body" style:list-style-name="L19"/>
    <style:style style:name="P31" style:family="paragraph" style:parent-style-name="Text_20_body" style:list-style-name="L19">
      <style:paragraph-properties fo:margin-top="0cm" fo:margin-bottom="0cm" style:contextual-spacing="false"/>
    </style:style>
    <style:style style:name="P32" style:family="paragraph" style:parent-style-name="Text_20_body" style:list-style-name="L20"/>
    <style:style style:name="P33" style:family="paragraph" style:parent-style-name="Text_20_body" style:list-style-name="L20">
      <style:paragraph-properties fo:margin-top="0cm" fo:margin-bottom="0cm" style:contextual-spacing="false"/>
    </style:style>
    <style:style style:name="P34" style:family="paragraph" style:parent-style-name="Text_20_body" style:list-style-name="L21"/>
    <style:style style:name="P35" style:family="paragraph" style:parent-style-name="Text_20_body" style:list-style-name="L21">
      <style:paragraph-properties fo:margin-top="0cm" fo:margin-bottom="0cm" style:contextual-spacing="false"/>
    </style:style>
    <style:style style:name="P36" style:family="paragraph" style:parent-style-name="Text_20_body" style:list-style-name="L22"/>
    <style:style style:name="P37" style:family="paragraph" style:parent-style-name="Text_20_body" style:list-style-name="L22">
      <style:paragraph-properties fo:margin-top="0cm" fo:margin-bottom="0cm" style:contextual-spacing="false"/>
    </style:style>
    <style:style style:name="P38" style:family="paragraph" style:parent-style-name="Text_20_body" style:list-style-name="L23"/>
    <style:style style:name="P39" style:family="paragraph" style:parent-style-name="Text_20_body" style:list-style-name="L23">
      <style:paragraph-properties fo:margin-top="0cm" fo:margin-bottom="0cm" style:contextual-spacing="false"/>
    </style:style>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26">
      <style:paragraph-properties fo:margin-top="0cm" fo:margin-bottom="0cm" style:contextual-spacing="false"/>
    </style:style>
    <style:style style:name="P44" style:family="paragraph" style:parent-style-name="Text_20_body" style:list-style-name="L27"/>
    <style:style style:name="P45" style:family="paragraph" style:parent-style-name="Text_20_body" style:list-style-name="L27">
      <style:paragraph-properties fo:margin-top="0cm" fo:margin-bottom="0cm" style:contextual-spacing="false"/>
    </style:style>
    <style:style style:name="P46" style:family="paragraph" style:parent-style-name="Text_20_body" style:list-style-name="L28"/>
    <style:style style:name="P47" style:family="paragraph" style:parent-style-name="Text_20_body" style:list-style-name="L29"/>
    <style:style style:name="P48" style:family="paragraph" style:parent-style-name="Text_20_body" style:list-style-name="L30"/>
    <style:style style:name="P49" style:family="paragraph" style:parent-style-name="Text_20_body" style:list-style-name="L31"/>
    <style:style style:name="P50" style:family="paragraph" style:parent-style-name="Text_20_body" style:list-style-name="L31">
      <style:paragraph-properties fo:margin-top="0cm" fo:margin-bottom="0cm" style:contextual-spacing="false"/>
    </style:style>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3">
      <style:paragraph-properties fo:margin-top="0cm" fo:margin-bottom="0cm" style:contextual-spacing="false"/>
    </style:style>
    <style:style style:name="P54" style:family="paragraph" style:parent-style-name="Text_20_body" style:list-style-name="L34"/>
    <style:style style:name="P55" style:family="paragraph" style:parent-style-name="Text_20_body" style:list-style-name="L34">
      <style:paragraph-properties fo:margin-top="0cm" fo:margin-bottom="0cm" style:contextual-spacing="false"/>
    </style:style>
    <style:style style:name="P56" style:family="paragraph" style:parent-style-name="Text_20_body" style:list-style-name="L35"/>
    <style:style style:name="P57" style:family="paragraph" style:parent-style-name="Text_20_body" style:list-style-name="L35">
      <style:paragraph-properties fo:margin-top="0cm" fo:margin-bottom="0cm" style:contextual-spacing="false"/>
    </style:style>
    <style:style style:name="P58" style:family="paragraph" style:parent-style-name="Text_20_body" style:list-style-name="L36"/>
    <style:style style:name="P59" style:family="paragraph" style:parent-style-name="Text_20_body" style:list-style-name="L36">
      <style:paragraph-properties fo:margin-top="0cm" fo:margin-bottom="0cm" style:contextual-spacing="false"/>
    </style:style>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8">
      <style:paragraph-properties fo:margin-top="0cm" fo:margin-bottom="0cm" style:contextual-spacing="false"/>
    </style:style>
    <style:style style:name="P63" style:family="paragraph" style:parent-style-name="Text_20_body" style:list-style-name="L39"/>
    <style:style style:name="P64" style:family="paragraph" style:parent-style-name="Text_20_body" style:list-style-name="L39">
      <style:paragraph-properties fo:margin-top="0cm" fo:margin-bottom="0cm" style:contextual-spacing="false"/>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CUADERNO DE ESTUDIO: LECCIÓN 6 (PARTE 2)</text:h>
      <text:h text:style-name="Heading_20_2" text:outline-level="2">Copa, Balanza y Vara en Lenguaje Figurativo<text:span text:style-name="T2"/></text:h>
      <text:p text:style-name="Horizontal_20_Line"/>
      <text:h text:style-name="Heading_20_2" text:outline-level="2">🔄 1. Repaso y Mini-Quiz de Retención</text:h>
      <text:p text:style-name="Text_20_body"><text:span text:style-name="Emphasis">(A cargo del Evangelista Christian Howard)</text:span></text:p>
      <text:p text:style-name="Text_20_body">Antes de continuar con la nueva temática, realizamos un repaso de la lección anterior (Levadura y Copa) y un <text:span text:style-name="Strong_20_Emphasis">mini-quiz de Verdadero/Falso</text:span> para evaluar nuestra retención de las lecciones previas ("Los dos dioses" y "Entendimiento básico de la Biblia"):</text:p>
      <text:h text:style-name="Heading_20_3" text:outline-level="3">📝 Preguntas de Reflexión y Respuestas:</text:h>
      <text:list text:style-name="L19">
        <text:list-item>
          <text:p text:style-name="P31"><text:span text:style-name="Strong_20_Emphasis">¿Qué estoy permitiendo que llene mi corazón?</text:span> <text:span text:style-name="Emphasis">(El resultado de no mantener el pacto es condenación).</text:span> </text:p>
        </text:list-item>
        <text:list-item>
          <text:p text:style-name="P31"><text:span text:style-name="Strong_20_Emphasis">¿Por qué la limpieza interior es importante?</text:span> Porque a Dios le interesa lo que hay en nuestro corazón, no solo las apariencias externas. </text:p>
        </text:list-item>
        <text:list-item>
          <text:p text:style-name="P31"><text:span text:style-name="Strong_20_Emphasis">¿Qué peligro muestra el ejemplo de Moab?</text:span> Pensar que estamos bien mientras conservamos impurezas y "sedimentos" (pensamientos contrarios a la verdad) sin darnos cuenta. </text:p>
        </text:list-item>
        <text:list-item>
          <text:p text:style-name="P30"><text:span text:style-name="Strong_20_Emphasis">Reflexión personal:</text:span> <text:span text:style-name="Emphasis">¿Hay algo que has permitido permanecer en tu corazón por mucho tiempo sin cambiarlo?</text:span> Debemos chequear si lo que creemos entra en conflicto con la Palabra de Dios. </text:p>
        </text:list-item>
      </text:list>
      <text:h text:style-name="Heading_20_3" text:outline-level="3">✅ Mini-Quiz (Verdadero o Falso):</text:h>
      <text:list text:style-name="L20">
        <text:list-item>
          <text:p text:style-name="P33"><text:span text:style-name="Strong_20_Emphasis">Dios es creador, único y es físico.</text:span> ➡️ <text:span text:style-name="Strong_20_Emphasis">FALSO.</text:span> Dios es espíritu, no físico. </text:p>
        </text:list-item>
        <text:list-item>
          <text:p text:style-name="P33"><text:span text:style-name="Strong_20_Emphasis">Satanás siempre fue malo y se opuso a Dios desde el principio.</text:span> ➡️ <text:span text:style-name="Strong_20_Emphasis">FALSO.</text:span> Fue creado perfecto (arcángel resplandeciente), pero su orgullo lo cambió. </text:p>
        </text:list-item>
        <text:list-item>
          <text:p text:style-name="P33"><text:span text:style-name="Strong_20_Emphasis">Donde obra Dios, no solo aparecen las promesas, sino también el cumplimiento.</text:span> ➡️ <text:span text:style-name="Strong_20_Emphasis">VERDADERO.</text:span> Dios es el Alfa y la Omega (Promesa y Cumplimiento). </text:p>
        </text:list-item>
        <text:list-item>
          <text:p text:style-name="P33"><text:span text:style-name="Strong_20_Emphasis">La Biblia es un libro de pactos entre Dios y </text:span><text:span text:style-name="Strong_20_Emphasis"><text:span text:style-name="Emphasis">todas</text:span></text:span><text:span text:style-name="Strong_20_Emphasis"> las personas del mundo.</text:span> ➡️ <text:span text:style-name="Strong_20_Emphasis">FALSO.</text:span> Es un libro de pactos entre Dios y su <text:span text:style-name="Emphasis">pueblo escogido</text:span> (los que escuchan y reciben la semilla). </text:p>
        </text:list-item>
        <text:list-item>
          <text:p text:style-name="P32"><text:span text:style-name="Strong_20_Emphasis">El resultado de no mantener el nuevo pacto en Apocalipsis es condenación e infierno.</text:span> ➡️ <text:span text:style-name="Strong_20_Emphasis">VERDADERO.</text:span> El pacto requiere nuestro esfuerzo y entendimiento; si no lo guardamos, hay consecuencias eternas. </text:p>
        </text:list-item>
      </text:list>
      <text:p text:style-name="Text_20_body"><text:span text:style-name="Strong_20_Emphasis">Oración de apertura:</text:span></text:p>
      <text:p text:style-name="Quotations"><text:span text:style-name="Emphasis">"Santísimo Padre Dios, gracias por traernos aquí a escuchar tu palabra. Cuanto más entendemos, más nos acercamos a comprender tu voluntad y tu obra. Oramos por los estudiantes que ponen tanto esfuerzo, y también por los que no han podido venir, especialmente por nuestros hermanos en Venezuela que acaban de sufrir un gran </text:span><text:soft-page-break/><text:span text:style-name="Emphasis">temblor; por favor, cuídalos y dales fe para volver a escuchar tu palabra que da vida. Te oramos en el nombre de Jesucristo. Amén."</text:span></text:p>
      <text:p text:style-name="Horizontal_20_Line"/>
      <text:h text:style-name="Heading_20_2" text:outline-level="2">⚖️ 2. Introducción a la Balanza y la Vara</text:h>
      <text:p text:style-name="Text_20_body"><text:span text:style-name="Emphasis">(A cargo del Instructor Sibiani)</text:span></text:p>
      <text:h text:style-name="Heading_20_3" text:outline-level="3">📌 La Importancia de Entender el Lenguaje Figurativo</text:h>
      <text:p text:style-name="Text_20_body">No estudiamos estos elementos (copa, balanza, vara) solo por curiosidad histórica. Los vemos porque <text:span text:style-name="Strong_20_Emphasis">aparecen en los tiempos de la Segunda Venida (Apocalipsis)</text:span>. </text:p>
      <text:list text:style-name="L21">
        <text:list-item>
          <text:p text:style-name="P35">Si Dios quiere utilizar una vara para juzgar o una balanza para medir, ¿cómo sabré yo qué es eso si no lo he estudiado? </text:p>
        </text:list-item>
        <text:list-item>
          <text:p text:style-name="P35">Si no entiendo qué es una balanza, ¿cómo podré ser juzgado correctamente o entender el juicio de Dios? </text:p>
        </text:list-item>
        <text:list-item>
          <text:p text:style-name="P34"><text:span text:style-name="Strong_20_Emphasis">El objetivo:</text:span> Ver cómo esto se aplica a mí hoy en 2026 y cómo identificar la obra de Dios y de Satanás en estos tiempos. </text:p>
        </text:list-item>
      </text:list>
      <text:p text:style-name="Horizontal_20_Line"/>
      <text:h text:style-name="Heading_20_2" text:outline-level="2">⚖️ 3. La Balanza en Figurativo: El Juicio de Dios</text:h>
      <text:h text:style-name="Heading_20_3" text:outline-level="3">🐎 La Profecía del Caballo Negro</text:h>
      <text:p text:style-name="Text_20_body"><text:span text:style-name="Strong_20_Emphasis">Apocalipsis 6:5-6</text:span></text:p>
      <text:p text:style-name="Quotations"><text:span text:style-name="Emphasis">"Cuando abrió el tercer sello... miré, y he aquí un caballo negro; y el que lo montaba tenía una balanza en la mano. Y oí una voz... que decía: Dos libras de trigo por un denario... pero no dañes el aceite ni el vino".</text:span></text:p>
      <text:list text:style-name="L22">
        <text:list-item>
          <text:p text:style-name="P37"><text:span text:style-name="Strong_20_Emphasis">No es literal:</text:span> No se trata de una balanza física de mercado ni de un caballo de carne y hueso. Es una parábola espiritual sobre el juicio en los tiempos del fin. </text:p>
        </text:list-item>
        <text:list-item>
          <text:p text:style-name="P37"><text:span text:style-name="Strong_20_Emphasis">Característica física:</text:span> La balanza sirve para <text:span text:style-name="Strong_20_Emphasis">pesar</text:span> y <text:span text:style-name="Strong_20_Emphasis">comparar</text:span> un peso con otro. </text:p>
        </text:list-item>
        <text:list-item>
          <text:p text:style-name="P36"><text:span text:style-name="Strong_20_Emphasis">Significado espiritual:</text:span> Pesar = <text:span text:style-name="Strong_20_Emphasis">Juzgar</text:span>. Dios quiere "pesarnos" para ver qué tan pesados o ligeros somos espiritualmente. </text:p>
        </text:list-item>
      </text:list>
      <text:h text:style-name="Heading_20_3" text:outline-level="3">❤️ ¿Qué pesa Dios en la Balanza?</text:h>
      <text:p text:style-name="Text_20_body"><text:span text:style-name="Strong_20_Emphasis">Proverbios 24:12</text:span></text:p>
      <text:p text:style-name="Quotations"><text:span text:style-name="Emphasis">"¿Acaso no lo entenderá el que pesa los corazones? El que mira por tu alma, él lo conocerá, y dará al hombre según sus obras".</text:span></text:p>
      <text:p text:style-name="Text_20_body"><text:span text:style-name="Strong_20_Emphasis">1 Samuel 2:3</text:span></text:p>
      <text:p text:style-name="Quotations"><text:span text:style-name="Emphasis">"...Jehová es el Dios de todo saber, y a él toca el pesar las acciones".</text:span></text:p>
      <text:list text:style-name="L23">
        <text:list-item>
          <text:p text:style-name="P39"><text:span text:style-name="Strong_20_Emphasis">El Corazón y las Acciones:</text:span> Dios no pesa kilogramos; pesa lo que hay en nuestro corazón (nuestros deseos) y las acciones que salen de él. </text:p>
        </text:list-item>
        <text:list-item>
          <text:p text:style-name="P39"><text:soft-page-break/><text:span text:style-name="Strong_20_Emphasis">El Estándar (La Ley):</text:span> En el mundo físico, un país juzga a sus ciudadanos con su constitución o leyes. En el mundo espiritual, <text:span text:style-name="Strong_20_Emphasis">¿cuál es la ley de Dios para pesarnos? La Palabra de Dios.</text:span> </text:p>
        </text:list-item>
        <text:list-item>
          <text:p text:style-name="P38">Dios pesa nuestra fe, nuestro corazón y nuestras obras usando Su Palabra como el estándar exacto. </text:p>
        </text:list-item>
      </text:list>
      <text:h text:style-name="Heading_20_3" text:outline-level="3">📜 Ejemplo Histórico: El Juicio a Babilonia</text:h>
      <text:p text:style-name="Text_20_body"><text:span text:style-name="Strong_20_Emphasis">Daniel 5:25-28 (MENE, MENE, TEKEL, UPHARSIN)</text:span> Durante un festín profano del rey Belsasar, apareció una mano escribiendo en la pared. Daniel interpretó:</text:p>
      <text:list text:style-name="L24">
        <text:list-item>
          <text:p text:style-name="P40"><text:span text:style-name="Strong_20_Emphasis">MENE:</text:span> Contó Dios tu reino y le ha puesto fin.</text:p>
        </text:list-item>
        <text:list-item>
          <text:p text:style-name="P40"><text:span text:style-name="Strong_20_Emphasis">TEQUEL:</text:span> <text:span text:style-name="Strong_20_Emphasis">Pesado has sido en balanza y fuiste hallado falto.</text:span></text:p>
        </text:list-item>
        <text:list-item>
          <text:p text:style-name="P40"><text:span text:style-name="Strong_20_Emphasis">PERES:</text:span> Tu reino fue roto y dado a los medos y persas.</text:p>
        </text:list-item>
        <text:list-item>
          <text:p text:style-name="P40"><text:span text:style-name="Strong_20_Emphasis">La Lección:</text:span> Dios tiene su balanza. Babilonia fue "pesada" y hallada "ligera" (falto). En la balanza de Dios, lo que es "pesado" (lleno de Su Palabra) es bueno; lo que está vacío o lleno de impurezas, es hallado falto para el juicio.</text:p>
        </text:list-item>
      </text:list>
      <text:h text:style-name="Heading_20_3" text:outline-level="3">📖 El Juicio en el Día Postrero</text:h>
      <text:p text:style-name="Text_20_body"><text:span text:style-name="Strong_20_Emphasis">Juan 12:48</text:span></text:p>
      <text:p text:style-name="Quotations"><text:span text:style-name="Emphasis">"El que me rechaza y no recibe mis palabras, tiene quien le juzgue. La palabra que he hablado, ella le juzgará en el día postrero".</text:span></text:p>
      <text:p text:style-name="Text_20_body"><text:span text:style-name="Strong_20_Emphasis">Apocalipsis 20:12</text:span></text:p>
      <text:p text:style-name="Quotations"><text:span text:style-name="Emphasis">"Y vi a los muertos... de pie ante Dios, y los libros fueron abiertos. Y otro libro fue abierto, el cual es el libro de la vida, y fueron juzgados los muertos por las cosas que estaban escritas en los libros según sus obras".</text:span></text:p>
      <text:list text:style-name="L25">
        <text:list-item>
          <text:p text:style-name="P41"><text:span text:style-name="Strong_20_Emphasis">Los Libros Abiertos:</text:span> Los 66 libros de la Biblia serán el estándar. No podemos llegar ante el trono de Dios diciendo "no sabía". Necesitamos conocer la ley de Dios, así como un ciudadano necesita conocer las leyes de su país para no ser condenado. </text:p>
        </text:list-item>
      </text:list>
      <text:h text:style-name="Heading_20_3" text:outline-level="3">❌ La Balanza de Satanás: Peso Falso</text:h>
      <text:p text:style-name="Text_20_body"><text:span text:style-name="Strong_20_Emphasis">Proverbios 11:1</text:span></text:p>
      <text:p text:style-name="Quotations"><text:span text:style-name="Emphasis">"El peso falso es abominación a Jehová, mas la pesa cabal le agrada".</text:span></text:p>
      <text:p text:style-name="Text_20_body"><text:span text:style-name="Strong_20_Emphasis">Oseas 12:7</text:span></text:p>
      <text:p text:style-name="Quotations"><text:span text:style-name="Emphasis">"El mercader que tiene en su mano peso falso, amador de opresión".</text:span></text:p>
      <text:list text:style-name="L26">
        <text:list-item>
          <text:p text:style-name="P43"><text:span text:style-name="Strong_20_Emphasis">El Peso Falso:</text:span> Representa las mentiras, los engaños y las falsas doctrinas. Los pastores falsos (mercaderes espirituales) usan "pesos falsos" para engañar al pueblo. </text:p>
        </text:list-item>
        <text:list-item>
          <text:p text:style-name="P42"><text:span text:style-name="Strong_20_Emphasis">La Advertencia de Apocalipsis 22:18-19:</text:span> Si <text:span text:style-name="Strong_20_Emphasis">añadimos</text:span> (ponemos nuestros propios pensamientos/peso falso) o <text:span text:style-name="Strong_20_Emphasis">quitamos</text:span> (ignoramos la profecía) de la Palabra de Dios, seremos hallados faltos en la balanza divina y recibiremos condenación. </text:p>
        </text:list-item>
      </text:list>
      <text:p text:style-name="Horizontal_20_Line"/>
      <text:h text:style-name="Heading_20_2" text:outline-level="2"><text:soft-page-break/>📏 4. La Vara en Figurativo: Guía, Apoyo y Autoridad</text:h>
      <text:h text:style-name="Heading_20_3" text:outline-level="3">🕊️ Midiendo el Templo</text:h>
      <text:p text:style-name="Text_20_body"><text:span text:style-name="Strong_20_Emphasis">Apocalipsis 11:1-2</text:span></text:p>
      <text:p text:style-name="Quotations"><text:span text:style-name="Emphasis">"Me fue dada una caña semejante a una vara de medir, y se me dijo: Levántate y mide el templo de Dios, y el altar, y a los que adoran en él".</text:span></text:p>
      <text:list text:style-name="L27">
        <text:list-item>
          <text:p text:style-name="P45"><text:span text:style-name="Strong_20_Emphasis">Característica física:</text:span> Una vara (o bastón) sirve para <text:span text:style-name="Strong_20_Emphasis">apoyarse</text:span>, <text:span text:style-name="Strong_20_Emphasis">ayudar a caminar</text:span> y <text:span text:style-name="Strong_20_Emphasis">medir</text:span>. </text:p>
        </text:list-item>
        <text:list-item>
          <text:p text:style-name="P44"><text:span text:style-name="Strong_20_Emphasis">Significado espiritual:</text:span> La vara representa <text:span text:style-name="Strong_20_Emphasis">la Palabra de Dios</text:span> y <text:span text:style-name="Strong_20_Emphasis">la persona (pastor) que la porta</text:span> y nos guía por el camino correcto. </text:p>
        </text:list-item>
      </text:list>
      <text:h text:style-name="Heading_20_3" text:outline-level="3">✅ La Vara de Dios: Palabra y Juicio</text:h>
      <text:p text:style-name="Text_20_body"><text:span text:style-name="Strong_20_Emphasis">Isaías 11:4</text:span></text:p>
      <text:p text:style-name="Quotations"><text:span text:style-name="Emphasis">"...herirá a la tierra con la vara de su boca, y con el espíritu de sus labios matará al impío".</text:span></text:p>
      <text:list text:style-name="L28">
        <text:list-item>
          <text:p text:style-name="P46">La vara de su boca = Las palabras que salen de ella. La Palabra juzga y guía. </text:p>
        </text:list-item>
      </text:list>
      <text:p text:style-name="Text_20_body"><text:span text:style-name="Strong_20_Emphasis">Jeremías 23:29</text:span></text:p>
      <text:p text:style-name="Quotations"><text:span text:style-name="Emphasis">"¿No es mi palabra como fuego, dice Jehová, y como martillo que quebranta la piedra?"</text:span></text:p>
      <text:list text:style-name="L29">
        <text:list-item>
          <text:p text:style-name="P47">La Palabra es como un martillo/vara que quebranta nuestro corazón duro para corregirnos. </text:p>
        </text:list-item>
      </text:list>
      <text:p text:style-name="Text_20_body"><text:span text:style-name="Strong_20_Emphasis">Salmos 23:4</text:span></text:p>
      <text:p text:style-name="Quotations"><text:span text:style-name="Emphasis">"Aunque ande en valle de sombra de muerte, no temeré mal alguno, porque tú estarás conmigo; tu vara y tu cayado me infundirán aliento".</text:span></text:p>
      <text:list text:style-name="L30">
        <text:list-item>
          <text:p text:style-name="P48">La vara de Dios no es para destruirnos, sino para <text:span text:style-name="Strong_20_Emphasis">infundirnos aliento</text:span>, guiarnos y protegernos en la oscuridad. Como la Palabra es luz (Juan 1:1-4), no debemos temer. </text:p>
        </text:list-item>
      </text:list>
      <text:h text:style-name="Heading_20_3" text:outline-level="3">❌ La Vara de Satanás: Fragilidad</text:h>
      <text:p text:style-name="Text_20_body"><text:span text:style-name="Strong_20_Emphasis">Isaías 36:6</text:span></text:p>
      <text:list text:style-name="L31">
        <text:list-item>
          <text:p text:style-name="P50">Se refiere al Faraón (rey de Egipto) como un <text:span text:style-name="Strong_20_Emphasis">"báculo de caña frágil"</text:span>. </text:p>
        </text:list-item>
        <text:list-item>
          <text:p text:style-name="P49">Si te apoyas en las enseñanzas de Satanás o en el hombre, te desplomará. No es una vara en la que el pueblo de Dios deba apoyarse. </text:p>
        </text:list-item>
      </text:list>
      <text:h text:style-name="Heading_20_3" text:outline-level="3">👑 La Vara de Hierro (Cetro de Autoridad)</text:h>
      <text:p text:style-name="Text_20_body">En la antigüedad, los reyes no usaban un bastón de madera, sino un <text:span text:style-name="Strong_20_Emphasis">cetro de hierro</text:span>, que simbolizaba <text:span text:style-name="Strong_20_Emphasis">autoridad para gobernar y juzgar</text:span>.</text:p>
      <text:p text:style-name="Text_20_body"><text:span text:style-name="Strong_20_Emphasis">Salmos 2:7-9 (La Promesa)</text:span></text:p>
      <text:p text:style-name="Quotations"><text:span text:style-name="Emphasis">"Mi hijo eres tú... Pídeme, y te daré por herencia las naciones... Los quebrantarás con vara de hierro; como vasija de alfarero los desmenuzarás".</text:span></text:p>
      <text:p text:style-name="Text_20_body"><text:soft-page-break/><text:span text:style-name="Strong_20_Emphasis">Juan 17:2, 8 (El Cumplimiento en la 1ª Venida)</text:span></text:p>
      <text:list text:style-name="L32">
        <text:list-item>
          <text:p text:style-name="P51">Dios le dio a Jesús potestad sobre toda carne. ¿Cómo? Dándole <text:span text:style-name="Strong_20_Emphasis">Sus Palabras</text:span>. La autoridad de Jesús provenía de la Palabra de Dios que Él portaba. </text:p>
        </text:list-item>
      </text:list>
      <text:p text:style-name="Text_20_body"><text:span text:style-name="Strong_20_Emphasis">Apocalipsis 2:26-27 (La Promesa para la 2ª Venida)</text:span></text:p>
      <text:p text:style-name="Quotations"><text:span text:style-name="Emphasis">"Al que venciere y guardare mis obras hasta el final, yo le daré autoridad sobre las naciones, y las regirá con vara de hierro... como yo también la he recibido de mi Padre".</text:span></text:p>
      <text:list text:style-name="L33">
        <text:list-item>
          <text:p text:style-name="P53"><text:span text:style-name="Strong_20_Emphasis">El Gran Secreto:</text:span> En la Primera Venida, Dios le dio la vara de hierro (autoridad) a Jesús. Pero en la Segunda Venida, <text:span text:style-name="Strong_20_Emphasis">Jesús le promete dar la vara de hierro al VENCEDOR</text:span>. </text:p>
        </text:list-item>
        <text:list-item>
          <text:p text:style-name="P52">El vencedor recibirá la Palabra revelada (la vara de hierro) para juzgar y pastorear a las naciones. </text:p>
        </text:list-item>
      </text:list>
      <text:p text:style-name="Horizontal_20_Line"/>
      <text:h text:style-name="Heading_20_2" text:outline-level="2">🛡️ 5. La Realidad: Escogiendo nuestro Lado</text:h>
      <text:h text:style-name="Heading_20_3" text:outline-level="3">🌍 La Realidad en la Primera Venida</text:h>
      <text:list text:style-name="L34">
        <text:list-item>
          <text:p text:style-name="P55"><text:span text:style-name="Strong_20_Emphasis">Lado de Dios (Vara/Balanza de Dios):</text:span> Jesús y los 12 discípulos. Tenían la Palabra de la verdad (el cumplimiento del AT). Ante los ojos humanos, eran pocos, pobres y sin templo. </text:p>
        </text:list-item>
        <text:list-item>
          <text:p text:style-name="P54"><text:span text:style-name="Strong_20_Emphasis">Lado de Satanás (Peso Falso):</text:span> Los escribas, fariseos y sus seguidores. Tenían las sinagogas hermosas, el dinero, el estatus y el reconocimiento mundial. Pero su balanza era de "peso falso" (tradiciones de hombres). </text:p>
        </text:list-item>
      </text:list>
      <text:h text:style-name="Heading_20_3" text:outline-level="3">🔍 La Realidad en la Segunda Venida (Hoy)</text:h>
      <text:p text:style-name="Text_20_body">La historia se repite. Hoy nos encontramos con pastores que parecen "bonitos" por fuera (grandes iglesias, fama, títulos), pero que tienen sedimentos de Moab o peso falso. </text:p>
      <text:list text:style-name="L35">
        <text:list-item>
          <text:p text:style-name="P57"><text:span text:style-name="Strong_20_Emphasis">¿Cómo no ser engañados?</text:span> No nos guiamos por lo visual. Nos guiamos por el <text:span text:style-name="Strong_20_Emphasis">Estándar (La Biblia)</text:span>. </text:p>
        </text:list-item>
        <text:list-item>
          <text:p text:style-name="P56">Debemos examinar nuestra "copa" (corazón), vaciarla de mentiras, y buscar al pastor/pueblo que tenga la <text:span text:style-name="Strong_20_Emphasis">Vara de Hierro</text:span> (la Palabra revelada del cumplimiento de Apocalipsis). </text:p>
        </text:list-item>
      </text:list>
      <text:p text:style-name="Horizontal_20_Line"/>
      <text:h text:style-name="Heading_20_2" text:outline-level="2">🎯 6. Conclusiones Finales de la Lección</text:h>
      <text:list text:style-name="L36">
        <text:list-item>
          <text:p text:style-name="P59"><text:span text:style-name="Strong_20_Emphasis">Debemos contener la Palabra de Dios:</text:span> Después de examinar nuestro corazón, lavarlo y vaciarlo de sedimentos, convirtámonos en un vaso de Dios. </text:p>
        </text:list-item>
        <text:list-item>
          <text:p text:style-name="P59"><text:span text:style-name="Strong_20_Emphasis">El poder no reside en el bastón físico, sino en Dios:</text:span> La vida eterna y la autoridad residen en la Palabra del principio que creó el cielo y la tierra. </text:p>
        </text:list-item>
        <text:list-item>
          <text:p text:style-name="P59"><text:span text:style-name="Strong_20_Emphasis">La Palabra mide el templo del corazón:</text:span> Puesto que la Palabra es el estándar de Dios, confiemos en ella para nuestro camino al cielo. </text:p>
        </text:list-item>
        <text:list-item>
          <text:p text:style-name="P58"><text:span text:style-name="Strong_20_Emphasis">El Llamado Final:</text:span> <text:span text:style-name="Emphasis">"Encontremos hoy al vencedor con la vara de hierro y alcancemos la salvación"</text:span>. </text:p>
        </text:list-item>
      </text:list>
      <text:p text:style-name="Text_20_body"><text:soft-page-break/><text:span text:style-name="Strong_20_Emphasis">📢 Anuncio para la Próxima Lección:</text:span> La próxima vez veremos tres elementos nuevos en figurativo: <text:span text:style-name="Strong_20_Emphasis">Fuego, Incensario y Olla</text:span>. </text:p>
      <text:list text:style-name="L37">
        <text:list-item>
          <text:p text:style-name="P60"><text:span text:style-name="Emphasis">Pista para reflexionar:</text:span> ¿Por qué se usaban incensarios en el templo? ¿Cuándo y antes de qué evento aparece el fuego en Apocalipsis? ¡Prepárense! </text:p>
        </text:list-item>
      </text:list>
      <text:p text:style-name="Horizontal_20_Line"/>
      <text:h text:style-name="Heading_20_2" text:outline-level="2">🔄 7. Repaso Final Interactivo y Oración de Cierre</text:h>
      <text:p text:style-name="Text_20_body"><text:span text:style-name="Emphasis">(A cargo del Evangelista Christian Howard)</text:span></text:p>
      <text:p text:style-name="Text_20_body"><text:span text:style-name="Strong_20_Emphasis">Resumen Interactivo con los Estudiantes:</text:span></text:p>
      <text:list text:style-name="L38">
        <text:list-item>
          <text:p text:style-name="P62"><text:span text:style-name="Strong_20_Emphasis">¿Qué mide la balanza espiritual?</text:span> Mide los corazones y las acciones (porque lo que tienes adentro, sale afuera). </text:p>
        </text:list-item>
        <text:list-item>
          <text:p text:style-name="P62"><text:span text:style-name="Strong_20_Emphasis">¿Cuál es el estándar (la ley) de Dios para juzgarnos?</text:span> Su Palabra (La Biblia). </text:p>
        </text:list-item>
        <text:list-item>
          <text:p text:style-name="P62"><text:span text:style-name="Strong_20_Emphasis">¿Cuál es el estándar de la balanza de Satanás?</text:span> La mentira (el peso falso que dobla o cambia la Palabra de Dios). </text:p>
        </text:list-item>
        <text:list-item>
          <text:p text:style-name="P62"><text:span text:style-name="Strong_20_Emphasis">¿Qué hace una vara física y qué es la vara espiritual?</text:span> Físicamente apoya y ayuda. Espiritualmente es la Palabra de Dios que nos guía. </text:p>
        </text:list-item>
        <text:list-item>
          <text:p text:style-name="P61"><text:span text:style-name="Strong_20_Emphasis">¿Quién tiene la Vara de Hierro (Cetro de Autoridad)?</text:span> En la 1ª Venida fue Jesús. En la 2ª Venida, Jesús se la promete al <text:span text:style-name="Strong_20_Emphasis">Vencedor</text:span>. </text:p>
        </text:list-item>
      </text:list>
      <text:p text:style-name="Text_20_body"><text:span text:style-name="Strong_20_Emphasis">📢 Anuncios y Oración por Venezuela:</text:span></text:p>
      <text:list text:style-name="L39">
        <text:list-item>
          <text:p text:style-name="P64"><text:span text:style-name="Strong_20_Emphasis">Mañana habrá otro quiz</text:span> para revisar si estamos reteniendo la palabra y no dejamos que el ave la robe. </text:p>
        </text:list-item>
        <text:list-item>
          <text:p text:style-name="P63"><text:span text:style-name="Strong_20_Emphasis">Oración especial:</text:span> Oremos por nuestros hermanos en Venezuela por el reciente terremoto. Que Dios los proteja y mantenga su hambre espiritual a pesar de los obstáculos. </text:p>
        </text:list-item>
      </text:list>
      <text:p text:style-name="Text_20_body"><text:span text:style-name="Strong_20_Emphasis">Oración de Cierre (El Padre Nuestro):</text:span></text:p>
      <text:p text:style-name="Quotations"><text:span text:style-name="Emphasis">"Padre nuestro que estás en los cielos, santificado sea tu nombre. Venga a nosotros tu reino. Hágase tu voluntad en la tierra como en el cielo. Danos hoy nuestro pan de cada día. Perdona nuestras deudas, como también nosotros perdonamos a nuestros deudores. No nos dejes caer en la tentación, mas líbranos de todo mal. Porque tuyo es el poder y la gloria por los siglos de los siglos. Amén."</text:span></text:p>
      <text:p text:style-name="Text_20_body">¡Gracias a todos! Cuídense, sigan estudiando y reflexionando sobre lo que hay en su corazón. ¡Nos vemos la próxima semana para estudiar el Fuego!</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6-25T20:46:06.379402282</dc:date>
    <meta:editing-duration>PT1H34M45S</meta:editing-duration>
    <meta:editing-cycles>5</meta:editing-cycles>
    <meta:generator>LibreOffice/24.2.7.2$Linux_X86_64 LibreOffice_project/420$Build-2</meta:generator>
    <meta:document-statistic meta:table-count="0" meta:image-count="0" meta:object-count="0" meta:page-count="6" meta:paragraph-count="118" meta:word-count="2130" meta:character-count="11965" meta:non-whitespace-character-count="9954"/>
  </office:meta>
</office:document-meta>
</file>