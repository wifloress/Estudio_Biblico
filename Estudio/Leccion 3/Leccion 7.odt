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automatic-styles>
    <style:style style:name="P1" style:family="paragraph" style:parent-style-name="Heading_20_1">
      <style:text-properties style:font-name="Padauk Book"/>
    </style:style>
    <style:style style:name="P2" style:family="paragraph" style:parent-style-name="Heading_20_2">
      <style:text-properties style:font-name="Padauk Book"/>
    </style:style>
    <style:style style:name="P3" style:family="paragraph" style:parent-style-name="Heading_20_3">
      <style:text-properties style:font-name="Padauk Book"/>
    </style:style>
    <style:style style:name="P4" style:family="paragraph" style:parent-style-name="Horizontal_20_Line">
      <style:text-properties style:font-name="Padauk Book"/>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12"/>
    <style:style style:name="P20" style:family="paragraph" style:parent-style-name="Text_20_body" style:list-style-name="L13">
      <style:paragraph-properties fo:margin-top="0cm" fo:margin-bottom="0cm" style:contextual-spacing="false"/>
    </style:style>
    <style:style style:name="P21" style:family="paragraph" style:parent-style-name="Text_20_body" style:list-style-name="L14"/>
    <style:style style:name="P22" style:family="paragraph" style:parent-style-name="Text_20_body" style:list-style-name="L15">
      <style:paragraph-properties fo:margin-top="0cm" fo:margin-bottom="0cm" style:contextual-spacing="false"/>
    </style:style>
    <style:style style:name="P23" style:family="paragraph" style:parent-style-name="Text_20_body" style:list-style-name="L16"/>
    <style:style style:name="P24" style:family="paragraph" style:parent-style-name="Text_20_body" style:list-style-name="L16">
      <style:paragraph-properties fo:margin-top="0cm" fo:margin-bottom="0cm" style:contextual-spacing="false"/>
    </style:style>
    <style:style style:name="P25" style:family="paragraph" style:parent-style-name="Text_20_body" style:list-style-name="L17"/>
    <style:style style:name="P26" style:family="paragraph" style:parent-style-name="Text_20_body" style:list-style-name="L17">
      <style:paragraph-properties fo:margin-top="0cm" fo:margin-bottom="0cm" style:contextual-spacing="false"/>
    </style:style>
    <style:style style:name="P27" style:family="paragraph" style:parent-style-name="Text_20_body" style:list-style-name="L18"/>
    <style:style style:name="P28" style:family="paragraph" style:parent-style-name="Text_20_body" style:list-style-name="L18">
      <style:paragraph-properties fo:margin-top="0cm" fo:margin-bottom="0cm" style:contextual-spacing="false"/>
    </style:style>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0">
      <style:paragraph-properties fo:margin-top="0cm" fo:margin-bottom="0cm" style:contextual-spacing="false"/>
    </style:style>
    <style:style style:name="P32" style:family="paragraph" style:parent-style-name="Text_20_body" style:list-style-name="L21"/>
    <style:style style:name="P33" style:family="paragraph" style:parent-style-name="Text_20_body" style:list-style-name="L21">
      <style:paragraph-properties fo:margin-top="0cm" fo:margin-bottom="0cm" style:contextual-spacing="false"/>
    </style:style>
    <style:style style:name="P34" style:family="paragraph" style:parent-style-name="Text_20_body" style:list-style-name="L3">
      <style:paragraph-properties fo:margin-top="0cm" fo:margin-bottom="0cm" style:contextual-spacing="false"/>
      <style:text-properties style:font-name="Padauk Book"/>
    </style:style>
    <style:style style:name="P35" style:family="paragraph" style:parent-style-name="Text_20_body" style:list-style-name="L5">
      <style:text-properties style:font-name="Padauk Book"/>
    </style:style>
    <style:style style:name="P36" style:family="paragraph" style:parent-style-name="Text_20_body" style:list-style-name="L10">
      <style:text-properties style:font-name="Padauk Book"/>
    </style:style>
    <style:style style:name="P37" style:family="paragraph" style:parent-style-name="Text_20_body" style:list-style-name="L11">
      <style:text-properties style:font-name="Padauk Book"/>
    </style:style>
    <style:style style:name="P38" style:family="paragraph" style:parent-style-name="Text_20_body" style:list-style-name="L13">
      <style:text-properties style:font-name="Padauk Book"/>
    </style:style>
    <style:style style:name="P39" style:family="paragraph" style:parent-style-name="Text_20_body" style:list-style-name="L15">
      <style:text-properties style:font-name="Padauk Book"/>
    </style:style>
    <style:style style:name="P40" style:family="paragraph" style:parent-style-name="Text_20_body">
      <style:text-properties style:font-name="Padauk Book"/>
    </style:style>
    <style:style style:name="T1" style:family="text">
      <style:text-properties style:text-underline-style="none"/>
    </style:style>
    <style:style style:name="T2" style:family="text">
      <style:text-properties style:font-name="Padauk Book"/>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CUADERNO DE ESTUDIO: LECCIÓN 6 (PARTE 2)</text:h>
      <text:h text:style-name="P2" text:outline-level="2">Copa, Balanza y Vara en Lenguaje Figurativo<text:span text:style-name="T1"/></text:h>
      <text:p text:style-name="P4"/>
      <text:h text:style-name="P2" text:outline-level="2">🔄 1. Repaso y Mini-Quiz de Retención</text:h>
      <text:p text:style-name="Text_20_body"><text:span text:style-name="Emphasis"><text:span text:style-name="T2">(A cargo del Evangelista Christian Howard)</text:span></text:span></text:p>
      <text:p text:style-name="Text_20_body"><text:span text:style-name="T2">Antes de continuar con la nueva temática, realizamos un repaso de la lección anterior (Levadura y Copa) y un </text:span><text:span text:style-name="Strong_20_Emphasis"><text:span text:style-name="T2">mini-quiz de Verdadero/Falso</text:span></text:span><text:span text:style-name="T2"> para evaluar nuestra retención de las lecciones previas ("Los dos dioses" y "Entendimiento básico de la Biblia"):</text:span></text:p>
      <text:h text:style-name="P3" text:outline-level="3">📝 Preguntas de Reflexión y Respuestas:</text:h>
      <text:list text:style-name="L1">
        <text:list-item>
          <text:p text:style-name="P6"><text:span text:style-name="Strong_20_Emphasis"><text:span text:style-name="T2">¿Qué estoy permitiendo que llene mi corazón?</text:span></text:span><text:span text:style-name="T2"> </text:span><text:span text:style-name="Emphasis"><text:span text:style-name="T2">(El resultado de no mantener el pacto es condenación).</text:span></text:span><text:span text:style-name="T2"> </text:span></text:p>
        </text:list-item>
        <text:list-item>
          <text:p text:style-name="P6"><text:span text:style-name="Strong_20_Emphasis"><text:span text:style-name="T2">¿Por qué la limpieza interior es importante?</text:span></text:span><text:span text:style-name="T2"> Porque a Dios le interesa lo que hay en nuestro corazón, no solo las apariencias externas. </text:span></text:p>
        </text:list-item>
        <text:list-item>
          <text:p text:style-name="P6"><text:span text:style-name="Strong_20_Emphasis"><text:span text:style-name="T2">¿Qué peligro muestra el ejemplo de Moab?</text:span></text:span><text:span text:style-name="T2"> Pensar que estamos bien mientras conservamos impurezas y "sedimentos" (pensamientos contrarios a la verdad) sin darnos cuenta. </text:span></text:p>
        </text:list-item>
        <text:list-item>
          <text:p text:style-name="P5"><text:span text:style-name="Strong_20_Emphasis"><text:span text:style-name="T2">Reflexión personal:</text:span></text:span><text:span text:style-name="T2"> </text:span><text:span text:style-name="Emphasis"><text:span text:style-name="T2">¿Hay algo que has permitido permanecer en tu corazón por mucho tiempo sin cambiarlo?</text:span></text:span><text:span text:style-name="T2"> Debemos chequear si lo que creemos entra en conflicto con la Palabra de Dios. </text:span></text:p>
        </text:list-item>
      </text:list>
      <text:h text:style-name="P3" text:outline-level="3">✅ Mini-Quiz (Verdadero o Falso):</text:h>
      <text:list text:style-name="L2">
        <text:list-item>
          <text:p text:style-name="P8"><text:span text:style-name="Strong_20_Emphasis"><text:span text:style-name="T2">Dios es creador, único y es físico.</text:span></text:span><text:span text:style-name="T2"> ➡️ </text:span><text:span text:style-name="Strong_20_Emphasis"><text:span text:style-name="T2">FALSO.</text:span></text:span><text:span text:style-name="T2"> Dios es espíritu, no físico. </text:span></text:p>
        </text:list-item>
        <text:list-item>
          <text:p text:style-name="P8"><text:span text:style-name="Strong_20_Emphasis"><text:span text:style-name="T2">Satanás siempre fue malo y se opuso a Dios desde el principio.</text:span></text:span><text:span text:style-name="T2"> ➡️ </text:span><text:span text:style-name="Strong_20_Emphasis"><text:span text:style-name="T2">FALSO.</text:span></text:span><text:span text:style-name="T2"> Fue creado perfecto (arcángel resplandeciente), pero su orgullo lo cambió. </text:span></text:p>
        </text:list-item>
        <text:list-item>
          <text:p text:style-name="P8"><text:span text:style-name="Strong_20_Emphasis"><text:span text:style-name="T2">Donde obra Dios, no solo aparecen las promesas, sino también el cumplimiento.</text:span></text:span><text:span text:style-name="T2"> ➡️ </text:span><text:span text:style-name="Strong_20_Emphasis"><text:span text:style-name="T2">VERDADERO.</text:span></text:span><text:span text:style-name="T2"> Dios es el Alfa y la Omega (Promesa y Cumplimiento). </text:span></text:p>
        </text:list-item>
        <text:list-item>
          <text:p text:style-name="P8"><text:soft-page-break/><text:span text:style-name="Strong_20_Emphasis"><text:span text:style-name="T2">La Biblia es un libro de pactos entre Dios y </text:span></text:span><text:span text:style-name="Strong_20_Emphasis"><text:span text:style-name="Emphasis"><text:span text:style-name="T2">todas</text:span></text:span></text:span><text:span text:style-name="Strong_20_Emphasis"><text:span text:style-name="T2"> las personas del mundo.</text:span></text:span><text:span text:style-name="T2"> ➡️ </text:span><text:span text:style-name="Strong_20_Emphasis"><text:span text:style-name="T2">FALSO.</text:span></text:span><text:span text:style-name="T2"> Es un libro de pactos entre Dios y su </text:span><text:span text:style-name="Emphasis"><text:span text:style-name="T2">pueblo escogido</text:span></text:span><text:span text:style-name="T2"> (los que escuchan y reciben la semilla). </text:span></text:p>
        </text:list-item>
        <text:list-item>
          <text:p text:style-name="P7"><text:span text:style-name="Strong_20_Emphasis"><text:span text:style-name="T2">El resultado de no mantener el nuevo pacto en Apocalipsis es condenación e infierno.</text:span></text:span><text:span text:style-name="T2"> ➡️ </text:span><text:span text:style-name="Strong_20_Emphasis"><text:span text:style-name="T2">VERDADERO.</text:span></text:span><text:span text:style-name="T2"> El pacto requiere nuestro esfuerzo y entendimiento; si no lo guardamos, hay consecuencias eternas. </text:span></text:p>
        </text:list-item>
      </text:list>
      <text:p text:style-name="Text_20_body"><text:span text:style-name="Strong_20_Emphasis"><text:span text:style-name="T2">Oración de apertura:</text:span></text:span></text:p>
      <text:p text:style-name="Quotations"><text:span text:style-name="Emphasis"><text:span text:style-name="T2">"Santísimo Padre Dios, gracias por traernos aquí a escuchar tu palabra. Cuanto más entendemos, más nos acercamos a comprender tu voluntad y tu obra. Oramos por los estudiantes que ponen tanto esfuerzo, y también por los que no han podido venir, especialmente por nuestros hermanos en Venezuela que acaban de sufrir un gran temblor; por favor, cuídalos y dales fe para volver a escuchar tu palabra que da vida. Te oramos en el nombre de Jesucristo. Amén."</text:span></text:span></text:p>
      <text:p text:style-name="P4"/>
      <text:h text:style-name="P2" text:outline-level="2">⚖️ 2. Introducción a la Balanza y la Vara</text:h>
      <text:p text:style-name="Text_20_body"><text:span text:style-name="Emphasis"><text:span text:style-name="T2">(A cargo del Instructor Sibiani)</text:span></text:span></text:p>
      <text:h text:style-name="P3" text:outline-level="3">📌 La Importancia de Entender el Lenguaje Figurativo</text:h>
      <text:p text:style-name="Text_20_body"><text:span text:style-name="T2">No estudiamos estos elementos (copa, balanza, vara) solo por curiosidad histórica. Los vemos porque </text:span><text:span text:style-name="Strong_20_Emphasis"><text:span text:style-name="T2">aparecen en los tiempos de la Segunda Venida (Apocalipsis)</text:span></text:span><text:span text:style-name="T2">. </text:span></text:p>
      <text:list text:style-name="L3">
        <text:list-item>
          <text:p text:style-name="P34">Si Dios quiere utilizar una vara para juzgar o una balanza para medir, ¿cómo sabré yo qué es eso si no lo he estudiado? </text:p>
        </text:list-item>
        <text:list-item>
          <text:p text:style-name="P34">Si no entiendo qué es una balanza, ¿cómo podré ser juzgado correctamente o entender el juicio de Dios? </text:p>
        </text:list-item>
        <text:list-item>
          <text:p text:style-name="P9"><text:span text:style-name="Strong_20_Emphasis"><text:span text:style-name="T2">El objetivo:</text:span></text:span><text:span text:style-name="T2"> Ver cómo esto se aplica a mí hoy en 2026 y cómo identificar la obra de Dios y de Satanás en estos tiempos. </text:span></text:p>
        </text:list-item>
      </text:list>
      <text:p text:style-name="P4"/>
      <text:h text:style-name="P2" text:outline-level="2">⚖️ 3. La Balanza en Figurativo: El Juicio de Dios</text:h>
      <text:h text:style-name="P3" text:outline-level="3">🐎 La Profecía del Caballo Negro</text:h>
      <text:p text:style-name="Text_20_body"><text:span text:style-name="Strong_20_Emphasis"><text:span text:style-name="T2">Apocalipsis 6:5-6</text:span></text:span></text:p>
      <text:p text:style-name="Quotations"><text:soft-page-break/><text:span text:style-name="Emphasis"><text:span text:style-name="T2">"Cuando abrió el tercer sello... miré, y he aquí un caballo negro; y el que lo montaba tenía una balanza en la mano. Y oí una voz... que decía: Dos libras de trigo por un denario... pero no dañes el aceite ni el vino".</text:span></text:span></text:p>
      <text:list text:style-name="L4">
        <text:list-item>
          <text:p text:style-name="P11"><text:span text:style-name="Strong_20_Emphasis"><text:span text:style-name="T2">No es literal:</text:span></text:span><text:span text:style-name="T2"> No se trata de una balanza física de mercado ni de un caballo de carne y hueso. Es una parábola espiritual sobre el juicio en los tiempos del fin. </text:span></text:p>
        </text:list-item>
        <text:list-item>
          <text:p text:style-name="P11"><text:span text:style-name="Strong_20_Emphasis"><text:span text:style-name="T2">Característica física:</text:span></text:span><text:span text:style-name="T2"> La balanza sirve para </text:span><text:span text:style-name="Strong_20_Emphasis"><text:span text:style-name="T2">pesar</text:span></text:span><text:span text:style-name="T2"> y </text:span><text:span text:style-name="Strong_20_Emphasis"><text:span text:style-name="T2">comparar</text:span></text:span><text:span text:style-name="T2"> un peso con otro. </text:span></text:p>
        </text:list-item>
        <text:list-item>
          <text:p text:style-name="P10"><text:span text:style-name="Strong_20_Emphasis"><text:span text:style-name="T2">Significado espiritual:</text:span></text:span><text:span text:style-name="T2"> Pesar = </text:span><text:span text:style-name="Strong_20_Emphasis"><text:span text:style-name="T2">Juzgar</text:span></text:span><text:span text:style-name="T2">. Dios quiere "pesarnos" para ver qué tan pesados o ligeros somos espiritualmente. </text:span></text:p>
        </text:list-item>
      </text:list>
      <text:h text:style-name="P3" text:outline-level="3">❤️ ¿Qué pesa Dios en la Balanza?</text:h>
      <text:p text:style-name="Text_20_body"><text:span text:style-name="Strong_20_Emphasis"><text:span text:style-name="T2">Proverbios 24:12</text:span></text:span></text:p>
      <text:p text:style-name="Quotations"><text:span text:style-name="Emphasis"><text:span text:style-name="T2">"¿Acaso no lo entenderá el que pesa los corazones? El que mira por tu alma, él lo conocerá, y dará al hombre según sus obras".</text:span></text:span></text:p>
      <text:p text:style-name="Text_20_body"><text:span text:style-name="Strong_20_Emphasis"><text:span text:style-name="T2">1 Samuel 2:3</text:span></text:span></text:p>
      <text:p text:style-name="Quotations"><text:span text:style-name="Emphasis"><text:span text:style-name="T2">"...Jehová es el Dios de todo saber, y a él toca el pesar las acciones".</text:span></text:span></text:p>
      <text:list text:style-name="L5">
        <text:list-item>
          <text:p text:style-name="P12"><text:span text:style-name="Strong_20_Emphasis"><text:span text:style-name="T2">El Corazón y las Acciones:</text:span></text:span><text:span text:style-name="T2"> Dios no pesa kilogramos; pesa lo que hay en nuestro corazón (nuestros deseos) y las acciones que salen de él. </text:span></text:p>
        </text:list-item>
        <text:list-item>
          <text:p text:style-name="P12"><text:span text:style-name="Strong_20_Emphasis"><text:span text:style-name="T2">El Estándar (La Ley):</text:span></text:span><text:span text:style-name="T2"> En el mundo físico, un país juzga a sus ciudadanos con su constitución o leyes. En el mundo espiritual, </text:span><text:span text:style-name="Strong_20_Emphasis"><text:span text:style-name="T2">¿cuál es la ley de Dios para pesarnos? La Palabra de Dios.</text:span></text:span><text:span text:style-name="T2"> </text:span></text:p>
        </text:list-item>
        <text:list-item>
          <text:p text:style-name="P35">Dios pesa nuestra fe, nuestro corazón y nuestras obras usando Su Palabra como el estándar exacto. </text:p>
        </text:list-item>
      </text:list>
      <text:h text:style-name="P3" text:outline-level="3">📜 Ejemplo Histórico: El Juicio a Babilonia</text:h>
      <text:p text:style-name="Text_20_body"><text:span text:style-name="Strong_20_Emphasis"><text:span text:style-name="T2">Daniel 5:25-28 (MENE, MENE, TEKEL, UPHARSIN)</text:span></text:span><text:span text:style-name="T2"> Durante un festín profano del rey Belsasar, apareció una mano escribiendo en la pared. Daniel interpretó:</text:span></text:p>
      <text:list text:style-name="L6">
        <text:list-item>
          <text:p text:style-name="P13"><text:span text:style-name="Strong_20_Emphasis"><text:span text:style-name="T2">MENE:</text:span></text:span><text:span text:style-name="T2"> Contó Dios tu reino y le ha puesto fin.</text:span></text:p>
        </text:list-item>
        <text:list-item>
          <text:p text:style-name="P13"><text:span text:style-name="Strong_20_Emphasis"><text:span text:style-name="T2">TEQUEL:</text:span></text:span><text:span text:style-name="T2"> </text:span><text:span text:style-name="Strong_20_Emphasis"><text:span text:style-name="T2">Pesado has sido en balanza y fuiste hallado falto.</text:span></text:span></text:p>
        </text:list-item>
        <text:list-item>
          <text:p text:style-name="P13"><text:span text:style-name="Strong_20_Emphasis"><text:span text:style-name="T2">PERES:</text:span></text:span><text:span text:style-name="T2"> Tu reino fue roto y dado a los medos y persas.</text:span></text:p>
        </text:list-item>
        <text:list-item>
          <text:p text:style-name="P13"><text:span text:style-name="Strong_20_Emphasis"><text:span text:style-name="T2">La Lección:</text:span></text:span><text:span text:style-name="T2"> Dios tiene su balanza. Babilonia fue "pesada" y hallada "ligera" (falto). En la balanza de Dios, lo que es "pesado" (lleno de Su Palabra) es bueno; lo que está vacío o lleno de impurezas, es hallado falto para el juicio.</text:span></text:p>
        </text:list-item>
      </text:list>
      <text:h text:style-name="P3" text:outline-level="3"><text:soft-page-break/>📖 El Juicio en el Día Postrero</text:h>
      <text:p text:style-name="Text_20_body"><text:span text:style-name="Strong_20_Emphasis"><text:span text:style-name="T2">Juan 12:48</text:span></text:span></text:p>
      <text:p text:style-name="Quotations"><text:span text:style-name="Emphasis"><text:span text:style-name="T2">"El que me rechaza y no recibe mis palabras, tiene quien le juzgue. La palabra que he hablado, ella le juzgará en el día postrero".</text:span></text:span></text:p>
      <text:p text:style-name="Text_20_body"><text:span text:style-name="Strong_20_Emphasis"><text:span text:style-name="T2">Apocalipsis 20:12</text:span></text:span></text:p>
      <text:p text:style-name="Quotations"><text:span text:style-name="Emphasis"><text:span text:style-name="T2">"Y vi a los muertos... de pie ante Dios, y los libros fueron abiertos. Y otro libro fue abierto, el cual es el libro de la vida, y fueron juzgados los muertos por las cosas que estaban escritas en los libros según sus obras".</text:span></text:span></text:p>
      <text:list text:style-name="L7">
        <text:list-item>
          <text:p text:style-name="P14"><text:span text:style-name="Strong_20_Emphasis"><text:span text:style-name="T2">Los Libros Abiertos:</text:span></text:span><text:span text:style-name="T2"> Los 66 libros de la Biblia serán el estándar. No podemos llegar ante el trono de Dios diciendo "no sabía". Necesitamos conocer la ley de Dios, así como un ciudadano necesita conocer las leyes de su país para no ser condenado. </text:span></text:p>
        </text:list-item>
      </text:list>
      <text:h text:style-name="P3" text:outline-level="3">❌ La Balanza de Satanás: Peso Falso</text:h>
      <text:p text:style-name="Text_20_body"><text:span text:style-name="Strong_20_Emphasis"><text:span text:style-name="T2">Proverbios 11:1</text:span></text:span></text:p>
      <text:p text:style-name="Quotations"><text:span text:style-name="Emphasis"><text:span text:style-name="T2">"El peso falso es abominación a Jehová, mas la pesa cabal le agrada".</text:span></text:span></text:p>
      <text:p text:style-name="Text_20_body"><text:span text:style-name="Strong_20_Emphasis"><text:span text:style-name="T2">Oseas 12:7</text:span></text:span></text:p>
      <text:p text:style-name="Quotations"><text:span text:style-name="Emphasis"><text:span text:style-name="T2">"El mercader que tiene en su mano peso falso, amador de opresión".</text:span></text:span></text:p>
      <text:list text:style-name="L8">
        <text:list-item>
          <text:p text:style-name="P16"><text:span text:style-name="Strong_20_Emphasis"><text:span text:style-name="T2">El Peso Falso:</text:span></text:span><text:span text:style-name="T2"> Representa las mentiras, los engaños y las falsas doctrinas. Los pastores falsos (mercaderes espirituales) usan "pesos falsos" para engañar al pueblo. </text:span></text:p>
        </text:list-item>
        <text:list-item>
          <text:p text:style-name="P15"><text:span text:style-name="Strong_20_Emphasis"><text:span text:style-name="T2">La Advertencia de Apocalipsis 22:18-19:</text:span></text:span><text:span text:style-name="T2"> Si </text:span><text:span text:style-name="Strong_20_Emphasis"><text:span text:style-name="T2">añadimos</text:span></text:span><text:span text:style-name="T2"> (ponemos nuestros propios pensamientos/peso falso) o </text:span><text:span text:style-name="Strong_20_Emphasis"><text:span text:style-name="T2">quitamos</text:span></text:span><text:span text:style-name="T2"> (ignoramos la profecía) de la Palabra de Dios, seremos hallados faltos en la balanza divina y recibiremos condenación. </text:span></text:p>
        </text:list-item>
      </text:list>
      <text:p text:style-name="P4"/>
      <text:h text:style-name="P2" text:outline-level="2">📏 4. La Vara en Figurativo: Guía, Apoyo y Autoridad</text:h>
      <text:h text:style-name="P3" text:outline-level="3">🕊️ Midiendo el Templo</text:h>
      <text:p text:style-name="Text_20_body"><text:span text:style-name="Strong_20_Emphasis"><text:span text:style-name="T2">Apocalipsis 11:1-2</text:span></text:span></text:p>
      <text:p text:style-name="Quotations"><text:span text:style-name="Emphasis"><text:span text:style-name="T2">"Me fue dada una caña semejante a una vara de medir, y se me dijo: Levántate y mide el templo de Dios, y el altar, y a los que adoran en él".</text:span></text:span></text:p>
      <text:list text:style-name="L9">
        <text:list-item>
          <text:p text:style-name="P18"><text:soft-page-break/><text:span text:style-name="Strong_20_Emphasis"><text:span text:style-name="T2">Característica física:</text:span></text:span><text:span text:style-name="T2"> Una vara (o bastón) sirve para </text:span><text:span text:style-name="Strong_20_Emphasis"><text:span text:style-name="T2">apoyarse</text:span></text:span><text:span text:style-name="T2">, </text:span><text:span text:style-name="Strong_20_Emphasis"><text:span text:style-name="T2">ayudar a caminar</text:span></text:span><text:span text:style-name="T2"> y </text:span><text:span text:style-name="Strong_20_Emphasis"><text:span text:style-name="T2">medir</text:span></text:span><text:span text:style-name="T2">. </text:span></text:p>
        </text:list-item>
        <text:list-item>
          <text:p text:style-name="P17"><text:span text:style-name="Strong_20_Emphasis"><text:span text:style-name="T2">Significado espiritual:</text:span></text:span><text:span text:style-name="T2"> La vara representa </text:span><text:span text:style-name="Strong_20_Emphasis"><text:span text:style-name="T2">la Palabra de Dios</text:span></text:span><text:span text:style-name="T2"> y </text:span><text:span text:style-name="Strong_20_Emphasis"><text:span text:style-name="T2">la persona (pastor) que la porta</text:span></text:span><text:span text:style-name="T2"> y nos guía por el camino correcto. </text:span></text:p>
        </text:list-item>
      </text:list>
      <text:h text:style-name="P3" text:outline-level="3">✅ La Vara de Dios: Palabra y Juicio</text:h>
      <text:p text:style-name="Text_20_body"><text:span text:style-name="Strong_20_Emphasis"><text:span text:style-name="T2">Isaías 11:4</text:span></text:span></text:p>
      <text:p text:style-name="Quotations"><text:span text:style-name="Emphasis"><text:span text:style-name="T2">"...herirá a la tierra con la vara de su boca, y con el espíritu de sus labios matará al impío".</text:span></text:span></text:p>
      <text:list text:style-name="L10">
        <text:list-item>
          <text:p text:style-name="P36">La vara de su boca = Las palabras que salen de ella. La Palabra juzga y guía. </text:p>
        </text:list-item>
      </text:list>
      <text:p text:style-name="Text_20_body"><text:span text:style-name="Strong_20_Emphasis"><text:span text:style-name="T2">Jeremías 23:29</text:span></text:span></text:p>
      <text:p text:style-name="Quotations"><text:span text:style-name="Emphasis"><text:span text:style-name="T2">"¿No es mi palabra como fuego, dice Jehová, y como martillo que quebranta la piedra?"</text:span></text:span></text:p>
      <text:list text:style-name="L11">
        <text:list-item>
          <text:p text:style-name="P37">La Palabra es como un martillo/vara que quebranta nuestro corazón duro para corregirnos. </text:p>
        </text:list-item>
      </text:list>
      <text:p text:style-name="Text_20_body"><text:span text:style-name="Strong_20_Emphasis"><text:span text:style-name="T2">Salmos 23:4</text:span></text:span></text:p>
      <text:p text:style-name="Quotations"><text:span text:style-name="Emphasis"><text:span text:style-name="T2">"Aunque ande en valle de sombra de muerte, no temeré mal alguno, porque tú estarás conmigo; tu vara y tu cayado me infundirán aliento".</text:span></text:span></text:p>
      <text:list text:style-name="L12">
        <text:list-item>
          <text:p text:style-name="P19"><text:span text:style-name="T2">La vara de Dios no es para destruirnos, sino para </text:span><text:span text:style-name="Strong_20_Emphasis"><text:span text:style-name="T2">infundirnos aliento</text:span></text:span><text:span text:style-name="T2">, guiarnos y protegernos en la oscuridad. Como la Palabra es luz (Juan 1:1-4), no debemos temer. </text:span></text:p>
        </text:list-item>
      </text:list>
      <text:h text:style-name="P3" text:outline-level="3">❌ La Vara de Satanás: Fragilidad</text:h>
      <text:p text:style-name="Text_20_body"><text:span text:style-name="Strong_20_Emphasis"><text:span text:style-name="T2">Isaías 36:6</text:span></text:span></text:p>
      <text:list text:style-name="L13">
        <text:list-item>
          <text:p text:style-name="P20"><text:span text:style-name="T2">Se refiere al Faraón (rey de Egipto) como un </text:span><text:span text:style-name="Strong_20_Emphasis"><text:span text:style-name="T2">"báculo de caña frágil"</text:span></text:span><text:span text:style-name="T2">. </text:span></text:p>
        </text:list-item>
        <text:list-item>
          <text:p text:style-name="P38">Si te apoyas en las enseñanzas de Satanás o en el hombre, te desplomará. No es una vara en la que el pueblo de Dios deba apoyarse. </text:p>
        </text:list-item>
      </text:list>
      <text:h text:style-name="P3" text:outline-level="3">👑 La Vara de Hierro (Cetro de Autoridad)</text:h>
      <text:p text:style-name="Text_20_body"><text:span text:style-name="T2">En la antigüedad, los reyes no usaban un bastón de madera, sino un </text:span><text:span text:style-name="Strong_20_Emphasis"><text:span text:style-name="T2">cetro de hierro</text:span></text:span><text:span text:style-name="T2">, que simbolizaba </text:span><text:span text:style-name="Strong_20_Emphasis"><text:span text:style-name="T2">autoridad para gobernar y juzgar</text:span></text:span><text:span text:style-name="T2">.</text:span></text:p>
      <text:p text:style-name="Text_20_body"><text:span text:style-name="Strong_20_Emphasis"><text:span text:style-name="T2">Salmos 2:7-9 (La Promesa)</text:span></text:span></text:p>
      <text:p text:style-name="Quotations"><text:soft-page-break/><text:span text:style-name="Emphasis"><text:span text:style-name="T2">"Mi hijo eres tú... Pídeme, y te daré por herencia las naciones... Los quebrantarás con vara de hierro; como vasija de alfarero los desmenuzarás".</text:span></text:span></text:p>
      <text:p text:style-name="Text_20_body"><text:span text:style-name="Strong_20_Emphasis"><text:span text:style-name="T2">Juan 17:2, 8 (El Cumplimiento en la 1ª Venida)</text:span></text:span></text:p>
      <text:list text:style-name="L14">
        <text:list-item>
          <text:p text:style-name="P21"><text:span text:style-name="T2">Dios le dio a Jesús potestad sobre toda carne. ¿Cómo? Dándole </text:span><text:span text:style-name="Strong_20_Emphasis"><text:span text:style-name="T2">Sus Palabras</text:span></text:span><text:span text:style-name="T2">. La autoridad de Jesús provenía de la Palabra de Dios que Él portaba. </text:span></text:p>
        </text:list-item>
      </text:list>
      <text:p text:style-name="Text_20_body"><text:span text:style-name="Strong_20_Emphasis"><text:span text:style-name="T2">Apocalipsis 2:26-27 (La Promesa para la 2ª Venida)</text:span></text:span></text:p>
      <text:p text:style-name="Quotations"><text:span text:style-name="Emphasis"><text:span text:style-name="T2">"Al que venciere y guardare mis obras hasta el final, yo le daré autoridad sobre las naciones, y las regirá con vara de hierro... como yo también la he recibido de mi Padre".</text:span></text:span></text:p>
      <text:list text:style-name="L15">
        <text:list-item>
          <text:p text:style-name="P22"><text:span text:style-name="Strong_20_Emphasis"><text:span text:style-name="T2">El Gran Secreto:</text:span></text:span><text:span text:style-name="T2"> En la Primera Venida, Dios le dio la vara de hierro (autoridad) a Jesús. Pero en la Segunda Venida, </text:span><text:span text:style-name="Strong_20_Emphasis"><text:span text:style-name="T2">Jesús le promete dar la vara de hierro al VENCEDOR</text:span></text:span><text:span text:style-name="T2">. </text:span></text:p>
        </text:list-item>
        <text:list-item>
          <text:p text:style-name="P39">El vencedor recibirá la Palabra revelada (la vara de hierro) para juzgar y pastorear a las naciones. </text:p>
        </text:list-item>
      </text:list>
      <text:p text:style-name="P4"/>
      <text:h text:style-name="P2" text:outline-level="2">🛡️ 5. La Realidad: Escogiendo nuestro Lado</text:h>
      <text:h text:style-name="P3" text:outline-level="3">🌍 La Realidad en la Primera Venida</text:h>
      <text:list text:style-name="L16">
        <text:list-item>
          <text:p text:style-name="P24"><text:span text:style-name="Strong_20_Emphasis"><text:span text:style-name="T2">Lado de Dios (Vara/Balanza de Dios):</text:span></text:span><text:span text:style-name="T2"> Jesús y los 12 discípulos. Tenían la Palabra de la verdad (el cumplimiento del AT). Ante los ojos humanos, eran pocos, pobres y sin templo. </text:span></text:p>
        </text:list-item>
        <text:list-item>
          <text:p text:style-name="P23"><text:span text:style-name="Strong_20_Emphasis"><text:span text:style-name="T2">Lado de Satanás (Peso Falso):</text:span></text:span><text:span text:style-name="T2"> Los escribas, fariseos y sus seguidores. Tenían las sinagogas hermosas, el dinero, el estatus y el reconocimiento mundial. Pero su balanza era de "peso falso" (tradiciones de hombres). </text:span></text:p>
        </text:list-item>
      </text:list>
      <text:h text:style-name="P3" text:outline-level="3">🔍 La Realidad en la Segunda Venida (Hoy)</text:h>
      <text:p text:style-name="P40">La historia se repite. Hoy nos encontramos con pastores que parecen "bonitos" por fuera (grandes iglesias, fama, títulos), pero que tienen sedimentos de Moab o peso falso. </text:p>
      <text:list text:style-name="L17">
        <text:list-item>
          <text:p text:style-name="P26"><text:span text:style-name="Strong_20_Emphasis"><text:span text:style-name="T2">¿Cómo no ser engañados?</text:span></text:span><text:span text:style-name="T2"> No nos guiamos por lo visual. Nos guiamos por el </text:span><text:span text:style-name="Strong_20_Emphasis"><text:span text:style-name="T2">Estándar (La Biblia)</text:span></text:span><text:span text:style-name="T2">. </text:span></text:p>
        </text:list-item>
        <text:list-item>
          <text:p text:style-name="P25"><text:soft-page-break/><text:span text:style-name="T2">Debemos examinar nuestra "copa" (corazón), vaciarla de mentiras, y buscar al pastor/pueblo que tenga la </text:span><text:span text:style-name="Strong_20_Emphasis"><text:span text:style-name="T2">Vara de Hierro</text:span></text:span><text:span text:style-name="T2"> (la Palabra revelada del cumplimiento de Apocalipsis). </text:span></text:p>
        </text:list-item>
      </text:list>
      <text:p text:style-name="P4"/>
      <text:h text:style-name="P2" text:outline-level="2">🎯 6. Conclusiones Finales de la Lección</text:h>
      <text:list text:style-name="L18">
        <text:list-item>
          <text:p text:style-name="P28"><text:span text:style-name="Strong_20_Emphasis"><text:span text:style-name="T2">Debemos contener la Palabra de Dios:</text:span></text:span><text:span text:style-name="T2"> Después de examinar nuestro corazón, lavarlo y vaciarlo de sedimentos, convirtámonos en un vaso de Dios. </text:span></text:p>
        </text:list-item>
        <text:list-item>
          <text:p text:style-name="P28"><text:span text:style-name="Strong_20_Emphasis"><text:span text:style-name="T2">El poder no reside en el bastón físico, sino en Dios:</text:span></text:span><text:span text:style-name="T2"> La vida eterna y la autoridad residen en la Palabra del principio que creó el cielo y la tierra. </text:span></text:p>
        </text:list-item>
        <text:list-item>
          <text:p text:style-name="P28"><text:span text:style-name="Strong_20_Emphasis"><text:span text:style-name="T2">La Palabra mide el templo del corazón:</text:span></text:span><text:span text:style-name="T2"> Puesto que la Palabra es el estándar de Dios, confiemos en ella para nuestro camino al cielo. </text:span></text:p>
        </text:list-item>
        <text:list-item>
          <text:p text:style-name="P27"><text:span text:style-name="Strong_20_Emphasis"><text:span text:style-name="T2">El Llamado Final:</text:span></text:span><text:span text:style-name="T2"> </text:span><text:span text:style-name="Emphasis"><text:span text:style-name="T2">"Encontremos hoy al vencedor con la vara de hierro y alcancemos la salvación"</text:span></text:span><text:span text:style-name="T2">. </text:span></text:p>
        </text:list-item>
      </text:list>
      <text:p text:style-name="Text_20_body"><text:span text:style-name="Strong_20_Emphasis"><text:span text:style-name="T2">📢 Anuncio para la Próxima Lección:</text:span></text:span><text:span text:style-name="T2"> La próxima vez veremos tres elementos nuevos en figurativo: </text:span><text:span text:style-name="Strong_20_Emphasis"><text:span text:style-name="T2">Fuego, Incensario y Olla</text:span></text:span><text:span text:style-name="T2">. </text:span></text:p>
      <text:list text:style-name="L19">
        <text:list-item>
          <text:p text:style-name="P29"><text:span text:style-name="Emphasis"><text:span text:style-name="T2">Pista para reflexionar:</text:span></text:span><text:span text:style-name="T2"> ¿Por qué se usaban incensarios en el templo? ¿Cuándo y antes de qué evento aparece el fuego en Apocalipsis? ¡Prepárense! </text:span></text:p>
        </text:list-item>
      </text:list>
      <text:p text:style-name="P4"/>
      <text:h text:style-name="P2" text:outline-level="2">🔄 7. Repaso Final Interactivo y Oración de Cierre</text:h>
      <text:p text:style-name="Text_20_body"><text:span text:style-name="Emphasis"><text:span text:style-name="T2">(A cargo del Evangelista Christian Howard)</text:span></text:span></text:p>
      <text:p text:style-name="Text_20_body"><text:span text:style-name="Strong_20_Emphasis"><text:span text:style-name="T2">Resumen Interactivo con los Estudiantes:</text:span></text:span></text:p>
      <text:list text:style-name="L20">
        <text:list-item>
          <text:p text:style-name="P31"><text:span text:style-name="Strong_20_Emphasis"><text:span text:style-name="T2">¿Qué mide la balanza espiritual?</text:span></text:span><text:span text:style-name="T2"> Mide los corazones y las acciones (porque lo que tienes adentro, sale afuera). </text:span></text:p>
        </text:list-item>
        <text:list-item>
          <text:p text:style-name="P31"><text:span text:style-name="Strong_20_Emphasis"><text:span text:style-name="T2">¿Cuál es el estándar (la ley) de Dios para juzgarnos?</text:span></text:span><text:span text:style-name="T2"> Su Palabra (La Biblia). </text:span></text:p>
        </text:list-item>
        <text:list-item>
          <text:p text:style-name="P31"><text:span text:style-name="Strong_20_Emphasis"><text:span text:style-name="T2">¿Cuál es el estándar de la balanza de Satanás?</text:span></text:span><text:span text:style-name="T2"> La mentira (el peso falso que dobla o cambia la Palabra de Dios). </text:span></text:p>
        </text:list-item>
        <text:list-item>
          <text:p text:style-name="P31"><text:span text:style-name="Strong_20_Emphasis"><text:span text:style-name="T2">¿Qué hace una vara física y qué es la vara espiritual?</text:span></text:span><text:span text:style-name="T2"> Físicamente apoya y ayuda. Espiritualmente es la Palabra de Dios que nos guía. </text:span></text:p>
        </text:list-item>
        <text:list-item>
          <text:p text:style-name="P30"><text:span text:style-name="Strong_20_Emphasis"><text:span text:style-name="T2">¿Quién tiene la Vara de Hierro (Cetro de Autoridad)?</text:span></text:span><text:span text:style-name="T2"> En la 1ª Venida fue Jesús. En la 2ª Venida, Jesús se la promete al </text:span><text:span text:style-name="Strong_20_Emphasis"><text:span text:style-name="T2">Vencedor</text:span></text:span><text:span text:style-name="T2">. </text:span></text:p>
        </text:list-item>
      </text:list>
      <text:p text:style-name="Text_20_body"><text:span text:style-name="Strong_20_Emphasis"><text:span text:style-name="T2">📢 Anuncios y Oración por Venezuela:</text:span></text:span></text:p>
      <text:list text:style-name="L21">
        <text:list-item>
          <text:p text:style-name="P33"><text:soft-page-break/><text:span text:style-name="Strong_20_Emphasis"><text:span text:style-name="T2">Mañana habrá otro quiz</text:span></text:span><text:span text:style-name="T2"> para revisar si estamos reteniendo la palabra y no dejamos que el ave la robe. </text:span></text:p>
        </text:list-item>
        <text:list-item>
          <text:p text:style-name="P32"><text:span text:style-name="Strong_20_Emphasis"><text:span text:style-name="T2">Oración especial:</text:span></text:span><text:span text:style-name="T2"> Oremos por nuestros hermanos en Venezuela por el reciente terremoto. Que Dios los proteja y mantenga su hambre espiritual a pesar de los obstáculos. </text:span></text:p>
        </text:list-item>
      </text:list>
      <text:p text:style-name="Text_20_body"><text:span text:style-name="Strong_20_Emphasis"><text:span text:style-name="T2">Oración de Cierre (El Padre Nuestro):</text:span></text:span></text:p>
      <text:p text:style-name="Quotations"><text:span text:style-name="Emphasis"><text:span text:style-name="T2">"Padre nuestro que estás en los cielos, santificado sea tu nombre. Venga a nosotros tu reino. Hágase tu voluntad en la tierra como en el cielo. Danos hoy nuestro pan de cada día. Perdona nuestras deudas, como también nosotros perdonamos a nuestros deudores. No nos dejes caer en la tentación, mas líbranos de todo mal. Porque tuyo es el poder y la gloria por los siglos de los siglos. Amén."</text:span></text:span></text:p>
      <text:p text:style-name="P40">¡Gracias a todos! Cuídense, sigan estudiando y reflexionando sobre lo que hay en su corazón. ¡Nos vemos la próxima semana para estudiar el Fuego!</text:p>
      <text:p text:style-name="P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10:07:57.002700876</meta:creation-date>
    <dc:date>2026-07-02T08:56:22.739473526</dc:date>
    <meta:editing-duration>PT1H34M53S</meta:editing-duration>
    <meta:editing-cycles>6</meta:editing-cycles>
    <meta:generator>LibreOffice/24.2.7.2$Linux_X86_64 LibreOffice_project/420$Build-2</meta:generator>
    <meta:document-statistic meta:table-count="0" meta:image-count="0" meta:object-count="0" meta:page-count="8" meta:paragraph-count="118" meta:word-count="2130" meta:character-count="11965" meta:non-whitespace-character-count="9954"/>
  </office:meta>
</office:document-meta>
</file>