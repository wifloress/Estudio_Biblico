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Tabla1" style:family="table">
      <style:table-properties style:width="17cm" table:align="left"/>
    </style:style>
    <style:style style:name="Tabla1.A" style:family="table-column">
      <style:table-column-properties style:column-width="1.93cm"/>
    </style:style>
    <style:style style:name="Tabla1.B" style:family="table-column">
      <style:table-column-properties style:column-width="6.502cm"/>
    </style:style>
    <style:style style:name="Tabla1.C" style:family="table-column">
      <style:table-column-properties style:column-width="8.569cm"/>
    </style:style>
    <style:style style:name="Tabla1.A1" style:family="table-cell">
      <style:table-cell-properties style:vertical-align="middle" fo:padding="0.049cm" fo:border="none"/>
    </style:style>
    <style:style style:name="P1" style:family="paragraph" style:parent-style-name="Heading_20_2">
      <style:text-properties style:font-name="Padauk Book"/>
    </style:style>
    <style:style style:name="P2" style:family="paragraph" style:parent-style-name="Heading_20_3">
      <style:text-properties style:font-name="Padauk Book"/>
    </style:style>
    <style:style style:name="P3" style:family="paragraph" style:parent-style-name="Horizontal_20_Line">
      <style:text-properties style:font-name="Padauk Book"/>
    </style:style>
    <style:style style:name="P4" style:family="paragraph" style:parent-style-name="Text_20_body">
      <style:text-properties style:font-name="Padauk Book"/>
    </style:style>
    <style:style style:name="P5" style:family="paragraph" style:parent-style-name="Heading_20_4">
      <style:text-properties style:font-name="Padauk Book"/>
    </style:style>
    <style:style style:name="P6" style:family="paragraph" style:parent-style-name="Horizontal_20_Line">
      <style:text-properties style:font-name="Padauk Book"/>
    </style:style>
    <style:style style:name="P7" style:family="paragraph" style:parent-style-name="Heading_20_1">
      <style:text-properties style:font-name="Padauk Book"/>
    </style:style>
    <style:style style:name="P8" style:family="paragraph" style:parent-style-name="Heading_20_2">
      <style:text-properties style:font-name="Padauk Book"/>
    </style:style>
    <style:style style:name="P9" style:family="paragraph" style:parent-style-name="Heading_20_3">
      <style:text-properties style:font-name="Padauk Book"/>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style:font-name="Padauk Book"/>
    </style:style>
    <style:style style:name="P12" style:family="paragraph" style:parent-style-name="Table_20_Heading">
      <style:paragraph-properties fo:text-align="start" style:justify-single-word="false"/>
      <style:text-properties style:font-name="Padauk Book"/>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paragraph-properties fo:margin-top="0cm" fo:margin-bottom="0cm" style:contextual-spacing="false"/>
      <style:text-properties style:font-name="Padauk Book"/>
    </style:style>
    <style:style style:name="P15" style:family="paragraph" style:parent-style-name="Text_20_body" style:list-style-name="L1">
      <style:text-properties style:font-name="Padauk Book"/>
    </style:style>
    <style:style style:name="P16" style:family="paragraph" style:parent-style-name="Text_20_body" style:list-style-name="L8">
      <style:text-properties style:font-name="Padauk Book"/>
    </style:style>
    <style:style style:name="P17" style:family="paragraph" style:parent-style-name="Text_20_body" style:list-style-name="L11">
      <style:paragraph-properties fo:margin-top="0cm" fo:margin-bottom="0cm" style:contextual-spacing="false"/>
      <style:text-properties style:font-name="Padauk Book"/>
    </style:style>
    <style:style style:name="P18" style:family="paragraph" style:parent-style-name="Text_20_body" style:list-style-name="L11">
      <style:text-properties style:font-name="Padauk Book"/>
    </style:style>
    <style:style style:name="P19" style:family="paragraph" style:parent-style-name="Text_20_body" style:list-style-name="L17">
      <style:paragraph-properties fo:margin-top="0cm" fo:margin-bottom="0cm" style:contextual-spacing="false"/>
      <style:text-properties style:font-name="Padauk Book"/>
    </style:style>
    <style:style style:name="P20" style:family="paragraph" style:parent-style-name="Text_20_body" style:list-style-name="L17">
      <style:text-properties style:font-name="Padauk Book"/>
    </style:style>
    <style:style style:name="P21" style:family="paragraph" style:parent-style-name="Text_20_body" style:list-style-name="L19">
      <style:paragraph-properties fo:margin-top="0cm" fo:margin-bottom="0cm" style:contextual-spacing="false"/>
      <style:text-properties style:font-name="Padauk Book"/>
    </style:style>
    <style:style style:name="P22" style:family="paragraph" style:parent-style-name="Text_20_body" style:list-style-name="L25">
      <style:paragraph-properties fo:margin-top="0cm" fo:margin-bottom="0cm" style:contextual-spacing="false"/>
      <style:text-properties style:font-name="Padauk Book"/>
    </style:style>
    <style:style style:name="P23" style:family="paragraph" style:parent-style-name="Text_20_body" style:list-style-name="L28">
      <style:paragraph-properties fo:margin-top="0cm" fo:margin-bottom="0cm" style:contextual-spacing="false"/>
      <style:text-properties style:font-name="Padauk Book"/>
    </style:style>
    <style:style style:name="P24" style:family="paragraph" style:parent-style-name="Text_20_body" style:list-style-name="L28">
      <style:text-properties style:font-name="Padauk Book"/>
    </style:style>
    <style:style style:name="P25" style:family="paragraph" style:parent-style-name="Text_20_body" style:list-style-name="L2"/>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style style:name="P33" style:family="paragraph" style:parent-style-name="Text_20_body" style:list-style-name="L6">
      <style:paragraph-properties fo:margin-top="0cm" fo:margin-bottom="0cm" style:contextual-spacing="false"/>
    </style:style>
    <style:style style:name="P34" style:family="paragraph" style:parent-style-name="Text_20_body" style:list-style-name="L7"/>
    <style:style style:name="P35" style:family="paragraph" style:parent-style-name="Text_20_body" style:list-style-name="L7">
      <style:paragraph-properties fo:margin-top="0cm" fo:margin-bottom="0cm" style:contextual-spacing="false"/>
    </style:style>
    <style:style style:name="P36" style:family="paragraph" style:parent-style-name="Text_20_body" style:list-style-name="L8">
      <style:paragraph-properties fo:margin-top="0cm" fo:margin-bottom="0cm" style:contextual-spacing="false"/>
    </style:style>
    <style:style style:name="P37" style:family="paragraph" style:parent-style-name="Text_20_body" style:list-style-name="L9"/>
    <style:style style:name="P38" style:family="paragraph" style:parent-style-name="Text_20_body" style:list-style-name="L9">
      <style:paragraph-properties fo:margin-top="0cm" fo:margin-bottom="0cm" style:contextual-spacing="false"/>
    </style:style>
    <style:style style:name="P39" style:family="paragraph" style:parent-style-name="Text_20_body" style:list-style-name="L10"/>
    <style:style style:name="P40" style:family="paragraph" style:parent-style-name="Text_20_body" style:list-style-name="L10">
      <style:paragraph-properties fo:margin-top="0cm" fo:margin-bottom="0cm" style:contextual-spacing="false"/>
    </style:style>
    <style:style style:name="P41" style:family="paragraph" style:parent-style-name="Text_20_body" style:list-style-name="L12"/>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5">
      <style:paragraph-properties fo:margin-top="0cm" fo:margin-bottom="0cm" style:contextual-spacing="false"/>
    </style:style>
    <style:style style:name="P47" style:family="paragraph" style:parent-style-name="Text_20_body" style:list-style-name="L16"/>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8"/>
    <style:style style:name="P50" style:family="paragraph" style:parent-style-name="Text_20_body" style:list-style-name="L18">
      <style:paragraph-properties fo:margin-top="0cm" fo:margin-bottom="0cm" style:contextual-spacing="false"/>
    </style:style>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4"/>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5"/>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7">
      <style:paragraph-properties fo:margin-top="0cm" fo:margin-bottom="0cm" style:contextual-spacing="false"/>
    </style:style>
    <style:style style:name="P64" style:family="paragraph" style:parent-style-name="Text_20_body" style:list-style-name="L29"/>
    <style:style style:name="P65" style:family="paragraph" style:parent-style-name="Text_20_body" style:list-style-name="L29">
      <style:paragraph-properties fo:margin-top="0cm" fo:margin-bottom="0cm" style:contextual-spacing="false"/>
    </style:style>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1">
      <style:paragraph-properties fo:margin-top="0cm" fo:margin-bottom="0cm" style:contextual-spacing="false"/>
    </style:style>
    <style:style style:name="P69" style:family="paragraph" style:parent-style-name="Text_20_body" style:list-style-name="L32"/>
    <style:style style:name="P70" style:family="paragraph" style:parent-style-name="Text_20_body" style:list-style-name="L34"/>
    <style:style style:name="P71" style:family="paragraph" style:parent-style-name="Text_20_body" style:list-style-name="L36"/>
    <style:style style:name="P72" style:family="paragraph" style:parent-style-name="Text_20_body" style:list-style-name="L36">
      <style:paragraph-properties fo:margin-top="0cm" fo:margin-bottom="0cm" style:contextual-spacing="false"/>
    </style:style>
    <style:style style:name="P73" style:family="paragraph" style:parent-style-name="Text_20_body" style:list-style-name="L37"/>
    <style:style style:name="P74" style:family="paragraph" style:parent-style-name="Text_20_body" style:list-style-name="L37">
      <style:paragraph-properties fo:margin-top="0cm" fo:margin-bottom="0cm" style:contextual-spacing="false"/>
    </style:style>
    <style:style style:name="P75" style:family="paragraph" style:parent-style-name="Text_20_body" style:list-style-name="L38"/>
    <style:style style:name="P76" style:family="paragraph" style:parent-style-name="Text_20_body" style:list-style-name="L38">
      <style:paragraph-properties fo:margin-top="0cm" fo:margin-bottom="0cm" style:contextual-spacing="false"/>
    </style:style>
    <style:style style:name="P77" style:family="paragraph" style:parent-style-name="Text_20_body" style:list-style-name="L39"/>
    <style:style style:name="P78" style:family="paragraph" style:parent-style-name="Text_20_body" style:list-style-name="L39">
      <style:paragraph-properties fo:margin-top="0cm" fo:margin-bottom="0cm" style:contextual-spacing="false"/>
    </style:style>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1">
      <style:paragraph-properties fo:margin-top="0cm" fo:margin-bottom="0cm" style:contextual-spacing="false"/>
    </style:style>
    <style:style style:name="P82" style:family="paragraph" style:parent-style-name="Text_20_body" style:list-style-name="L42"/>
    <style:style style:name="P83" style:family="paragraph" style:parent-style-name="Text_20_body" style:list-style-name="L42">
      <style:paragraph-properties fo:margin-top="0cm" fo:margin-bottom="0cm" style:contextual-spacing="false"/>
    </style:style>
    <style:style style:name="P84" style:family="paragraph" style:parent-style-name="Text_20_body" style:list-style-name="L43">
      <style:paragraph-properties fo:margin-top="0cm" fo:margin-bottom="0cm" style:contextual-spacing="false"/>
    </style:style>
    <style:style style:name="P85" style:family="paragraph" style:parent-style-name="Text_20_body">
      <style:text-properties style:font-name="Padauk Book"/>
    </style:style>
    <style:style style:name="P86" style:family="paragraph" style:parent-style-name="Text_20_body" style:list-style-name="L32">
      <style:paragraph-properties fo:margin-top="0cm" fo:margin-bottom="0cm" style:contextual-spacing="false"/>
      <style:text-properties style:font-name="Padauk Book"/>
    </style:style>
    <style:style style:name="P87" style:family="paragraph" style:parent-style-name="Text_20_body" style:list-style-name="L33">
      <style:text-properties style:font-name="Padauk Book"/>
    </style:style>
    <style:style style:name="P88" style:family="paragraph" style:parent-style-name="Text_20_body" style:list-style-name="L35">
      <style:text-properties style:font-name="Padauk Book"/>
    </style:style>
    <style:style style:name="P89" style:family="paragraph" style:parent-style-name="Text_20_body" style:list-style-name="L43">
      <style:paragraph-properties fo:margin-top="0cm" fo:margin-bottom="0cm" style:contextual-spacing="false"/>
      <style:text-properties style:font-name="Padauk Book"/>
    </style:style>
    <style:style style:name="P90" style:family="paragraph" style:parent-style-name="Text_20_body" style:list-style-name="L43">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CUADERNO DE ESTUDIO: LECCIÓN 11 (PARTE 1)</text:h>
      <text:h text:style-name="P1" text:outline-level="2">Mar, Pescador, Red, Pez y Barco en Lenguaje Figurativo</text:h>
      <text:p text:style-name="P3"/>
      <text:h text:style-name="P1" text:outline-level="2">🔄 1. Repaso Inicial: Agua, Fuente y Río</text:h>
      <text:p text:style-name="Text_20_body"><text:span text:style-name="Emphasis"><text:span text:style-name="T1">(A cargo del Evangelista Christian Howard)</text:span></text:span></text:p>
      <text:p text:style-name="P4">Antes de comenzar la nueva lección, repasamos los conceptos fundamentales de la lección anterior sobre el agua, la fuente y el río en sentido figurativo:</text:p>
      <text:p text:style-name="Text_20_body"><text:span text:style-name="Strong_20_Emphasis"><text:span text:style-name="T1">Preguntas de Reflexión y Respuestas:</text:span></text:span></text:p>
      <text:list text:style-name="L29">
        <text:list-item>
          <text:p text:style-name="P65"><text:span text:style-name="Strong_20_Emphasis"><text:span text:style-name="T1">¿Qué representa el agua en sentido figurativo?</text:span></text:span></text:p>
          <text:list>
            <text:list-item>
              <text:p text:style-name="P65"><text:span text:style-name="Emphasis"><text:span text:style-name="T1">Respuesta:</text:span></text:span><text:span text:style-name="T1"> La </text:span><text:span text:style-name="Strong_20_Emphasis"><text:span text:style-name="T1">palabra de verdad de Dios</text:span></text:span><text:span text:style-name="T1">. </text:span></text:p>
            </text:list-item>
            <text:list-item>
              <text:p text:style-name="P65"><text:span text:style-name="Emphasis"><text:span text:style-name="T1">Justificación:</text:span></text:span><text:span text:style-name="T1"> Así como el agua física da vida, limpia y es indispensable para vivir, la palabra de Dios da vida a nuestra alma, limpia nuestro corazón y nos guía hacia la salvación. </text:span></text:p>
            </text:list-item>
          </text:list>
        </text:list-item>
        <text:list-item>
          <text:p text:style-name="P65"><text:span text:style-name="Strong_20_Emphasis"><text:span text:style-name="T1">¿Existe solo un tipo de agua espiritual?</text:span></text:span></text:p>
          <text:list>
            <text:list-item>
              <text:p text:style-name="P65"><text:span text:style-name="Emphasis"><text:span text:style-name="T1">Respuesta:</text:span></text:span><text:span text:style-name="T1"> No. Existe el </text:span><text:span text:style-name="Strong_20_Emphasis"><text:span text:style-name="T1">agua de Dios</text:span></text:span><text:span text:style-name="T1"> (verdad) y el </text:span><text:span text:style-name="Strong_20_Emphasis"><text:span text:style-name="T1">agua de Satanás</text:span></text:span><text:span text:style-name="T1"> (falsedad, enseñanzas mezcladas con pensamientos humanos). El agua contaminada enferma el espíritu. </text:span></text:p>
            </text:list-item>
          </text:list>
        </text:list-item>
        <text:list-item>
          <text:p text:style-name="P65"><text:span text:style-name="Strong_20_Emphasis"><text:span text:style-name="T1">¿Qué es una fuente o manantial en figurativo?</text:span></text:span></text:p>
          <text:list>
            <text:list-item>
              <text:p text:style-name="P65"><text:span text:style-name="Emphasis"><text:span text:style-name="T1">Respuesta:</text:span></text:span><text:span text:style-name="T1"> El </text:span><text:span text:style-name="Strong_20_Emphasis"><text:span text:style-name="T1">pastor y el templo (la iglesia)</text:span></text:span><text:span text:style-name="T1">. De la misma manera que el agua nace y brota de una fuente física, la palabra de Dios brota y es dada por el pastor o desde el templo donde él ministra. </text:span></text:p>
            </text:list-item>
          </text:list>
        </text:list-item>
        <text:list-item>
          <text:p text:style-name="P65"><text:span text:style-name="Strong_20_Emphasis"><text:span text:style-name="T1">¿Qué son los ríos en sentido figurativo?</text:span></text:span></text:p>
          <text:list>
            <text:list-item>
              <text:p text:style-name="P64"><text:span text:style-name="Emphasis"><text:span text:style-name="T1">Respuesta:</text:span></text:span><text:span text:style-name="T1"> Los </text:span><text:span text:style-name="Strong_20_Emphasis"><text:span text:style-name="T1">discípulos y evangelistas</text:span></text:span><text:span text:style-name="T1">. Así como un río transmite y guía el agua desde la fuente hacia el mar, los discípulos y evangelistas transmiten y guían la palabra de Dios hacia la gente.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darnos estas revelaciones. Nos estás enseñando qué significa ser una persona rica, qué es una persona pobre. Dios, ya </text:span></text:span><text:soft-page-break/><text:span text:style-name="Emphasis"><text:span text:style-name="T1">estamos entendiendo más y más cuando dice la Biblia que bienaventurados los pobres, porque ellos no tienen nada adentro y, cuando agarran riquezas, no hay nada que tengan que rechazar, porque ya están vacíos. Gracias por enseñarnos esto. Ya todas esas parábolas están teniendo más sentido. Dios, por favor, sigue enviando tu Espíritu Santo sobre nosotros para que abras todo nuestro corazón, porque poquito a poquito estás abriendo nuestros corazones y nuestros ojos. Sabemos que todavía somos humanos y a veces es difícil entender y aceptar lo que nos estás enseñando, pero si de verdad nos estás enseñando tu verdad y se puede ver claramente en la Biblia, no podemos negarlo. Por favor, Dios, también cuida a los hermanos y hermanas que están teniendo tiempos difíciles. Quítales esas espinas para que vuelvan a ti, para que vuelvan a escuchar tu palabra y renovar su fe. Oramos todo esto en tu hijo maravilloso Jesucristo. Amén."</text:span></text:span></text:p>
      <text:p text:style-name="P3"/>
      <text:h text:style-name="P1" text:outline-level="2">🌊 2. Introducción: La Lógica del Mar, la Fuente y el Río</text:h>
      <text:p text:style-name="Text_20_body"><text:span text:style-name="Emphasis"><text:span text:style-name="T1">(A cargo del Instructor Sibiani)</text:span></text:span></text:p>
      <text:h text:style-name="P2" text:outline-level="3">📌 La Actitud ante la Palabra</text:h>
      <text:p text:style-name="Text_20_body"><text:span text:style-name="T1">Siempre es importante recordar que casi todos los elementos que hemos visto en este nivel introductorio tienen que ver con </text:span><text:span text:style-name="Strong_20_Emphasis"><text:span text:style-name="T1">la palabra de Dios</text:span></text:span><text:span text:style-name="T1">. El reino de los cielos es como una semilla (palabra), como fuego (palabra), como una perla o tesoro (palabra). Todo el reino de los cielos se inicia teniendo la palabra de Dios en nuestro corazón.</text:span></text:p>
      <text:h text:style-name="P2" text:outline-level="3">📖 El Título de la Lección</text:h>
      <text:p text:style-name="P4">Leamos juntos dos veces:</text:p>
      <text:p text:style-name="Quotations"><text:span text:style-name="Strong_20_Emphasis"><text:span text:style-name="T1">"Mar, pescador, red, pez y barco en figurativo"</text:span></text:span></text:p>
      <text:p text:style-name="Text_20_body"><text:span text:style-name="T1">Hoy nos enfocaremos en la primera parte: </text:span><text:span text:style-name="Strong_20_Emphasis"><text:span text:style-name="T1">el mar</text:span></text:span><text:span text:style-name="T1">. </text:span></text:p>
      <text:list text:style-name="L30">
        <text:list-item>
          <text:p text:style-name="P66"><text:span text:style-name="Emphasis"><text:span text:style-name="T1">Reflexión lógica:</text:span></text:span><text:span text:style-name="T1"> En la naturaleza, el agua nace en una fuente, fluye hacia abajo formando un río y eventualmente todos los ríos desembocan en el mar. ¿Por qué Dios quiere darnos esta lógica como una parábola? ¿Por qué nos quiere hablar sobre el reino de los cielos utilizando estos tres elementos? </text:span></text:p>
        </text:list-item>
      </text:list>
      <text:p text:style-name="P3"/>
      <text:h text:style-name="P1" text:outline-level="2"><text:soft-page-break/>🌍 3. El Mar en Figurativo: Características y Significado</text:h>
      <text:h text:style-name="P2" text:outline-level="3">🌊 Características Físicas del Mar</text:h>
      <text:list text:style-name="L31">
        <text:list-item>
          <text:p text:style-name="P68"><text:span text:style-name="Strong_20_Emphasis"><text:span text:style-name="T1">Es inmenso y amplio:</text:span></text:span><text:span text:style-name="T1"> Parece que nunca se acaba en el horizonte. </text:span></text:p>
        </text:list-item>
        <text:list-item>
          <text:p text:style-name="P68"><text:span text:style-name="Strong_20_Emphasis"><text:span text:style-name="T1">Es una mezcla de aguas:</text:span></text:span><text:span text:style-name="T1"> Contiene muchos tipos de aguas (dulces, saladas, corrientes) que se mezclan. </text:span></text:p>
        </text:list-item>
        <text:list-item>
          <text:p text:style-name="P68"><text:span text:style-name="Strong_20_Emphasis"><text:span text:style-name="T1">Es intomable:</text:span></text:span><text:span text:style-name="T1"> Debido a su alta salinidad y a que puede contener impurezas, beber agua del mar solo aumenta la sed y puede ser perjudicial para la salud. </text:span></text:p>
        </text:list-item>
        <text:list-item>
          <text:p text:style-name="P67"><text:span text:style-name="Strong_20_Emphasis"><text:span text:style-name="T1">Es el hábitat de muchas criaturas:</text:span></text:span><text:span text:style-name="T1"> Incluye desde peces hasta bestias marinas. </text:span></text:p>
        </text:list-item>
      </text:list>
      <text:h text:style-name="P2" text:outline-level="3">🕊️ Significado Espiritual del Mar</text:h>
      <text:p text:style-name="Text_20_body"><text:span text:style-name="T1">El mar representa </text:span><text:span text:style-name="Strong_20_Emphasis"><text:span text:style-name="T1">el mundo</text:span></text:span><text:span text:style-name="T1">, pero específicamente el </text:span><text:span text:style-name="Strong_20_Emphasis"><text:span text:style-name="T1">mundo religioso o el mundo de los creyentes</text:span></text:span><text:span text:style-name="T1">, donde hay una mezcla de doctrinas y palabras.</text:span></text:p>
      <text:p text:style-name="Text_20_body"><text:span text:style-name="Strong_20_Emphasis"><text:span text:style-name="T1">A. Un lugar de mezcla y confusión (Isaías 1:22)</text:span></text:span></text:p>
      <text:p text:style-name="Quotations"><text:span text:style-name="Emphasis"><text:span text:style-name="T1">"Tu plata se ha convertido en escorias. Ahora tu vino está mezclado con agua".</text:span></text:span></text:p>
      <text:list text:style-name="L32">
        <text:list-item>
          <text:p text:style-name="P86">El pueblo de Dios tenía la "plata" y el "vino" (la palabra de Dios), pero con el tiempo se mezcló con "agua" (palabras humanas, falsedades). </text:p>
        </text:list-item>
        <text:list-item>
          <text:p text:style-name="P69"><text:span text:style-name="Emphasis"><text:span text:style-name="T1">Analogía del veneno:</text:span></text:span><text:span text:style-name="T1"> Si le pones una gota de veneno a un vaso de agua, el agua sigue viéndose normal, pero es mortal. De la misma manera, cuando la palabra de Dios se mezcla con pensamientos humanos o falsedades, parece inofensiva, pero espiritualmente es mortal. </text:span></text:p>
        </text:list-item>
      </text:list>
      <text:p text:style-name="Text_20_body"><text:span text:style-name="Strong_20_Emphasis"><text:span text:style-name="T1">B. El dominio de Satanás (Isaías 27:1 y 1 Juan 5:19)</text:span></text:span></text:p>
      <text:p text:style-name="Quotations"><text:span text:style-name="Emphasis"><text:span text:style-name="T1">"En aquel día Jehová castigará con su espada... a Leviatán, serpiente veloz... y matará al dragón que está en el mar".</text:span></text:span><text:span text:style-name="T1"> (Isaías 27:1) </text:span><text:span text:style-name="Emphasis"><text:span text:style-name="T1">"Todo el mundo está bajo el maligno".</text:span></text:span><text:span text:style-name="T1"> (1 Juan 5:19)</text:span></text:p>
      <text:list text:style-name="L33">
        <text:list-item>
          <text:p text:style-name="P87">El "dragón" y la "serpiente antigua" representan a Satanás. El mar es el lugar donde él ejerce su dominio, engañando a las naciones con una mezcla de palabras. </text:p>
        </text:list-item>
      </text:list>
      <text:p text:style-name="Text_20_body"><text:span text:style-name="Strong_20_Emphasis"><text:span text:style-name="T1">C. Las Bestias que suben del mar (Daniel 7:2-3)</text:span></text:span></text:p>
      <text:p text:style-name="Quotations"><text:span text:style-name="Emphasis"><text:span text:style-name="T1">"Miraba yo en mi visión de noche, y he aquí que los cuatro vientos del cielo combatían en el gran mar, y cuatro bestias grandes, diferentes la una de la otra, subían del mar".</text:span></text:span></text:p>
      <text:list text:style-name="L34">
        <text:list-item>
          <text:p text:style-name="P70"><text:soft-page-break/><text:span text:style-name="T1">Estas bestias no son animales literales, sino </text:span><text:span text:style-name="Strong_20_Emphasis"><text:span text:style-name="T1">reyes y reinos</text:span></text:span><text:span text:style-name="T1"> (Daniel 7:17) que surgen del mundo gobernado por Satanás. </text:span></text:p>
        </text:list-item>
      </text:list>
      <text:p text:style-name="Text_20_body"><text:span text:style-name="Strong_20_Emphasis"><text:span text:style-name="T1">D. La Voluntad de Dios: Cubrir el mar con Su conocimiento (Habacuc 2:14)</text:span></text:span></text:p>
      <text:p text:style-name="Quotations"><text:span text:style-name="Emphasis"><text:span text:style-name="T1">"Porque la tierra será llena del conocimiento de la gloria de Jehová, como las aguas cubren el mar".</text:span></text:span></text:p>
      <text:list text:style-name="L35">
        <text:list-item>
          <text:p text:style-name="P88">Dios promete que Su palabra (conocimiento) cubrirá este mundo mezclado y caótico para traer orden y verdad. </text:p>
        </text:list-item>
      </text:list>
      <text:p text:style-name="P3"/>
      <text:h text:style-name="P1" text:outline-level="2">🏞️ 4. El Río de Dios vs. El Río de Satanás</text:h>
      <text:h text:style-name="P2" text:outline-level="3">✅ El Río de Dios: Sanidad y Vida</text:h>
      <text:p text:style-name="P4">El río de Dios fluye desde la fuente (Dios/Jesús) a través de los discípulos para sanar el mar (el mundo).</text:p>
      <text:list text:style-name="L36">
        <text:list-item>
          <text:p text:style-name="P72"><text:span text:style-name="Strong_20_Emphasis"><text:span text:style-name="T1">Ezequiel 47:1-12:</text:span></text:span><text:span text:style-name="T1"> El profeta ve un río que sale del templo (de Dios). A medida que fluye, se hace más caudaloso y, al desembocar en el Mar Muerto, </text:span><text:span text:style-name="Strong_20_Emphasis"><text:span text:style-name="T1">sana las aguas</text:span></text:span><text:span text:style-name="T1"> y hace que haya abundancia de criaturas vivientes. </text:span></text:p>
        </text:list-item>
        <text:list-item>
          <text:p text:style-name="P72"><text:span text:style-name="Strong_20_Emphasis"><text:span text:style-name="T1">Juan 7:37-38:</text:span></text:span><text:span text:style-name="T1"> </text:span><text:span text:style-name="Emphasis"><text:span text:style-name="T1">"El que cree en mí, como dice la Escritura, de su interior correrán ríos de agua viva"</text:span></text:span><text:span text:style-name="T1">. Los creyentes, al recibir la palabra, se convierten en canales que distribuyen esta verdad. </text:span></text:p>
        </text:list-item>
        <text:list-item>
          <text:p text:style-name="P71"><text:span text:style-name="Strong_20_Emphasis"><text:span text:style-name="T1">Apocalipsis 22:1-2:</text:span></text:span><text:span text:style-name="T1"> </text:span><text:span text:style-name="Emphasis"><text:span text:style-name="T1">"Me mostró un río limpio de agua de vida, resplandeciente como cristal, que salía del trono de Dios y del Cordero... y las hojas del árbol eran para la sanidad de las naciones"</text:span></text:span><text:span text:style-name="T1">. El objetivo final de Dios es sanar a todas las naciones que han bebido del "vino de la fornicación" de Babilonia (Apocalipsis 18). </text:span></text:p>
        </text:list-item>
      </text:list>
      <text:h text:style-name="P2" text:outline-level="3">❌ El Río de Satanás: Engaño y Arrastre</text:h>
      <text:p text:style-name="P4">Satanás también tiene sus "ríos" para arrastrar al pueblo de Dios.</text:p>
      <text:list text:style-name="L37">
        <text:list-item>
          <text:p text:style-name="P74"><text:span text:style-name="Strong_20_Emphasis"><text:span text:style-name="T1">Ezequiel 29:3:</text:span></text:span><text:span text:style-name="T1"> Dios se refiere al Faraón (rey de Egipto) como </text:span><text:span text:style-name="Emphasis"><text:span text:style-name="T1">"el gran dragón que yace en medio de sus ríos"</text:span></text:span><text:span text:style-name="T1">. Representa a Satanás y a los falsos líderes que difunden sus enseñanzas. </text:span></text:p>
        </text:list-item>
        <text:list-item>
          <text:p text:style-name="P74"><text:span text:style-name="Strong_20_Emphasis"><text:span text:style-name="T1">Apocalipsis 12:15:</text:span></text:span><text:span text:style-name="T1"> </text:span><text:span text:style-name="Emphasis"><text:span text:style-name="T1">"Y la serpiente arrojó de su boca, tras la mujer, agua como un río, para que fuese arrastrada por el río"</text:span></text:span><text:span text:style-name="T1">. </text:span></text:p>
          <text:list>
            <text:list-item>
              <text:p text:style-name="P73"><text:soft-page-break/><text:span text:style-name="T1">Espiritualmente, esto significa que los falsos pastores (la serpiente) arrojan un flujo constante de </text:span><text:span text:style-name="Strong_20_Emphasis"><text:span text:style-name="T1">falsedades y mentiras</text:span></text:span><text:span text:style-name="T1"> (agua como un río) para arrastrar y engañar a la iglesia (la mujer). </text:span></text:p>
            </text:list-item>
          </text:list>
        </text:list-item>
      </text:list>
      <text:p text:style-name="P3"/>
      <text:h text:style-name="P1" text:outline-level="2">⛵ 5. La Fuente y el Río: Definiciones Clave</text:h>
      <text:h text:style-name="P2" text:outline-level="3">⛲ La Fuente (Manantial)</text:h>
      <text:list text:style-name="L38">
        <text:list-item>
          <text:p text:style-name="P76"><text:span text:style-name="Strong_20_Emphasis"><text:span text:style-name="T1">Significado:</text:span></text:span><text:span text:style-name="T1"> El </text:span><text:span text:style-name="Strong_20_Emphasis"><text:span text:style-name="T1">pastor y el templo (la iglesia)</text:span></text:span><text:span text:style-name="T1">. </text:span></text:p>
        </text:list-item>
        <text:list-item>
          <text:p text:style-name="P75"><text:span text:style-name="Strong_20_Emphasis"><text:span text:style-name="T1">Explicación:</text:span></text:span><text:span text:style-name="T1"> La palabra de Dios no flota en el aire; necesita un emisor. Dios escoge a un pastor (la boca del justo, Proverbios 10:11) o establece un templo desde donde mana el "manantial de vida" (Zacarías 13:1) para la purificación del pecado. </text:span></text:p>
        </text:list-item>
      </text:list>
      <text:h text:style-name="P2" text:outline-level="3">🏃 El Río</text:h>
      <text:list text:style-name="L39">
        <text:list-item>
          <text:p text:style-name="P78"><text:span text:style-name="Strong_20_Emphasis"><text:span text:style-name="T1">Significado:</text:span></text:span><text:span text:style-name="T1"> El </text:span><text:span text:style-name="Strong_20_Emphasis"><text:span text:style-name="T1">corazón de los discípulos y evangelistas</text:span></text:span><text:span text:style-name="T1">. </text:span></text:p>
        </text:list-item>
        <text:list-item>
          <text:p text:style-name="P77"><text:span text:style-name="Strong_20_Emphasis"><text:span text:style-name="T1">Explicación:</text:span></text:span><text:span text:style-name="T1"> Son las personas que reciben el agua de la fuente (la palabra del pastor) y la hacen fluir persona a persona, corazón a corazón, hasta que llega al "mar" (el mundo) para cumplir la misión de Dios. </text:span></text:p>
        </text:list-item>
      </text:list>
      <text:p text:style-name="P3"/>
      <text:h text:style-name="P1" text:outline-level="2">⚔️ 6. La Realidad en la Primera Venida</text:h>
      <text:p text:style-name="P4">La lógica espiritual que vemos en las profecías se cumplió claramente en la Primera Venida de Jesús:</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2">Elemento</text:p>
            </table:table-cell>
            <table:table-cell table:style-name="Tabla1.A1" office:value-type="string">
              <text:p text:style-name="P12">Lado de Dios (Verdad)</text:p>
            </table:table-cell>
            <table:table-cell table:style-name="Tabla1.A1" office:value-type="string">
              <text:p text:style-name="P12">Lado de Satanás (Falsedad)</text:p>
            </table:table-cell>
          </table:table-row>
        </table:table-header-rows>
        <table:table-row>
          <table:table-cell table:style-name="Tabla1.A1" office:value-type="string">
            <text:p text:style-name="P10"><text:span text:style-name="Strong_20_Emphasis"><text:span text:style-name="T1">Agua</text:span></text:span></text:p>
          </table:table-cell>
          <table:table-cell table:style-name="Tabla1.A1" office:value-type="string">
            <text:p text:style-name="P11">La palabra de la verdad (profecía y cumplimiento).</text:p>
          </table:table-cell>
          <table:table-cell table:style-name="Tabla1.A1" office:value-type="string">
            <text:p text:style-name="P11">Falsedad, mentiras y palabras del hombre mezcladas con la Biblia.</text:p>
          </table:table-cell>
        </table:table-row>
        <table:table-row>
          <table:table-cell table:style-name="Tabla1.A1" office:value-type="string">
            <text:p text:style-name="P10"><text:span text:style-name="Strong_20_Emphasis"><text:span text:style-name="T1">Fuente</text:span></text:span></text:p>
          </table:table-cell>
          <table:table-cell table:style-name="Tabla1.A1" office:value-type="string">
            <text:p text:style-name="P10"><text:span text:style-name="Strong_20_Emphasis"><text:span text:style-name="T1">Jesucristo</text:span></text:span><text:span text:style-name="T1"> (el templo de Dios) y los apóstoles.</text:span></text:p>
          </table:table-cell>
          <table:table-cell table:style-name="Tabla1.A1" office:value-type="string">
            <text:p text:style-name="P10"><text:span text:style-name="T1">Los </text:span><text:span text:style-name="Strong_20_Emphasis"><text:span text:style-name="T1">escribas y fariseos</text:span></text:span><text:span text:style-name="T1"> (falsos manantiales, "fuentes sin agua", 2 Pedro 2:17).</text:span></text:p>
          </table:table-cell>
        </table:table-row>
        <table:table-row>
          <table:table-cell table:style-name="Tabla1.A1" office:value-type="string">
            <text:p text:style-name="P10"><text:span text:style-name="Strong_20_Emphasis"><text:span text:style-name="T1">Ríos</text:span></text:span></text:p>
          </table:table-cell>
          <table:table-cell table:style-name="Tabla1.A1" office:value-type="string">
            <text:p text:style-name="P10"><text:span text:style-name="T1">Los </text:span><text:span text:style-name="Strong_20_Emphasis"><text:span text:style-name="T1">12 discípulos</text:span></text:span><text:span text:style-name="T1"> y evangelistas que difundieron la verdad.</text:span></text:p>
          </table:table-cell>
          <table:table-cell table:style-name="Tabla1.A1" office:value-type="string">
            <text:p text:style-name="P11">Los seguidores y evangelistas de los fariseos que propagaban las tradiciones humanas.</text:p>
          </table:table-cell>
        </table:table-row>
      </table:table>
      <text:list text:style-name="L40">
        <text:list-item>
          <text:p text:style-name="P79"><text:span text:style-name="Strong_20_Emphasis"><text:span text:style-name="T1">El Desafío del Discernimiento:</text:span></text:span><text:span text:style-name="T1"> En aquel entonces, los fariseos se veían "bonitos" por fuera (sinagogas hermosas, títulos, estatus), mientras que Jesús parecía un nazareno pobre sin títulos. Sin el estándar de la </text:span><text:span text:style-name="Strong_20_Emphasis"><text:span text:style-name="T1">palabra revelada (el cumplimiento)</text:span></text:span><text:span text:style-name="T1">, era imposible distinguir la fuente verdadera de la falsa. Hoy, en la Segunda Venida, enfrentamos el mismo desafío espiritual. </text:span></text:p>
        </text:list-item>
      </text:list>
      <text:p text:style-name="P3"><text:soft-page-break/></text:p>
      <text:h text:style-name="P1" text:outline-level="2">🎯 7. Conclusiones de la Lección</text:h>
      <text:list text:style-name="L41">
        <text:list-item>
          <text:p text:style-name="P81"><text:span text:style-name="Strong_20_Emphasis"><text:span text:style-name="T1">La palabra proviene de la boca del pastor</text:span></text:span><text:span text:style-name="T1"> y se difunde ampliamente por todo el mundo a través de los discípulos y evangelistas, tal como el agua brota de un manantial y fluye por un río hasta el mar. </text:span></text:p>
        </text:list-item>
        <text:list-item>
          <text:p text:style-name="P81"><text:span text:style-name="Strong_20_Emphasis"><text:span text:style-name="T1">Así como hay aguas en el mundo que no se pueden beber</text:span></text:span><text:span text:style-name="T1">, hay falsedades en la palabra que dañan el alma humana. Las falsas doctrinas y los falsos pastores son aguas, manantiales y ríos de Satanás. </text:span></text:p>
        </text:list-item>
        <text:list-item>
          <text:p text:style-name="P80"><text:span text:style-name="Strong_20_Emphasis"><text:span text:style-name="T1">Para que mi alma viva</text:span></text:span><text:span text:style-name="T1">, debo beber el agua de vida que proviene del pastor y del templo (manantiales de Dios) a través de los discípulos y evangelistas (ríos), y lavar mi alma contaminada antes de poder entrar al cielo (Apocalipsis 22:14). </text:span></text:p>
        </text:list-item>
      </text:list>
      <text:p text:style-name="P3"/>
      <text:h text:style-name="P1" text:outline-level="2">🔄 8. Repaso Final Interactivo y Anuncios</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42">
        <text:list-item>
          <text:p text:style-name="P83"><text:span text:style-name="Strong_20_Emphasis"><text:span text:style-name="T1">¿Qué representa el agua?</text:span></text:span><text:span text:style-name="T1"> La palabra de verdad de Dios (da vida y limpia). </text:span></text:p>
        </text:list-item>
        <text:list-item>
          <text:p text:style-name="P83"><text:span text:style-name="Strong_20_Emphasis"><text:span text:style-name="T1">¿Qué representa la fuente?</text:span></text:span><text:span text:style-name="T1"> El pastor y el templo, de donde sale la palabra. </text:span></text:p>
        </text:list-item>
        <text:list-item>
          <text:p text:style-name="P83"><text:span text:style-name="Strong_20_Emphasis"><text:span text:style-name="T1">¿Qué representan los ríos?</text:span></text:span><text:span text:style-name="T1"> Los discípulos y evangelistas que llevan la palabra a otras personas. </text:span></text:p>
        </text:list-item>
        <text:list-item>
          <text:p text:style-name="P82"><text:span text:style-name="Strong_20_Emphasis"><text:span text:style-name="T1">¿Qué representa el mar?</text:span></text:span><text:span text:style-name="T1"> El mundo (especialmente el mundo religioso), una mezcla de doctrinas bajo la influencia de Satanás, que necesita ser sanado por el río de Dios. </text:span></text:p>
        </text:list-item>
      </text:list>
      <text:p text:style-name="Text_20_body"><text:span text:style-name="Strong_20_Emphasis"><text:span text:style-name="T1">📢 Anuncios:</text:span></text:span></text:p>
      <text:list text:style-name="L43">
        <text:list-item>
          <text:p text:style-name="P84"><text:span text:style-name="T1">La próxima semana tendremos una </text:span><text:span text:style-name="Strong_20_Emphasis"><text:span text:style-name="T1">reunión especial con los pastores</text:span></text:span><text:span text:style-name="T1"> después de la clase para conversar sobre las lecciones y resolver dudas. </text:span></text:p>
        </text:list-item>
        <text:list-item>
          <text:p text:style-name="P89">La semana siguiente habrá una reunión general con todos los estudiantes. </text:p>
        </text:list-item>
        <text:list-item>
          <text:p text:style-name="P90">¡No olviden repasar sus apuntes durante el fin de semana para que el "ave" no se lleve la semilla!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text:span></text:span><text:soft-page-break/><text:span text:style-name="Emphasis"><text:span text:style-name="T1">perdonamos a los que nos ofenden. No nos dejes caer en la tentación, mas líbranos del mal. Porque tuyo es el reino, el poder y la gloria, por los siglos de los siglos. Amén."</text:span></text:span></text:p>
      <text:p text:style-name="P4">¡Gracias a todos! Cuídense, sigan estudiando y que Dios los bendiga. ¡Nos vemos en la próxima lección para estudiar al pescador, la red, el pez y el barco!</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15T12:08:06.584921713</dc:date>
    <meta:editing-duration>PT2H57M38S</meta:editing-duration>
    <meta:editing-cycles>14</meta:editing-cycles>
    <meta:generator>LibreOffice/24.2.7.2$Linux_X86_64 LibreOffice_project/420$Build-2</meta:generator>
    <meta:document-statistic meta:table-count="1" meta:image-count="0" meta:object-count="0" meta:page-count="7" meta:paragraph-count="98" meta:word-count="1905" meta:character-count="10830" meta:non-whitespace-character-count="9026"/>
  </office:meta>
</office:document-meta>
</file>