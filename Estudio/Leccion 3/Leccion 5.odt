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4"/>
    <style:style style:name="P28" style:family="paragraph" style:parent-style-name="Text_20_body" style:list-style-name="L14">
      <style:paragraph-properties fo:margin-top="0cm" fo:margin-bottom="0cm" style:contextual-spacing="false"/>
    </style:style>
    <style:style style:name="P29" style:family="paragraph" style:parent-style-name="Text_20_body" style:list-style-name="L15"/>
    <style:style style:name="P30" style:family="paragraph" style:parent-style-name="Text_20_body" style:list-style-name="L15">
      <style:paragraph-properties fo:margin-top="0cm" fo:margin-bottom="0cm" style:contextual-spacing="false"/>
    </style:style>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7">
      <style:paragraph-properties fo:margin-top="0cm" fo:margin-bottom="0cm" style:contextual-spacing="false"/>
    </style:style>
    <style:style style:name="P34" style:family="paragraph" style:parent-style-name="Text_20_body" style:list-style-name="L18"/>
    <style:style style:name="P35" style:family="paragraph" style:parent-style-name="Text_20_body" style:list-style-name="L18">
      <style:paragraph-properties fo:margin-top="0cm" fo:margin-bottom="0cm" style:contextual-spacing="false"/>
    </style:style>
    <style:style style:name="P36" style:family="paragraph" style:parent-style-name="Text_20_body" style:list-style-name="L19"/>
    <style:style style:name="P37" style:family="paragraph" style:parent-style-name="Text_20_body" style:list-style-name="L19">
      <style:paragraph-properties fo:margin-top="0cm" fo:margin-bottom="0cm" style:contextual-spacing="false"/>
    </style:style>
    <style:style style:name="P38" style:family="paragraph" style:parent-style-name="Text_20_body" style:list-style-name="L20"/>
    <style:style style:name="P39" style:family="paragraph" style:parent-style-name="Text_20_body" style:list-style-name="L20">
      <style:paragraph-properties fo:margin-top="0cm" fo:margin-bottom="0cm" style:contextual-spacing="false"/>
    </style:style>
    <style:style style:name="P40" style:family="paragraph" style:parent-style-name="Text_20_body" style:list-style-name="L21"/>
    <style:style style:name="P41" style:family="paragraph" style:parent-style-name="Text_20_body" style:list-style-name="L21">
      <style:paragraph-properties fo:margin-top="0cm" fo:margin-bottom="0cm" style:contextual-spacing="false"/>
    </style:style>
    <style:style style:name="P42" style:family="paragraph" style:parent-style-name="Text_20_body" style:list-style-name="L22"/>
    <style:style style:name="P43" style:family="paragraph" style:parent-style-name="Text_20_body" style:list-style-name="L22">
      <style:paragraph-properties fo:margin-top="0cm" fo:margin-bottom="0cm" style:contextual-spacing="false"/>
    </style:style>
    <style:style style:name="P44" style:family="paragraph" style:parent-style-name="Text_20_body" style:list-style-name="L23"/>
    <style:style style:name="P45" style:family="paragraph" style:parent-style-name="Text_20_body" style:list-style-name="L23">
      <style:paragraph-properties fo:margin-top="0cm" fo:margin-bottom="0cm" style:contextual-spacing="false"/>
    </style:style>
    <style:style style:name="P46" style:family="paragraph" style:parent-style-name="Text_20_body" style:list-style-name="L24"/>
    <style:style style:name="P47" style:family="paragraph" style:parent-style-name="Text_20_body" style:list-style-name="L24">
      <style:paragraph-properties fo:margin-top="0cm" fo:margin-bottom="0cm" style:contextual-spacing="false"/>
    </style:style>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6">
      <style:paragraph-properties fo:margin-top="0cm" fo:margin-bottom="0cm" style:contextual-spacing="false"/>
    </style:style>
    <style:style style:name="P51" style:family="paragraph" style:parent-style-name="Text_20_body" style:list-style-name="L27"/>
    <style:style style:name="P52" style:family="paragraph" style:parent-style-name="Text_20_body" style:list-style-name="L27">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CUADERNO DE ESTUDIO: LECCIÓN 5 (PARTE 2)</text:h>
      <text:h text:style-name="Heading_20_2" text:outline-level="2">Alimento y Levadura en Lenguaje Figurativo</text:h>
      <text:p text:style-name="Horizontal_20_Line"/>
      <text:h text:style-name="Heading_20_2" text:outline-level="2">🔄 1. Repaso Inicial: El Alimento Espiritual</text:h>
      <text:p text:style-name="Text_20_body"><text:span text:style-name="Emphasis">(A cargo del Evangelista Christian Howard)</text:span></text:p>
      <text:p text:style-name="Text_20_body">Antes de continuar con la nueva temática, ponemos a prueba lo aprendido en la primera parte sobre el alimento espiritual:</text:p>
      <text:p text:style-name="Text_20_body"><text:span text:style-name="Strong_20_Emphasis">Preguntas de Reflexión y Respuestas:</text:span></text:p>
      <text:list text:style-name="L15">
        <text:list-item>
          <text:p text:style-name="P30"><text:span text:style-name="Strong_20_Emphasis">¿Qué significa el alimento de Dios?</text:span></text:p>
          <text:list>
            <text:list-item>
              <text:p text:style-name="P30"><text:span text:style-name="Emphasis">Respuesta:</text:span> <text:span text:style-name="Strong_20_Emphasis">La palabra de Dios que da vida.</text:span> </text:p>
            </text:list-item>
          </text:list>
        </text:list-item>
        <text:list-item>
          <text:p text:style-name="P30"><text:span text:style-name="Strong_20_Emphasis">¿Qué es el alimento de Satanás?</text:span></text:p>
          <text:list>
            <text:list-item>
              <text:p text:style-name="P30"><text:span text:style-name="Emphasis">Respuesta:</text:span> <text:span text:style-name="Strong_20_Emphasis">Las mentiras que dan muerte espiritual.</text:span> </text:p>
            </text:list-item>
          </text:list>
        </text:list-item>
        <text:list-item>
          <text:p text:style-name="P30"><text:span text:style-name="Strong_20_Emphasis">¿Qué es la hambruna espiritual?</text:span></text:p>
          <text:list>
            <text:list-item>
              <text:p text:style-name="P30"><text:span text:style-name="Emphasis">Respuesta:</text:span> <text:span text:style-name="Strong_20_Emphasis">La falta de oír la palabra de Dios</text:span> (no recibir alimento, por lo tanto, tener hambre). </text:p>
            </text:list-item>
          </text:list>
        </text:list-item>
        <text:list-item>
          <text:p text:style-name="P30"><text:span text:style-name="Strong_20_Emphasis">¿Qué es el árbol de la vida y el árbol de la ciencia del bien y del mal?</text:span></text:p>
          <text:list>
            <text:list-item>
              <text:p text:style-name="P30"><text:span text:style-name="Emphasis">Respuesta:</text:span> El árbol de la vida es <text:span text:style-name="Strong_20_Emphasis">el pastor que tiene la palabra de Dios</text:span> (que da vida). El árbol de la ciencia del bien y del mal es <text:span text:style-name="Strong_20_Emphasis">el pastor de Satanás</text:span> (que da muerte). </text:p>
            </text:list-item>
          </text:list>
        </text:list-item>
        <text:list-item>
          <text:p text:style-name="P30"><text:span text:style-name="Strong_20_Emphasis">¿Quién es el siervo fiel y prudente?</text:span></text:p>
          <text:list>
            <text:list-item>
              <text:p text:style-name="P30"><text:span text:style-name="Emphasis">Respuesta:</text:span> <text:span text:style-name="Strong_20_Emphasis">El pastor verdadero</text:span> que tiene la palabra de verdad y da el alimento que necesitamos para renacer. </text:p>
            </text:list-item>
          </text:list>
        </text:list-item>
        <text:list-item>
          <text:p text:style-name="P30"><text:span text:style-name="Strong_20_Emphasis">¿Qué es el maná escondido (Apocalipsis)?</text:span></text:p>
          <text:list>
            <text:list-item>
              <text:p text:style-name="P30"><text:span text:style-name="Emphasis">Respuesta:</text:span> <text:span text:style-name="Strong_20_Emphasis">El alimento prometido al que vence</text:span>, lo que necesitamos comer en estos tiempos. </text:p>
            </text:list-item>
          </text:list>
        </text:list-item>
        <text:list-item>
          <text:p text:style-name="P30"><text:span text:style-name="Strong_20_Emphasis">Reflexión:</text:span> <text:span text:style-name="Emphasis">¿Habías pensado antes que escuchar era una forma de comer espiritualmente?</text:span></text:p>
          <text:list>
            <text:list-item>
              <text:p text:style-name="P29"><text:span text:style-name="Emphasis">Conclusión:</text:span> Debemos tener cuidado con lo que escuchamos (como Eva con la serpiente). Siempre debemos volver a la Biblia para chequear si lo que oímos está de acuerdo con Dios. </text:p>
            </text:list-item>
          </text:list>
        </text:list-item>
      </text:list>
      <text:p text:style-name="Text_20_body"><text:span text:style-name="Strong_20_Emphasis">Oración de apertura:</text:span></text:p>
      <text:p text:style-name="Quotations"><text:span text:style-name="Emphasis">"Santísimo Padre Dios, gracias por todo esto que tú nos has enseñado hasta hoy. Nos has enseñado que tu palabra es como alimento para nuestros espíritus. Muchos de nosotros nunca pensamos que tenemos que alimentar nuestro espíritu. Creíamos que si creíamos en ti, eso era suficiente, pero podemos ver que eso no es verdad. Así como el cuerpo necesita comida física, nuestro espíritu necesita ese alimento espiritual que nos hace crecer y ser más como tú. Dios, gracias por abrir nuestros ojos. Y también oramos por los estudiantes que no pueden venir por sus circunstancias; por favor, ayúdalos a </text:span><text:soft-page-break/><text:span text:style-name="Emphasis">conectarse y venir a estudiar. Oramos todo esto en el nombre de tu hijo Jesucristo. Amén."</text:span></text:p>
      <text:p text:style-name="Horizontal_20_Line"/>
      <text:h text:style-name="Heading_20_2" text:outline-level="2">🏫 2. Introducción: La Necesidad de Cambiar</text:h>
      <text:p text:style-name="Text_20_body"><text:span text:style-name="Emphasis">(A cargo del Instructor Sibiani)</text:span></text:p>
      <text:h text:style-name="Heading_20_3" text:outline-level="3">📌 La Actitud ante la Palabra</text:h>
      <text:p text:style-name="Text_20_body">Es muy agradable verlos con la cámara prendida y listos para recibir la palabra. Recuerden siempre: <text:span text:style-name="Strong_20_Emphasis">no solo vemos la Biblia por información, sino para vernos a nosotros mismos en ella</text:span> y dejar que nos guíe al reino de los cielos.</text:p>
      <text:h text:style-name="Heading_20_3" text:outline-level="3">📖 El Título de la Lección</text:h>
      <text:p text:style-name="Text_20_body">Leamos juntos dos veces:</text:p>
      <text:p text:style-name="Quotations"><text:span text:style-name="Strong_20_Emphasis">"Alimento y levadura en figurativo. Parte dos"</text:span></text:p>
      <text:p text:style-name="Text_20_body">Hoy vamos a ver más sobre <text:span text:style-name="Strong_20_Emphasis">levadura</text:span>. Siempre pensemos: <text:span text:style-name="Emphasis">¿Por qué Dios me está enseñando esto hoy? ¿Qué tiene que ver conmigo?</text:span></text:p>
      <text:list text:style-name="L16">
        <text:list-item>
          <text:p text:style-name="P31"><text:span text:style-name="Strong_20_Emphasis">Repaso rápido:</text:span> En la primera venida, el alimento a tiempo era la profecía y el cumplimiento del Antiguo Testamento. En la segunda venida (nuestro tiempo), es la <text:span text:style-name="Strong_20_Emphasis">profecía y el cumplimiento del Nuevo Testamento (Apocalipsis)</text:span>. </text:p>
        </text:list-item>
      </text:list>
      <text:p text:style-name="Horizontal_20_Line"/>
      <text:h text:style-name="Heading_20_2" text:outline-level="2">🍞 3. Características Físicas y Espirituales de la Levadura</text:h>
      <text:h text:style-name="Heading_20_3" text:outline-level="3">🥖 En el Mundo Físico</text:h>
      <text:p text:style-name="Text_20_body">¿Qué hace la levadura en el pan?</text:p>
      <text:list text:style-name="L17">
        <text:list-item>
          <text:p text:style-name="P33">Si no le aplicas levadura a la masa, al hornearla se vuelve plana, como una galleta o una croqueta. </text:p>
        </text:list-item>
        <text:list-item>
          <text:p text:style-name="P33">La levadura <text:span text:style-name="Strong_20_Emphasis">cambia la forma del pan</text:span>, lo infla, lo rellena y lo hace esponjoso. </text:p>
        </text:list-item>
        <text:list-item>
          <text:p text:style-name="P32"><text:span text:style-name="Strong_20_Emphasis">Característica principal:</text:span> La levadura <text:span text:style-name="Strong_20_Emphasis">transforma y cambia</text:span> algo para hacerlo mejor. </text:p>
        </text:list-item>
      </text:list>
      <text:h text:style-name="Heading_20_3" text:outline-level="3">🕊️ En el Mundo Espiritual</text:h>
      <text:p text:style-name="Text_20_body">Si la levadura física cambia la forma del pan, ¿qué debe hacer la levadura espiritual en nosotros?</text:p>
      <text:list text:style-name="L18">
        <text:list-item>
          <text:p text:style-name="P35"><text:span text:style-name="Strong_20_Emphasis">Tiene que hacernos cambiar.</text:span> </text:p>
        </text:list-item>
        <text:list-item>
          <text:p text:style-name="P34"><text:span text:style-name="Emphasis">Reflexión:</text:span> Todos queremos entrar al reino de los cielos, pero <text:span text:style-name="Strong_20_Emphasis">no podemos entrar tal y como estamos</text:span>. Tenemos que cambiar. La levadura espiritual es lo que nos ayuda a transformar nuestro espíritu para ser aptos para el cielo. </text:p>
        </text:list-item>
      </text:list>
      <text:p text:style-name="Horizontal_20_Line"/>
      <text:h text:style-name="Heading_20_2" text:outline-level="2"><text:soft-page-break/>📜 4. La Parábola de la Levadura</text:h>
      <text:p text:style-name="Text_20_body"><text:span text:style-name="Strong_20_Emphasis">Mateo 13:33</text:span></text:p>
      <text:p text:style-name="Quotations"><text:span text:style-name="Emphasis">"Otra parábola les dijo: El reino de los cielos es semejante a la levadura que tomó una mujer y escondió en tres medidas de harina, hasta que todo fue leudado".</text:span></text:p>
      <text:h text:style-name="Heading_20_3" text:outline-level="3">🔍 Análisis de los Elementos</text:h>
      <text:list text:style-name="L19">
        <text:list-item>
          <text:p text:style-name="P37"><text:span text:style-name="Strong_20_Emphasis">La Levadura:</text:span> El reino de los cielos es semejante a ella (enseñanzas que transforman). </text:p>
        </text:list-item>
        <text:list-item>
          <text:p text:style-name="P37"><text:span text:style-name="Strong_20_Emphasis">La Mujer:</text:span> ¿Quién es esta mujer?</text:p>
          <text:list>
            <text:list-item>
              <text:p text:style-name="P37"><text:span text:style-name="Strong_20_Emphasis">Gálatas 4:19:</text:span> <text:span text:style-name="Emphasis">"Hijitos míos, por quienes vuelvo a sufrir dolores de parto, hasta que Cristo sea formado en vosotros"</text:span>. </text:p>
            </text:list-item>
            <text:list-item>
              <text:p text:style-name="P37">Pablo no estaba pariendo físicamente. Espiritualmente, una <text:span text:style-name="Strong_20_Emphasis">mujer</text:span> representa a un <text:span text:style-name="Strong_20_Emphasis">pastor o una persona que recibe la semilla (la palabra) y la comparte</text:span>, generando "hijos" (santos, congregación) para Cristo. </text:p>
            </text:list-item>
          </text:list>
        </text:list-item>
        <text:list-item>
          <text:p text:style-name="P37"><text:span text:style-name="Strong_20_Emphasis">Las Tres Medidas de Harina:</text:span> Representan contenedores o el ámbito donde se esconde la levadura. </text:p>
        </text:list-item>
        <text:list-item>
          <text:p text:style-name="P36"><text:span text:style-name="Strong_20_Emphasis">El Resultado:</text:span> <text:span text:style-name="Emphasis">"Hasta que todo fue leudado"</text:span>. Hay un proceso de transformación hasta que el producto final es completo y agradable. </text:p>
        </text:list-item>
      </text:list>
      <text:p text:style-name="Horizontal_20_Line"/>
      <text:h text:style-name="Heading_20_2" text:outline-level="2">⚖️ 5. El Significado de la Levadura: Doctrinas y Enseñanzas</text:h>
      <text:p text:style-name="Text_20_body">Para entender qué es la levadura, veamos cómo Jesús la usó como advertencia:</text:p>
      <text:p text:style-name="Text_20_body"><text:span text:style-name="Strong_20_Emphasis">Mateo 16:6-12</text:span></text:p>
      <text:p text:style-name="Quotations"><text:span text:style-name="Emphasis">"Mirad, guardaos de la levadura de los fariseos y de los saduceos... Entonces entendieron que no les había dicho que se guardasen de la levadura del pan, sino de la doctrina de los fariseos y de los saduceos".</text:span></text:p>
      <text:list text:style-name="L20">
        <text:list-item>
          <text:p text:style-name="P39"><text:span text:style-name="Strong_20_Emphasis">El Error de los Discípulos:</text:span> Pensaron que Jesús hablaba de pan literal. </text:p>
        </text:list-item>
        <text:list-item>
          <text:p text:style-name="P39"><text:span text:style-name="Strong_20_Emphasis">La Corrección de Jesús:</text:span> La levadura representa <text:span text:style-name="Strong_20_Emphasis">las doctrinas, las enseñanzas y las palabras</text:span> que salen de una persona. </text:p>
        </text:list-item>
        <text:list-item>
          <text:p text:style-name="P38"><text:span text:style-name="Strong_20_Emphasis">Conclusión:</text:span> La levadura espiritual son <text:span text:style-name="Strong_20_Emphasis">enseñanzas morales y doctrinas</text:span> que tienen el poder de cambiarnos. </text:p>
        </text:list-item>
      </text:list>
      <text:p text:style-name="Horizontal_20_Line"/>
      <text:h text:style-name="Heading_20_2" text:outline-level="2">🧬 6. Los Dos Tipos de Levadura Espiritual</text:h>
      <text:p text:style-name="Text_20_body">Así como hay dos semillas y dos árboles, hay <text:span text:style-name="Strong_20_Emphasis">dos tipos de levadura (enseñanzas)</text:span>:</text:p>
      <text:h text:style-name="Heading_20_3" text:outline-level="3">✅ 1. La Levadura de Dios (Transformación a Su Imagen)</text:h>
      <text:p text:style-name="Text_20_body">Sus enseñanzas nos transforman a la imagen del Espíritu de Dios. <text:span text:style-name="Strong_20_Emphasis">Efesios 4:21-24</text:span></text:p>
      <text:p text:style-name="Quotations"><text:span text:style-name="Emphasis">"En cuanto a la pasada manera de vivir, despojaos del viejo hombre... y renovaos en el espíritu de vuestra mente, y vestíos del nuevo hombre, creado según Dios en la justicia y santidad de la verdad".</text:span></text:p>
      <text:list text:style-name="L21">
        <text:list-item>
          <text:p text:style-name="P41"><text:soft-page-break/><text:span text:style-name="Strong_20_Emphasis">El Viejo Hombre:</text:span> Nuestra pasada manera de vivir, viciada conforme a los deseos engañosos del mundo. </text:p>
        </text:list-item>
        <text:list-item>
          <text:p text:style-name="P41"><text:span text:style-name="Strong_20_Emphasis">El Nuevo Hombre:</text:span> Nuestro espíritu renovado por medio de las palabras de verdad (la levadura de Dios). </text:p>
        </text:list-item>
        <text:list-item>
          <text:p text:style-name="P40"><text:span text:style-name="Emphasis">Acción:</text:span> Debemos despojarnos de lo viejo y dejar que la palabra nos transforme en justicia y santidad. </text:p>
        </text:list-item>
      </text:list>
      <text:h text:style-name="Heading_20_3" text:outline-level="3">❌ 2. La Levadura de Satanás (Transformación a su Imagen)</text:h>
      <text:p text:style-name="Text_20_body">Sus enseñanzas nos hacen divagar y nos transforman a imagen de Satanás. Debemos aprender a identificarla para no recibirla.</text:p>
      <text:list text:style-name="L22">
        <text:list-item>
          <text:p text:style-name="P43"><text:span text:style-name="Strong_20_Emphasis">Proverbios 19:27:</text:span> <text:span text:style-name="Emphasis">"Cesa, hijo mío, de oír las enseñanzas que te hacen divagar de las razones de sabiduría".</text:span></text:p>
          <text:list>
            <text:list-item>
              <text:p text:style-name="P43">Dios nos pide que nos detengamos y dejemos de recibir enseñanzas que no provienen de Él. </text:p>
            </text:list-item>
          </text:list>
        </text:list-item>
        <text:list-item>
          <text:p text:style-name="P43"><text:span text:style-name="Strong_20_Emphasis">Apocalipsis 2:14-15:</text:span> <text:span text:style-name="Emphasis">"Tengo pocas cosas contra ti: que tienes ahí a los que retienen la doctrina de Balaam... y también los que retienen las doctrinas de los nicolaítas".</text:span></text:p>
          <text:list>
            <text:list-item>
              <text:p text:style-name="P43">Estas doctrinas ponían tropiezo al pueblo de Dios (enseñando a comer cosas sacrificadas a ídolos y cometer fornicación). Son enseñanzas de Satanás que el pueblo de Dios está volviendo a recibir. </text:p>
            </text:list-item>
          </text:list>
        </text:list-item>
        <text:list-item>
          <text:p text:style-name="P43"><text:span text:style-name="Strong_20_Emphasis">Marcos 7:6-7 / Isaías 29:13:</text:span> <text:span text:style-name="Emphasis">"Este pueblo de labios me honra, mas su corazón está lejos de mí. Pues en vano me honran, enseñando como doctrinas mandamientos de hombres".</text:span></text:p>
          <text:list>
            <text:list-item>
              <text:p text:style-name="P43"><text:span text:style-name="Strong_20_Emphasis">El Peligro:</text:span> Personas que hacen muchas cosas "para Dios" (honran de labios), pero su corazón está lejos porque siguen <text:span text:style-name="Strong_20_Emphasis">tradiciones y mandamientos de hombres</text:span> en lugar de la palabra pura de Dios. </text:p>
            </text:list-item>
            <text:list-item>
              <text:p text:style-name="P42"><text:span text:style-name="Emphasis">Ejemplo de la Primera Venida:</text:span> Los fariseos parecían muy religiosos, tenían templos hermosos y enseñaban la ley, pero su levadura era humana. Por eso Jesús los llamó "hipócritas" y "generación de víboras" (su fruto era veneno). </text:p>
            </text:list-item>
          </text:list>
        </text:list-item>
      </text:list>
      <text:p text:style-name="Horizontal_20_Line"/>
      <text:h text:style-name="Heading_20_2" text:outline-level="2">🎯 7. La Realidad y Cómo Escoger Nuestra Levadura</text:h>
      <text:h text:style-name="Heading_20_3" text:outline-level="3">🌍 La Realidad en la Primera Venida</text:h>
      <text:list text:style-name="L23">
        <text:list-item>
          <text:p text:style-name="P45"><text:span text:style-name="Strong_20_Emphasis">Levadura de Dios:</text:span> Las palabras de verdad y enseñanzas de <text:span text:style-name="Strong_20_Emphasis">Jesús y los 12 discípulos</text:span>. </text:p>
        </text:list-item>
        <text:list-item>
          <text:p text:style-name="P45"><text:span text:style-name="Strong_20_Emphasis">Levadura de Satanás:</text:span> Las falsedades, tradiciones y enseñanzas de los <text:span text:style-name="Strong_20_Emphasis">escribas y fariseos</text:span>. </text:p>
        </text:list-item>
        <text:list-item>
          <text:p text:style-name="P44"><text:span text:style-name="Emphasis">Reflexión:</text:span> A los ojos humanos, los fariseos se veían "mejor" (más ricos, más poderosos, más religiosos). Pero Job 34:3 dice que <text:span text:style-name="Emphasis">"el oído prueba las palabras"</text:span>. Debemos discernir no por lo físico, sino por la palabra. </text:p>
        </text:list-item>
      </text:list>
      <text:h text:style-name="Heading_20_3" text:outline-level="3">🛡️ Nuestras Conclusiones y Deberes</text:h>
      <text:list text:style-name="L24">
        <text:list-item>
          <text:p text:style-name="P47"><text:span text:style-name="Strong_20_Emphasis">Comer la Palabra de Verdad:</text:span> Los creyentes deben escuchar y comer la palabra de Dios para alcanzar la vida eterna. </text:p>
        </text:list-item>
        <text:list-item>
          <text:p text:style-name="P47"><text:span text:style-name="Strong_20_Emphasis">Comer el Alimento a Tiempo:</text:span> Si creemos en el Nuevo Testamento, debemos comer el alimento que da testimonio de las <text:span text:style-name="Strong_20_Emphasis">profecías de Apocalipsis y su realidad/cumplimiento</text:span>. </text:p>
        </text:list-item>
        <text:list-item>
          <text:p text:style-name="P47"><text:soft-page-break/><text:span text:style-name="Strong_20_Emphasis">Recibir la Levadura de Dios:</text:span> Para llegar a ser santos del cielo, debemos recibir las enseñanzas del pastor enviado por Dios y permitir que nuestro ser interior sea <text:span text:style-name="Strong_20_Emphasis">transformado a la imagen de Dios</text:span>.</text:p>
          <text:list>
            <text:list-item>
              <text:p text:style-name="P46"><text:span text:style-name="Emphasis">Advertencia:</text:span> No hagamos otras cosas mientras escuchamos la clase. Estamos frente a la Palabra, y la Palabra es Dios (Juan 1:1). Necesitamos una actitud de respeto total. </text:p>
            </text:list-item>
          </text:list>
        </text:list-item>
      </text:list>
      <text:p text:style-name="Text_20_body"><text:span text:style-name="Strong_20_Emphasis">📢 Anuncio para la Próxima Lección:</text:span> La próxima vez aprenderemos sobre otros tres elementos en figurativo: <text:span text:style-name="Strong_20_Emphasis">Copa, Balanza y Vara</text:span>.</text:p>
      <text:list text:style-name="L25">
        <text:list-item>
          <text:p text:style-name="P48"><text:span text:style-name="Emphasis">Pista para reflexionar:</text:span> En Apocalipsis 16 vemos las "copas de la ira de Dios". ¿Dónde se contiene la ira de Dios? ¿Hacia quién se derrama? ¡Prepárense para estudiar! </text:p>
        </text:list-item>
      </text:list>
      <text:p text:style-name="Horizontal_20_Line"/>
      <text:h text:style-name="Heading_20_2" text:outline-level="2">🔄 8. Repaso Final Interactivo y Oración de Cierre</text:h>
      <text:p text:style-name="Text_20_body"><text:span text:style-name="Emphasis">(A cargo del Evangelista Christian Howard)</text:span></text:p>
      <text:p text:style-name="Text_20_body"><text:span text:style-name="Strong_20_Emphasis">Resumen Interactivo con los Estudiantes:</text:span></text:p>
      <text:list text:style-name="L26">
        <text:list-item>
          <text:p text:style-name="P50"><text:span text:style-name="Strong_20_Emphasis">¿Cuántas levaduras hay?</text:span></text:p>
          <text:list>
            <text:list-item>
              <text:p text:style-name="P50"><text:span text:style-name="Emphasis">Respuesta:</text:span> <text:span text:style-name="Strong_20_Emphasis">Dos.</text:span> La levadura de Dios (da vida/transforma a Su imagen) y la levadura de Satanás (da muerte/transforma a su imagen). </text:p>
            </text:list-item>
          </text:list>
        </text:list-item>
        <text:list-item>
          <text:p text:style-name="P50"><text:span text:style-name="Strong_20_Emphasis">¿Cuál es la importancia de entender la levadura espiritual?</text:span></text:p>
          <text:list>
            <text:list-item>
              <text:p text:style-name="P50"><text:span text:style-name="Emphasis">Respuesta:</text:span> <text:span text:style-name="Strong_20_Emphasis">Porque la levadura nos transforma.</text:span> Nos recuerda que tenemos que renacer, quitar nuestros pensamientos viejos y cambiar para entrar al cielo. </text:p>
            </text:list-item>
          </text:list>
        </text:list-item>
        <text:list-item>
          <text:p text:style-name="P50"><text:span text:style-name="Strong_20_Emphasis">¿Qué evidencia muestra que una persona está recibiendo la levadura de Dios?</text:span></text:p>
          <text:list>
            <text:list-item>
              <text:p text:style-name="P49"><text:span text:style-name="Emphasis">Respuesta:</text:span> <text:span text:style-name="Strong_20_Emphasis">El cambio.</text:span> Abandonar el "viejo hombre" y dejar que la semilla y el alimento de Dios nos transformen. Todo el lenguaje figurativo (árbol, levadura, semilla) está conectado: todo busca que cambiemos y seamos transformados por la verdad. </text:p>
            </text:list-item>
          </text:list>
        </text:list-item>
      </text:list>
      <text:p text:style-name="Text_20_body"><text:span text:style-name="Strong_20_Emphasis">📢 Recordatorio Logístico:</text:span></text:p>
      <text:list text:style-name="L27">
        <text:list-item>
          <text:p text:style-name="P52">Por favor, cambien sus nombres en Zoom para incluir su número de participante para la asistencia. </text:p>
        </text:list-item>
        <text:list-item>
          <text:p text:style-name="P51">Soliciten los videos (Vimeo) a la persona que los invitó para repasar diariamente. ¡No dejen pasar un día sin repasar al menos un versículo o concepto! </text:p>
        </text:list-item>
      </text:list>
      <text:p text:style-name="Text_20_body"><text:span text:style-name="Strong_20_Emphasis">Oración de Cierre (El Padre Nuestro):</text:span></text:p>
      <text:p text:style-name="Quotations"><text:span text:style-name="Emphasis">"Padre nuestro que estás en los cielos, santificado sea tu nombre. Venga a nosotros tu reino. Hágase tu voluntad en la tierra como en el cielo. Danos hoy nuestro pan de cada día. Perdona nuestras ofensas, como también nosotros perdonamos a los que nos ofenden. No nos dejes caer en la tentación, mas líbranos del mal. Porque tuyo es el reino, el poder y la gloria, por los siglos de los siglos. Amén."</text:span></text:p>
      <text:p text:style-name="Text_20_body">¡Gracias a todos! Cuídense, sigan estudiando y llénense de esta levadura santa de Dios. ¡Nos vemos la próxima seman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6-19T10:28:50.409807505</dc:date>
    <meta:editing-duration>PT2M20S</meta:editing-duration>
    <meta:editing-cycles>2</meta:editing-cycles>
    <meta:generator>LibreOffice/24.2.7.2$Linux_X86_64 LibreOffice_project/420$Build-2</meta:generator>
    <meta:document-statistic meta:table-count="0" meta:image-count="0" meta:object-count="0" meta:page-count="5" meta:paragraph-count="102" meta:word-count="1794" meta:character-count="10413" meta:non-whitespace-character-count="8736"/>
  </office:meta>
</office:document-meta>
</file>