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Horizontal_20_Line">
      <style:text-properties style:font-name="Padauk Book"/>
    </style:style>
    <style:style style:name="P6" style:family="paragraph" style:parent-style-name="Heading_20_1">
      <style:text-properties style:font-name="Padauk Book"/>
    </style:style>
    <style:style style:name="P7" style:family="paragraph" style:parent-style-name="Heading_20_2">
      <style:text-properties style:font-name="Padauk Book"/>
    </style:style>
    <style:style style:name="P8" style:family="paragraph" style:parent-style-name="Heading_20_3">
      <style:text-properties style:font-name="Padauk Book"/>
    </style:style>
    <style:style style:name="P9" style:family="paragraph" style:parent-style-name="Heading_20_4">
      <style:text-properties style:font-name="Padauk Book"/>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3"/>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4"/>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8"/>
    <style:style style:name="P43" style:family="paragraph" style:parent-style-name="Text_20_body" style:list-style-name="L18">
      <style:paragraph-properties fo:margin-top="0cm" fo:margin-bottom="0cm" style:contextual-spacing="false"/>
    </style:style>
    <style:style style:name="P44" style:family="paragraph" style:parent-style-name="Text_20_body" style:list-style-name="L19"/>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2"/>
    <style:style style:name="P51" style:family="paragraph" style:parent-style-name="Text_20_body" style:list-style-name="L22">
      <style:paragraph-properties fo:margin-top="0cm" fo:margin-bottom="0cm" style:contextual-spacing="false"/>
    </style:style>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P54" style:family="paragraph" style:parent-style-name="Text_20_body" style:list-style-name="L24"/>
    <style:style style:name="P55" style:family="paragraph" style:parent-style-name="Text_20_body" style:list-style-name="L24">
      <style:paragraph-properties fo:margin-top="0cm" fo:margin-bottom="0cm" style:contextual-spacing="false"/>
    </style:style>
    <style:style style:name="P56" style:family="paragraph" style:parent-style-name="Text_20_body" style:list-style-name="L25"/>
    <style:style style:name="P57" style:family="paragraph" style:parent-style-name="Text_20_body" style:list-style-name="L25">
      <style:paragraph-properties fo:margin-top="0cm" fo:margin-bottom="0cm" style:contextual-spacing="false"/>
    </style:style>
    <style:style style:name="P58" style:family="paragraph" style:parent-style-name="Text_20_body" style:list-style-name="L26"/>
    <style:style style:name="P59" style:family="paragraph" style:parent-style-name="Text_20_body" style:list-style-name="L26">
      <style:paragraph-properties fo:margin-top="0cm" fo:margin-bottom="0cm" style:contextual-spacing="false"/>
    </style:style>
    <style:style style:name="P60" style:family="paragraph" style:parent-style-name="Text_20_body" style:list-style-name="L27"/>
    <style:style style:name="P61" style:family="paragraph" style:parent-style-name="Text_20_body" style:list-style-name="L27">
      <style:paragraph-properties fo:margin-top="0cm" fo:margin-bottom="0cm" style:contextual-spacing="false"/>
    </style:style>
    <style:style style:name="P62" style:family="paragraph" style:parent-style-name="Text_20_body" style:list-style-name="L28"/>
    <style:style style:name="P63" style:family="paragraph" style:parent-style-name="Text_20_body" style:list-style-name="L28">
      <style:paragraph-properties fo:margin-top="0cm" fo:margin-bottom="0cm" style:contextual-spacing="false"/>
    </style:style>
    <style:style style:name="P64" style:family="paragraph" style:parent-style-name="Text_20_body" style:list-style-name="L29"/>
    <style:style style:name="P65" style:family="paragraph" style:parent-style-name="Text_20_body" style:list-style-name="L29">
      <style:paragraph-properties fo:margin-top="0cm" fo:margin-bottom="0cm" style:contextual-spacing="false"/>
    </style:style>
    <style:style style:name="P66" style:family="paragraph" style:parent-style-name="Text_20_body" style:list-style-name="L30"/>
    <style:style style:name="P67" style:family="paragraph" style:parent-style-name="Text_20_body" style:list-style-name="L30">
      <style:paragraph-properties fo:margin-top="0cm" fo:margin-bottom="0cm" style:contextual-spacing="false"/>
    </style:style>
    <style:style style:name="P68" style:family="paragraph" style:parent-style-name="Text_20_body" style:list-style-name="L31"/>
    <style:style style:name="P69" style:family="paragraph" style:parent-style-name="Text_20_body" style:list-style-name="L31">
      <style:paragraph-properties fo:margin-top="0cm" fo:margin-bottom="0cm" style:contextual-spacing="false"/>
    </style:style>
    <style:style style:name="P70" style:family="paragraph" style:parent-style-name="Text_20_body" style:list-style-name="L32"/>
    <style:style style:name="P71" style:family="paragraph" style:parent-style-name="Text_20_body" style:list-style-name="L32">
      <style:paragraph-properties fo:margin-top="0cm" fo:margin-bottom="0cm" style:contextual-spacing="false"/>
    </style:style>
    <style:style style:name="P72" style:family="paragraph" style:parent-style-name="Text_20_body" style:list-style-name="L33"/>
    <style:style style:name="P73" style:family="paragraph" style:parent-style-name="Text_20_body" style:list-style-name="L33">
      <style:paragraph-properties fo:margin-top="0cm" fo:margin-bottom="0cm" style:contextual-spacing="false"/>
    </style:style>
    <style:style style:name="P74" style:family="paragraph" style:parent-style-name="Text_20_body" style:list-style-name="L34"/>
    <style:style style:name="P75" style:family="paragraph" style:parent-style-name="Text_20_body" style:list-style-name="L34">
      <style:paragraph-properties fo:margin-top="0cm" fo:margin-bottom="0cm" style:contextual-spacing="false"/>
    </style:style>
    <style:style style:name="P76" style:family="paragraph" style:parent-style-name="Text_20_body" style:list-style-name="L35"/>
    <style:style style:name="P77" style:family="paragraph" style:parent-style-name="Text_20_body" style:list-style-name="L35">
      <style:paragraph-properties fo:margin-top="0cm" fo:margin-bottom="0cm" style:contextual-spacing="false"/>
    </style:style>
    <style:style style:name="P78" style:family="paragraph" style:parent-style-name="Text_20_body" style:list-style-name="L36"/>
    <style:style style:name="P79" style:family="paragraph" style:parent-style-name="Text_20_body" style:list-style-name="L36">
      <style:paragraph-properties fo:margin-top="0cm" fo:margin-bottom="0cm" style:contextual-spacing="false"/>
    </style:style>
    <style:style style:name="P80" style:family="paragraph" style:parent-style-name="Text_20_body" style:list-style-name="L37"/>
    <style:style style:name="P81" style:family="paragraph" style:parent-style-name="Text_20_body" style:list-style-name="L37">
      <style:paragraph-properties fo:margin-top="0cm" fo:margin-bottom="0cm" style:contextual-spacing="false"/>
    </style:style>
    <style:style style:name="P82" style:family="paragraph" style:parent-style-name="Text_20_body" style:list-style-name="L38"/>
    <style:style style:name="P83" style:family="paragraph" style:parent-style-name="Text_20_body" style:list-style-name="L38">
      <style:paragraph-properties fo:margin-top="0cm" fo:margin-bottom="0cm" style:contextual-spacing="false"/>
    </style:style>
    <style:style style:name="P84" style:family="paragraph" style:parent-style-name="Text_20_body">
      <style:text-properties style:font-name="Padauk Book"/>
    </style:style>
    <style:style style:name="P85" style:family="paragraph" style:parent-style-name="Text_20_body" style:list-style-name="L39">
      <style:paragraph-properties fo:margin-top="0cm" fo:margin-bottom="0cm" style:contextual-spacing="false"/>
      <style:text-properties style:font-name="Padauk Book"/>
    </style:style>
    <style:style style:name="P86" style:family="paragraph" style:parent-style-name="Text_20_body" style:list-style-name="L39">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CUADERNO DE ESTUDIO: LECCIÓN 9 (PARTE 1)</text:h>
      <text:h text:style-name="P1" text:outline-level="2">Tesoro y Hombre Rico en Lenguaje Figurativo</text:h>
      <text:p text:style-name="P3"/>
      <text:h text:style-name="P1" text:outline-level="2">🔄 1. Repaso Inicial y Mini-Quiz de Retención</text:h>
      <text:p text:style-name="Text_20_body"><text:span text:style-name="Emphasis"><text:span text:style-name="T1">(A cargo del Evangelista Christian Howard)</text:span></text:span></text:p>
      <text:p text:style-name="P4">Antes de comenzar la nueva lección, repasamos los conceptos fundamentales de la lección anterior sobre luz, candelero, ciegos, sordos y vestido de boda:</text:p>
      <text:p text:style-name="Text_20_body"><text:span text:style-name="Strong_20_Emphasis"><text:span text:style-name="T1">Preguntas de Reflexión y Respuestas:</text:span></text:span></text:p>
      <text:list text:style-name="L13">
        <text:list-item>
          <text:p text:style-name="P35"><text:span text:style-name="Strong_20_Emphasis"><text:span text:style-name="T1">¿Qué es lo que realmente no entiende un ciego y sordo espiritual?</text:span></text:span></text:p>
          <text:list>
            <text:list-item>
              <text:p text:style-name="P35"><text:span text:style-name="Emphasis"><text:span text:style-name="T1">Respuesta:</text:span></text:span><text:span text:style-name="T1"> </text:span><text:span text:style-name="Strong_20_Emphasis"><text:span text:style-name="T1">A) El verdadero significado y cumplimiento de la profecía.</text:span></text:span><text:span text:style-name="T1"> (Pueden ver y oír la palabra, pero no la entienden). </text:span></text:p>
            </text:list-item>
          </text:list>
        </text:list-item>
        <text:list-item>
          <text:p text:style-name="P35"><text:span text:style-name="Strong_20_Emphasis"><text:span text:style-name="T1">¿Cuál es la ropa que debemos usar para ir al cielo?</text:span></text:span></text:p>
          <text:list>
            <text:list-item>
              <text:p text:style-name="P34"><text:span text:style-name="Emphasis"><text:span text:style-name="T1">Respuesta:</text:span></text:span><text:span text:style-name="T1"> </text:span><text:span text:style-name="Strong_20_Emphasis"><text:span text:style-name="T1">El vestido de boda / lino fino</text:span></text:span><text:span text:style-name="T1">, que representa las </text:span><text:span text:style-name="Strong_20_Emphasis"><text:span text:style-name="T1">acciones justas ante los ojos de Dios</text:span></text:span><text:span text:style-name="T1">, logradas al lavar nuestro corazón y doctrinas con la sangre del Cordero (la Palabra de verdad).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traernos aquí. Gracias por abrir nuestros ojos para que no seamos ciegos. Gracias por ayudarnos para no ser sordos a tu palabra. Dios, siempre queremos seguirte y entenderte. Muchos de nosotros hemos tratado de entenderte con nuestros propios pensamientos y vemos que esto es malo. Esto nos está llevando a la destrucción. Entonces, Dios, gracias por guiarnos acá, gracias por enseñarnos tus verdades, gracias por abrir nuestros ojos espiritualmente. Dios, oramos para que mandes tus espíritus santos, que vengan a todos nuestros miembros, que abran más nuestros corazones, que quiten esos sedimentos que tenemos, que abran más nuestros ojos para que no seamos ciegos. Dios, de verdad, gracias por todo. Y también ayuda a nuestros hermanos y hermanas que no pueden venir por circunstancias en la vida. Por favor, quita esas espinas de sus corazones, quita esas preocupaciones, Dios, que ellos puedan venir y escuchar más tu palabra día tras día. Dios, sabemos que solo tú sabes qué hay en nuestros corazones, sabemos que tú eres el único que nos guía y </text:span></text:span><text:soft-page-break/><text:span text:style-name="Emphasis"><text:span text:style-name="T1">estamos tan agradecidos. Dios, gracias por todo y oramos todo esto en tu nombre Jesucristo. Amén."</text:span></text:span></text:p>
      <text:p text:style-name="P3"/>
      <text:h text:style-name="P1" text:outline-level="2">🏫 2. Introducción a la Lección: ¿Qué es un Tesoro?</text:h>
      <text:p text:style-name="Text_20_body"><text:span text:style-name="Emphasis"><text:span text:style-name="T1">(A cargo del Instructor Sibiani)</text:span></text:span></text:p>
      <text:h text:style-name="P2" text:outline-level="3">📌 La Actitud ante la Palabra</text:h>
      <text:p text:style-name="P4">Es muy agradable verlos a todos presentes, listos para recibir otra vez la palabra. Espero que estén repasando y estudiando mucho las lecciones. Todo se olvida si no repasamos. Satanás quiere llevarse esa semilla muy lejos de nuestro corazón.</text:p>
      <text:h text:style-name="P2" text:outline-level="3">📖 El Título de la Lección</text:h>
      <text:p text:style-name="P4">Leamos juntos dos veces:</text:p>
      <text:p text:style-name="Quotations"><text:span text:style-name="Strong_20_Emphasis"><text:span text:style-name="T1">"Tesoro y hombre rico en figurativo"</text:span></text:span></text:p>
      <text:p text:style-name="Text_20_body"><text:span text:style-name="T1">Hoy vamos a ver sobre </text:span><text:span text:style-name="Strong_20_Emphasis"><text:span text:style-name="T1">tesoro</text:span></text:span><text:span text:style-name="T1"> y </text:span><text:span text:style-name="Strong_20_Emphasis"><text:span text:style-name="T1">hombre rico</text:span></text:span><text:span text:style-name="T1">. </text:span></text:p>
      <text:list text:style-name="L14">
        <text:list-item>
          <text:p text:style-name="P37"><text:span text:style-name="Emphasis"><text:span text:style-name="T1">Reflexión:</text:span></text:span><text:span text:style-name="T1"> ¿Qué es un tesoro? Cuando hablamos de tesoro, estamos hablando de cosas valiosas: piedras preciosas, plata, oro, cosas que tienen mucho valor. </text:span></text:p>
        </text:list-item>
        <text:list-item>
          <text:p text:style-name="P36"><text:span text:style-name="Emphasis"><text:span text:style-name="T1">Pregunta clave:</text:span></text:span><text:span text:style-name="T1"> ¿Qué clase de contenidos vamos a ver? ¿Por qué Dios está comparando cosas con tesoros? ¿Qué es un tesoro para mí? ¿Qué sería un tesoro para Dios también? </text:span></text:p>
        </text:list-item>
      </text:list>
      <text:h text:style-name="P2" text:outline-level="3">💎 Tesoros en la Biblia</text:h>
      <text:p text:style-name="P4">De hecho, incluso en la Biblia hay muchos tesoros. Habla muchas veces sobre tesoros. Tal vez hay tesoros físicos, pero también hay tesoros más espirituales.</text:p>
      <text:list text:style-name="L15">
        <text:list-item>
          <text:p text:style-name="P38"><text:span text:style-name="Strong_20_Emphasis"><text:span text:style-name="T1">Ejemplo:</text:span></text:span><text:span text:style-name="T1"> Cuando Jesús habló sobre parábolas, especialmente respecto al reino de los cielos, ¿cómo se refiere al reino de los cielos? Como oro, plata y muchas de este tipo de cosas. Como perlas, como tesoros en un campo. </text:span></text:p>
        </text:list-item>
      </text:list>
      <text:p text:style-name="P3"/>
      <text:h text:style-name="P1" text:outline-level="2"><text:soft-page-break/>🤔 3. Preguntas Existenciales sobre el Reino de los Cielos</text:h>
      <text:h text:style-name="P2" text:outline-level="3">🏰 ¿Qué es el Reino de los Cielos?</text:h>
      <text:p text:style-name="P4">Muchas personas tienen ideas diferentes sobre el reino de los cielos:</text:p>
      <text:list text:style-name="L16">
        <text:list-item>
          <text:p text:style-name="P39"><text:span text:style-name="Emphasis"><text:span text:style-name="T1">Testimonio común:</text:span></text:span><text:span text:style-name="T1"> "Yo fui al reino de los cielos en sueño, en visión. Me llevó Jesucristo al cielo. Todo es como un castillo muy grande, hay otros castillos más pequeños, muchas casas alrededor. Las calles son de oro y de cristal. Jesús me dijo: '¿Ves aquella casa de allá? Esa es tu casa'." </text:span></text:p>
        </text:list-item>
      </text:list>
      <text:h text:style-name="P2" text:outline-level="3">🌟 La Realidad Espiritual vs. La Imaginación Física</text:h>
      <text:p text:style-name="P4">Muchas personas, cuando leen la Biblia, piensan las cosas de una manera muy física: oro, plata, riquezas. </text:p>
      <text:list text:style-name="L17">
        <text:list-item>
          <text:p text:style-name="P41"><text:span text:style-name="Emphasis"><text:span text:style-name="T1">Imagen común:</text:span></text:span><text:span text:style-name="T1"> Un castillo bonito, reluciente, calles de oro, todo flotando en nubes. </text:span></text:p>
        </text:list-item>
        <text:list-item>
          <text:p text:style-name="P41"><text:span text:style-name="Emphasis"><text:span text:style-name="T1">La Verdad:</text:span></text:span><text:span text:style-name="T1"> Cuando Dios y Jesús hablan sobre el reino de los cielos, </text:span><text:span text:style-name="Strong_20_Emphasis"><text:span text:style-name="T1">no están hablando de tesoros físicos</text:span></text:span><text:span text:style-name="T1">. </text:span></text:p>
        </text:list-item>
        <text:list-item>
          <text:p text:style-name="P40"><text:span text:style-name="Emphasis"><text:span text:style-name="T1">Contradicción aparente:</text:span></text:span><text:span text:style-name="T1"> La Biblia dice que </text:span><text:span text:style-name="Strong_20_Emphasis"><text:span text:style-name="T1">no nos hagamos tesoros en la tierra</text:span></text:span><text:span text:style-name="T1"> (Mateo 6:19). Pero si no debemos hacernos tesoros en la tierra, entonces, ¿por qué hay tanto tesoro en el cielo? ¿A Dios no le interesa el oro, pero allá en el cielo todo está hecho de oro? </text:span></text:p>
        </text:list-item>
      </text:list>
      <text:p text:style-name="P3"/>
      <text:h text:style-name="P1" text:outline-level="2">📜 4. El Versículo Principal: La Carta a Laodicea</text:h>
      <text:p text:style-name="Text_20_body"><text:span text:style-name="Strong_20_Emphasis"><text:span text:style-name="T1">Apocalipsis 3:17-18</text:span></text:span></text:p>
      <text:p text:style-name="Quotations"><text:span text:style-name="Emphasis"><text:span text:style-name="T1">"Porque tú dices: 'Yo soy rico y me he enriquecido, y de ninguna cosa tengo necesidad'. Y no sabes que tú eres un desventurado, miserable, pobre, ciego y desnudo. Por tanto, yo te aconsejo que de mí compres oro refinado en fuego para que seas rico, y vestiduras blancas para vestirte y que no se descubra la vergüenza de tu desnudez; y unge tus ojos con colirio para que veas".</text:span></text:span></text:p>
      <text:h text:style-name="P2" text:outline-level="3">🔍 Análisis del Pasaje</text:h>
      <text:p text:style-name="P4">Este pasaje es parte de las cartas que Jesús envía a las iglesias en Apocalipsis 2 y 3.</text:p>
      <text:h text:style-name="Heading_20_4" text:outline-level="4"><text:soft-page-break/><text:span text:style-name="T1">1. </text:span><text:span text:style-name="Strong_20_Emphasis"><text:span text:style-name="T1">El Mensajero de Laodicea</text:span></text:span></text:h>
      <text:list text:style-name="L18">
        <text:list-item>
          <text:p text:style-name="P43"><text:span text:style-name="Strong_20_Emphasis"><text:span text:style-name="T1">Lo que dice:</text:span></text:span><text:span text:style-name="T1"> "Yo soy rico y me he enriquecido, y de ninguna cosa tengo necesidad." </text:span></text:p>
        </text:list-item>
        <text:list-item>
          <text:p text:style-name="P43"><text:span text:style-name="Strong_20_Emphasis"><text:span text:style-name="T1">La realidad espiritual:</text:span></text:span><text:span text:style-name="T1"> "Y no sabes que tú eres un desventurado, miserable, pobre, ciego y desnudo." </text:span></text:p>
        </text:list-item>
        <text:list-item>
          <text:p text:style-name="P42"><text:span text:style-name="Emphasis"><text:span text:style-name="T1">Reflexión:</text:span></text:span><text:span text:style-name="T1"> ¿Cómo puede una persona no darse cuenta que está desnuda o ciega? Porque no está hablando de una ceguera física o una desnudez física. Está hablando de una </text:span><text:span text:style-name="Strong_20_Emphasis"><text:span text:style-name="T1">ceguera y desnudez espiritual</text:span></text:span><text:span text:style-name="T1">, porque no se están dando cuenta. </text:span></text:p>
        </text:list-item>
      </text:list>
      <text:h text:style-name="Heading_20_4" text:outline-level="4"><text:span text:style-name="T1">2. </text:span><text:span text:style-name="Strong_20_Emphasis"><text:span text:style-name="T1">El Consejo de Jesús</text:span></text:span></text:h>
      <text:list text:style-name="L19">
        <text:list-item>
          <text:p text:style-name="P45"><text:span text:style-name="Strong_20_Emphasis"><text:span text:style-name="T1">"Compra oro refinado en fuego":</text:span></text:span><text:span text:style-name="T1"> Para que seas rico. </text:span></text:p>
        </text:list-item>
        <text:list-item>
          <text:p text:style-name="P45"><text:span text:style-name="Strong_20_Emphasis"><text:span text:style-name="T1">"Vestiduras blancas":</text:span></text:span><text:span text:style-name="T1"> Para vestirte y que no se descubra la vergüenza de tu desnudez. </text:span></text:p>
        </text:list-item>
        <text:list-item>
          <text:p text:style-name="P44"><text:span text:style-name="Strong_20_Emphasis"><text:span text:style-name="T1">"Colirio":</text:span></text:span><text:span text:style-name="T1"> Para ungir tus ojos y que veas. </text:span></text:p>
        </text:list-item>
      </text:list>
      <text:h text:style-name="P2" text:outline-level="3">💡 La Diferencia entre Riqueza Física y Espiritual</text:h>
      <text:list text:style-name="L20">
        <text:list-item>
          <text:p text:style-name="P47"><text:span text:style-name="Strong_20_Emphasis"><text:span text:style-name="T1">Riqueza física:</text:span></text:span><text:span text:style-name="T1"> Es cuantificable. Si tienes millones de dólares, eres millonario. Si no tienes nada, eres pobre. </text:span></text:p>
        </text:list-item>
        <text:list-item>
          <text:p text:style-name="P46"><text:span text:style-name="Strong_20_Emphasis"><text:span text:style-name="T1">Riqueza espiritual:</text:span></text:span><text:span text:style-name="T1"> Esta persona cree que es rica, pero realmente no lo es. Le falta un tipo de oro más importante. Tiene mucho oro (enseñanzas humanas, tradiciones), pero no el que Jesús quiere que tenga. </text:span></text:p>
        </text:list-item>
      </text:list>
      <text:p text:style-name="P3"/>
      <text:h text:style-name="P1" text:outline-level="2">✨ 5. Características del Tesoro: Físico y Espiritual</text:h>
      <text:h text:style-name="P2" text:outline-level="3">🏦 Características Físicas del Tesoro</text:h>
      <text:p text:style-name="P4">Cuando hablamos de tesoro (oro, plata, perlas, diamantes, piedras preciosas), tiene características específicas:</text:p>
      <text:list text:style-name="L21">
        <text:list-item>
          <text:p text:style-name="P49"><text:span text:style-name="Strong_20_Emphasis"><text:span text:style-name="T1">Es precioso y valioso:</text:span></text:span><text:span text:style-name="T1"> Lo consideramos algo muy importante. Nos hace felices porque facilita nuestra vida. </text:span></text:p>
        </text:list-item>
        <text:list-item>
          <text:p text:style-name="P49"><text:span text:style-name="Strong_20_Emphasis"><text:span text:style-name="T1">Es raro (escaso):</text:span></text:span><text:span text:style-name="T1"> No es normal encontrar oro, diamantes, plata. Por eso es que no cambia. </text:span></text:p>
        </text:list-item>
        <text:list-item>
          <text:p text:style-name="P49"><text:span text:style-name="Strong_20_Emphasis"><text:span text:style-name="T1">No se devalúa:</text:span></text:span><text:span text:style-name="T1"> Sus propiedades no cambian. El valor del oro nunca cambia.</text:span></text:p>
          <text:list>
            <text:list-item>
              <text:p text:style-name="P48"><text:span text:style-name="Emphasis"><text:span text:style-name="T1">Analogía:</text:span></text:span><text:span text:style-name="T1"> Muchas personas compran oro para protegerse de la inflación. El dinero es como papel, simplemente papel, que se devalúa. Pero el oro, la plata, las piedras preciosas no cambian de valor nunca. </text:span></text:p>
            </text:list-item>
          </text:list>
        </text:list-item>
      </text:list>
      <text:h text:style-name="P2" text:outline-level="3"><text:soft-page-break/>🙌 Características Espirituales del Tesoro</text:h>
      <text:list text:style-name="L22">
        <text:list-item>
          <text:p text:style-name="P51"><text:span text:style-name="Strong_20_Emphasis"><text:span text:style-name="T1">Pregunta clave:</text:span></text:span><text:span text:style-name="T1"> ¿Qué será lo que Dios nos quiere decir con oro, plata, todo este tipo de cosas? </text:span></text:p>
        </text:list-item>
        <text:list-item>
          <text:p text:style-name="P51"><text:span text:style-name="Strong_20_Emphasis"><text:span text:style-name="T1">Respuesta:</text:span></text:span><text:span text:style-name="T1"> Dios está hablando de </text:span><text:span text:style-name="Strong_20_Emphasis"><text:span text:style-name="T1">Su Palabra</text:span></text:span><text:span text:style-name="T1">. </text:span></text:p>
        </text:list-item>
        <text:list-item>
          <text:p text:style-name="P51"><text:span text:style-name="Emphasis"><text:span text:style-name="T1">Comparación:</text:span></text:span><text:span text:style-name="T1"> Así como consideramos el tesoro físico como algo muy importante y valioso, ¿cómo considera Dios Su palabra? Como algo </text:span><text:span text:style-name="Strong_20_Emphasis"><text:span text:style-name="T1">más importante y valioso</text:span></text:span><text:span text:style-name="T1">. </text:span></text:p>
        </text:list-item>
        <text:list-item>
          <text:p text:style-name="P50"><text:span text:style-name="Emphasis"><text:span text:style-name="T1">Conclusión:</text:span></text:span><text:span text:style-name="T1"> ¿Qué tenemos que considerar más importante? ¿Tesoros físicos o tesoros espirituales? </text:span><text:span text:style-name="Strong_20_Emphasis"><text:span text:style-name="T1">Tesoros espirituales</text:span></text:span><text:span text:style-name="T1">, porque son los que nos pueden llevar al reino de los cielos. </text:span></text:p>
        </text:list-item>
      </text:list>
      <text:h text:style-name="P2" text:outline-level="3">📖 La Palabra de Dios como Tesoro</text:h>
      <text:list text:style-name="L23">
        <text:list-item>
          <text:p text:style-name="P53"><text:span text:style-name="Strong_20_Emphasis"><text:span text:style-name="T1">La Palabra nunca cambia:</text:span></text:span><text:span text:style-name="T1"> Así como el oro no se devalúa, la palabra de Dios nunca cambia. Todo lo que Dios promete, todo lo que Él dice en Su palabra, eventualmente lo termina cumpliendo. </text:span></text:p>
        </text:list-item>
        <text:list-item>
          <text:p text:style-name="P52"><text:span text:style-name="Strong_20_Emphasis"><text:span text:style-name="T1">La Palabra es la verdad:</text:span></text:span><text:span text:style-name="T1"> Juan 17:17 dice que las palabras de Dios son verdad. Y la verdad es el cumplimiento de las promesas de Dios. </text:span></text:p>
        </text:list-item>
      </text:list>
      <text:p text:style-name="P3"/>
      <text:h text:style-name="P1" text:outline-level="2">📚 6. Ejemplos Bíblicos de Tesoro en Figurativo</text:h>
      <text:h text:style-name="P2" text:outline-level="3">🪙 1. La Parábola de los Talentos (Mateo 25:14-15)</text:h>
      <text:p text:style-name="Quotations"><text:span text:style-name="Emphasis"><text:span text:style-name="T1">"Porque el reino de los cielos es como un hombre que, yéndose lejos, llamó a sus siervos y les entregó sus bienes. A uno dio cinco talentos, y a otro dos, y a otro uno, a cada uno conforme a su capacidad; y luego se fue lejos".</text:span></text:span></text:p>
      <text:h text:style-name="P9" text:outline-level="4">🔍 Interpretación Espiritual</text:h>
      <text:list text:style-name="L24">
        <text:list-item>
          <text:p text:style-name="P55"><text:span text:style-name="Strong_20_Emphasis"><text:span text:style-name="T1">¿Qué es un talento?</text:span></text:span><text:span text:style-name="T1"> Muchas personas piensan que son habilidades o dones (como tocar guitarra). </text:span></text:p>
        </text:list-item>
        <text:list-item>
          <text:p text:style-name="P55"><text:span text:style-name="Strong_20_Emphasis"><text:span text:style-name="T1">La realidad bíblica:</text:span></text:span><text:span text:style-name="T1"> En Éxodo 25:39, Dios le dice a Moisés: "De un talento de oro fino lo harás con todos estos utensilios". Está hablando del tabernáculo, de algo físico: </text:span><text:span text:style-name="Strong_20_Emphasis"><text:span text:style-name="T1">oro</text:span></text:span><text:span text:style-name="T1">. </text:span></text:p>
        </text:list-item>
        <text:list-item>
          <text:p text:style-name="P55"><text:span text:style-name="Strong_20_Emphasis"><text:span text:style-name="T1">Significado espiritual:</text:span></text:span><text:span text:style-name="T1"> Los talentos representan </text:span><text:span text:style-name="Strong_20_Emphasis"><text:span text:style-name="T1">la palabra de Dios</text:span></text:span><text:span text:style-name="T1"> que Jesús da a sus siervos. Cada uno recibe la palabra conforme a su capacidad de retenerla. </text:span></text:p>
        </text:list-item>
        <text:list-item>
          <text:p text:style-name="P54"><text:span text:style-name="Strong_20_Emphasis"><text:span text:style-name="T1">Aplicación:</text:span></text:span><text:span text:style-name="T1"> Jesús le da Su palabra (talentos de oro) a las personas. Algunos reciben más, otros menos, pero todos tienen la palabra. </text:span></text:p>
        </text:list-item>
      </text:list>
      <text:h text:style-name="P2" text:outline-level="3"><text:soft-page-break/>💰 2. Oro Refinado en Fuego (Apocalipsis 3:18)</text:h>
      <text:list text:style-name="L25">
        <text:list-item>
          <text:p text:style-name="P57"><text:span text:style-name="Strong_20_Emphasis"><text:span text:style-name="T1">El consejo de Jesús:</text:span></text:span><text:span text:style-name="T1"> "De mí compra oro refinado en fuego para que seas rico." </text:span></text:p>
        </text:list-item>
        <text:list-item>
          <text:p text:style-name="P57"><text:span text:style-name="Strong_20_Emphasis"><text:span text:style-name="T1">¿Qué es este oro refinado?</text:span></text:span><text:span text:style-name="T1"> Es la </text:span><text:span text:style-name="Strong_20_Emphasis"><text:span text:style-name="T1">palabra de la verdad</text:span></text:span><text:span text:style-name="T1">. </text:span></text:p>
        </text:list-item>
        <text:list-item>
          <text:p text:style-name="P56"><text:span text:style-name="Strong_20_Emphasis"><text:span text:style-name="T1">¿Por qué refinado en fuego?</text:span></text:span><text:span text:style-name="T1"> Porque el fuego (la palabra de Dios) purifica y limpia. Cuando recibimos la palabra verdadera, somos refinados y nos volvemos verdaderamente ricos espiritualmente. </text:span></text:p>
        </text:list-item>
      </text:list>
      <text:h text:style-name="P2" text:outline-level="3">🥈 3. Plata Refinada (Salmos 12:6)</text:h>
      <text:p text:style-name="Quotations"><text:span text:style-name="Emphasis"><text:span text:style-name="T1">"Las palabras de Jehová son palabras limpias, como plata refinada en horno de tierra, purificada siete veces".</text:span></text:span></text:p>
      <text:list text:style-name="L26">
        <text:list-item>
          <text:p text:style-name="P59"><text:span text:style-name="Strong_20_Emphasis"><text:span text:style-name="T1">Las palabras de Dios:</text:span></text:span><text:span text:style-name="T1"> Son como plata refinada, limpias, purificadas. </text:span></text:p>
        </text:list-item>
        <text:list-item>
          <text:p text:style-name="P58"><text:span text:style-name="Strong_20_Emphasis"><text:span text:style-name="T1">La purificación:</text:span></text:span><text:span text:style-name="T1"> Solo la palabra de Dios puede limpiarnos, limpiar nuestro corazón, nuestro ser interior, nuestro espíritu. </text:span></text:p>
        </text:list-item>
      </text:list>
      <text:h text:style-name="P2" text:outline-level="3">💎 4. La Perla de Gran Precio (Mateo 13:45-46)</text:h>
      <text:p text:style-name="Quotations"><text:span text:style-name="Emphasis"><text:span text:style-name="T1">"También el reino de los cielos es semejante a un mercader que busca buenas perlas, que habiendo hallado una perla preciosa, fue y vendió todo lo que tenía y la compró".</text:span></text:span></text:p>
      <text:h text:style-name="P9" text:outline-level="4">🔍 Interpretación Espiritual</text:h>
      <text:list text:style-name="L27">
        <text:list-item>
          <text:p text:style-name="P61"><text:span text:style-name="Strong_20_Emphasis"><text:span text:style-name="T1">El mercader:</text:span></text:span><text:span text:style-name="T1"> Una persona que busca perlas (la verdad). </text:span></text:p>
        </text:list-item>
        <text:list-item>
          <text:p text:style-name="P61"><text:span text:style-name="Strong_20_Emphasis"><text:span text:style-name="T1">La perla preciosa:</text:span></text:span><text:span text:style-name="T1"> La palabra de Dios, la verdad del reino de los cielos. </text:span></text:p>
        </text:list-item>
        <text:list-item>
          <text:p text:style-name="P61"><text:span text:style-name="Strong_20_Emphasis"><text:span text:style-name="T1">Vender todo lo que tenía:</text:span></text:span><text:span text:style-name="T1"> No significa literalmente vender tu casa o tu carro. Significa </text:span><text:span text:style-name="Strong_20_Emphasis"><text:span text:style-name="T1">priorizar la palabra de Dios más que cualquier otra cosa</text:span></text:span><text:span text:style-name="T1">. </text:span></text:p>
        </text:list-item>
        <text:list-item>
          <text:p text:style-name="P61"><text:span text:style-name="Strong_20_Emphasis"><text:span text:style-name="T1">La compra:</text:span></text:span><text:span text:style-name="T1"> Recibir y aceptar la palabra de verdad, dándole el primer lugar en tu vida. </text:span></text:p>
        </text:list-item>
        <text:list-item>
          <text:p text:style-name="P60"><text:span text:style-name="Emphasis"><text:span text:style-name="T1">Reflexión:</text:span></text:span><text:span text:style-name="T1"> En el mundo físico, ¿quién vendería todo para comprar una perla? Parece loco. Pero espiritualmente, la palabra de Dios es tan valiosa que debemos priorizarla sobre todo lo demás. </text:span></text:p>
        </text:list-item>
      </text:list>
      <text:h text:style-name="P2" text:outline-level="3">🪨 5. Piedras Vivas (1 Pedro 2:4-5)</text:h>
      <text:p text:style-name="Quotations"><text:span text:style-name="Emphasis"><text:span text:style-name="T1">"Acercándoos a él, piedra viva, desechada ciertamente por los hombres, mas para Dios escogida y preciosa. Vosotros también, como piedras vivas, sed edificados como casa espiritual y sacerdocio santo, para ofrecer sacrificios espirituales aceptables a Dios por medio de Jesucristo".</text:span></text:span></text:p>
      <text:h text:style-name="P9" text:outline-level="4"><text:soft-page-break/>🔍 Interpretación Espiritual</text:h>
      <text:list text:style-name="L28">
        <text:list-item>
          <text:p text:style-name="P63"><text:span text:style-name="Strong_20_Emphasis"><text:span text:style-name="T1">Jesús como piedra viva:</text:span></text:span><text:span text:style-name="T1"> Desechada por los hombres, pero escogida y preciosa para Dios. </text:span></text:p>
        </text:list-item>
        <text:list-item>
          <text:p text:style-name="P63"><text:span text:style-name="Strong_20_Emphasis"><text:span text:style-name="T1">Los creyentes como piedras vivas:</text:span></text:span><text:span text:style-name="T1"> Personas que reciben la palabra de Dios y se convierten en piedras preciosas ante los ojos de Dios. </text:span></text:p>
        </text:list-item>
        <text:list-item>
          <text:p text:style-name="P63"><text:span text:style-name="Strong_20_Emphasis"><text:span text:style-name="T1">La casa espiritual:</text:span></text:span><text:span text:style-name="T1"> La iglesia, el templo espiritual edificado con estas piedras vivas. </text:span></text:p>
        </text:list-item>
        <text:list-item>
          <text:p text:style-name="P62"><text:span text:style-name="Emphasis"><text:span text:style-name="T1">Conclusión:</text:span></text:span><text:span text:style-name="T1"> Cuando hablamos de tesoro figurativo, no solamente estamos hablando de palabra, sino también de </text:span><text:span text:style-name="Strong_20_Emphasis"><text:span text:style-name="T1">personas</text:span></text:span><text:span text:style-name="T1"> que tienen la palabra de Dios en su corazón. </text:span></text:p>
        </text:list-item>
      </text:list>
      <text:h text:style-name="P2" text:outline-level="3">🗝️ 6. El Tesoro Escondido en el Campo (Mateo 13:44)</text:h>
      <text:p text:style-name="Quotations"><text:span text:style-name="Emphasis"><text:span text:style-name="T1">"Además, el reino de los cielos es semejante a un tesoro escondido en un campo. El cual un hombre halla y lo esconde de nuevo. Y gozoso por ello va y vende todo lo que tiene y compra aquel campo".</text:span></text:span></text:p>
      <text:h text:style-name="P9" text:outline-level="4">🔍 Interpretación Espiritual</text:h>
      <text:list text:style-name="L29">
        <text:list-item>
          <text:p text:style-name="P65"><text:span text:style-name="Strong_20_Emphasis"><text:span text:style-name="T1">El tesoro escondido:</text:span></text:span><text:span text:style-name="T1"> La palabra de verdad, el reino de los cielos. </text:span></text:p>
        </text:list-item>
        <text:list-item>
          <text:p text:style-name="P65"><text:span text:style-name="Strong_20_Emphasis"><text:span text:style-name="T1">El campo:</text:span></text:span><text:span text:style-name="T1"> El corazón de la persona (como vimos en la parábola del sembrador). </text:span></text:p>
        </text:list-item>
        <text:list-item>
          <text:p text:style-name="P65"><text:span text:style-name="Strong_20_Emphasis"><text:span text:style-name="T1">Hallar y esconder de nuevo:</text:span></text:span><text:span text:style-name="T1"> Descubrir la verdad y guardarla en el corazón. </text:span></text:p>
        </text:list-item>
        <text:list-item>
          <text:p text:style-name="P64"><text:span text:style-name="Strong_20_Emphasis"><text:span text:style-name="T1">Vender todo y comprar el campo:</text:span></text:span><text:span text:style-name="T1"> Priorizar la palabra de Dios, darle el primer lugar, y permitir que esa palabra eche raíz en nuestro corazón. </text:span></text:p>
        </text:list-item>
      </text:list>
      <text:p text:style-name="P3"/>
      <text:h text:style-name="P1" text:outline-level="2">🧠 7. Los Tesoros de Sabiduría y Conocimiento en Cristo</text:h>
      <text:p text:style-name="Text_20_body"><text:span text:style-name="Strong_20_Emphasis"><text:span text:style-name="T1">Colosenses 2:2-3</text:span></text:span></text:p>
      <text:p text:style-name="Quotations"><text:span text:style-name="Emphasis"><text:span text:style-name="T1">"Para que sean consolados sus corazones, unidos en amor, hasta alcanzar todas las riquezas de pleno entendimiento, a fin de conocer el misterio de Dios, el Padre y de Cristo, en quien están escondidos todos los tesoros de la sabiduría y del conocimiento".</text:span></text:span></text:p>
      <text:h text:style-name="P2" text:outline-level="3">🔍 Análisis del Pasaje</text:h>
      <text:list text:style-name="L30">
        <text:list-item>
          <text:p text:style-name="P67"><text:span text:style-name="Strong_20_Emphasis"><text:span text:style-name="T1">Las riquezas de pleno entendimiento:</text:span></text:span><text:span text:style-name="T1"> No está hablando de inversiones o negocios. Está hablando de </text:span><text:span text:style-name="Strong_20_Emphasis"><text:span text:style-name="T1">entendimiento espiritual</text:span></text:span><text:span text:style-name="T1">. </text:span></text:p>
        </text:list-item>
        <text:list-item>
          <text:p text:style-name="P67"><text:span text:style-name="Strong_20_Emphasis"><text:span text:style-name="T1">El misterio de Dios y de Cristo:</text:span></text:span><text:span text:style-name="T1"> Los secretos del reino de los cielos, las parábolas, las profecías y su cumplimiento. </text:span></text:p>
        </text:list-item>
        <text:list-item>
          <text:p text:style-name="P67"><text:soft-page-break/><text:span text:style-name="Strong_20_Emphasis"><text:span text:style-name="T1">Los tesoros escondidos en Cristo:</text:span></text:span><text:span text:style-name="T1"> En Jesús están escondidos todos los tesoros de la sabiduría y del conocimiento. </text:span></text:p>
        </text:list-item>
        <text:list-item>
          <text:p text:style-name="P66"><text:span text:style-name="Strong_20_Emphasis"><text:span text:style-name="T1">La revelación:</text:span></text:span><text:span text:style-name="T1"> Estos tesoros no se descubren con inteligencia humana o estudios académicos. Tienen que ser </text:span><text:span text:style-name="Strong_20_Emphasis"><text:span text:style-name="T1">revelados por Dios</text:span></text:span><text:span text:style-name="T1"> a través de Su Espíritu. </text:span></text:p>
        </text:list-item>
      </text:list>
      <text:p text:style-name="P3"/>
      <text:h text:style-name="P1" text:outline-level="2">🏙️ 8. La Ciudad Santa: La Nueva Jerusalén</text:h>
      <text:p text:style-name="Text_20_body"><text:span text:style-name="Strong_20_Emphasis"><text:span text:style-name="T1">Apocalipsis 21:2, 9-10, 12, 14, 21</text:span></text:span></text:p>
      <text:h text:style-name="P2" text:outline-level="3">🌆 La Visión de Juan</text:h>
      <text:p text:style-name="Quotations"><text:span text:style-name="Emphasis"><text:span text:style-name="T1">"Y yo, Juan, vi la santa ciudad, la nueva Jerusalén, descender del cielo, de Dios, dispuesta como una esposa ataviada para su marido".</text:span></text:span></text:p>
      <text:h text:style-name="P2" text:outline-level="3">🔍 Los Elementos de la Ciudad</text:h>
      <text:list text:style-name="L31">
        <text:list-item>
          <text:p text:style-name="P69"><text:span text:style-name="Strong_20_Emphasis"><text:span text:style-name="T1">12 puertas:</text:span></text:span><text:span text:style-name="T1"> Con los nombres de las 12 tribus de los hijos de Israel (verso 12). </text:span></text:p>
        </text:list-item>
        <text:list-item>
          <text:p text:style-name="P69"><text:span text:style-name="Strong_20_Emphasis"><text:span text:style-name="T1">12 cimientos:</text:span></text:span><text:span text:style-name="T1"> Con los nombres de los 12 apóstoles del Cordero (verso 14). </text:span></text:p>
        </text:list-item>
        <text:list-item>
          <text:p text:style-name="P69"><text:span text:style-name="Strong_20_Emphasis"><text:span text:style-name="T1">12 perlas:</text:span></text:span><text:span text:style-name="T1"> Cada puerta era una perla (verso 21). </text:span></text:p>
        </text:list-item>
        <text:list-item>
          <text:p text:style-name="P68"><text:span text:style-name="Strong_20_Emphasis"><text:span text:style-name="T1">Calles de oro puro:</text:span></text:span><text:span text:style-name="T1"> Transparente como vidrio (verso 21). </text:span></text:p>
        </text:list-item>
      </text:list>
      <text:h text:style-name="P2" text:outline-level="3">💡 Interpretación Espiritual</text:h>
      <text:list text:style-name="L32">
        <text:list-item>
          <text:p text:style-name="P71"><text:span text:style-name="Strong_20_Emphasis"><text:span text:style-name="T1">No es una ciudad física:</text:span></text:span><text:span text:style-name="T1"> Si fuera física y descendiera sobre la Tierra, destruiría todo (casas, árboles, animales). </text:span></text:p>
        </text:list-item>
        <text:list-item>
          <text:p text:style-name="P71"><text:span text:style-name="Strong_20_Emphasis"><text:span text:style-name="T1">Es una organización celestial:</text:span></text:span><text:span text:style-name="T1"> La Nueva Jerusalén representa la organización de Dios, formada por la palabra de la verdad y aquellos que tienen esa palabra. </text:span></text:p>
        </text:list-item>
        <text:list-item>
          <text:p text:style-name="P71"><text:span text:style-name="Strong_20_Emphasis"><text:span text:style-name="T1">Las 12 puertas (perlas):</text:span></text:span><text:span text:style-name="T1"> Representan a los 12 apóstoles, personas que fueron como piedras preciosas porque recibieron las palabras verdaderas de Jesús. </text:span></text:p>
        </text:list-item>
        <text:list-item>
          <text:p text:style-name="P70"><text:span text:style-name="Strong_20_Emphasis"><text:span text:style-name="T1">Las calles de oro:</text:span></text:span><text:span text:style-name="T1"> Significa que en este lugar </text:span><text:span text:style-name="Strong_20_Emphasis"><text:span text:style-name="T1">abunda la palabra verdadera de Dios</text:span></text:span><text:span text:style-name="T1"> en cada rincón. No hay pensamiento del hombre, solo la verdad del cielo. </text:span></text:p>
        </text:list-item>
      </text:list>
      <text:h text:style-name="P2" text:outline-level="3">🚪 ¿Cómo Encontrar Esta Ciudad?</text:h>
      <text:list text:style-name="L33">
        <text:list-item>
          <text:p text:style-name="P73"><text:span text:style-name="Strong_20_Emphasis"><text:span text:style-name="T1">No es un lugar geográfico:</text:span></text:span><text:span text:style-name="T1"> No podemos buscarla en un mapa. </text:span></text:p>
        </text:list-item>
        <text:list-item>
          <text:p text:style-name="P73"><text:span text:style-name="Strong_20_Emphasis"><text:span text:style-name="T1">La condición para entrar:</text:span></text:span><text:span text:style-name="T1"> Lavar nuestras vestimentas con el agua que sale de ahí (la palabra de Dios). </text:span></text:p>
        </text:list-item>
        <text:list-item>
          <text:p text:style-name="P73"><text:span text:style-name="Strong_20_Emphasis"><text:span text:style-name="T1">El nuevo cielo y la nueva tierra:</text:span></text:span><text:span text:style-name="T1"> La ciudad desciende sobre un nuevo cielo y una nueva tierra (Apocalipsis 21:1). </text:span></text:p>
        </text:list-item>
        <text:list-item>
          <text:p text:style-name="P72"><text:soft-page-break/><text:span text:style-name="Strong_20_Emphasis"><text:span text:style-name="T1">La clave:</text:span></text:span><text:span text:style-name="T1"> Buscar a las personas que tienen la palabra de la verdad, porque ellas son las que forman esta ciudad espiritual. </text:span></text:p>
        </text:list-item>
      </text:list>
      <text:p text:style-name="P3"/>
      <text:h text:style-name="P1" text:outline-level="2">🔥 9. La Contraparte: El Tesoro de Satanás</text:h>
      <text:h text:style-name="P2" text:outline-level="3">🏺 Babilonia y la Copa de Oro (Jeremías 51:7)</text:h>
      <text:p text:style-name="Quotations"><text:span text:style-name="Emphasis"><text:span text:style-name="T1">"Copa de oro fue Babilonia en la mano de Jehová, que embriagó a toda la tierra. De su vino bebieron los pueblos; se aturdieron, por tanto, las naciones".</text:span></text:span></text:p>
      <text:h text:style-name="P9" text:outline-level="4">🔍 Interpretación</text:h>
      <text:list text:style-name="L34">
        <text:list-item>
          <text:p text:style-name="P75"><text:span text:style-name="Strong_20_Emphasis"><text:span text:style-name="T1">Babilonia:</text:span></text:span><text:span text:style-name="T1"> Representa el reino de Satanás, la organización del enemigo. </text:span></text:p>
        </text:list-item>
        <text:list-item>
          <text:p text:style-name="P75"><text:span text:style-name="Strong_20_Emphasis"><text:span text:style-name="T1">La copa de oro:</text:span></text:span><text:span text:style-name="T1"> Parece valiosa, pero está llena de abominaciones. </text:span></text:p>
        </text:list-item>
        <text:list-item>
          <text:p text:style-name="P74"><text:span text:style-name="Strong_20_Emphasis"><text:span text:style-name="T1">El vino de Babilonia:</text:span></text:span><text:span text:style-name="T1"> Las palabras de Satanás, las mentiras y falsedades que embriagan y aturden a las naciones. </text:span></text:p>
        </text:list-item>
      </text:list>
      <text:h text:style-name="P2" text:outline-level="3">👗 La Ramera y sus Vestimentas (Apocalipsis 17:4-5)</text:h>
      <text:p text:style-name="Quotations"><text:span text:style-name="Emphasis"><text:span text:style-name="T1">"Y la mujer estaba vestida de púrpura y escarlata, y adornada de oro de piedras preciosas y de perlas, y tenía en la mano un cáliz de oro lleno de abominaciones y de la inmundicia de su fornicación. Y en su frente un nombre escrito, un misterio: 'Babilonia la grande, la madre de las rameras y de las abominaciones de la tierra'".</text:span></text:span></text:p>
      <text:h text:style-name="P9" text:outline-level="4">🔍 Interpretación</text:h>
      <text:list text:style-name="L35">
        <text:list-item>
          <text:p text:style-name="P77"><text:span text:style-name="Strong_20_Emphasis"><text:span text:style-name="T1">La mujer (ramera):</text:span></text:span><text:span text:style-name="T1"> Representa a un falso pastor o una organización religiosa falsa. </text:span></text:p>
        </text:list-item>
        <text:list-item>
          <text:p text:style-name="P77"><text:span text:style-name="Strong_20_Emphasis"><text:span text:style-name="T1">Vestida de púrpura, escarlata, oro, piedras preciosas, perlas:</text:span></text:span><text:span text:style-name="T1"> Parece rica y valiosa por fuera, pero está adornada con las palabras de Satanás, no con la verdad de Dios. </text:span></text:p>
        </text:list-item>
        <text:list-item>
          <text:p text:style-name="P77"><text:span text:style-name="Strong_20_Emphasis"><text:span text:style-name="T1">El cáliz de oro lleno de abominaciones:</text:span></text:span><text:span text:style-name="T1"> Enseñanzas que parecen valiosas pero están llenas de falsedad e inmundicia espiritual. </text:span></text:p>
        </text:list-item>
        <text:list-item>
          <text:p text:style-name="P76"><text:span text:style-name="Strong_20_Emphasis"><text:span text:style-name="T1">La mercadería de Babilonia (Apocalipsis 18:12-13):</text:span></text:span><text:span text:style-name="T1"> Oro, plata, piedras preciosas, perlas, lino fino, púrpura, seda, escarlata, madera olorosa, marfil, cobre, hierro, mármol. Todo esto representa las enseñanzas humanas y tradiciones que el mundo consume, pensando que son valiosas, pero que en realidad son falsedad. </text:span></text:p>
        </text:list-item>
      </text:list>
      <text:h text:style-name="P2" text:outline-level="3"><text:soft-page-break/>⚠️ El Peligro de la Falsedad</text:h>
      <text:list text:style-name="L36">
        <text:list-item>
          <text:p text:style-name="P79"><text:span text:style-name="Strong_20_Emphasis"><text:span text:style-name="T1">Mezcla peligrosa:</text:span></text:span><text:span text:style-name="T1"> La falsedad de Satanás no es completamente mentira. Mezcla un poco de la palabra de Dios con pensamientos humanos, tradiciones y engaños. </text:span></text:p>
        </text:list-item>
        <text:list-item>
          <text:p text:style-name="P79"><text:span text:style-name="Strong_20_Emphasis"><text:span text:style-name="T1">Difícil de distinguir:</text:span></text:span><text:span text:style-name="T1"> Por eso muchas personas creen que están recibiendo la verdad, cuando en realidad están consumiendo el "tesoro" de Babilonia. </text:span></text:p>
        </text:list-item>
        <text:list-item>
          <text:p text:style-name="P78"><text:span text:style-name="Strong_20_Emphasis"><text:span text:style-name="T1">El autoexamen:</text:span></text:span><text:span text:style-name="T1"> ¿Qué clase de tesoros he estado adquiriendo? ¿Son acorde a la Biblia o son pensamientos del hombre? </text:span></text:p>
        </text:list-item>
      </text:list>
      <text:p text:style-name="P3"/>
      <text:h text:style-name="P1" text:outline-level="2">🎯 10. Conclusiones de la Primera Parte</text:h>
      <text:list text:style-name="L37">
        <text:list-item>
          <text:p text:style-name="P81"><text:span text:style-name="Strong_20_Emphasis"><text:span text:style-name="T1">El tesoro verdadero es la Palabra de Dios:</text:span></text:span><text:span text:style-name="T1"> Así como el oro es valioso y no se devalúa, la palabra de Dios es el verdadero tesoro espiritual que nos lleva al reino de los cielos. </text:span></text:p>
        </text:list-item>
        <text:list-item>
          <text:p text:style-name="P81"><text:span text:style-name="Strong_20_Emphasis"><text:span text:style-name="T1">Debemos comprar oro refinado en fuego:</text:span></text:span><text:span text:style-name="T1"> Jesús nos aconseja recibir Su palabra verdadera, purificada y refinada, para ser verdaderamente ricos espiritualmente. </text:span></text:p>
        </text:list-item>
        <text:list-item>
          <text:p text:style-name="P81"><text:span text:style-name="Strong_20_Emphasis"><text:span text:style-name="T1">La Nueva Jerusalén es una organización celestial:</text:span></text:span><text:span text:style-name="T1"> No es un lugar físico, sino la organización formada por la palabra de la verdad y aquellos que la tienen en su corazón. </text:span></text:p>
        </text:list-item>
        <text:list-item>
          <text:p text:style-name="P81"><text:span text:style-name="Strong_20_Emphasis"><text:span text:style-name="T1">Cuidado con el tesoro de Babilonia:</text:span></text:span><text:span text:style-name="T1"> Satanás también tiene su "tesoro": las mentiras, falsedades y tradiciones humanas mezcladas con un poco de la palabra de Dios. </text:span></text:p>
        </text:list-item>
        <text:list-item>
          <text:p text:style-name="P80"><text:span text:style-name="Strong_20_Emphasis"><text:span text:style-name="T1">El autoexamen constante:</text:span></text:span><text:span text:style-name="T1"> Debemos reflexionar qué clase de tesoros estamos acumulando en nuestro corazón. ¿Son tesoros del cielo o tesoros de la tierra? </text:span></text:p>
        </text:list-item>
      </text:list>
      <text:p text:style-name="Text_20_body"><text:span text:style-name="Strong_20_Emphasis"><text:span text:style-name="T1">📢 Anuncio para la Próxima Lección:</text:span></text:span><text:span text:style-name="T1"> Continuaremos con la segunda parte, donde veremos sobre el </text:span><text:span text:style-name="Strong_20_Emphasis"><text:span text:style-name="T1">hombre rico en figurativo</text:span></text:span><text:span text:style-name="T1">. ¿Qué clase de persona puede entrar al reino de los cielos? ¿Qué significa ser rico ante los ojos de Dios? Jesús dijo que es más fácil que un camello pase por el ojo de una aguja que un rico entre al reino de los cielos. ¿Significa que los ricos no pueden entrar? ¿O hay un significado espiritual más profundo?</text:span></text:p>
      <text:p text:style-name="P3"/>
      <text:h text:style-name="P1" text:outline-level="2">🔄 11.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38">
        <text:list-item>
          <text:p text:style-name="P83"><text:span text:style-name="Strong_20_Emphasis"><text:span text:style-name="T1">¿Qué representa el tesoro en figurativo?</text:span></text:span></text:p>
          <text:list>
            <text:list-item>
              <text:p text:style-name="P83"><text:soft-page-break/><text:span text:style-name="Emphasis"><text:span text:style-name="T1">Respuesta:</text:span></text:span><text:span text:style-name="T1"> La </text:span><text:span text:style-name="Strong_20_Emphasis"><text:span text:style-name="T1">Palabra de Dios</text:span></text:span><text:span text:style-name="T1"> y también las </text:span><text:span text:style-name="Strong_20_Emphasis"><text:span text:style-name="T1">personas</text:span></text:span><text:span text:style-name="T1"> que tienen la palabra en su corazón (piedras vivas). </text:span></text:p>
            </text:list-item>
          </text:list>
        </text:list-item>
        <text:list-item>
          <text:p text:style-name="P83"><text:span text:style-name="Strong_20_Emphasis"><text:span text:style-name="T1">¿Cuál es la diferencia entre el tesoro de Dios y el tesoro de Satanás?</text:span></text:span></text:p>
          <text:list>
            <text:list-item>
              <text:p text:style-name="P83"><text:span text:style-name="Emphasis"><text:span text:style-name="T1">Tesoro de Dios:</text:span></text:span><text:span text:style-name="T1"> La palabra de la verdad, refinada, pura, que nos da vida eterna. </text:span></text:p>
            </text:list-item>
            <text:list-item>
              <text:p text:style-name="P83"><text:span text:style-name="Emphasis"><text:span text:style-name="T1">Tesoro de Satanás:</text:span></text:span><text:span text:style-name="T1"> Las mentiras, falsedades, tradiciones humanas mezcladas con un poco de la palabra de Dios, que nos llevan a la destrucción. </text:span></text:p>
            </text:list-item>
          </text:list>
        </text:list-item>
        <text:list-item>
          <text:p text:style-name="P83"><text:span text:style-name="Strong_20_Emphasis"><text:span text:style-name="T1">¿Qué debemos hacer para ser verdaderamente ricos?</text:span></text:span></text:p>
          <text:list>
            <text:list-item>
              <text:p text:style-name="P83"><text:span text:style-name="Emphasis"><text:span text:style-name="T1">Respuesta:</text:span></text:span><text:span text:style-name="T1"> Comprar </text:span><text:span text:style-name="Strong_20_Emphasis"><text:span text:style-name="T1">oro refinado en fuego</text:span></text:span><text:span text:style-name="T1"> de Jesús, es decir, recibir Su palabra verdadera, priorizarla sobre todo lo demás, y permitir que eche raíz en nuestro corazón. </text:span></text:p>
            </text:list-item>
          </text:list>
        </text:list-item>
        <text:list-item>
          <text:p text:style-name="P83"><text:span text:style-name="Strong_20_Emphasis"><text:span text:style-name="T1">¿Qué es la Nueva Jerusalén?</text:span></text:span></text:p>
          <text:list>
            <text:list-item>
              <text:p text:style-name="P82"><text:span text:style-name="Emphasis"><text:span text:style-name="T1">Respuesta:</text:span></text:span><text:span text:style-name="T1"> No es una ciudad física, sino una </text:span><text:span text:style-name="Strong_20_Emphasis"><text:span text:style-name="T1">organización celestial</text:span></text:span><text:span text:style-name="T1"> formada por la palabra de la verdad y aquellos que la tienen. Las 12 puertas son perlas (los apóstoles), y las calles son de oro puro (la abundancia de la palabra verdadera). </text:span></text:p>
            </text:list-item>
          </text:list>
        </text:list-item>
      </text:list>
      <text:p text:style-name="Text_20_body"><text:span text:style-name="Strong_20_Emphasis"><text:span text:style-name="T1">📢 Anuncios:</text:span></text:span></text:p>
      <text:list text:style-name="L39">
        <text:list-item>
          <text:p text:style-name="P85">La próxima semana continuaremos con la parte 2 de esta lección sobre el hombre rico. </text:p>
        </text:list-item>
        <text:list-item>
          <text:p text:style-name="P86">Recuerden repasar sus apuntes y ver los videos de las lecciones anteriores para retener la palabra.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4">¡Gracias a todos! Cuídense, sigan estudiando y acumulando tesoros en el cielo, no en la tierra. ¡Nos vemos en la próxima lecció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8T09:11:20.411001846</dc:date>
    <meta:editing-duration>PT1H43M58S</meta:editing-duration>
    <meta:editing-cycles>11</meta:editing-cycles>
    <meta:generator>LibreOffice/24.2.7.2$Linux_X86_64 LibreOffice_project/420$Build-2</meta:generator>
    <meta:document-statistic meta:table-count="0" meta:image-count="0" meta:object-count="0" meta:page-count="11" meta:paragraph-count="173" meta:word-count="3266" meta:character-count="18906" meta:non-whitespace-character-count="15818"/>
  </office:meta>
</office:document-meta>
</file>