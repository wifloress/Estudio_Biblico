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list-style-name="L17">
      <style:paragraph-properties fo:margin-top="0cm" fo:margin-bottom="0cm" style:contextual-spacing="false"/>
    </style:style>
    <style:style style:name="P32" style:family="paragraph" style:parent-style-name="Text_20_body" style:list-style-name="L18"/>
    <style:style style:name="P33" style:family="paragraph" style:parent-style-name="Text_20_body">
      <style:text-properties style:font-name="Padauk Book"/>
    </style:style>
    <style:style style:name="P34" style:family="paragraph" style:parent-style-name="Text_20_body" style:list-style-name="L14">
      <style:paragraph-properties fo:margin-top="0cm" fo:margin-bottom="0cm" style:contextual-spacing="false"/>
      <style:text-properties style:font-name="Padauk Book"/>
    </style:style>
    <style:style style:name="P35" style:family="paragraph" style:parent-style-name="Text_20_body" style:list-style-name="L14">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6 (PARTE 1)</text:h>
      <text:h text:style-name="P2" text:outline-level="2">Copa, Balanza y Vara en Lenguaje Figurativo</text:h>
      <text:p text:style-name="P4"/>
      <text:h text:style-name="P2" text:outline-level="2">🔄 1. Repaso Inicial: La Levadura Espiritual</text:h>
      <text:p text:style-name="Text_20_body"><text:span text:style-name="Emphasis"><text:span text:style-name="T1">(A cargo del Evangelista Christian Howard)</text:span></text:span></text:p>
      <text:p text:style-name="P33">Antes de comenzar la nueva lección, ponemos a prueba lo aprendido sobre la levadura y la importancia de examinar nuestro corazón:</text:p>
      <text:p text:style-name="Text_20_body"><text:span text:style-name="Strong_20_Emphasis"><text:span text:style-name="T1">Preguntas de Reflexión y Respuestas:</text:span></text:span></text:p>
      <text:list text:style-name="L1">
        <text:list-item>
          <text:p text:style-name="P6"><text:span text:style-name="Strong_20_Emphasis"><text:span text:style-name="T1">¿Cómo define la lección la levadura espiritual?</text:span></text:span></text:p>
          <text:list>
            <text:list-item>
              <text:p text:style-name="P6"><text:span text:style-name="Emphasis"><text:span text:style-name="T1">Respuesta:</text:span></text:span><text:span text:style-name="T1"> </text:span><text:span text:style-name="Strong_20_Emphasis"><text:span text:style-name="T1">B) Enseñanzas morales que cambian el corazón.</text:span></text:span><text:span text:style-name="T1"> (Así como la levadura cambia la masa, estas enseñanzas transforman nuestro interior). </text:span></text:p>
            </text:list-item>
          </text:list>
        </text:list-item>
        <text:list-item>
          <text:p text:style-name="P6"><text:span text:style-name="Strong_20_Emphasis"><text:span text:style-name="T1">Si la levadura representa enseñanzas que transforman, ¿qué representa que "todo fue leudado"?</text:span></text:span></text:p>
          <text:list>
            <text:list-item>
              <text:p text:style-name="P6"><text:span text:style-name="Emphasis"><text:span text:style-name="T1">Respuesta:</text:span></text:span><text:span text:style-name="T1"> </text:span><text:span text:style-name="Strong_20_Emphasis"><text:span text:style-name="T1">C) La enseñanza influyó completamente en aquello donde fue puesta.</text:span></text:span><text:span text:style-name="T1"> (Debe haber un cambio total, no parcial). </text:span></text:p>
            </text:list-item>
          </text:list>
        </text:list-item>
        <text:list-item>
          <text:p text:style-name="P6"><text:span text:style-name="Strong_20_Emphasis"><text:span text:style-name="T1">¿Por qué es importante tener cuidado con lo que escuchamos y aprendemos?</text:span></text:span></text:p>
          <text:list>
            <text:list-item>
              <text:p text:style-name="P5"><text:span text:style-name="Emphasis"><text:span text:style-name="T1">Respuesta:</text:span></text:span><text:span text:style-name="T1"> Porque </text:span><text:span text:style-name="Strong_20_Emphasis"><text:span text:style-name="T1">hay dos tipos de levaduras</text:span></text:span><text:span text:style-name="T1"> (la de Dios y la de Satanás). Si aceptamos la de Dios, nos transformamos a Su imagen; si aceptamos la de Satanás, nos convertimos más en él. Debemos escuchar, pero luego repasar todo con la Biblia.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todas estas palabras que nos has dado. Estamos viendo que todas estas parábolas que tú nos has enseñado en Mateo 13 no solo son cuentos, sino que cada una tiene un significado que tú nos has querido mostrar. Dios, ahí siempre estaba eso, pero nunca era el tiempo. Ahora tú estás revelando todos estos secretos tuyos. Dios, por favor, danos ese corazón hambriento que nos hace preguntar: ¿qué es esto? ¿Por qué es esto? Ayúdanos para que tengamos tiempo y un ambiente para repasar y aprender más de ti. Continúa enviando tu Espíritu Santo a todos los estudiantes para que abran sus </text:span></text:span><text:soft-page-break/><text:span text:style-name="Emphasis"><text:span text:style-name="T1">ojos y sus corazones para entender tu palabra a tu manera, no a la manera en que ellos entendían antes. Oramos todo esto en tu hijo Jesucristo. Amén."</text:span></text:span></text:p>
      <text:p text:style-name="P4"/>
      <text:h text:style-name="P2" text:outline-level="2">🏫 2. Introducción: El Enfoque en la "Copa"</text:h>
      <text:p text:style-name="Text_20_body"><text:span text:style-name="Emphasis"><text:span text:style-name="T1">(A cargo del Instructor Sibiani)</text:span></text:span></text:p>
      <text:h text:style-name="P3" text:outline-level="3">📌 Recordatorios de Etiqueta</text:h>
      <text:list text:style-name="L2">
        <text:list-item>
          <text:p text:style-name="P8"><text:span text:style-name="Strong_20_Emphasis"><text:span text:style-name="T1">Actitud:</text:span></text:span><text:span text:style-name="T1"> Prender la cámara, tener la Biblia a mano y escribir todos los apuntes. </text:span></text:p>
        </text:list-item>
        <text:list-item>
          <text:p text:style-name="P7"><text:span text:style-name="Strong_20_Emphasis"><text:span text:style-name="T1">Enfoque:</text:span></text:span><text:span text:style-name="T1"> Muchas veces queremos hacer cosas, pero la mejor opción es simplemente </text:span><text:span text:style-name="Strong_20_Emphasis"><text:span text:style-name="T1">detenerse, escuchar la palabra de Dios y entender Su voluntad</text:span></text:span><text:span text:style-name="T1">. Solo cuando entendemos bien, podemos actuar correctamente. </text:span></text:p>
        </text:list-item>
      </text:list>
      <text:h text:style-name="P3" text:outline-level="3">📖 El Título de la Lección</text:h>
      <text:p text:style-name="P33">Leamos juntos dos veces:</text:p>
      <text:p text:style-name="Quotations"><text:span text:style-name="Strong_20_Emphasis"><text:span text:style-name="T1">"Copa, balanza y vara en figurativo"</text:span></text:span></text:p>
      <text:p text:style-name="Text_20_body"><text:span text:style-name="T1">Hoy nos vamos a enfocar en lo que es la </text:span><text:span text:style-name="Strong_20_Emphasis"><text:span text:style-name="T1">Copa</text:span></text:span><text:span text:style-name="T1">. </text:span></text:p>
      <text:list text:style-name="L3">
        <text:list-item>
          <text:p text:style-name="P9"><text:span text:style-name="Emphasis"><text:span text:style-name="T1">Reflexión:</text:span></text:span><text:span text:style-name="T1"> ¿Qué es lo que Dios quiere mostrarme con una copa? En Apocalipsis aparecen copas llenas de la ira de Dios. Si no entendemos qué clase de copa es una copa espiritual, vamos a malentender el plan de Dios y no podremos entender cómo está obrando hoy. </text:span></text:p>
        </text:list-item>
      </text:list>
      <text:p text:style-name="P4"/>
      <text:h text:style-name="P2" text:outline-level="2">🏆 3. El Versículo Principal: Las Copas de la Ira</text:h>
      <text:p text:style-name="Text_20_body"><text:span text:style-name="Strong_20_Emphasis"><text:span text:style-name="T1">Apocalipsis 15:7</text:span></text:span></text:p>
      <text:p text:style-name="Quotations"><text:span text:style-name="Emphasis"><text:span text:style-name="T1">"Y uno de los cuatro seres vivientes dio a los siete ángeles siete copas de oro, llenas de la ira de Dios, que vive por los siglos de los siglos".</text:span></text:span></text:p>
      <text:h text:style-name="P3" text:outline-level="3">🔍 Análisis del Pasaje</text:h>
      <text:list text:style-name="L4">
        <text:list-item>
          <text:p text:style-name="P11"><text:span text:style-name="Strong_20_Emphasis"><text:span text:style-name="T1">El Recipiente:</text:span></text:span><text:span text:style-name="T1"> Siete ángeles reciben siete copas de oro. </text:span></text:p>
        </text:list-item>
        <text:list-item>
          <text:p text:style-name="P11"><text:span text:style-name="Strong_20_Emphasis"><text:span text:style-name="T1">El Contenido:</text:span></text:span><text:span text:style-name="T1"> Están </text:span><text:span text:style-name="Emphasis"><text:span text:style-name="T1">llenas de la ira de Dios</text:span></text:span><text:span text:style-name="T1">. </text:span></text:p>
        </text:list-item>
        <text:list-item>
          <text:p text:style-name="P11"><text:span text:style-name="Strong_20_Emphasis"><text:span text:style-name="T1">La Acción:</text:span></text:span><text:span text:style-name="T1"> Dios quiere </text:span><text:span text:style-name="Emphasis"><text:span text:style-name="T1">derramar</text:span></text:span><text:span text:style-name="T1"> o verter esta copa sobre algo o algún lugar. </text:span></text:p>
        </text:list-item>
        <text:list-item>
          <text:p text:style-name="P10"><text:soft-page-break/><text:span text:style-name="Strong_20_Emphasis"><text:span text:style-name="T1">El Significado Espiritual:</text:span></text:span><text:span text:style-name="T1"> Físicamente no podemos "derramar ira" en una copa. Esto nos prueba que son </text:span><text:span text:style-name="Strong_20_Emphasis"><text:span text:style-name="T1">copas espirituales</text:span></text:span><text:span text:style-name="T1">. Contienen algo muy importante (la ira de Dios) y deben ser derramadas en el tiempo y lugar correctos según el plan divino. </text:span></text:p>
        </text:list-item>
      </text:list>
      <text:p text:style-name="P4"/>
      <text:h text:style-name="P2" text:outline-level="2">🏺 4. Características de la Copa: El Recipiente</text:h>
      <text:p text:style-name="P33">En la Biblia tenemos copas, jarras, vasijas y medidas. Físicamente se usaban para contener alimento, agua, trigo, vino o tesoros. </text:p>
      <text:h text:style-name="P3" text:outline-level="3">🧠 Significado Espiritual</text:h>
      <text:list text:style-name="L5">
        <text:list-item>
          <text:p text:style-name="P13"><text:span text:style-name="Strong_20_Emphasis"><text:span text:style-name="T1">El Contenedor:</text:span></text:span><text:span text:style-name="T1"> Si el alimento es la Palabra de Dios (como vimos en lecciones anteriores), </text:span><text:span text:style-name="Strong_20_Emphasis"><text:span text:style-name="T1">¿en dónde contenemos nosotros esa palabra?</text:span></text:span><text:span text:style-name="T1"> </text:span></text:p>
        </text:list-item>
        <text:list-item>
          <text:p text:style-name="P13"><text:span text:style-name="Strong_20_Emphasis"><text:span text:style-name="T1">El Corazón del Hombre:</text:span></text:span><text:span text:style-name="T1"> Uno escucha las palabras con los oídos, pero deben permanecer en el corazón. Por lo tanto, la copa representa al </text:span><text:span text:style-name="Strong_20_Emphasis"><text:span text:style-name="T1">hombre (su corazón)</text:span></text:span><text:span text:style-name="T1">. </text:span></text:p>
        </text:list-item>
        <text:list-item>
          <text:p text:style-name="P12"><text:span text:style-name="Strong_20_Emphasis"><text:span text:style-name="T1">La Iglesia:</text:span></text:span><text:span text:style-name="T1"> En una escala más grande, un lugar que tenga muchas "copas pequeñas" (personas) recibiendo el alimento de Dios, también se puede llamar una </text:span><text:span text:style-name="Strong_20_Emphasis"><text:span text:style-name="T1">Iglesia</text:span></text:span><text:span text:style-name="T1">. Una gran copa que contiene muchas copas pequeñas. </text:span></text:p>
        </text:list-item>
      </text:list>
      <text:p text:style-name="P4"/>
      <text:h text:style-name="P2" text:outline-level="2">⚖️ 5. Los Dos Tipos de Vasijas: Dios vs. Satanás</text:h>
      <text:p text:style-name="P33">Como siempre, Satanás imita lo que Dios hace. Hay vasijas que pertenecen a Dios y vasijas que pertenecen a Satanás.</text:p>
      <text:h text:style-name="P3" text:outline-level="3">✅ La Vasija de Dios (El Lado de la Verdad)</text:h>
      <text:p text:style-name="P33">¿Qué hace que una copa sea de Dios? No es su apariencia física, sino lo que contiene y para qué propósito fue formada.</text:p>
      <text:p text:style-name="Text_20_body"><text:span text:style-name="Strong_20_Emphasis"><text:span text:style-name="T1">1. Instrumento Escogido (Hechos 9:15)</text:span></text:span></text:p>
      <text:p text:style-name="Quotations"><text:span text:style-name="Emphasis"><text:span text:style-name="T1">"Ve, porque instrumento escogido me es este, para llevar mi nombre en presencia de los gentiles, y de reyes, y de los hijos de Israel".</text:span></text:span></text:p>
      <text:list text:style-name="L6">
        <text:list-item>
          <text:p text:style-name="P14"><text:span text:style-name="Strong_20_Emphasis"><text:span text:style-name="T1">El Apóstol Pablo:</text:span></text:span><text:span text:style-name="T1"> Fue escogido directamente por Dios como un "instrumento" (un contenedor/vasija) para llevar la Palabra de Dios a todas las naciones. </text:span></text:p>
        </text:list-item>
      </text:list>
      <text:p text:style-name="Text_20_body"><text:span text:style-name="Strong_20_Emphasis"><text:span text:style-name="T1">2. El Alfarero y el Barro (Romanos 9:21-24)</text:span></text:span></text:p>
      <text:p text:style-name="Quotations"><text:soft-page-break/><text:span text:style-name="Emphasis"><text:span text:style-name="T1">"¿O no tiene potestad el alfarero sobre el barro, para hacer de la misma masa un vaso para honra y otro para deshonra?"</text:span></text:span></text:p>
      <text:list text:style-name="L7">
        <text:list-item>
          <text:p text:style-name="P16"><text:span text:style-name="Strong_20_Emphasis"><text:span text:style-name="T1">El Alfarero es Dios:</text:span></text:span><text:span text:style-name="T1"> Él tiene la potestad de formar nuestros corazones. </text:span></text:p>
        </text:list-item>
        <text:list-item>
          <text:p text:style-name="P15"><text:span text:style-name="Strong_20_Emphasis"><text:span text:style-name="T1">Vasos de Misericordia:</text:span></text:span><text:span text:style-name="T1"> Dios nos llama y nos prepara para ser vasos de honra, contenedores de Su gloria, tanto de judíos como de gentiles. </text:span></text:p>
        </text:list-item>
      </text:list>
      <text:p text:style-name="Text_20_body"><text:span text:style-name="Strong_20_Emphasis"><text:span text:style-name="T1">3. El Proceso de Limpieza (2 Timoteo 2:21)</text:span></text:span></text:p>
      <text:p text:style-name="Quotations"><text:span text:style-name="Emphasis"><text:span text:style-name="T1">"Así que, si alguno se limpia de estas cosas, será instrumento para honra, santificado, útil al Señor, y dispuesto para toda buena obra".</text:span></text:span></text:p>
      <text:list text:style-name="L8">
        <text:list-item>
          <text:p text:style-name="P18"><text:span text:style-name="Strong_20_Emphasis"><text:span text:style-name="T1">La Condición:</text:span></text:span><text:span text:style-name="T1"> Para ser un vaso de honra, </text:span><text:span text:style-name="Strong_20_Emphasis"><text:span text:style-name="T1">debemos limpiarnos</text:span></text:span><text:span text:style-name="T1">. </text:span></text:p>
        </text:list-item>
        <text:list-item>
          <text:p text:style-name="P17"><text:span text:style-name="Strong_20_Emphasis"><text:span text:style-name="T1">El Detergente Espiritual:</text:span></text:span><text:span text:style-name="T1"> No hay un jabón celestial. Lo único que nos puede limpiar realmente es </text:span><text:span text:style-name="Strong_20_Emphasis"><text:span text:style-name="T1">la Palabra de Dios (la Verdad)</text:span></text:span><text:span text:style-name="T1">. </text:span></text:p>
        </text:list-item>
      </text:list>
      <text:p text:style-name="Text_20_body"><text:span text:style-name="Strong_20_Emphasis"><text:span text:style-name="T1">4. La Parábola de la Red y las Cestas (Mateo 13:47-50)</text:span></text:span></text:p>
      <text:p text:style-name="Quotations"><text:span text:style-name="Emphasis"><text:span text:style-name="T1">"Asimismo, el reino de los cielos es semejante a una red... y sentados, recogieron lo bueno en cestas, y lo malo echaron fuera".</text:span></text:span></text:p>
      <text:list text:style-name="L9">
        <text:list-item>
          <text:p text:style-name="P20"><text:span text:style-name="Strong_20_Emphasis"><text:span text:style-name="T1">Las Cestas (Contenedores):</text:span></text:span><text:span text:style-name="T1"> Representan las organizaciones o iglesias donde Dios reúne a sus escogidos (los "peces buenos" o justos). </text:span></text:p>
        </text:list-item>
        <text:list-item>
          <text:p text:style-name="P19"><text:span text:style-name="Strong_20_Emphasis"><text:span text:style-name="T1">El Destino:</text:span></text:span><text:span text:style-name="T1"> Los justos son guardados en las cestas (el reino), y los malos son echados fuera (al horno de fuego). </text:span></text:p>
        </text:list-item>
      </text:list>
      <text:h text:style-name="P3" text:outline-level="3">❌ La Vasija de Satanás (El Lado de la Mentira)</text:h>
      <text:p text:style-name="Text_20_body"><text:span text:style-name="T1">Esta vasija contiene mentiras, robo e injusticia. Pero lo más peligroso es que </text:span><text:span text:style-name="Strong_20_Emphasis"><text:span text:style-name="T1">contiene una mezcla</text:span></text:span><text:span text:style-name="T1">: un poco de la palabra de Dios mezclada con pensamientos humanos y sedimentos.</text:span></text:p>
      <text:p text:style-name="Text_20_body"><text:span text:style-name="Strong_20_Emphasis"><text:span text:style-name="T1">1. El Sedimento de Moab (Jeremías 48:11-12)</text:span></text:span></text:p>
      <text:p text:style-name="Quotations"><text:span text:style-name="Emphasis"><text:span text:style-name="T1">"Quieto estuvo Moab desde su juventud, y sobre sus heces ha estado reposado, y no fue vaciado de vasija en vasija... por tanto, quedó su sabor en él, y su olor no se ha cambiado".</text:span></text:span></text:p>
      <text:list text:style-name="L10">
        <text:list-item>
          <text:p text:style-name="P22"><text:span text:style-name="Strong_20_Emphasis"><text:span text:style-name="T1">El Sedimento (Heces/Sobras):</text:span></text:span><text:span text:style-name="T1"> Representa las impurezas, los propios pensamientos y las tradiciones humanas que se acumulan en el fondo del corazón cuando no nos "vaciamos" ni nos limpiamos. </text:span></text:p>
        </text:list-item>
        <text:list-item>
          <text:p text:style-name="P21"><text:span text:style-name="Strong_20_Emphasis"><text:span text:style-name="T1">El Peligro:</text:span></text:span><text:span text:style-name="T1"> El pueblo de Dios (Moab) se corrompió. Su palabra estaba mezclada con impurezas. Dios promete enviar "trasvasadores" para vaciar y romper esos odres sucios. </text:span></text:p>
        </text:list-item>
      </text:list>
      <text:p text:style-name="Text_20_body"><text:soft-page-break/><text:span text:style-name="Strong_20_Emphasis"><text:span text:style-name="T1">2. Limpiar solo lo de Afuera (Mateo 23:25-26)</text:span></text:span></text:p>
      <text:p text:style-name="Quotations"><text:span text:style-name="Emphasis"><text:span text:style-name="T1">"¡Ay de vosotros, escribas y fariseos, hipócritas! Porque limpiáis lo de afuera del vaso y del plato, pero por dentro estáis llenos de robo y de injusticia... limpia primero lo de adentro del vaso".</text:span></text:span></text:p>
      <text:list text:style-name="L11">
        <text:list-item>
          <text:p text:style-name="P24"><text:span text:style-name="Strong_20_Emphasis"><text:span text:style-name="T1">El Error de los Fariseos:</text:span></text:span><text:span text:style-name="T1"> Eran como vasijas sucias por dentro, pero se enfocaban solo en la apariencia externa (se veían religiosos, santos y respetables). </text:span></text:p>
        </text:list-item>
        <text:list-item>
          <text:p text:style-name="P23"><text:span text:style-name="Strong_20_Emphasis"><text:span text:style-name="T1">Los Trasvasadores:</text:span></text:span><text:span text:style-name="T1"> Jesús y los 12 discípulos fueron enviados por Dios para "vaciar" y "limpiar" por dentro a las vasijas, quitando el sedimento de las tradiciones humanas. </text:span></text:p>
        </text:list-item>
      </text:list>
      <text:p text:style-name="P4"/>
      <text:h text:style-name="P2" text:outline-level="2">🎯 6. Conclusión de la Lección</text:h>
      <text:list text:style-name="L12">
        <text:list-item>
          <text:p text:style-name="P26"><text:span text:style-name="Strong_20_Emphasis"><text:span text:style-name="T1">Debemos contener la Palabra de Dios:</text:span></text:span><text:span text:style-name="T1"> Para convertirnos en un vaso de Dios. </text:span></text:p>
        </text:list-item>
        <text:list-item>
          <text:p text:style-name="P26"><text:span text:style-name="Strong_20_Emphasis"><text:span text:style-name="T1">Examinar nuestro corazón:</text:span></text:span><text:span text:style-name="T1"> Después de recibir la palabra, debemos preguntar: </text:span><text:span text:style-name="Emphasis"><text:span text:style-name="T1">¿Qué más hay en mi corazón? ¿Hay sedimentos, pensamientos propios o mentiras?</text:span></text:span><text:span text:style-name="T1"> </text:span></text:p>
        </text:list-item>
        <text:list-item>
          <text:p text:style-name="P26"><text:span text:style-name="Strong_20_Emphasis"><text:span text:style-name="T1">Limpiar y Vaciar:</text:span></text:span><text:span text:style-name="T1"> Si hay impurezas, debemos desecharlas usando la misma Palabra de Dios. </text:span></text:p>
        </text:list-item>
        <text:list-item>
          <text:p text:style-name="P26"><text:span text:style-name="Strong_20_Emphasis"><text:span text:style-name="T1">El Resultado Final:</text:span></text:span><text:span text:style-name="T1"> </text:span></text:p>
          <text:list>
            <text:list-item>
              <text:p text:style-name="P26"><text:span text:style-name="Emphasis"><text:span text:style-name="T1">Vasija de Dios (Verdad)</text:span></text:span><text:span text:style-name="T1"> ➡️ Bendición, Reino de los Cielos, Vida Eterna. </text:span></text:p>
            </text:list-item>
            <text:list-item>
              <text:p text:style-name="P25"><text:span text:style-name="Emphasis"><text:span text:style-name="T1">Vasija de Satanás (Mentira)</text:span></text:span><text:span text:style-name="T1"> ➡️ Maldición, Juicio, Infierno. </text:span></text:p>
            </text:list-item>
          </text:list>
        </text:list-item>
      </text:list>
      <text:p text:style-name="Text_20_body"><text:span text:style-name="Strong_20_Emphasis"><text:span text:style-name="T1">📢 Anuncio para la Próxima Lección:</text:span></text:span><text:span text:style-name="T1"> La próxima vez veremos la segunda parte: </text:span><text:span text:style-name="Strong_20_Emphasis"><text:span text:style-name="T1">Balanza y Vara en figurativo</text:span></text:span><text:span text:style-name="T1">. ¿Por qué Dios utiliza una balanza? ¿Por qué nos muestra varas? ¡Prepárense para seguir descubriendo los secretos del reino!</text:span></text:p>
      <text:p text:style-name="P4"/>
      <text:h text:style-name="P2" text:outline-level="2">🔄 7.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3">
        <text:list-item>
          <text:p text:style-name="P28"><text:span text:style-name="Strong_20_Emphasis"><text:span text:style-name="T1">¿Qué es la "Copa" espiritualmente?</text:span></text:span></text:p>
          <text:list>
            <text:list-item>
              <text:p text:style-name="P28"><text:span text:style-name="Emphasis"><text:span text:style-name="T1">Respuesta:</text:span></text:span><text:span text:style-name="T1"> Es un </text:span><text:span text:style-name="Strong_20_Emphasis"><text:span text:style-name="T1">contenedor</text:span></text:span><text:span text:style-name="T1">. Representa el </text:span><text:span text:style-name="Strong_20_Emphasis"><text:span text:style-name="T1">corazón de la persona</text:span></text:span><text:span text:style-name="T1"> y, en escala grande, representa la </text:span><text:span text:style-name="Strong_20_Emphasis"><text:span text:style-name="T1">Iglesia</text:span></text:span><text:span text:style-name="T1">. </text:span></text:p>
            </text:list-item>
          </text:list>
        </text:list-item>
        <text:list-item>
          <text:p text:style-name="P28"><text:span text:style-name="Strong_20_Emphasis"><text:span text:style-name="T1">¿Qué contiene la copa?</text:span></text:span></text:p>
          <text:list>
            <text:list-item>
              <text:p text:style-name="P28"><text:span text:style-name="Emphasis"><text:span text:style-name="T1">Respuesta:</text:span></text:span><text:span text:style-name="T1"> </text:span><text:span text:style-name="Strong_20_Emphasis"><text:span text:style-name="T1">Alimento</text:span></text:span><text:span text:style-name="T1">, que ya sabemos que es la </text:span><text:span text:style-name="Strong_20_Emphasis"><text:span text:style-name="T1">Palabra de Dios</text:span></text:span><text:span text:style-name="T1">. </text:span></text:p>
            </text:list-item>
          </text:list>
        </text:list-item>
        <text:list-item>
          <text:p text:style-name="P28"><text:span text:style-name="Strong_20_Emphasis"><text:span text:style-name="T1">¿Cuáles son los dos tipos de copas?</text:span></text:span></text:p>
          <text:list>
            <text:list-item>
              <text:p text:style-name="P28"><text:soft-page-break/><text:span text:style-name="Emphasis"><text:span text:style-name="T1">Respuesta:</text:span></text:span><text:span text:style-name="T1"> </text:span><text:span text:style-name="Strong_20_Emphasis"><text:span text:style-name="T1">La Copa de Dios</text:span></text:span><text:span text:style-name="T1"> (contiene la Verdad: profecía y cumplimiento) y </text:span><text:span text:style-name="Strong_20_Emphasis"><text:span text:style-name="T1">la Copa de Satanás</text:span></text:span><text:span text:style-name="T1"> (contiene mentiras: la palabra de Dios tergiversada y mezclada con pensamientos humanos). </text:span></text:p>
            </text:list-item>
          </text:list>
        </text:list-item>
        <text:list-item>
          <text:p text:style-name="P28"><text:span text:style-name="Strong_20_Emphasis"><text:span text:style-name="T1">¿Cuál es el destino final de los "peces buenos" en la parábola de la red?</text:span></text:span></text:p>
          <text:list>
            <text:list-item>
              <text:p text:style-name="P28"><text:span text:style-name="Emphasis"><text:span text:style-name="T1">Respuesta:</text:span></text:span><text:span text:style-name="T1"> Ser recogidos en </text:span><text:span text:style-name="Strong_20_Emphasis"><text:span text:style-name="T1">cestas</text:span></text:span><text:span text:style-name="T1"> (contenedores/iglesias), lo que representa el Reino de los Cielos y la bendición de estar con Dios. </text:span></text:p>
            </text:list-item>
          </text:list>
        </text:list-item>
        <text:list-item>
          <text:p text:style-name="P28"><text:span text:style-name="Strong_20_Emphasis"><text:span text:style-name="T1">¿Cuál es la gran lección para nosotros?</text:span></text:span></text:p>
          <text:list>
            <text:list-item>
              <text:p text:style-name="P27"><text:span text:style-name="Emphasis"><text:span text:style-name="T1">Respuesta:</text:span></text:span><text:span text:style-name="T1"> Debemos darnos cuenta de que el resultado no es pequeño. Es </text:span><text:span text:style-name="Strong_20_Emphasis"><text:span text:style-name="T1">Bendición o Maldición</text:span></text:span><text:span text:style-name="T1">. Debemos examinar nuestro corazón, limpiarlo de todo "sedimento" y asegurarnos de que solo la Verdad de Dios habite en nuestra vasija. </text:span></text:p>
            </text:list-item>
          </text:list>
        </text:list-item>
      </text:list>
      <text:p text:style-name="Text_20_body"><text:span text:style-name="Strong_20_Emphasis"><text:span text:style-name="T1">📢 Recordatorio Logístico:</text:span></text:span></text:p>
      <text:list text:style-name="L14">
        <text:list-item>
          <text:p text:style-name="P34">Los pastores que están presentes, por favor quédense después de la clase para una reunión especial. </text:p>
        </text:list-item>
        <text:list-item>
          <text:p text:style-name="P35">Recuerden pedir los videos (Vimeo) a la persona que los invitó para repasar diariamente y asegurar que la "semilla" no sea robada por las aves.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span></text:p>
      <text:p text:style-name="P33">¡Gracias a todos! Cuídense, sigan estudiando y llénense de la verdad de Dios. ¡Nos vemos la próxima semana para estudiar la balanza y la vara!</text:p>
      <text:p text:style-name="P33"/>
      <text:p text:style-name="P33"/>
      <text:list text:style-name="L15">
        <text:list-item>
          <text:p text:style-name="P29"><text:span text:style-name="Strong_20_Emphasis"><text:span text:style-name="T1">Tradiciones humanas:</text:span></text:span><text:span text:style-name="T1"> Enseñanzas que hemos escuchado desde hace años en otras iglesias o de otros pastores, las cuales hemos aceptado como verdades absolutas sin verificarlas en la Biblia.</text:span></text:p>
        </text:list-item>
      </text:list>
      <text:list text:style-name="L16">
        <text:list-item>
          <text:p text:style-name="P30"><text:span text:style-name="Strong_20_Emphasis"><text:span text:style-name="T1">Pensamientos propios y prejuicios:</text:span></text:span><text:span text:style-name="T1"> Ideas preconcebidas sobre cómo "debería" ser Dios o cómo debería obrar, que chocan con lo que realmente dice Su Palabra.</text:span></text:p>
        </text:list-item>
      </text:list>
      <text:list text:style-name="L17">
        <text:list-item>
          <text:p text:style-name="P31"><text:soft-page-break/><text:span text:style-name="Strong_20_Emphasis"><text:span text:style-name="T1">Falsas doctrinas (Cizaña):</text:span></text:span><text:span text:style-name="T1"> Creencias que parecen cristianas (porque tienen un poco de "palabra de Dios" mezclada), pero que en el fondo son mentiras de Satanás que nos impiden ver la realidad del cumplimiento de las profecías.</text:span></text:p>
        </text:list-item>
      </text:list>
      <text:list text:style-name="L18">
        <text:list-item>
          <text:p text:style-name="P32"><text:span text:style-name="Emphasis"><text:span text:style-name="T1">El llamado de la lección:</text:span></text:span><text:span text:style-name="T1"> No debemos tener miedo de identificar este sedimento. Cuando la verdadera Palabra de Dios entra en nuestro corazón, naturalmente "chocará" con estas impurezas. Ese es el momento de permitir que Dios nos "trasvase", desechando todo pensamiento humano para quedarnos únicamente con la Verda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6:45.468335776</dc:date>
    <meta:editing-duration>PT1H34M36S</meta:editing-duration>
    <meta:editing-cycles>5</meta:editing-cycles>
    <meta:generator>LibreOffice/24.2.7.2$Linux_X86_64 LibreOffice_project/420$Build-2</meta:generator>
    <meta:document-statistic meta:table-count="0" meta:image-count="0" meta:object-count="0" meta:page-count="7" meta:paragraph-count="98" meta:word-count="1836" meta:character-count="10729" meta:non-whitespace-character-count="9001"/>
  </office:meta>
</office:document-meta>
</file>