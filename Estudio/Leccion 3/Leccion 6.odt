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9"/>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10"/>
    <style:style style:name="P19" style:family="paragraph" style:parent-style-name="Text_20_body" style:list-style-name="L10">
      <style:paragraph-properties fo:margin-top="0cm" fo:margin-bottom="0cm" style:contextual-spacing="false"/>
    </style:style>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2">
      <style:paragraph-properties fo:margin-top="0cm" fo:margin-bottom="0cm" style:contextual-spacing="false"/>
    </style:style>
    <style:style style:name="P23" style:family="paragraph" style:parent-style-name="Text_20_body" style:list-style-name="L13"/>
    <style:style style:name="P24" style:family="paragraph" style:parent-style-name="Text_20_body" style:list-style-name="L13">
      <style:paragraph-properties fo:margin-top="0cm" fo:margin-bottom="0cm" style:contextual-spacing="false"/>
    </style:style>
    <style:style style:name="P25" style:family="paragraph" style:parent-style-name="Text_20_body" style:list-style-name="L14"/>
    <style:style style:name="P26" style:family="paragraph" style:parent-style-name="Text_20_body" style:list-style-name="L14">
      <style:paragraph-properties fo:margin-top="0cm" fo:margin-bottom="0cm" style:contextual-spacing="false"/>
    </style:style>
    <style:style style:name="P27" style:family="paragraph" style:parent-style-name="Text_20_body" style:list-style-name="L15"/>
    <style:style style:name="P28" style:family="paragraph" style:parent-style-name="Text_20_body" style:list-style-name="L15">
      <style:paragraph-properties fo:margin-top="0cm" fo:margin-bottom="0cm" style:contextual-spacing="false"/>
    </style:style>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7">
      <style:paragraph-properties fo:margin-top="0cm" fo:margin-bottom="0cm" style:contextual-spacing="false"/>
    </style:style>
    <style:style style:name="P32" style:family="paragraph" style:parent-style-name="Text_20_body" style:list-style-name="L18"/>
    <style:style style:name="P33" style:family="paragraph" style:parent-style-name="Text_20_body" style:list-style-name="L18">
      <style:paragraph-properties fo:margin-top="0cm" fo:margin-bottom="0cm" style:contextual-spacing="false"/>
    </style:style>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0">
      <style:paragraph-properties fo:margin-top="0cm" fo:margin-bottom="0cm" style:contextual-spacing="false"/>
    </style:style>
    <style:style style:name="P37" style:family="paragraph" style:parent-style-name="Text_20_body" style:list-style-name="L21"/>
    <style:style style:name="P38" style:family="paragraph" style:parent-style-name="Text_20_body" style:list-style-name="L21">
      <style:paragraph-properties fo:margin-top="0cm" fo:margin-bottom="0cm" style:contextual-spacing="false"/>
    </style:style>
    <style:style style:name="P39" style:family="paragraph" style:parent-style-name="Text_20_body" style:list-style-name="L22"/>
    <style:style style:name="P40" style:family="paragraph" style:parent-style-name="Text_20_body" style:list-style-name="L22">
      <style:paragraph-properties fo:margin-top="0cm" fo:margin-bottom="0cm" style:contextual-spacing="false"/>
    </style:style>
    <style:style style:name="P41" style:family="paragraph" style:parent-style-name="Text_20_body" style:list-style-name="L23"/>
    <style:style style:name="P42" style:family="paragraph" style:parent-style-name="Text_20_body" style:list-style-name="L23">
      <style:paragraph-properties fo:margin-top="0cm" fo:margin-bottom="0cm" style:contextual-spacing="false"/>
    </style:style>
    <style:style style:name="P43" style:family="paragraph" style:parent-style-name="Text_20_body" style:list-style-name="L24"/>
    <style:style style:name="P44" style:family="paragraph" style:parent-style-name="Text_20_body" style:list-style-name="L24">
      <style:paragraph-properties fo:margin-top="0cm" fo:margin-bottom="0cm" style:contextual-spacing="false"/>
    </style:style>
    <style:style style:name="P45" style:family="paragraph" style:parent-style-name="Text_20_body" style:list-style-name="L25"/>
    <style:style style:name="P46" style:family="paragraph" style:parent-style-name="Text_20_body" style:list-style-name="L25">
      <style:paragraph-properties fo:margin-top="0cm" fo:margin-bottom="0cm" style:contextual-spacing="false"/>
    </style:style>
    <style:style style:name="P47" style:family="paragraph" style:parent-style-name="Text_20_body" style:list-style-name="L26"/>
    <style:style style:name="P48" style:family="paragraph" style:parent-style-name="Text_20_body" style:list-style-name="L26">
      <style:paragraph-properties fo:margin-top="0cm" fo:margin-bottom="0cm" style:contextual-spacing="false"/>
    </style:style>
    <style:style style:name="P49" style:family="paragraph" style:parent-style-name="Text_20_body" style:list-style-name="L27"/>
    <style:style style:name="P50" style:family="paragraph" style:parent-style-name="Text_20_body" style:list-style-name="L27">
      <style:paragraph-properties fo:margin-top="0cm" fo:margin-bottom="0cm" style:contextual-spacing="false"/>
    </style:style>
    <style:style style:name="P51" style:family="paragraph" style:parent-style-name="Text_20_body" style:list-style-name="L28">
      <style:paragraph-properties fo:margin-top="0cm" fo:margin-bottom="0cm" style:contextual-spacing="false"/>
    </style:style>
    <style:style style:name="P52" style:family="paragraph" style:parent-style-name="Text_20_body" style:list-style-name="L29">
      <style:paragraph-properties fo:margin-top="0cm" fo:margin-bottom="0cm" style:contextual-spacing="false"/>
    </style:style>
    <style:style style:name="P53" style:family="paragraph" style:parent-style-name="Text_20_body" style:list-style-name="L30">
      <style:paragraph-properties fo:margin-top="0cm" fo:margin-bottom="0cm" style:contextual-spacing="false"/>
    </style:style>
    <style:style style:name="P54" style:family="paragraph" style:parent-style-name="Text_20_body" style:list-style-name="L31"/>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CUADERNO DE ESTUDIO: LECCIÓN 6 (PARTE 1)</text:h>
      <text:h text:style-name="Heading_20_2" text:outline-level="2">Copa, Balanza y Vara en Lenguaje Figurativo</text:h>
      <text:p text:style-name="Horizontal_20_Line"/>
      <text:h text:style-name="Heading_20_2" text:outline-level="2">🔄 1. Repaso Inicial: La Levadura Espiritual</text:h>
      <text:p text:style-name="Text_20_body"><text:span text:style-name="Emphasis">(A cargo del Evangelista Christian Howard)</text:span></text:p>
      <text:p text:style-name="Text_20_body">Antes de comenzar la nueva lección, ponemos a prueba lo aprendido sobre la levadura y la importancia de examinar nuestro corazón:</text:p>
      <text:p text:style-name="Text_20_body"><text:span text:style-name="Strong_20_Emphasis">Preguntas de Reflexión y Respuestas:</text:span></text:p>
      <text:list text:style-name="L14">
        <text:list-item>
          <text:p text:style-name="P26"><text:span text:style-name="Strong_20_Emphasis">¿Cómo define la lección la levadura espiritual?</text:span></text:p>
          <text:list>
            <text:list-item>
              <text:p text:style-name="P26"><text:span text:style-name="Emphasis">Respuesta:</text:span> <text:span text:style-name="Strong_20_Emphasis">B) Enseñanzas morales que cambian el corazón.</text:span> (Así como la levadura cambia la masa, estas enseñanzas transforman nuestro interior). </text:p>
            </text:list-item>
          </text:list>
        </text:list-item>
        <text:list-item>
          <text:p text:style-name="P26"><text:span text:style-name="Strong_20_Emphasis">Si la levadura representa enseñanzas que transforman, ¿qué representa que "todo fue leudado"?</text:span></text:p>
          <text:list>
            <text:list-item>
              <text:p text:style-name="P26"><text:span text:style-name="Emphasis">Respuesta:</text:span> <text:span text:style-name="Strong_20_Emphasis">C) La enseñanza influyó completamente en aquello donde fue puesta.</text:span> (Debe haber un cambio total, no parcial). </text:p>
            </text:list-item>
          </text:list>
        </text:list-item>
        <text:list-item>
          <text:p text:style-name="P26"><text:span text:style-name="Strong_20_Emphasis">¿Por qué es importante tener cuidado con lo que escuchamos y aprendemos?</text:span></text:p>
          <text:list>
            <text:list-item>
              <text:p text:style-name="P25"><text:span text:style-name="Emphasis">Respuesta:</text:span> Porque <text:span text:style-name="Strong_20_Emphasis">hay dos tipos de levaduras</text:span> (la de Dios y la de Satanás). Si aceptamos la de Dios, nos transformamos a Su imagen; si aceptamos la de Satanás, nos convertimos más en él. Debemos escuchar, pero luego repasar todo con la Biblia. </text:p>
            </text:list-item>
          </text:list>
        </text:list-item>
      </text:list>
      <text:p text:style-name="Text_20_body"><text:span text:style-name="Strong_20_Emphasis">Oración de apertura:</text:span></text:p>
      <text:p text:style-name="Quotations"><text:span text:style-name="Emphasis">"Santísimo Padre Dios, gracias por todas estas palabras que nos has dado. Estamos viendo que todas estas parábolas que tú nos has enseñado en Mateo 13 no solo son cuentos, sino que cada una tiene un significado que tú nos has querido mostrar. Dios, ahí siempre estaba eso, pero nunca era el tiempo. Ahora tú estás revelando todos estos secretos tuyos. Dios, por favor, danos ese corazón hambriento que nos hace preguntar: ¿qué es esto? ¿Por qué es esto? Ayúdanos para que tengamos tiempo y un ambiente para repasar y aprender más de ti. Continúa enviando tu Espíritu Santo a todos los estudiantes para que abran sus ojos y sus corazones para entender tu palabra a tu manera, no a la manera en que ellos entendían antes. Oramos todo esto en tu hijo Jesucristo. Amén."</text:span></text:p>
      <text:p text:style-name="Horizontal_20_Line"/>
      <text:h text:style-name="Heading_20_2" text:outline-level="2">🏫 2. Introducción: El Enfoque en la "Copa"</text:h>
      <text:p text:style-name="Text_20_body"><text:span text:style-name="Emphasis">(A cargo del Instructor Sibiani)</text:span></text:p>
      <text:h text:style-name="Heading_20_3" text:outline-level="3"><text:soft-page-break/>📌 Recordatorios de Etiqueta</text:h>
      <text:list text:style-name="L15">
        <text:list-item>
          <text:p text:style-name="P28"><text:span text:style-name="Strong_20_Emphasis">Actitud:</text:span> Prender la cámara, tener la Biblia a mano y escribir todos los apuntes. </text:p>
        </text:list-item>
        <text:list-item>
          <text:p text:style-name="P27"><text:span text:style-name="Strong_20_Emphasis">Enfoque:</text:span> Muchas veces queremos hacer cosas, pero la mejor opción es simplemente <text:span text:style-name="Strong_20_Emphasis">detenerse, escuchar la palabra de Dios y entender Su voluntad</text:span>. Solo cuando entendemos bien, podemos actuar correctamente. </text:p>
        </text:list-item>
      </text:list>
      <text:h text:style-name="Heading_20_3" text:outline-level="3">📖 El Título de la Lección</text:h>
      <text:p text:style-name="Text_20_body">Leamos juntos dos veces:</text:p>
      <text:p text:style-name="Quotations"><text:span text:style-name="Strong_20_Emphasis">"Copa, balanza y vara en figurativo"</text:span></text:p>
      <text:p text:style-name="Text_20_body">Hoy nos vamos a enfocar en lo que es la <text:span text:style-name="Strong_20_Emphasis">Copa</text:span>. </text:p>
      <text:list text:style-name="L16">
        <text:list-item>
          <text:p text:style-name="P29"><text:span text:style-name="Emphasis">Reflexión:</text:span> ¿Qué es lo que Dios quiere mostrarme con una copa? En Apocalipsis aparecen copas llenas de la ira de Dios. Si no entendemos qué clase de copa es una copa espiritual, vamos a malentender el plan de Dios y no podremos entender cómo está obrando hoy. </text:p>
        </text:list-item>
      </text:list>
      <text:p text:style-name="Horizontal_20_Line"/>
      <text:h text:style-name="Heading_20_2" text:outline-level="2">🏆 3. El Versículo Principal: Las Copas de la Ira</text:h>
      <text:p text:style-name="Text_20_body"><text:span text:style-name="Strong_20_Emphasis">Apocalipsis 15:7</text:span></text:p>
      <text:p text:style-name="Quotations"><text:span text:style-name="Emphasis">"Y uno de los cuatro seres vivientes dio a los siete ángeles siete copas de oro, llenas de la ira de Dios, que vive por los siglos de los siglos".</text:span></text:p>
      <text:h text:style-name="Heading_20_3" text:outline-level="3">🔍 Análisis del Pasaje</text:h>
      <text:list text:style-name="L17">
        <text:list-item>
          <text:p text:style-name="P31"><text:span text:style-name="Strong_20_Emphasis">El Recipiente:</text:span> Siete ángeles reciben siete copas de oro. </text:p>
        </text:list-item>
        <text:list-item>
          <text:p text:style-name="P31"><text:span text:style-name="Strong_20_Emphasis">El Contenido:</text:span> Están <text:span text:style-name="Emphasis">llenas de la ira de Dios</text:span>. </text:p>
        </text:list-item>
        <text:list-item>
          <text:p text:style-name="P31"><text:span text:style-name="Strong_20_Emphasis">La Acción:</text:span> Dios quiere <text:span text:style-name="Emphasis">derramar</text:span> o verter esta copa sobre algo o algún lugar. </text:p>
        </text:list-item>
        <text:list-item>
          <text:p text:style-name="P30"><text:span text:style-name="Strong_20_Emphasis">El Significado Espiritual:</text:span> Físicamente no podemos "derramar ira" en una copa. Esto nos prueba que son <text:span text:style-name="Strong_20_Emphasis">copas espirituales</text:span>. Contienen algo muy importante (la ira de Dios) y deben ser derramadas en el tiempo y lugar correctos según el plan divino. </text:p>
        </text:list-item>
      </text:list>
      <text:p text:style-name="Horizontal_20_Line"/>
      <text:h text:style-name="Heading_20_2" text:outline-level="2">🏺 4. Características de la Copa: El Recipiente</text:h>
      <text:p text:style-name="Text_20_body">En la Biblia tenemos copas, jarras, vasijas y medidas. Físicamente se usaban para contener alimento, agua, trigo, vino o tesoros. </text:p>
      <text:h text:style-name="Heading_20_3" text:outline-level="3">🧠 Significado Espiritual</text:h>
      <text:list text:style-name="L18">
        <text:list-item>
          <text:p text:style-name="P33"><text:span text:style-name="Strong_20_Emphasis">El Contenedor:</text:span> Si el alimento es la Palabra de Dios (como vimos en lecciones anteriores), <text:span text:style-name="Strong_20_Emphasis">¿en dónde contenemos nosotros esa palabra?</text:span> </text:p>
        </text:list-item>
        <text:list-item>
          <text:p text:style-name="P33"><text:span text:style-name="Strong_20_Emphasis">El Corazón del Hombre:</text:span> Uno escucha las palabras con los oídos, pero deben permanecer en el corazón. Por lo tanto, la copa representa al <text:span text:style-name="Strong_20_Emphasis">hombre (su corazón)</text:span>. </text:p>
        </text:list-item>
        <text:list-item>
          <text:p text:style-name="P32"><text:soft-page-break/><text:span text:style-name="Strong_20_Emphasis">La Iglesia:</text:span> En una escala más grande, un lugar que tenga muchas "copas pequeñas" (personas) recibiendo el alimento de Dios, también se puede llamar una <text:span text:style-name="Strong_20_Emphasis">Iglesia</text:span>. Una gran copa que contiene muchas copas pequeñas. </text:p>
        </text:list-item>
      </text:list>
      <text:p text:style-name="Horizontal_20_Line"/>
      <text:h text:style-name="Heading_20_2" text:outline-level="2">⚖️ 5. Los Dos Tipos de Vasijas: Dios vs. Satanás</text:h>
      <text:p text:style-name="Text_20_body">Como siempre, Satanás imita lo que Dios hace. Hay vasijas que pertenecen a Dios y vasijas que pertenecen a Satanás.</text:p>
      <text:h text:style-name="Heading_20_3" text:outline-level="3">✅ La Vasija de Dios (El Lado de la Verdad)</text:h>
      <text:p text:style-name="Text_20_body">¿Qué hace que una copa sea de Dios? No es su apariencia física, sino lo que contiene y para qué propósito fue formada.</text:p>
      <text:p text:style-name="Text_20_body"><text:span text:style-name="Strong_20_Emphasis">1. Instrumento Escogido (Hechos 9:15)</text:span></text:p>
      <text:p text:style-name="Quotations"><text:span text:style-name="Emphasis">"Ve, porque instrumento escogido me es este, para llevar mi nombre en presencia de los gentiles, y de reyes, y de los hijos de Israel".</text:span></text:p>
      <text:list text:style-name="L19">
        <text:list-item>
          <text:p text:style-name="P34"><text:span text:style-name="Strong_20_Emphasis">El Apóstol Pablo:</text:span> Fue escogido directamente por Dios como un "instrumento" (un contenedor/vasija) para llevar la Palabra de Dios a todas las naciones. </text:p>
        </text:list-item>
      </text:list>
      <text:p text:style-name="Text_20_body"><text:span text:style-name="Strong_20_Emphasis">2. El Alfarero y el Barro (Romanos 9:21-24)</text:span></text:p>
      <text:p text:style-name="Quotations"><text:span text:style-name="Emphasis">"¿O no tiene potestad el alfarero sobre el barro, para hacer de la misma masa un vaso para honra y otro para deshonra?"</text:span></text:p>
      <text:list text:style-name="L20">
        <text:list-item>
          <text:p text:style-name="P36"><text:span text:style-name="Strong_20_Emphasis">El Alfarero es Dios:</text:span> Él tiene la potestad de formar nuestros corazones. </text:p>
        </text:list-item>
        <text:list-item>
          <text:p text:style-name="P35"><text:span text:style-name="Strong_20_Emphasis">Vasos de Misericordia:</text:span> Dios nos llama y nos prepara para ser vasos de honra, contenedores de Su gloria, tanto de judíos como de gentiles. </text:p>
        </text:list-item>
      </text:list>
      <text:p text:style-name="Text_20_body"><text:span text:style-name="Strong_20_Emphasis">3. El Proceso de Limpieza (2 Timoteo 2:21)</text:span></text:p>
      <text:p text:style-name="Quotations"><text:span text:style-name="Emphasis">"Así que, si alguno se limpia de estas cosas, será instrumento para honra, santificado, útil al Señor, y dispuesto para toda buena obra".</text:span></text:p>
      <text:list text:style-name="L21">
        <text:list-item>
          <text:p text:style-name="P38"><text:span text:style-name="Strong_20_Emphasis">La Condición:</text:span> Para ser un vaso de honra, <text:span text:style-name="Strong_20_Emphasis">debemos limpiarnos</text:span>. </text:p>
        </text:list-item>
        <text:list-item>
          <text:p text:style-name="P37"><text:span text:style-name="Strong_20_Emphasis">El Detergente Espiritual:</text:span> No hay un jabón celestial. Lo único que nos puede limpiar realmente es <text:span text:style-name="Strong_20_Emphasis">la Palabra de Dios (la Verdad)</text:span>. </text:p>
        </text:list-item>
      </text:list>
      <text:p text:style-name="Text_20_body"><text:span text:style-name="Strong_20_Emphasis">4. La Parábola de la Red y las Cestas (Mateo 13:47-50)</text:span></text:p>
      <text:p text:style-name="Quotations"><text:span text:style-name="Emphasis">"Asimismo, el reino de los cielos es semejante a una red... y sentados, recogieron lo bueno en cestas, y lo malo echaron fuera".</text:span></text:p>
      <text:list text:style-name="L22">
        <text:list-item>
          <text:p text:style-name="P40"><text:span text:style-name="Strong_20_Emphasis">Las Cestas (Contenedores):</text:span> Representan las organizaciones o iglesias donde Dios reúne a sus escogidos (los "peces buenos" o justos). </text:p>
        </text:list-item>
        <text:list-item>
          <text:p text:style-name="P39"><text:span text:style-name="Strong_20_Emphasis">El Destino:</text:span> Los justos son guardados en las cestas (el reino), y los malos son echados fuera (al horno de fuego). </text:p>
        </text:list-item>
      </text:list>
      <text:h text:style-name="Heading_20_3" text:outline-level="3"><text:soft-page-break/>❌ La Vasija de Satanás (El Lado de la Mentira)</text:h>
      <text:p text:style-name="Text_20_body">Esta vasija contiene mentiras, robo e injusticia. Pero lo más peligroso es que <text:span text:style-name="Strong_20_Emphasis">contiene una mezcla</text:span>: un poco de la palabra de Dios mezclada con pensamientos humanos y sedimentos.</text:p>
      <text:p text:style-name="Text_20_body"><text:span text:style-name="Strong_20_Emphasis">1. El Sedimento de Moab (Jeremías 48:11-12)</text:span></text:p>
      <text:p text:style-name="Quotations"><text:span text:style-name="Emphasis">"Quieto estuvo Moab desde su juventud, y sobre sus heces ha estado reposado, y no fue vaciado de vasija en vasija... por tanto, quedó su sabor en él, y su olor no se ha cambiado".</text:span></text:p>
      <text:list text:style-name="L23">
        <text:list-item>
          <text:p text:style-name="P42"><text:span text:style-name="Strong_20_Emphasis">El Sedimento (Heces/Sobras):</text:span> Representa las impurezas, los propios pensamientos y las tradiciones humanas que se acumulan en el fondo del corazón cuando no nos "vaciamos" ni nos limpiamos. </text:p>
        </text:list-item>
        <text:list-item>
          <text:p text:style-name="P41"><text:span text:style-name="Strong_20_Emphasis">El Peligro:</text:span> El pueblo de Dios (Moab) se corrompió. Su palabra estaba mezclada con impurezas. Dios promete enviar "trasvasadores" para vaciar y romper esos odres sucios. </text:p>
        </text:list-item>
      </text:list>
      <text:p text:style-name="Text_20_body"><text:span text:style-name="Strong_20_Emphasis">2. Limpiar solo lo de Afuera (Mateo 23:25-26)</text:span></text:p>
      <text:p text:style-name="Quotations"><text:span text:style-name="Emphasis">"¡Ay de vosotros, escribas y fariseos, hipócritas! Porque limpiáis lo de afuera del vaso y del plato, pero por dentro estáis llenos de robo y de injusticia... limpia primero lo de adentro del vaso".</text:span></text:p>
      <text:list text:style-name="L24">
        <text:list-item>
          <text:p text:style-name="P44"><text:span text:style-name="Strong_20_Emphasis">El Error de los Fariseos:</text:span> Eran como vasijas sucias por dentro, pero se enfocaban solo en la apariencia externa (se veían religiosos, santos y respetables). </text:p>
        </text:list-item>
        <text:list-item>
          <text:p text:style-name="P43"><text:span text:style-name="Strong_20_Emphasis">Los Trasvasadores:</text:span> Jesús y los 12 discípulos fueron enviados por Dios para "vaciar" y "limpiar" por dentro a las vasijas, quitando el sedimento de las tradiciones humanas. </text:p>
        </text:list-item>
      </text:list>
      <text:p text:style-name="Horizontal_20_Line"/>
      <text:h text:style-name="Heading_20_2" text:outline-level="2">🎯 6. Conclusión de la Lección</text:h>
      <text:list text:style-name="L25">
        <text:list-item>
          <text:p text:style-name="P46"><text:span text:style-name="Strong_20_Emphasis">Debemos contener la Palabra de Dios:</text:span> Para convertirnos en un vaso de Dios. </text:p>
        </text:list-item>
        <text:list-item>
          <text:p text:style-name="P46"><text:span text:style-name="Strong_20_Emphasis">Examinar nuestro corazón:</text:span> Después de recibir la palabra, debemos preguntar: <text:span text:style-name="Emphasis">¿Qué más hay en mi corazón? ¿Hay sedimentos, pensamientos propios o mentiras?</text:span> </text:p>
        </text:list-item>
        <text:list-item>
          <text:p text:style-name="P46"><text:span text:style-name="Strong_20_Emphasis">Limpiar y Vaciar:</text:span> Si hay impurezas, debemos desecharlas usando la misma Palabra de Dios. </text:p>
        </text:list-item>
        <text:list-item>
          <text:p text:style-name="P46"><text:span text:style-name="Strong_20_Emphasis">El Resultado Final:</text:span> </text:p>
          <text:list>
            <text:list-item>
              <text:p text:style-name="P46"><text:span text:style-name="Emphasis">Vasija de Dios (Verdad)</text:span> ➡️ Bendición, Reino de los Cielos, Vida Eterna. </text:p>
            </text:list-item>
            <text:list-item>
              <text:p text:style-name="P45"><text:span text:style-name="Emphasis">Vasija de Satanás (Mentira)</text:span> ➡️ Maldición, Juicio, Infierno. </text:p>
            </text:list-item>
          </text:list>
        </text:list-item>
      </text:list>
      <text:p text:style-name="Text_20_body"><text:span text:style-name="Strong_20_Emphasis">📢 Anuncio para la Próxima Lección:</text:span> La próxima vez veremos la segunda parte: <text:span text:style-name="Strong_20_Emphasis">Balanza y Vara en figurativo</text:span>. ¿Por qué Dios utiliza una balanza? ¿Por qué nos muestra varas? ¡Prepárense para seguir descubriendo los secretos del reino!</text:p>
      <text:p text:style-name="Horizontal_20_Line"/>
      <text:h text:style-name="Heading_20_2" text:outline-level="2">🔄 7. Repaso Final Interactivo y Oración de Cierre</text:h>
      <text:p text:style-name="Text_20_body"><text:span text:style-name="Emphasis">(A cargo del Evangelista Christian Howard)</text:span></text:p>
      <text:p text:style-name="Text_20_body"><text:span text:style-name="Strong_20_Emphasis">Resumen Interactivo con los Estudiantes:</text:span></text:p>
      <text:list text:style-name="L26">
        <text:list-item>
          <text:p text:style-name="P48"><text:soft-page-break/><text:span text:style-name="Strong_20_Emphasis">¿Qué es la "Copa" espiritualmente?</text:span></text:p>
          <text:list>
            <text:list-item>
              <text:p text:style-name="P48"><text:span text:style-name="Emphasis">Respuesta:</text:span> Es un <text:span text:style-name="Strong_20_Emphasis">contenedor</text:span>. Representa el <text:span text:style-name="Strong_20_Emphasis">corazón de la persona</text:span> y, en escala grande, representa la <text:span text:style-name="Strong_20_Emphasis">Iglesia</text:span>. </text:p>
            </text:list-item>
          </text:list>
        </text:list-item>
        <text:list-item>
          <text:p text:style-name="P48"><text:span text:style-name="Strong_20_Emphasis">¿Qué contiene la copa?</text:span></text:p>
          <text:list>
            <text:list-item>
              <text:p text:style-name="P48"><text:span text:style-name="Emphasis">Respuesta:</text:span> <text:span text:style-name="Strong_20_Emphasis">Alimento</text:span>, que ya sabemos que es la <text:span text:style-name="Strong_20_Emphasis">Palabra de Dios</text:span>. </text:p>
            </text:list-item>
          </text:list>
        </text:list-item>
        <text:list-item>
          <text:p text:style-name="P48"><text:span text:style-name="Strong_20_Emphasis">¿Cuáles son los dos tipos de copas?</text:span></text:p>
          <text:list>
            <text:list-item>
              <text:p text:style-name="P48"><text:span text:style-name="Emphasis">Respuesta:</text:span> <text:span text:style-name="Strong_20_Emphasis">La Copa de Dios</text:span> (contiene la Verdad: profecía y cumplimiento) y <text:span text:style-name="Strong_20_Emphasis">la Copa de Satanás</text:span> (contiene mentiras: la palabra de Dios tergiversada y mezclada con pensamientos humanos). </text:p>
            </text:list-item>
          </text:list>
        </text:list-item>
        <text:list-item>
          <text:p text:style-name="P48"><text:span text:style-name="Strong_20_Emphasis">¿Cuál es el destino final de los "peces buenos" en la parábola de la red?</text:span></text:p>
          <text:list>
            <text:list-item>
              <text:p text:style-name="P48"><text:span text:style-name="Emphasis">Respuesta:</text:span> Ser recogidos en <text:span text:style-name="Strong_20_Emphasis">cestas</text:span> (contenedores/iglesias), lo que representa el Reino de los Cielos y la bendición de estar con Dios. </text:p>
            </text:list-item>
          </text:list>
        </text:list-item>
        <text:list-item>
          <text:p text:style-name="P48"><text:span text:style-name="Strong_20_Emphasis">¿Cuál es la gran lección para nosotros?</text:span></text:p>
          <text:list>
            <text:list-item>
              <text:p text:style-name="P47"><text:span text:style-name="Emphasis">Respuesta:</text:span> Debemos darnos cuenta de que el resultado no es pequeño. Es <text:span text:style-name="Strong_20_Emphasis">Bendición o Maldición</text:span>. Debemos examinar nuestro corazón, limpiarlo de todo "sedimento" y asegurarnos de que solo la Verdad de Dios habite en nuestra vasija. </text:p>
            </text:list-item>
          </text:list>
        </text:list-item>
      </text:list>
      <text:p text:style-name="Text_20_body"><text:span text:style-name="Strong_20_Emphasis">📢 Recordatorio Logístico:</text:span></text:p>
      <text:list text:style-name="L27">
        <text:list-item>
          <text:p text:style-name="P50">Los pastores que están presentes, por favor quédense después de la clase para una reunión especial. </text:p>
        </text:list-item>
        <text:list-item>
          <text:p text:style-name="P49">Recuerden pedir los videos (Vimeo) a la persona que los invitó para repasar diariamente y asegurar que la "semilla" no sea robada por las aves. </text:p>
        </text:list-item>
      </text:list>
      <text:p text:style-name="Text_20_body"><text:span text:style-name="Strong_20_Emphasis">Oración de Cierre (El Padre Nuestro):</text:span></text:p>
      <text:p text:style-name="Quotations"><text:span text:style-name="Emphasis">"Padre nuestro que estás en los cielos, santificado sea tu nombre. Venga a nosotros tu reino. Hágase tu voluntad en la tierra como en el cielo. Danos hoy nuestro pan de cada día. Perdona nuestras deudas, como también nosotros perdonamos a nuestros deudores. No nos dejes caer en la tentación, mas líbranos del mal. Porque tuyo es el reino, el poder y la gloria, por los siglos de los siglos. Amén."</text:span></text:p>
      <text:p text:style-name="Text_20_body">¡Gracias a todos! Cuídense, sigan estudiando y llénense de la verdad de Dios. ¡Nos vemos la próxima semana para estudiar la balanza y la vara!</text:p>
      <text:p text:style-name="Text_20_body"/>
      <text:p text:style-name="Text_20_body"/>
      <text:list text:style-name="L28">
        <text:list-item>
          <text:p text:style-name="P51"><text:span text:style-name="Strong_20_Emphasis">Tradiciones humanas:</text:span> Enseñanzas que hemos escuchado desde hace años en otras iglesias o de otros pastores, las cuales hemos aceptado como verdades absolutas sin verificarlas en la Biblia.</text:p>
        </text:list-item>
      </text:list>
      <text:list text:style-name="L29">
        <text:list-item>
          <text:p text:style-name="P52"><text:span text:style-name="Strong_20_Emphasis">Pensamientos propios y prejuicios:</text:span> Ideas preconcebidas sobre cómo "debería" ser Dios o cómo debería obrar, que chocan con lo que realmente dice Su Palabra.</text:p>
        </text:list-item>
      </text:list>
      <text:list text:style-name="L30">
        <text:list-item>
          <text:p text:style-name="P53"><text:span text:style-name="Strong_20_Emphasis">Falsas doctrinas (Cizaña):</text:span> Creencias que parecen cristianas (porque tienen un poco de "palabra de Dios" mezclada), pero que en el fondo son mentiras de Satanás que nos impiden ver la realidad del cumplimiento de las profecías.</text:p>
        </text:list-item>
      </text:list>
      <text:list text:style-name="L31">
        <text:list-item>
          <text:p text:style-name="P54"><text:span text:style-name="Emphasis">El llamado de la lección:</text:span> No debemos tener miedo de identificar este sedimento. Cuando la verdadera Palabra de Dios entra en nuestro corazón, naturalmente "chocará" con estas <text:soft-page-break/>impurezas. Ese es el momento de permitir que Dios nos "trasvase", desechando todo pensamiento humano para quedarnos únicamente con la Verda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6-23T20:15:26.677653071</dc:date>
    <meta:editing-duration>PT1H34M18S</meta:editing-duration>
    <meta:editing-cycles>4</meta:editing-cycles>
    <meta:generator>LibreOffice/24.2.7.2$Linux_X86_64 LibreOffice_project/420$Build-2</meta:generator>
    <meta:document-statistic meta:table-count="0" meta:image-count="0" meta:object-count="0" meta:page-count="6" meta:paragraph-count="98" meta:word-count="1836" meta:character-count="10729" meta:non-whitespace-character-count="9001"/>
  </office:meta>
</office:document-meta>
</file>