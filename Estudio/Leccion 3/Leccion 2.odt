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eading_20_4">
      <style:text-properties style:font-name="Padauk Book"/>
    </style:style>
    <style:style style:name="P5" style:family="paragraph" style:parent-style-name="Horizontal_20_Line">
      <style:text-properties style:font-name="Padauk Book"/>
    </style:style>
    <style:style style:name="P6" style:family="paragraph" style:parent-style-name="Standard">
      <style:text-properties style:font-name="Padauk Book"/>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text-properties style:font-name="Padauk Book"/>
    </style:style>
    <style:style style:name="P34" style:family="paragraph" style:parent-style-name="Text_20_body" style:list-style-name="L3">
      <style:paragraph-properties fo:margin-top="0cm" fo:margin-bottom="0cm" style:contextual-spacing="false"/>
      <style:text-properties style:font-name="Padauk Book"/>
    </style:style>
    <style:style style:name="P35" style:family="paragraph" style:parent-style-name="Text_20_body" style:list-style-name="L7">
      <style:paragraph-properties fo:margin-top="0cm" fo:margin-bottom="0cm" style:contextual-spacing="false"/>
      <style:text-properties style:font-name="Padauk Book"/>
    </style:style>
    <style:style style:name="P36" style:family="paragraph" style:parent-style-name="Text_20_body" style:list-style-name="L7">
      <style:text-properties style:font-name="Padauk Book"/>
    </style:style>
    <style:style style:name="P37" style:family="paragraph" style:parent-style-name="Text_20_body" style:list-style-name="L16">
      <style:paragraph-properties fo:margin-top="0cm" fo:margin-bottom="0cm" style:contextual-spacing="false"/>
      <style:text-properties style:font-name="Padauk Book"/>
    </style:style>
    <style:style style:name="P38" style:family="paragraph" style:parent-style-name="Text_20_body" style:list-style-name="L16">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4</text:h>
      <text:h text:style-name="P2" text:outline-level="2">Semilla, Campo, Árbol y Ave en Lenguaje Figurativo</text:h>
      <text:p text:style-name="P5"/>
      <text:h text:style-name="P2" text:outline-level="2">🔄 1. Repaso Inicial: La Importancia de las Parábolas</text:h>
      <text:p text:style-name="Text_20_body"><text:span text:style-name="Emphasis"><text:span text:style-name="T1">(A cargo del Evangelista Christian Howard)</text:span></text:span></text:p>
      <text:p text:style-name="P33">Antes de comenzar la nueva lección, ponemos a prueba lo aprendido sobre los misterios del reino y la importancia de comprenderlos:</text:p>
      <text:p text:style-name="Text_20_body"><text:span text:style-name="Strong_20_Emphasis"><text:span text:style-name="T1">Preguntas de Reflexión y Respuestas:</text:span></text:span></text:p>
      <text:list text:style-name="L1">
        <text:list-item>
          <text:p text:style-name="P8"><text:span text:style-name="Strong_20_Emphasis"><text:span text:style-name="T1">Según Mateo 7:21, si alguien conoce el significado de una parábola pero no obedece, ¿qué debe considerar?</text:span></text:span></text:p>
          <text:list>
            <text:list-item>
              <text:p text:style-name="P8"><text:span text:style-name="Emphasis"><text:span text:style-name="T1">Respuesta:</text:span></text:span><text:span text:style-name="T1"> </text:span><text:span text:style-name="Strong_20_Emphasis"><text:span text:style-name="T1">A) El conocimiento por sí solo no es suficiente.</text:span></text:span><text:span text:style-name="T1"> (Deben saber el significado y seguirlo, como hicieron los 12 discípulos). </text:span></text:p>
            </text:list-item>
          </text:list>
        </text:list-item>
        <text:list-item>
          <text:p text:style-name="P8"><text:span text:style-name="Strong_20_Emphasis"><text:span text:style-name="T1">¿Qué idea conecta Mateo 13:10-11 con la salvación?</text:span></text:span></text:p>
          <text:list>
            <text:list-item>
              <text:p text:style-name="P8"><text:span text:style-name="Emphasis"><text:span text:style-name="T1">Respuesta:</text:span></text:span><text:span text:style-name="T1"> </text:span><text:span text:style-name="Strong_20_Emphasis"><text:span text:style-name="T1">B) Comprender los misterios del reino es esencial para la salvación.</text:span></text:span><text:span text:style-name="T1"> (Los misterios enseñan la voluntad de Dios; si no la entendemos, no podemos obedecerla ni ser salvos). </text:span></text:p>
            </text:list-item>
          </text:list>
        </text:list-item>
        <text:list-item>
          <text:p text:style-name="P8"><text:span text:style-name="Strong_20_Emphasis"><text:span text:style-name="T1">¿Cuál es la diferencia entre una parábola usada para enseñanza moral y una usada para profecía?</text:span></text:span></text:p>
          <text:list>
            <text:list-item>
              <text:p text:style-name="P8"><text:span text:style-name="Emphasis"><text:span text:style-name="T1">Respuesta:</text:span></text:span><text:span text:style-name="T1"> En historia y enseñanza moral, las parábolas son para </text:span><text:span text:style-name="Strong_20_Emphasis"><text:span text:style-name="T1">reforzar la idea y ayudar a comprender</text:span></text:span><text:span text:style-name="T1">. En profecía, son para </text:span><text:span text:style-name="Strong_20_Emphasis"><text:span text:style-name="T1">ocultar los misterios del reino</text:span></text:span><text:span text:style-name="T1"> de los enemigos (Satanás). </text:span></text:p>
            </text:list-item>
          </text:list>
        </text:list-item>
        <text:list-item>
          <text:p text:style-name="P8"><text:span text:style-name="Strong_20_Emphasis"><text:span text:style-name="T1">¿Cuándo se puede entender plenamente el verdadero significado de una parábola?</text:span></text:span></text:p>
          <text:list>
            <text:list-item>
              <text:p text:style-name="P8"><text:span text:style-name="Emphasis"><text:span text:style-name="T1">Respuesta:</text:span></text:span><text:span text:style-name="T1"> </text:span><text:span text:style-name="Strong_20_Emphasis"><text:span text:style-name="T1">Cuando hay un cumplimiento (la realidad).</text:span></text:span><text:span text:style-name="T1"> Cuando vemos la realidad de lo que significa esa parábola. </text:span></text:p>
            </text:list-item>
          </text:list>
        </text:list-item>
        <text:list-item>
          <text:p text:style-name="P8"><text:span text:style-name="Strong_20_Emphasis"><text:span text:style-name="T1">¿Qué consecuencias menciona la Biblia para quienes no entienden las parábolas?</text:span></text:span></text:p>
          <text:list>
            <text:list-item>
              <text:p text:style-name="P7"><text:span text:style-name="Emphasis"><text:span text:style-name="T1">Respuesta:</text:span></text:span><text:span text:style-name="T1"> No conocen la voluntad de Dios, no reciben perdón de pecados y no alcanzan la salvación (Marcos 4:10-12; Mateo 7:21). </text:span></text:p>
            </text:list-item>
          </text:list>
        </text:list-item>
      </text:list>
      <text:p text:style-name="Text_20_body"><text:span text:style-name="Strong_20_Emphasis"><text:span text:style-name="T1">Oración de apertura:</text:span></text:span></text:p>
      <text:p text:style-name="Quotations"><text:soft-page-break/><text:span text:style-name="Emphasis"><text:span text:style-name="T1">"Santísimo Padre Dios, gracias por este día. Gracias por enseñarnos la importancia de las parábolas y que tenemos que entender qué significan. Antes, muchos de nosotros ni sabíamos la importancia de esto, pero hoy, en estos estudios, tú nos vas a revelar todo tu plan y tus deseos hacia nosotros. Tenemos que tener un corazón humilde. Dios, por favor, manda tu Espíritu Santo a todos nosotros, que abra nuestros corazones y mentes para que no seamos como esas personas que no pudieron oír ni ver, sino abre nuestros ojos y oídos espiritualmente para entender. Ayuda a los estudiantes que tienen problemas para venir a clase; solo tú puedes guiarnos y abrir el camino. Oramos todo esto en el nombre de tu Hijo Jesucristo. Amén."</text:span></text:span></text:p>
      <text:p text:style-name="P5"/>
      <text:h text:style-name="P2" text:outline-level="2">🏫 2. Introducción a los Secretos del Reino</text:h>
      <text:p text:style-name="Text_20_body"><text:span text:style-name="Emphasis"><text:span text:style-name="T1">(A cargo del Instructor Sibiani)</text:span></text:span></text:p>
      <text:h text:style-name="P3" text:outline-level="3">📌 Recordatorios de Etiqueta</text:h>
      <text:list text:style-name="L2">
        <text:list-item>
          <text:p text:style-name="P10"><text:span text:style-name="Strong_20_Emphasis"><text:span text:style-name="T1">Actitud:</text:span></text:span><text:span text:style-name="T1"> Estamos delante de la Palabra de Dios, por lo que nuestra actitud debe ser de reverencia. </text:span></text:p>
        </text:list-item>
        <text:list-item>
          <text:p text:style-name="P10"><text:span text:style-name="Strong_20_Emphasis"><text:span text:style-name="T1">Materiales:</text:span></text:span><text:span text:style-name="T1"> Biblia física, cuaderno y bolígrafo a la mano. Hacer buenos apuntes es vital para repasar y no olvidar. </text:span></text:p>
        </text:list-item>
        <text:list-item>
          <text:p text:style-name="P9"><text:span text:style-name="Strong_20_Emphasis"><text:span text:style-name="T1">El Enemigo Oculto:</text:span></text:span><text:span text:style-name="T1"> Cuando hablamos de parábolas respecto al reino de los cielos, estamos hablando de profecías. Dios las ocultó del enemigo, pero ahora, porque ustedes son Su pueblo, Él se las está revelando. ¡Tomen provecho de esta oportunidad! </text:span></text:p>
        </text:list-item>
      </text:list>
      <text:h text:style-name="P3" text:outline-level="3">📖 El Título de la Lección</text:h>
      <text:p text:style-name="P33">Leamos juntos dos veces:</text:p>
      <text:p text:style-name="Quotations"><text:span text:style-name="Strong_20_Emphasis"><text:span text:style-name="T1">"Semilla, campo, árbol y ave en figurativo"</text:span></text:span></text:p>
      <text:p text:style-name="Text_20_body"><text:span text:style-name="T1">Estas son cosas que conocen muy bien en el mundo natural, pero Dios las usa porque hay un </text:span><text:span text:style-name="Strong_20_Emphasis"><text:span text:style-name="T1">significado oculto</text:span></text:span><text:span text:style-name="T1"> (un mensaje encriptado). Debemos revelarlo espiritualmente.</text:span></text:p>
      <text:p text:style-name="P5"/>
      <text:h text:style-name="P2" text:outline-level="2">🌱 3. La Parábola Principal: El Grano de Mostaza</text:h>
      <text:p text:style-name="Text_20_body"><text:span text:style-name="Strong_20_Emphasis"><text:span text:style-name="T1">Mateo 13:31-32</text:span></text:span></text:p>
      <text:p text:style-name="Quotations"><text:soft-page-break/><text:span text:style-name="Emphasis"><text:span text:style-name="T1">"Otra parábola les refirió, diciendo: 'El reino de los cielos es semejante al grano de mostaza que un hombre tomó y sembró en su campo, el cual a la verdad es la más pequeña de todas las semillas, pero cuando ha crecido, es la mayor de las hortalizas y se hace árbol, de tal manera que vienen las aves del cielo y hacen nidos en sus ramas'."</text:span></text:span></text:p>
      <text:p text:style-name="Text_20_body"><text:span text:style-name="Strong_20_Emphasis"><text:span text:style-name="T1">El Orden de las Cosas:</text:span></text:span></text:p>
      <text:list text:style-name="L3">
        <text:list-item>
          <text:p text:style-name="P34">Se siembra una semilla (algo muy pequeño). </text:p>
        </text:list-item>
        <text:list-item>
          <text:p text:style-name="P34">Crece y se transforma en un árbol grande. </text:p>
        </text:list-item>
        <text:list-item>
          <text:p text:style-name="P11"><text:span text:style-name="Emphasis"><text:span text:style-name="T1">Solo después</text:span></text:span><text:span text:style-name="T1"> de que el árbol es grande, las aves vienen y hacen nidos en sus ramas. </text:span></text:p>
        </text:list-item>
      </text:list>
      <text:p text:style-name="P5"/>
      <text:h text:style-name="P2" text:outline-level="2">🧬 4. Características Físicas y Espirituales de la Semilla</text:h>
      <text:h text:style-name="P3" text:outline-level="3">🌿 Características Físicas de una Semilla</text:h>
      <text:list text:style-name="L4">
        <text:list-item>
          <text:p text:style-name="P13"><text:span text:style-name="Strong_20_Emphasis"><text:span text:style-name="T1">Origen de la vida:</text:span></text:span><text:span text:style-name="T1"> Todo lo vivo inicia con una semilla. Sin semilla, no hay vida. </text:span></text:p>
        </text:list-item>
        <text:list-item>
          <text:p text:style-name="P13"><text:span text:style-name="Strong_20_Emphasis"><text:span text:style-name="T1">Crece y se transforma:</text:span></text:span><text:span text:style-name="T1"> No es normal sembrar y que se encoja; la semilla siempre crece. </text:span></text:p>
        </text:list-item>
        <text:list-item>
          <text:p text:style-name="P13"><text:span text:style-name="Strong_20_Emphasis"><text:span text:style-name="T1">Propósito (Cosecha):</text:span></text:span><text:span text:style-name="T1"> El agricultor siembra para cosechar un fruto específico. </text:span></text:p>
        </text:list-item>
        <text:list-item>
          <text:p text:style-name="P12"><text:span text:style-name="Strong_20_Emphasis"><text:span text:style-name="T1">Rasgos genéticos:</text:span></text:span><text:span text:style-name="T1"> </text:span><text:span text:style-name="Emphasis"><text:span text:style-name="T1">Analogía del árbol de mangos.</text:span></text:span><text:span text:style-name="T1"> Cuando ves una semilla, es difícil saber qué es. Cuando crece y da frutos, ahí sabes exactamente qué semilla era. Una semilla de manzana no da limones. </text:span></text:p>
        </text:list-item>
      </text:list>
      <text:h text:style-name="P3" text:outline-level="3">🕊️ Las Dos Semillas Espirituales</text:h>
      <text:p text:style-name="Text_20_body"><text:span text:style-name="T1">Espiritualmente hablando, solo existen </text:span><text:span text:style-name="Strong_20_Emphasis"><text:span text:style-name="T1">dos tipos de semillas</text:span></text:span><text:span text:style-name="T1"> porque hay dos tipos de espíritus (Dios y el Diablo).</text:span></text:p>
      <text:h text:style-name="P4" text:outline-level="4">✅ La Semilla de Dios (La Palabra / La Verdad)</text:h>
      <text:list text:style-name="L5">
        <text:list-item>
          <text:p text:style-name="P15"><text:span text:style-name="Strong_20_Emphasis"><text:span text:style-name="T1">Lucas 8:11:</text:span></text:span><text:span text:style-name="T1"> </text:span><text:span text:style-name="Emphasis"><text:span text:style-name="T1">"La semilla es la palabra de Dios"</text:span></text:span><text:span text:style-name="T1">. </text:span></text:p>
        </text:list-item>
        <text:list-item>
          <text:p text:style-name="P15"><text:span text:style-name="Strong_20_Emphasis"><text:span text:style-name="T1">Romanos 10:17:</text:span></text:span><text:span text:style-name="T1"> </text:span><text:span text:style-name="Emphasis"><text:span text:style-name="T1">"La fe es por el oír, y el oír, por la palabra de Dios"</text:span></text:span><text:span text:style-name="T1">. Nuestra vida de fe debe basarse en la Palabra, no en emociones. </text:span></text:p>
        </text:list-item>
        <text:list-item>
          <text:p text:style-name="P15"><text:span text:style-name="Strong_20_Emphasis"><text:span text:style-name="T1">1 Pedro 1:23:</text:span></text:span><text:span text:style-name="T1"> Somos renacidos de simiente incorruptible, por la palabra de Dios que vive y permanece para siempre. </text:span></text:p>
        </text:list-item>
        <text:list-item>
          <text:p text:style-name="P14"><text:span text:style-name="Strong_20_Emphasis"><text:span text:style-name="T1">¿Qué es la Verdad?</text:span></text:span><text:span text:style-name="T1"> Es el cumplimiento exacto de las promesas de Dios. </text:span></text:p>
        </text:list-item>
      </text:list>
      <text:h text:style-name="P4" text:outline-level="4"><text:soft-page-break/>❌ La Semilla del Diablo (La Mentira / La Tergiversación)</text:h>
      <text:list text:style-name="L6">
        <text:list-item>
          <text:p text:style-name="P17"><text:span text:style-name="Strong_20_Emphasis"><text:span text:style-name="T1">1 Juan 3:9-10:</text:span></text:span><text:span text:style-name="T1"> En esto se manifiestan los hijos de Dios y los hijos del diablo. Todo aquel que no hace justicia y no ama a su hermano, no es de Dios (porque no tiene la simiente de Dios en su corazón). </text:span></text:p>
        </text:list-item>
        <text:list-item>
          <text:p text:style-name="P17"><text:span text:style-name="Strong_20_Emphasis"><text:span text:style-name="T1">Juan 8:44:</text:span></text:span><text:span text:style-name="T1"> Satanás es mentiroso y padre de mentira. </text:span></text:p>
        </text:list-item>
        <text:list-item>
          <text:p text:style-name="P16"><text:span text:style-name="Strong_20_Emphasis"><text:span text:style-name="T1">¿De qué miente Satanás?</text:span></text:span><text:span text:style-name="T1"> No miente de cosas triviales; </text:span><text:span text:style-name="Strong_20_Emphasis"><text:span text:style-name="T1">miente respecto a la Palabra de Dios</text:span></text:span><text:span text:style-name="T1">. Terigversa la Biblia para que parezca verdad, tal como lo hicieron los fariseos en la Primera Venida (decían: </text:span><text:span text:style-name="Emphasis"><text:span text:style-name="T1">"Solo cree en Dios y ya, no te preocupes por lo que dice ese Jesús"</text:span></text:span><text:span text:style-name="T1">). </text:span></text:p>
        </text:list-item>
      </text:list>
      <text:p text:style-name="P5"/>
      <text:h text:style-name="P2" text:outline-level="2">🌍 5. El Significado Espiritual del Campo</text:h>
      <text:p text:style-name="P33">Si la semilla es espiritual, el campo también debe serlo. ¿Qué características tiene un campo?</text:p>
      <text:list text:style-name="L7">
        <text:list-item>
          <text:p text:style-name="P35">Es donde se siembra la semilla. </text:p>
        </text:list-item>
        <text:list-item>
          <text:p text:style-name="P36">Es el ambiente donde la semilla crece, se transforma y da frutos. </text:p>
        </text:list-item>
      </text:list>
      <text:h text:style-name="P3" text:outline-level="3">📜 Los Significados Bíblicos del "Campo"</text:h>
      <text:list text:style-name="L8">
        <text:list-item>
          <text:p text:style-name="P19"><text:span text:style-name="Strong_20_Emphasis"><text:span text:style-name="T1">El Corazón de la Persona:</text:span></text:span></text:p>
          <text:list>
            <text:list-item>
              <text:p text:style-name="P19"><text:span text:style-name="Strong_20_Emphasis"><text:span text:style-name="T1">1 Corintios 3:9:</text:span></text:span><text:span text:style-name="T1"> </text:span><text:span text:style-name="Emphasis"><text:span text:style-name="T1">"Vosotros sois labranza de Dios"</text:span></text:span><text:span text:style-name="T1">. Los creyentes son el campo donde se siembra la Palabra. </text:span></text:p>
            </text:list-item>
            <text:list-item>
              <text:p text:style-name="P19"><text:span text:style-name="Strong_20_Emphasis"><text:span text:style-name="T1">Lucas 8:15:</text:span></text:span><text:span text:style-name="T1"> </text:span><text:span text:style-name="Emphasis"><text:span text:style-name="T1">"La que cayó en buena tierra, estos son los que con corazón bueno y recto retienen la palabra oída y dan fruto con perseverancia"</text:span></text:span><text:span text:style-name="T1">. </text:span></text:p>
            </text:list-item>
          </text:list>
        </text:list-item>
        <text:list-item>
          <text:p text:style-name="P19"><text:span text:style-name="Strong_20_Emphasis"><text:span text:style-name="T1">El Mundo (El Cristianismo):</text:span></text:span></text:p>
          <text:list>
            <text:list-item>
              <text:p text:style-name="P19"><text:span text:style-name="Strong_20_Emphasis"><text:span text:style-name="T1">Mateo 13:38:</text:span></text:span><text:span text:style-name="T1"> </text:span><text:span text:style-name="Emphasis"><text:span text:style-name="T1">"El campo es el mundo, la buena semilla son los hijos del reino y la cizaña son los hijos del malo"</text:span></text:span><text:span text:style-name="T1">. </text:span></text:p>
            </text:list-item>
            <text:list-item>
              <text:p text:style-name="P18"><text:span text:style-name="Emphasis"><text:span text:style-name="T1">Nota:</text:span></text:span><text:span text:style-name="T1"> Este "mundo" no es el planeta entero, sino el ámbito donde se siembra la palabra de Dios: las iglesias, el cristianismo. ¡Alerta! En el campo de Jesús también hay cizaña (semilla del enemigo). </text:span></text:p>
            </text:list-item>
          </text:list>
        </text:list-item>
      </text:list>
      <text:p text:style-name="P5"/>
      <text:h text:style-name="P2" text:outline-level="2">🚜 6. Los Cuatro Tipos de Campos (Corazones)</text:h>
      <text:p text:style-name="Text_20_body"><text:span text:style-name="Emphasis"><text:span text:style-name="T1">(Basado en Lucas 8:5-8 y Mateo 13:3-9)</text:span></text:span></text:p>
      <text:p text:style-name="Text_20_body"><text:soft-page-break/><text:span text:style-name="T1">Cuando el sembrador tira la semilla, cae en cuatro tipos de terrenos. Esto es un espejo para que nos preguntemos: </text:span><text:span text:style-name="Emphasis"><text:span text:style-name="T1">¿Qué clase de campo soy yo?</text:span></text:span></text:p>
      <text:h text:style-name="P3" text:outline-level="3">1️⃣ Junto al Camino (El Camino Pisoteado)</text:h>
      <text:list text:style-name="L9">
        <text:list-item>
          <text:p text:style-name="P21"><text:span text:style-name="Strong_20_Emphasis"><text:span text:style-name="T1">Físico:</text:span></text:span><text:span text:style-name="T1"> Tierra dura, la semilla no entra, vienen las aves y se la comen. </text:span></text:p>
        </text:list-item>
        <text:list-item>
          <text:p text:style-name="P20"><text:span text:style-name="Strong_20_Emphasis"><text:span text:style-name="T1">Espiritual:</text:span></text:span><text:span text:style-name="T1"> Oyen la palabra (sobre el reino), pero </text:span><text:span text:style-name="Strong_20_Emphasis"><text:span text:style-name="T1">no la entienden</text:span></text:span><text:span text:style-name="T1">. Entra por un oído y sale por el otro. El diablo viene y quita la palabra de su corazón. </text:span></text:p>
        </text:list-item>
      </text:list>
      <text:h text:style-name="P3" text:outline-level="3">2️⃣ Pedregal (Tierra con Piedras)</text:h>
      <text:list text:style-name="L10">
        <text:list-item>
          <text:p text:style-name="P23"><text:span text:style-name="Strong_20_Emphasis"><text:span text:style-name="T1">Físico:</text:span></text:span><text:span text:style-name="T1"> Hay poca tierra, la semilla brota rápido pero no echa raíz. Cuando sale el sol, se seca. </text:span></text:p>
        </text:list-item>
        <text:list-item>
          <text:p text:style-name="P23"><text:span text:style-name="Strong_20_Emphasis"><text:span text:style-name="T1">Espiritual:</text:span></text:span><text:span text:style-name="T1"> Reciben la palabra con gusto, pero </text:span><text:span text:style-name="Strong_20_Emphasis"><text:span text:style-name="T1">no tienen raíz</text:span></text:span><text:span text:style-name="T1">. Cuando viene la </text:span><text:span text:style-name="Strong_20_Emphasis"><text:span text:style-name="T1">persecución o la aflicción</text:span></text:span><text:span text:style-name="T1"> por causa de la palabra, tropiezan y se secan.</text:span></text:p>
          <text:list>
            <text:list-item>
              <text:p text:style-name="P22"><text:span text:style-name="Emphasis"><text:span text:style-name="T1">Ejemplo de persecución actual:</text:span></text:span><text:span text:style-name="T1"> Amigos que se burlan, te dicen que "eso es solo para pastores" o te presionan para hacer otras cosas en vez de estudiar la Biblia. </text:span></text:p>
            </text:list-item>
          </text:list>
        </text:list-item>
      </text:list>
      <text:h text:style-name="P3" text:outline-level="3">3️⃣ Entre Espinos (Tierra Fértil pero Ahogada)</text:h>
      <text:list text:style-name="L11">
        <text:list-item>
          <text:p text:style-name="P25"><text:span text:style-name="Strong_20_Emphasis"><text:span text:style-name="T1">Físico:</text:span></text:span><text:span text:style-name="T1"> La semilla crece, pero los espinos crecen más rápido y la ahogan. </text:span></text:p>
        </text:list-item>
        <text:list-item>
          <text:p text:style-name="P25"><text:span text:style-name="Strong_20_Emphasis"><text:span text:style-name="T1">Espiritual:</text:span></text:span><text:span text:style-name="T1"> Oyen la palabra, pero los </text:span><text:span text:style-name="Strong_20_Emphasis"><text:span text:style-name="T1">afanes de este siglo, el engaño de las riquezas y los placeres de la vida</text:span></text:span><text:span text:style-name="T1"> ahogan la palabra, y se hace infructuosa.</text:span></text:p>
          <text:list>
            <text:list-item>
              <text:p text:style-name="P24"><text:span text:style-name="Emphasis"><text:span text:style-name="T1">Ejemplo de espinos:</text:span></text:span><text:span text:style-name="T1"> Afanarse por dinero, perder la clase por un concierto (ej. Luis Miguel), priorizar el trabajo sobre el estudio de la Palabra. Satanás usa estas cosas para ahogar tu fruto. </text:span></text:p>
            </text:list-item>
          </text:list>
        </text:list-item>
      </text:list>
      <text:h text:style-name="P3" text:outline-level="3">4️⃣ Buena Tierra (El Corazón Noble y Bueno)</text:h>
      <text:list text:style-name="L12">
        <text:list-item>
          <text:p text:style-name="P27"><text:span text:style-name="Strong_20_Emphasis"><text:span text:style-name="T1">Físico:</text:span></text:span><text:span text:style-name="T1"> La semilla echa raíz, crece y da fruto al ciento por uno. </text:span></text:p>
        </text:list-item>
        <text:list-item>
          <text:p text:style-name="P27"><text:span text:style-name="Strong_20_Emphasis"><text:span text:style-name="T1">Espiritual:</text:span></text:span><text:span text:style-name="T1"> Los que con </text:span><text:span text:style-name="Strong_20_Emphasis"><text:span text:style-name="T1">corazón bueno y recto retienen la palabra</text:span></text:span><text:span text:style-name="T1">, la repasan constantemente y </text:span><text:span text:style-name="Strong_20_Emphasis"><text:span text:style-name="T1">dan fruto con perseverancia</text:span></text:span><text:span text:style-name="T1">.</text:span></text:p>
          <text:list>
            <text:list-item>
              <text:p text:style-name="P26"><text:span text:style-name="Emphasis"><text:span text:style-name="T1">La Perseverancia:</text:span></text:span><text:span text:style-name="T1"> Es mantenerse firme a pesar de las piedras y espinos que Satanás pone. </text:span></text:p>
            </text:list-item>
          </text:list>
        </text:list-item>
      </text:list>
      <text:p text:style-name="P5"/>
      <text:h text:style-name="P2" text:outline-level="2"><text:soft-page-break/>🎯 7. Conclusiones y Anuncios</text:h>
      <text:list text:style-name="L13">
        <text:list-item>
          <text:p text:style-name="P29"><text:span text:style-name="Strong_20_Emphasis"><text:span text:style-name="T1">Dios confía en ustedes:</text:span></text:span><text:span text:style-name="T1"> Al revelarles los misterios del reino, Dios los considera Su verdadero pueblo. Demostremos que podemos ser fieles a esta revelación. </text:span></text:p>
        </text:list-item>
        <text:list-item>
          <text:p text:style-name="P29"><text:span text:style-name="Strong_20_Emphasis"><text:span text:style-name="T1">La Fe Verdadera:</text:span></text:span><text:span text:style-name="T1"> Debe basarse en la Palabra de Dios, no en mis emociones ni en lo que quiero escuchar. </text:span></text:p>
        </text:list-item>
        <text:list-item>
          <text:p text:style-name="P28"><text:span text:style-name="Strong_20_Emphasis"><text:span text:style-name="T1">Próxima Lección:</text:span></text:span><text:span text:style-name="T1"> Continuaremos con el </text:span><text:span text:style-name="Strong_20_Emphasis"><text:span text:style-name="T1">Árbol</text:span></text:span><text:span text:style-name="T1"> (qué significa que crezca), las </text:span><text:span text:style-name="Strong_20_Emphasis"><text:span text:style-name="T1">Aves</text:span></text:span><text:span text:style-name="T1"> (que anidan en las ramas), y también veremos el </text:span><text:span text:style-name="Strong_20_Emphasis"><text:span text:style-name="T1">Fruto, las Ramas y las Hojas</text:span></text:span><text:span text:style-name="T1">. ¡Todo empieza con la semilla! </text:span></text:p>
        </text:list-item>
      </text:list>
      <text:p text:style-name="P5"/>
      <text:h text:style-name="P2" text:outline-level="2">🔄 8. Repaso Final Interactivo y Oración de Cierre</text:h>
      <text:p text:style-name="Text_20_body"><text:span text:style-name="Emphasis"><text:span text:style-name="T1">(A cargo del Evangelista Christian Howard)</text:span></text:span></text:p>
      <text:h text:style-name="P3" text:outline-level="3">📌 La Parábola Clave</text:h>
      <text:p text:style-name="Text_20_body"><text:span text:style-name="Strong_20_Emphasis"><text:span text:style-name="T1">Marcos 4:13</text:span></text:span></text:p>
      <text:p text:style-name="Quotations"><text:span text:style-name="Emphasis"><text:span text:style-name="T1">"Y les dijo: 'No sabéis esta parábola. ¿Cómo, pues, entenderéis todas las parábolas?'"</text:span></text:span></text:p>
      <text:list text:style-name="L14">
        <text:list-item>
          <text:p text:style-name="P30"><text:span text:style-name="Strong_20_Emphasis"><text:span text:style-name="T1">Reflexión:</text:span></text:span><text:span text:style-name="T1"> Si no entiendes la parábola de la semilla (la más básica), ¿cómo vas a entender todas las demás parábolas del reino? Esta es la base de todo. </text:span></text:p>
        </text:list-item>
      </text:list>
      <text:p text:style-name="Text_20_body"><text:span text:style-name="Strong_20_Emphasis"><text:span text:style-name="T1">Resumen Interactivo:</text:span></text:span></text:p>
      <text:list text:style-name="L15">
        <text:list-item>
          <text:p text:style-name="P32"><text:span text:style-name="Strong_20_Emphasis"><text:span text:style-name="T1">¿Qué es la semilla espiritualmente?</text:span></text:span><text:span text:style-name="T1"> La Palabra de Dios (La Verdad del cumplimiento). </text:span></text:p>
        </text:list-item>
        <text:list-item>
          <text:p text:style-name="P32"><text:span text:style-name="Strong_20_Emphasis"><text:span text:style-name="T1">¿Cuántas semillas hay?</text:span></text:span><text:span text:style-name="T1"> Dos: La de Dios (Verdad) y la del Diablo (Mentira/Tergiversación). </text:span></text:p>
        </text:list-item>
        <text:list-item>
          <text:p text:style-name="P32"><text:span text:style-name="Strong_20_Emphasis"><text:span text:style-name="T1">¿Qué es el campo?</text:span></text:span><text:span text:style-name="T1"> Nuestro corazón, pero también el mundo (el cristianismo). </text:span></text:p>
        </text:list-item>
        <text:list-item>
          <text:p text:style-name="P32"><text:span text:style-name="Strong_20_Emphasis"><text:span text:style-name="T1">¿Cuáles son los 4 campos?</text:span></text:span></text:p>
          <text:list>
            <text:list-item>
              <text:p text:style-name="P32"><text:span text:style-name="Emphasis"><text:span text:style-name="T1">Camino:</text:span></text:span><text:span text:style-name="T1"> No entienden, el diablo se la lleva. </text:span></text:p>
            </text:list-item>
            <text:list-item>
              <text:p text:style-name="P32"><text:span text:style-name="Emphasis"><text:span text:style-name="T1">Piedras:</text:span></text:span><text:span text:style-name="T1"> Persecución, se secan. </text:span></text:p>
            </text:list-item>
            <text:list-item>
              <text:p text:style-name="P32"><text:span text:style-name="Emphasis"><text:span text:style-name="T1">Espinos:</text:span></text:span><text:span text:style-name="T1"> Afanes y riquezas, se ahogan. </text:span></text:p>
            </text:list-item>
            <text:list-item>
              <text:p text:style-name="P31"><text:span text:style-name="Emphasis"><text:span text:style-name="T1">Buena Tierra:</text:span></text:span><text:span text:style-name="T1"> Retienen la palabra y dan fruto con perseverancia. </text:span></text:p>
            </text:list-item>
          </text:list>
        </text:list-item>
      </text:list>
      <text:p text:style-name="Text_20_body"><text:span text:style-name="Strong_20_Emphasis"><text:span text:style-name="T1">📢 Anuncios:</text:span></text:span></text:p>
      <text:list text:style-name="L16">
        <text:list-item>
          <text:p text:style-name="P37"><text:soft-page-break/>Por favor, cambien sus nombres en Zoom para incluir el número que les asignaron (los ayudantes les enviarán un video tutorial si no saben cómo hacerlo). </text:p>
        </text:list-item>
        <text:list-item>
          <text:p text:style-name="P38">El lunes en la noche (martes en Corea) habrá una reunión especial para pastores y estudiantes con dudas o preguntas.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todos los siglos. Amén."</text:span></text:span></text:p>
      <text:p text:style-name="P33">¡Gracias a todos! Cuídense, que Dios los bendiga. Nos vemos la próxima semana para estudiar el árbol, el ave y el fruto. ¡Adió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2T07:17:26.352678386</meta:creation-date>
    <dc:date>2026-07-02T08:57:37.344273196</dc:date>
    <meta:editing-duration>PT27S</meta:editing-duration>
    <meta:editing-cycles>2</meta:editing-cycles>
    <meta:generator>LibreOffice/24.2.7.2$Linux_X86_64 LibreOffice_project/420$Build-2</meta:generator>
    <meta:document-statistic meta:table-count="0" meta:image-count="0" meta:object-count="0" meta:page-count="7" meta:paragraph-count="106" meta:word-count="1799" meta:character-count="10170" meta:non-whitespace-character-count="8488"/>
  </office:meta>
</office:document-meta>
</file>