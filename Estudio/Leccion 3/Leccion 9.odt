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3">
      <style:paragraph-properties fo:margin-top="0cm" fo:margin-bottom="0cm" style:contextual-spacing="false"/>
    </style:style>
    <style:style style:name="P44" style:family="paragraph" style:parent-style-name="Text_20_body" style:list-style-name="L24"/>
    <style:style style:name="P45" style:family="paragraph" style:parent-style-name="Text_20_body" style:list-style-name="L24">
      <style:paragraph-properties fo:margin-top="0cm" fo:margin-bottom="0cm" style:contextual-spacing="false"/>
    </style:style>
    <style:style style:name="P46" style:family="paragraph" style:parent-style-name="Text_20_body" style:list-style-name="L25"/>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list-style-name="L26"/>
    <style:style style:name="P49" style:family="paragraph" style:parent-style-name="Text_20_body" style:list-style-name="L26">
      <style:paragraph-properties fo:margin-top="0cm" fo:margin-bottom="0cm" style:contextual-spacing="false"/>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8">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7 (PARTE 2)</text:h>
      <text:h text:style-name="Heading_20_2" text:outline-level="2">Fuego, Incensario y Olla en Lenguaje Figurativo</text:h>
      <text:p text:style-name="Horizontal_20_Line"/>
      <text:h text:style-name="Heading_20_2" text:outline-level="2">🔥 1. Repaso Inicial: El Fuego Espiritual</text:h>
      <text:p text:style-name="Text_20_body"><text:span text:style-name="Emphasis">(A cargo del Evangelista Christian Howard)</text:span></text:p>
      <text:p text:style-name="Text_20_body">Antes de continuar con la nueva temática, repasamos los conceptos fundamentales sobre el fuego espiritual:</text:p>
      <text:p text:style-name="Text_20_body"><text:span text:style-name="Strong_20_Emphasis">Preguntas de Reflexión y Respuestas:</text:span></text:p>
      <text:list text:style-name="L12">
        <text:list-item>
          <text:p text:style-name="P24"><text:span text:style-name="Strong_20_Emphasis">¿Qué representa el fuego en figurativo?</text:span></text:p>
          <text:list>
            <text:list-item>
              <text:p text:style-name="P24"><text:span text:style-name="Emphasis">Respuesta:</text:span> <text:span text:style-name="Strong_20_Emphasis">La Palabra.</text:span> (Puede ser la Palabra de Dios o la palabra de Satanás). </text:p>
            </text:list-item>
          </text:list>
        </text:list-item>
        <text:list-item>
          <text:p text:style-name="P24"><text:span text:style-name="Strong_20_Emphasis">¿Qué significa ser bautizado en fuego?</text:span></text:p>
          <text:list>
            <text:list-item>
              <text:p text:style-name="P24"><text:span text:style-name="Emphasis">Respuesta:</text:span> <text:span text:style-name="Strong_20_Emphasis">El bautismo de la Palabra de Dios.</text:span> Es el proceso de darse cuenta de nuestras malas acciones e impurezas (sedimentos como los de Moab) y desecharlas a través de la Palabra de verdad. </text:p>
            </text:list-item>
          </text:list>
        </text:list-item>
        <text:list-item>
          <text:p text:style-name="P24"><text:span text:style-name="Strong_20_Emphasis">¿Cuáles son los dos tipos de fuego en figurativo y su resultado?</text:span></text:p>
          <text:list>
            <text:list-item>
              <text:p text:style-name="P24"><text:span text:style-name="Emphasis">Fuego de Dios:</text:span> <text:span text:style-name="Strong_20_Emphasis">Lava los pecados y la impureza.</text:span> Limpia y purifica a los que temen a Dios. </text:p>
            </text:list-item>
            <text:list-item>
              <text:p text:style-name="P23"><text:span text:style-name="Emphasis">Fuego de Satanás:</text:span> <text:span text:style-name="Strong_20_Emphasis">Mata nuestros espíritus.</text:span> Son las mentiras y tergiversaciones de la Palabra de Dios que, al ser recibidas, destruyen nuestro ser interior (como le pasó a Adán y Eva). </text:p>
            </text:list-item>
          </text:list>
        </text:list-item>
      </text:list>
      <text:p text:style-name="Text_20_body"><text:span text:style-name="Strong_20_Emphasis">Oración de apertura (Enfocada en Venezuela y las naciones):</text:span></text:p>
      <text:p text:style-name="Quotations"><text:span text:style-name="Emphasis">"Dios, gracias por estar con nosotros. Queremos orar por tres cosas muy importantes. Pasan muchas cosas terribles, pero no es tu culpa, porque también tenemos libre albedrío. Pero Dios, nosotros creemos en lo que dices. Promesas que sí van a venir, que pronto va a pasar todo esto y todo se va a volver como antes. También, Dios, oramos por nuestros países, por todo lo que está ocurriendo (especialmente por los terremotos en Venezuela). Sabemos que sí se va a poder sanar por ti y también por nosotros, porque somos hojas de este libro. También, Dios, queremos orar para nuestro ego, para que podamos vivir en este mundo de más de ti y aprender de tus secretos. Finalmente, queremos orar para solo darte gracias, Dios, por darnos esta palabra revelada, enseñándonos cosas desde el principio, como tú has dicho que ibas a hacerlo. Ya no es tiempo de parábolas, pero ya es tiempo de aprender la realidad de estas cosas. Pedimos todo esto en tu nombre poderoso, Jesucristo. Amén."</text:span></text:p>
      <text:p text:style-name="Horizontal_20_Line"/>
      <text:h text:style-name="Heading_20_2" text:outline-level="2">🏺 2. Introducción al Incensario y la Olla</text:h>
      <text:p text:style-name="Text_20_body"><text:span text:style-name="Emphasis">(A cargo del Instructor Sibiani)</text:span></text:p>
      <text:h text:style-name="Heading_20_3" text:outline-level="3"><text:soft-page-break/>📌 La Conexión con el Fuego</text:h>
      <text:p text:style-name="Text_20_body">Hoy vamos a ver qué significa el <text:span text:style-name="Strong_20_Emphasis">incensario</text:span> y la <text:span text:style-name="Strong_20_Emphasis">olla</text:span>, para qué se utilizaban en la Biblia. Como algunos sabrán, el incensario es un recipiente. ¿Y qué es lo que se le aplicaba? <text:span text:style-name="Strong_20_Emphasis">El fuego.</text:span> Sin fuego no se podía usar el incensario. El propósito del incensario no podía permanecer. Entonces, tienen que ver mucho ambos.</text:p>
      <text:h text:style-name="Heading_20_3" text:outline-level="3">📖 El Versículo Principal</text:h>
      <text:p text:style-name="Text_20_body"><text:span text:style-name="Strong_20_Emphasis">Apocalipsis 8:5</text:span></text:p>
      <text:p text:style-name="Quotations"><text:span text:style-name="Emphasis">"Y el ángel tomó el incensario y lo llenó del fuego del altar, y lo arrojó a la tierra; y hubo truenos y voces y relámpagos y un terremoto".</text:span></text:p>
      <text:list text:style-name="L13">
        <text:list-item>
          <text:p text:style-name="P26"><text:span text:style-name="Strong_20_Emphasis">El Análisis:</text:span> Un ángel toma un incensario, lo llena del fuego del altar y lo arroja a la tierra. Cuando se arroja a la tierra, empiezan a haber truenos, voces, relámpagos y un terremoto. ¡Un caos total! </text:p>
        </text:list-item>
        <text:list-item>
          <text:p text:style-name="P25"><text:span text:style-name="Strong_20_Emphasis">La Interpretación:</text:span> Si estuviéramos hablando físicamente, sería un incensario gigante. Pero como es una parábola, está hablando de cosas espirituales. Dios quiere que empecemos a abrir nuestros ojos y oídos espirituales, a no ver las cosas solo de manera física. </text:p>
        </text:list-item>
      </text:list>
      <text:p text:style-name="Horizontal_20_Line"/>
      <text:h text:style-name="Heading_20_2" text:outline-level="2">🕯️ 3. El Significado Espiritual del Incensario</text:h>
      <text:h text:style-name="Heading_20_3" text:outline-level="3">🧩 Los Elementos del Incensario</text:h>
      <text:p text:style-name="Text_20_body">El significado del incensario es, de hecho, <text:span text:style-name="Strong_20_Emphasis">persona</text:span> (el corazón de una persona). Vamos a entender por qué a través de sus características físicas y los elementos que lo componen:</text:p>
      <text:list text:style-name="L14">
        <text:list-item>
          <text:p text:style-name="P28"><text:span text:style-name="Strong_20_Emphasis">El Incensario (El Recipiente):</text:span> Es un cuenco para quemar incienso. Un recipiente, un vaso, un odre. ¿De qué estamos hablando? Del <text:span text:style-name="Strong_20_Emphasis">corazón de una persona</text:span>. Si Dios quiere poner su fuego en un incensario, ¿dónde es que Dios quiere poner su palabra? En nuestro corazón (igual que la parábola de la semilla y el campo). </text:p>
        </text:list-item>
        <text:list-item>
          <text:p text:style-name="P28"><text:span text:style-name="Strong_20_Emphasis">El Fuego (La Palabra):</text:span> Ya sabemos que el fuego representa la Palabra de Dios (Jeremías 5:14). </text:p>
        </text:list-item>
        <text:list-item>
          <text:p text:style-name="P28"><text:span text:style-name="Strong_20_Emphasis">El Incienso (Las Oraciones):</text:span> Representa las <text:span text:style-name="Strong_20_Emphasis">oraciones de los santos</text:span>.</text:p>
          <text:list>
            <text:list-item>
              <text:p text:style-name="P28"><text:span text:style-name="Strong_20_Emphasis">Apocalipsis 5:8:</text:span> El incienso representa las oraciones de los santos. </text:p>
            </text:list-item>
            <text:list-item>
              <text:p text:style-name="P28"><text:span text:style-name="Strong_20_Emphasis">Salmos 141:2:</text:span> <text:span text:style-name="Emphasis">"Que descienda el incienso ante la presencia de Dios"</text:span>. </text:p>
            </text:list-item>
          </text:list>
        </text:list-item>
        <text:list-item>
          <text:p text:style-name="P27"><text:span text:style-name="Strong_20_Emphasis">El Humo (Las Oraciones que Suben):</text:span> Si ponemos fuego (Palabra) e incienso (Oración) en el incensario (Corazón), ¿qué asciende? <text:span text:style-name="Strong_20_Emphasis">Humo.</text:span> Este humo sube a la presencia de Dios como oraciones (Apocalipsis 8:3-4). </text:p>
        </text:list-item>
      </text:list>
      <text:h text:style-name="Heading_20_3" text:outline-level="3">📐 La Lógica de la Oración Efectiva</text:h>
      <text:p text:style-name="Text_20_body">La pregunta clave es: <text:span text:style-name="Emphasis">¿Todo el humo puede llegar a la presencia de Dios? ¿Todas las oraciones pueden llegar a Dios?</text:span></text:p>
      <text:p text:style-name="Text_20_body"><text:span text:style-name="Strong_20_Emphasis">Juan 15:7</text:span></text:p>
      <text:p text:style-name="Quotations"><text:soft-page-break/><text:span text:style-name="Emphasis">"Si permanecéis en mí y mis palabras permanecen en vosotros, pedid todo lo que queréis y os será hecho".</text:span></text:p>
      <text:list text:style-name="L15">
        <text:list-item>
          <text:p text:style-name="P30"><text:span text:style-name="Strong_20_Emphasis">Permanecer en Jesús:</text:span> No es solo "estar cerca" emocionalmente. Significa que <text:span text:style-name="Strong_20_Emphasis">Sus palabras permanezcan en nosotros</text:span>. Si las palabras de Jesús están en mi corazón, significa que puedo estar cerca de Su presencia. </text:p>
        </text:list-item>
        <text:list-item>
          <text:p text:style-name="P30"><text:span text:style-name="Strong_20_Emphasis">La Fórmula de la Oración Respondida:</text:span> Una oración que puede tener respuesta es una oración que <text:span text:style-name="Strong_20_Emphasis">contiene la palabra de verdad de Dios en el corazón</text:span>. </text:p>
        </text:list-item>
        <text:list-item>
          <text:p text:style-name="P29"><text:span text:style-name="Strong_20_Emphasis">El Error Común:</text:span> Muchas veces oramos de manera egoísta ("Dios, dame esto, dame aquello") y no se cumplen. Pero cuando entendemos la voluntad de Dios y oramos acorde a eso, todo puede ser hecho. </text:p>
        </text:list-item>
      </text:list>
      <text:h text:style-name="Heading_20_3" text:outline-level="3">⚠️ El Ejemplo de Moab: Oraciones Inválidas</text:h>
      <text:p text:style-name="Text_20_body"><text:span text:style-name="Strong_20_Emphasis">Isaías 16:12</text:span></text:p>
      <text:p text:style-name="Quotations"><text:span text:style-name="Emphasis">"Y cuando apareciere Moab cansado sobre los lugares altos, cuando venga a su santuario a orar, no le valdrá".</text:span></text:p>
      <text:list text:style-name="L16">
        <text:list-item>
          <text:p text:style-name="P32"><text:span text:style-name="Strong_20_Emphasis">El Contexto:</text:span> Los moabitas (descendientes de Lot) en un principio estaban con Dios, pero eventualmente se volvieron gentiles y abandonaron a Dios. </text:p>
        </text:list-item>
        <text:list-item>
          <text:p text:style-name="P32"><text:span text:style-name="Strong_20_Emphasis">La Lección:</text:span> Moab iba al santuario a orar, pero Dios dijo: <text:span text:style-name="Emphasis">"No vale"</text:span>. ¿Por qué? Porque ya no tenían la Palabra de Dios en su corazón. Estaban cansados y llenos de impurezas. </text:p>
        </text:list-item>
        <text:list-item>
          <text:p text:style-name="P31"><text:span text:style-name="Strong_20_Emphasis">Aplicación:</text:span> Cuando oremos, debemos tener la <text:span text:style-name="Strong_20_Emphasis">palabra revelada</text:span> (la voluntad de Dios para estos tiempos de Apocalipsis) en nuestro incensario. Así es como Dios quiere que oremos, con ojos espirituales entendiendo Su Palabra. </text:p>
        </text:list-item>
      </text:list>
      <text:p text:style-name="Horizontal_20_Line"/>
      <text:h text:style-name="Heading_20_2" text:outline-level="2">🍲 4. La Olla en Figurativo: La Iglesia</text:h>
      <text:h text:style-name="Heading_20_3" text:outline-level="3">🥘 Características Físicas de la Olla</text:h>
      <text:p text:style-name="Text_20_body">¿Por qué Dios nos muestra una olla? ¿Es para enseñarnos a cocinar? No.</text:p>
      <text:list text:style-name="L17">
        <text:list-item>
          <text:p text:style-name="P34"><text:span text:style-name="Strong_20_Emphasis">Uso físico:</text:span> Es una herramienta para hervir alimentos, especialmente carnes. En Corea, hierven estofados durante 4 a 6 horas con huesos para que la sopa quede buena. </text:p>
        </text:list-item>
        <text:list-item>
          <text:p text:style-name="P33"><text:span text:style-name="Strong_20_Emphasis">Significado espiritual:</text:span> La olla representa a la <text:span text:style-name="Strong_20_Emphasis">Iglesia</text:span>. </text:p>
        </text:list-item>
      </text:list>
      <text:h text:style-name="Heading_20_3" text:outline-level="3">📜 Los Ejemplos Bíblicos de la Olla</text:h>
      <text:h text:style-name="Heading_20_4" text:outline-level="4">1. La Olla de Dios (Ezequiel 11:3)</text:h>
      <text:p text:style-name="Quotations"><text:span text:style-name="Emphasis">"Los cuales dicen: No será tan pronto; edifiquemos casas: esta será la olla y nosotros la carne".</text:span></text:p>
      <text:list text:style-name="L18">
        <text:list-item>
          <text:p text:style-name="P36"><text:span text:style-name="Strong_20_Emphasis">La Carne:</text:span> No es carne física. Somos <text:span text:style-name="Strong_20_Emphasis">nosotros, las personas</text:span>. </text:p>
        </text:list-item>
        <text:list-item>
          <text:p text:style-name="P35"><text:span text:style-name="Strong_20_Emphasis">La Olla:</text:span> Es la ciudad (y hoy, la Iglesia) donde el pueblo de Dios se reúne para recibir la Palabra y ser "cocinado" (preparado) por el fuego de Dios. </text:p>
        </text:list-item>
      </text:list>
      <text:h text:style-name="Heading_20_4" text:outline-level="4"><text:soft-page-break/>2. La Olla de Satanás (Jeremías 1:13 y Ezequiel 24:3-6)</text:h>
      <text:p text:style-name="Text_20_body"><text:span text:style-name="Strong_20_Emphasis">Jeremías 1:13</text:span></text:p>
      <text:p text:style-name="Quotations"><text:span text:style-name="Emphasis">"Veo una olla que hierve y su faz está hacia el norte".</text:span></text:p>
      <text:list text:style-name="L19">
        <text:list-item>
          <text:p text:style-name="P37"><text:span text:style-name="Strong_20_Emphasis">La Faz hacia el Norte:</text:span> Significa que la olla se está <text:span text:style-name="Strong_20_Emphasis">derramando</text:span>. </text:p>
        </text:list-item>
      </text:list>
      <text:p text:style-name="Text_20_body"><text:span text:style-name="Strong_20_Emphasis">Ezequiel 24:3-6</text:span></text:p>
      <text:p text:style-name="Quotations"><text:span text:style-name="Emphasis">"¡Ay de la ciudad de sangres, de la olla herrumbrosa, cuya herrumbre no ha sido quitada!"</text:span></text:p>
      <text:list text:style-name="L20">
        <text:list-item>
          <text:p text:style-name="P39"><text:span text:style-name="Strong_20_Emphasis">La Herrumbre:</text:span> Representa la suciedad, el pecado y las impurezas (sedimentos) que no han sido limpiadas. Si cocinamos en una olla con herrumbre, la comida se pone mala y nadie la quiere comer. </text:p>
        </text:list-item>
        <text:list-item>
          <text:p text:style-name="P38"><text:span text:style-name="Strong_20_Emphasis">La Madera (Los Pastores):</text:span> Para encender el fuego debajo de la olla se usa madera (que viene de los árboles/pastores). En la Primera Venida, los fariseos y maestros de la ley daban su "fuego" (fuego extraño, no ordenado por Dios) a la Iglesia, cocinando al pueblo de Dios con mentiras. </text:p>
        </text:list-item>
      </text:list>
      <text:h text:style-name="Heading_20_4" text:outline-level="4">3. El Juicio a los Falsos Pastores (Miqueas 3:1-3)</text:h>
      <text:p text:style-name="Quotations"><text:span text:style-name="Emphasis">"Vosotros que aborrecéis lo bueno y amáis lo malo... que coméis asimismo la carne de mi pueblo y les quebrantáis los huesos, como carnes en olla".</text:span></text:p>
      <text:list text:style-name="L21">
        <text:list-item>
          <text:p text:style-name="P40"><text:span text:style-name="Strong_20_Emphasis">La Acusación:</text:span> Los líderes (príncipes de Jacob) aborrecían lo bueno (la voluntad de Dios) y amaban lo malo (sus tradiciones). "Cocinaban" al pueblo de Dios en sus ollas (sinagogas/iglesias) dándoles mentiras y palabra de hombre. </text:p>
        </text:list-item>
      </text:list>
      <text:h text:style-name="Heading_20_4" text:outline-level="4">4. La Promesa de Santificación (Zacarías 14:20-21)</text:h>
      <text:p text:style-name="Quotations"><text:span text:style-name="Emphasis">"Y toda olla en Jerusalén y Judá será consagrada a Jehová de los ejércitos... y no habrá en aquel día más mercader en la casa de Jehová".</text:span></text:p>
      <text:list text:style-name="L22">
        <text:list-item>
          <text:p text:style-name="P41"><text:span text:style-name="Strong_20_Emphasis">La Voluntad de Dios:</text:span> Dios promete que todas las ollas (iglesias) serán <text:span text:style-name="Strong_20_Emphasis">santificadas y purificadas</text:span>. Dios quiere sacar a Su pueblo de las ollas sucias de Satanás a través de la Palabra de verdad. </text:p>
        </text:list-item>
      </text:list>
      <text:p text:style-name="Horizontal_20_Line"/>
      <text:h text:style-name="Heading_20_2" text:outline-level="2">⚔️ 5. La Realidad: Las Dos Ollas en la Primera Venida</text:h>
      <text:h text:style-name="Heading_20_3" text:outline-level="3">🍲 La Olla de Dios (Lado de la Verdad)</text:h>
      <text:list text:style-name="L23">
        <text:list-item>
          <text:p text:style-name="P43"><text:span text:style-name="Strong_20_Emphasis">Representantes:</text:span> <text:span text:style-name="Strong_20_Emphasis">Jesús y los 12 discípulos.</text:span> </text:p>
        </text:list-item>
        <text:list-item>
          <text:p text:style-name="P43"><text:span text:style-name="Strong_20_Emphasis">El Fuego:</text:span> La Palabra de verdad, el cumplimiento de las profecías. </text:p>
        </text:list-item>
        <text:list-item>
          <text:p text:style-name="P43"><text:span text:style-name="Strong_20_Emphasis">La Apariencia:</text:span> A los ojos humanos, no se veía "bonita". Era un nazareno pobre, hijo de carpintero, sin templo, solo con 12 discípulos. </text:p>
        </text:list-item>
        <text:list-item>
          <text:p text:style-name="P42"><text:span text:style-name="Strong_20_Emphasis">El Resultado:</text:span> Los que escucharon Su palabra y creyeron en la Realidad fueron "cocinados" para vida eterna. </text:p>
        </text:list-item>
      </text:list>
      <text:h text:style-name="Heading_20_3" text:outline-level="3"><text:soft-page-break/>🍲 La Olla de Satanás (Lado de la Mentira)</text:h>
      <text:list text:style-name="L24">
        <text:list-item>
          <text:p text:style-name="P45"><text:span text:style-name="Strong_20_Emphasis">Representantes:</text:span> <text:span text:style-name="Strong_20_Emphasis">Los escribas, fariseos y sus seguidores.</text:span> </text:p>
        </text:list-item>
        <text:list-item>
          <text:p text:style-name="P45"><text:span text:style-name="Strong_20_Emphasis">El Fuego:</text:span> Falsedad, tradiciones humanas, mentiras respecto a la Palabra de Dios. </text:p>
        </text:list-item>
        <text:list-item>
          <text:p text:style-name="P45"><text:span text:style-name="Strong_20_Emphasis">La Apariencia:</text:span> A los ojos humanos, se veía "muy bonita". Sinagogas hermosas, pastores reconocidos, dinero, estatus, y la mayoría del pueblo iba allí. </text:p>
        </text:list-item>
        <text:list-item>
          <text:p text:style-name="P44"><text:span text:style-name="Strong_20_Emphasis">El Resultado:</text:span> Los que se quedaron en esta olla, pensando que adoraban a Dios, terminaron adorando a Satanás y fueron echados al horno de fuego (infierno). </text:p>
        </text:list-item>
      </text:list>
      <text:h text:style-name="Heading_20_3" text:outline-level="3">🔍 La Lección para la Segunda Venida</text:h>
      <text:p text:style-name="Text_20_body">La historia se repite. Hoy nos encontramos con pastores que parecen "bonitos" por fuera (grandes iglesias, fama, títulos), pero que tienen sedimentos de Moab o fuego extraño.</text:p>
      <text:list text:style-name="L25">
        <text:list-item>
          <text:p text:style-name="P47"><text:span text:style-name="Strong_20_Emphasis">¿Cómo no ser engañados?</text:span> No nos guiamos por lo visual ni por las emociones. Nos guiamos por el <text:span text:style-name="Strong_20_Emphasis">Estándar (La Biblia)</text:span>. </text:p>
        </text:list-item>
        <text:list-item>
          <text:p text:style-name="P46">Debemos examinar nuestra "olla" (Iglesia) y preguntar: <text:span text:style-name="Emphasis">¿Qué clase de fuego se está dando en este lugar? ¿Es la Palabra de verdad o son mandamientos de hombres?</text:span> </text:p>
        </text:list-item>
      </text:list>
      <text:p text:style-name="Horizontal_20_Line"/>
      <text:h text:style-name="Heading_20_2" text:outline-level="2">🎯 6. Conclusiones Finales de la Lección</text:h>
      <text:list text:style-name="L26">
        <text:list-item>
          <text:p text:style-name="P49"><text:span text:style-name="Strong_20_Emphasis">La Palabra de Dios debe estar en mi corazón:</text:span> Como fuego en el incensario, para que llegue al cielo como incienso (oración efectiva). </text:p>
        </text:list-item>
        <text:list-item>
          <text:p text:style-name="P49"><text:span text:style-name="Strong_20_Emphasis">No se conviertan en carne cocida en el caldero de Satanás:</text:span> No acepten mentiras, tradiciones humanas o tergiversaciones de la Biblia. </text:p>
        </text:list-item>
        <text:list-item>
          <text:p text:style-name="P49"><text:span text:style-name="Strong_20_Emphasis">Pertenezcan a la Iglesia donde brota la verdad:</text:span> El caldero de la santidad, nutriéndose de la Palabra de verdad (profecía y cumplimiento). </text:p>
        </text:list-item>
        <text:list-item>
          <text:p text:style-name="P49"><text:span text:style-name="Strong_20_Emphasis">Cuatro Preguntas para Reflexionar Diariamente:</text:span></text:p>
          <text:list>
            <text:list-item>
              <text:p text:style-name="P49">¿Qué palabra tengo dentro de mi corazón? ¿Verdad o sentimientos/pensamientos propios? </text:p>
            </text:list-item>
            <text:list-item>
              <text:p text:style-name="P49">¿De dónde estoy recibiendo mi alimento espiritual? ¿De Dios o de Satanás? </text:p>
            </text:list-item>
            <text:list-item>
              <text:p text:style-name="P49">¿Pertenezco yo a la iglesia que enseña la verdad pura? </text:p>
            </text:list-item>
            <text:list-item>
              <text:p text:style-name="P48">¿Están mis oraciones basadas en la palabra de la verdad o en lo que yo quiero? </text:p>
            </text:list-item>
          </text:list>
        </text:list-item>
      </text:list>
      <text:p text:style-name="Text_20_body"><text:span text:style-name="Strong_20_Emphasis">📢 Anuncio para la Próxima Lección:</text:span> La próxima vez veremos tres elementos nuevos en figurativo: <text:span text:style-name="Strong_20_Emphasis">Luz, Candelero, sobre ciegos, sordos y vestidos de boda</text:span>.</text:p>
      <text:list text:style-name="L27">
        <text:list-item>
          <text:p text:style-name="P50"><text:span text:style-name="Emphasis">Pista para reflexionar:</text:span> La Biblia menciona que habrá hijos de luz e hijos de tinieblas. ¿Cómo sé yo si estoy en la luz o en tinieblas? No por lo que yo "sienta", sino por lo que Dios dice que es luz. ¡Prepárense! </text:p>
        </text:list-item>
      </text:list>
      <text:p text:style-name="Horizontal_20_Line"/>
      <text:h text:style-name="Heading_20_2" text:outline-level="2">🔄 7.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28">
        <text:list-item>
          <text:p text:style-name="P52"><text:span text:style-name="Strong_20_Emphasis">¿Qué es el incensario?</text:span></text:p>
          <text:list>
            <text:list-item>
              <text:p text:style-name="P52"><text:soft-page-break/><text:span text:style-name="Emphasis">Respuesta:</text:span> <text:span text:style-name="Strong_20_Emphasis">Una persona</text:span> (el corazón). </text:p>
            </text:list-item>
          </text:list>
        </text:list-item>
        <text:list-item>
          <text:p text:style-name="P52"><text:span text:style-name="Strong_20_Emphasis">¿Qué es el fuego en el incensario?</text:span></text:p>
          <text:list>
            <text:list-item>
              <text:p text:style-name="P52"><text:span text:style-name="Emphasis">Respuesta:</text:span> <text:span text:style-name="Strong_20_Emphasis">La Palabra de Dios.</text:span> </text:p>
            </text:list-item>
          </text:list>
        </text:list-item>
        <text:list-item>
          <text:p text:style-name="P52"><text:span text:style-name="Strong_20_Emphasis">¿Qué es el incienso?</text:span></text:p>
          <text:list>
            <text:list-item>
              <text:p text:style-name="P52"><text:span text:style-name="Emphasis">Respuesta:</text:span> <text:span text:style-name="Strong_20_Emphasis">Las oraciones de los santos.</text:span> </text:p>
            </text:list-item>
          </text:list>
        </text:list-item>
        <text:list-item>
          <text:p text:style-name="P52"><text:span text:style-name="Strong_20_Emphasis">¿Qué es el humo que sube?</text:span></text:p>
          <text:list>
            <text:list-item>
              <text:p text:style-name="P52"><text:span text:style-name="Emphasis">Respuesta:</text:span> <text:span text:style-name="Strong_20_Emphasis">Las oraciones que suben a la presencia de Dios.</text:span> </text:p>
            </text:list-item>
          </text:list>
        </text:list-item>
        <text:list-item>
          <text:p text:style-name="P52"><text:span text:style-name="Strong_20_Emphasis">¿Qué es la olla?</text:span></text:p>
          <text:list>
            <text:list-item>
              <text:p text:style-name="P52"><text:span text:style-name="Emphasis">Respuesta:</text:span> <text:span text:style-name="Strong_20_Emphasis">La Iglesia.</text:span> (Un contenedor grande que reúne a muchas "copas" o personas). </text:p>
            </text:list-item>
          </text:list>
        </text:list-item>
        <text:list-item>
          <text:p text:style-name="P52"><text:span text:style-name="Strong_20_Emphasis">¿Cuántas ollas hay?</text:span></text:p>
          <text:list>
            <text:list-item>
              <text:p text:style-name="P52"><text:span text:style-name="Emphasis">Respuesta:</text:span> <text:span text:style-name="Strong_20_Emphasis">Dos.</text:span> La olla de Dios (verdad) y la olla de Satanás (mentiras). </text:p>
            </text:list-item>
          </text:list>
        </text:list-item>
        <text:list-item>
          <text:p text:style-name="P52"><text:span text:style-name="Strong_20_Emphasis">¿Quién fue la olla de Dios en la primera venida?</text:span></text:p>
          <text:list>
            <text:list-item>
              <text:p text:style-name="P52"><text:span text:style-name="Emphasis">Respuesta:</text:span> <text:span text:style-name="Strong_20_Emphasis">Jesús y los 12 discípulos.</text:span> </text:p>
            </text:list-item>
          </text:list>
        </text:list-item>
        <text:list-item>
          <text:p text:style-name="P52"><text:span text:style-name="Strong_20_Emphasis">¿Quién fue la olla de Satanás?</text:span></text:p>
          <text:list>
            <text:list-item>
              <text:p text:style-name="P51"><text:span text:style-name="Emphasis">Respuesta:</text:span> <text:span text:style-name="Strong_20_Emphasis">Los escribas, fariseos y los miembros que se quedaron con ellos.</text:span> </text:p>
            </text:list-item>
          </text:list>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p>
      <text:p text:style-name="Text_20_body">¡Gracias a todos! Cuídense, sigan estudiando y llénense de esta levadura y fuego santo de Dios. ¡Nos vemos la próxima semana para estudiar la luz y el candelero!</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6-30T20:31:49.407686494</dc:date>
    <meta:editing-duration>PT1H35M22S</meta:editing-duration>
    <meta:editing-cycles>7</meta:editing-cycles>
    <meta:generator>LibreOffice/24.2.7.2$Linux_X86_64 LibreOffice_project/420$Build-2</meta:generator>
    <meta:document-statistic meta:table-count="0" meta:image-count="0" meta:object-count="0" meta:page-count="6" meta:paragraph-count="118" meta:word-count="2110" meta:character-count="12021" meta:non-whitespace-character-count="10042"/>
  </office:meta>
</office:document-meta>
</file>