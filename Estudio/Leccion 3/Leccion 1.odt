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3 (PARTE 1)</text:h>
      <text:h text:style-name="Heading_20_2" text:outline-level="2">Las Parábolas de los Misterios del Reino de los Cielos</text:h>
      <text:p text:style-name="Horizontal_20_Line"/>
      <text:h text:style-name="Heading_20_2" text:outline-level="2">🔄 1. Repaso Inicial: Profecía, Cumplimiento y Fe</text:h>
      <text:p text:style-name="Text_20_body"><text:span text:style-name="Emphasis">(A cargo del Evangelista Christian Howard)</text:span></text:p>
      <text:p text:style-name="Text_20_body">Antes de comenzar la nueva lección, ponemos a prueba lo aprendido sobre la metodología de Dios y Su plan:</text:p>
      <text:p text:style-name="Text_20_body"><text:span text:style-name="Strong_20_Emphasis">Preguntas de Reflexión y Respuestas:</text:span></text:p>
      <text:list text:style-name="L1">
        <text:list-item>
          <text:p text:style-name="P2"><text:span text:style-name="Strong_20_Emphasis">¿Qué demuestra que la palabra de Dios es verdadera?</text:span></text:p>
          <text:list>
            <text:list-item>
              <text:p text:style-name="P2"><text:span text:style-name="Emphasis">Respuesta:</text:span> <text:span text:style-name="Strong_20_Emphasis">Que las profecías se cumplen.</text:span> (Si todo lo que se cumplió antes fue verdad, todo lo que profetizó para el futuro también se cumplirá). </text:p>
            </text:list-item>
          </text:list>
        </text:list-item>
        <text:list-item>
          <text:p text:style-name="P2"><text:span text:style-name="Strong_20_Emphasis">Según 2 Tesalonicenses 2:1-3, ¿cuál es el orden correcto de las profecías?</text:span></text:p>
          <text:list>
            <text:list-item>
              <text:p text:style-name="P2"><text:span text:style-name="Emphasis">Respuesta:</text:span> <text:span text:style-name="Strong_20_Emphasis">Traición, destrucción y salvación.</text:span> </text:p>
            </text:list-item>
          </text:list>
        </text:list-item>
        <text:list-item>
          <text:p text:style-name="P2"><text:span text:style-name="Strong_20_Emphasis">Según 1 Timoteo 2:4, ¿qué desea Dios para toda la humanidad?</text:span></text:p>
          <text:list>
            <text:list-item>
              <text:p text:style-name="P2"><text:span text:style-name="Emphasis">Respuesta:</text:span> <text:span text:style-name="Strong_20_Emphasis">Que todos sean salvos y lleguen al conocimiento de la verdad</text:span> (la verdad de Dios, no la del hombre). </text:p>
            </text:list-item>
          </text:list>
        </text:list-item>
        <text:list-item>
          <text:p text:style-name="P2"><text:span text:style-name="Strong_20_Emphasis">Según Oseas 4:6, ¿por qué es importante estudiar y comprender la Biblia?</text:span></text:p>
          <text:list>
            <text:list-item>
              <text:p text:style-name="P2"><text:span text:style-name="Emphasis">Respuesta:</text:span> Porque <text:span text:style-name="Strong_20_Emphasis">la falta de conocimiento nos manda a la destrucción</text:span>. El conocimiento nos ayuda a hacer la voluntad de Dios. </text:p>
            </text:list-item>
          </text:list>
        </text:list-item>
        <text:list-item>
          <text:p text:style-name="P2"><text:span text:style-name="Strong_20_Emphasis">¿Qué significa tener una "fe completa" según la lección anterior?</text:span></text:p>
          <text:list>
            <text:list-item>
              <text:p text:style-name="P2"><text:span text:style-name="Emphasis">Respuesta:</text:span> <text:span text:style-name="Strong_20_Emphasis">Creer tanto en la profecía como en su cumplimiento.</text:span> (Los judíos creyeron en la profecía, pero no en el cumplimiento; nosotros debemos entender ambas). </text:p>
            </text:list-item>
          </text:list>
        </text:list-item>
        <text:list-item>
          <text:p text:style-name="P2"><text:span text:style-name="Strong_20_Emphasis">¿Qué se cumplió durante la era de los Evangelios del Reino?</text:span></text:p>
          <text:list>
            <text:list-item>
              <text:p text:style-name="P1"><text:span text:style-name="Emphasis">Respuesta:</text:span> <text:span text:style-name="Strong_20_Emphasis">Todas las profecías del Antiguo Testamento.</text:span> (Jesús testificó que Él era el cumplimiento exacto de lo escrito en la Ley, los Salmos y los Profetas). </text:p>
            </text:list-item>
          </text:list>
        </text:list-item>
      </text:list>
      <text:p text:style-name="Text_20_body"><text:span text:style-name="Strong_20_Emphasis">Oración de apertura:</text:span></text:p>
      <text:p text:style-name="Quotations"><text:span text:style-name="Emphasis">"Santísimo Padre Dios, gracias por traernos hoy a esta clase. Gracias por enseñar todas estas cosas que, aunque parecen básicas, son cimientos que debemos entender desde el principio. Oramos por todos los estudiantes que tienen ese hambre de aprender de ti. Por los que no han podido venir por circunstancias, tú conoces su corazón; dales la oportunidad de aprender más sobre tu palabra. Manda tu Espíritu Santo al instructor Sibiani para que solo hable tus palabras y no sus propios pensamientos, para que sepamos tu verdad directa de ti, sin corromper por pensamientos humanos. Gracias por darnos esta chance de aprender hoy de las parábolas. Oramos todo esto en tu hijo Jesucristo. Amén."</text:span></text:p>
      <text:p text:style-name="Horizontal_20_Line"/>
      <text:h text:style-name="Heading_20_2" text:outline-level="2"><text:soft-page-break/>🏫 2. Bienvenida y la Actitud del Corazón</text:h>
      <text:p text:style-name="Text_20_body"><text:span text:style-name="Emphasis">(A cargo del Instructor Sibiani)</text:span></text:p>
      <text:h text:style-name="Heading_20_3" text:outline-level="3">📌 La Actitud ante la Palabra</text:h>
      <text:p text:style-name="Text_20_body">Es una alegría ver a todos con las cámaras encendidas y participando. Cuando participamos, nos motivamos unos a otros. </text:p>
      <text:list text:style-name="L2">
        <text:list-item>
          <text:p text:style-name="P4"><text:span text:style-name="Strong_20_Emphasis">El Peligro de Enfriarse:</text:span> Muchas veces, al recibir palabra revelada, las personas se enfrían con el tiempo. ¡Espero que eso no les pase a ustedes! Mantengan ese fuego en sus corazones hasta el final. </text:p>
        </text:list-item>
        <text:list-item>
          <text:p text:style-name="P3"><text:span text:style-name="Strong_20_Emphasis">El Propósito de las Preguntas:</text:span> Cuando hacemos preguntas interactivas, no lo vean como un examen para avergonzarse si se equivocan. Respóndanlas con fe; es una herramienta para darse cuenta de qué necesitan mejorar. </text:p>
        </text:list-item>
      </text:list>
      <text:h text:style-name="Heading_20_3" text:outline-level="3">📖 El Título de la Lección</text:h>
      <text:p text:style-name="Text_20_body">Leamos juntos dos veces:</text:p>
      <text:p text:style-name="Quotations"><text:span text:style-name="Strong_20_Emphasis">"Las parábolas de los misterios del reino de los cielos"</text:span></text:p>
      <text:p text:style-name="Text_20_body">Dios tiene muchos misterios en la Biblia y habla en parábolas respecto al <text:span text:style-name="Strong_20_Emphasis">reino de los cielos</text:span>, que es nuestro objetivo final. Pero, ¿qué significa que sea un "misterio"? Significa que hay mucha ambigüedad, que las personas asumen cosas y que, humanamente, es desconocido. Jesús habló de esto hace 2,000 años. ¿Se vuelve menos misterio con el tiempo? No, requiere revelación.</text:p>
      <text:p text:style-name="Horizontal_20_Line"/>
      <text:h text:style-name="Heading_20_2" text:outline-level="2">👥 3. El Misterio del Reino y los Dos Grupos de Personas</text:h>
      <text:p text:style-name="Text_20_body"><text:span text:style-name="Strong_20_Emphasis">Mateo 13:10-11</text:span></text:p>
      <text:p text:style-name="Quotations"><text:span text:style-name="Emphasis">"Entonces, acercándose los discípulos, le dijeron: '¿Por qué les hablas por parábolas?'. Él, respondiendo, les dijo: 'Porque a vosotros os es dado saber los misterios del reino de los cielos, mas a ellos no les es dado'."</text:span></text:p>
      <text:h text:style-name="Heading_20_3" text:outline-level="3">🧠 "Vosotros" vs. "Ellos"</text:h>
      <text:p text:style-name="Text_20_body">Jesús hace una distinción clara entre dos tipos de personas:</text:p>
      <text:list text:style-name="L3">
        <text:list-item>
          <text:p text:style-name="P6"><text:span text:style-name="Strong_20_Emphasis">"Vosotros" (Los Discípulos):</text:span> A ellos sí se les da entender los misterios. </text:p>
        </text:list-item>
        <text:list-item>
          <text:p text:style-name="P5"><text:span text:style-name="Strong_20_Emphasis">"Ellos" (La Multitud / Los Cerrados):</text:span> A ellos no les es dado. </text:p>
        </text:list-item>
      </text:list>
      <text:p text:style-name="Text_20_body"><text:span text:style-name="Strong_20_Emphasis">¿Por qué los 12 discípulos sí entendieron y el resto no?</text:span> No fue por inteligencia académica, sino por <text:span text:style-name="Strong_20_Emphasis">el corazón que tenían</text:span>. </text:p>
      <text:list text:style-name="L4">
        <text:list-item>
          <text:p text:style-name="P8">Vivían en tiempos de incertidumbre, donde todos decían conocer el reino. </text:p>
        </text:list-item>
        <text:list-item>
          <text:p text:style-name="P8">Pero los discípulos tenían un <text:span text:style-name="Strong_20_Emphasis">corazón abierto y humilde</text:span>. Aunque venían de aprender de fariseos y otros pastores, cuando llegó la Verdad, desecharon sus pensamientos previos y aceptaron la palabra verdadera. </text:p>
        </text:list-item>
        <text:list-item>
          <text:p text:style-name="P7"><text:span text:style-name="Emphasis">Reflexión:</text:span> ¿Qué clase de corazón tengo yo? Si la palabra de Dios choca con mis pensamientos, ¿los desecho para dar campo a Dios, o me cierro? </text:p>
        </text:list-item>
      </text:list>
      <text:p text:style-name="Horizontal_20_Line"><text:soft-page-break/></text:p>
      <text:h text:style-name="Heading_20_2" text:outline-level="2">🔍 4. ¿Qué es una Parábola?</text:h>
      <text:p text:style-name="Text_20_body">Una parábola es una <text:span text:style-name="Strong_20_Emphasis">comparación</text:span>. En coreano se dice <text:span text:style-name="Emphasis">"biu"</text:span>, que significa comparar y entender.</text:p>
      <text:list text:style-name="L5">
        <text:list-item>
          <text:p text:style-name="P10"><text:span text:style-name="Strong_20_Emphasis">No es literal:</text:span> Si digo <text:span text:style-name="Emphasis">"El evangelista Christian es como una piedra"</text:span>, no significa que sea una roca literal, sino que tiene características de una piedra (firmeza, etc.). </text:p>
        </text:list-item>
        <text:list-item>
          <text:p text:style-name="P10"><text:span text:style-name="Strong_20_Emphasis">Ejemplos:</text:span> <text:span text:style-name="Emphasis">"Susana es como una flor"</text:span> (usa las características de una flor, como la belleza, para describir a Susana). </text:p>
        </text:list-item>
        <text:list-item>
          <text:p text:style-name="P9"><text:span text:style-name="Strong_20_Emphasis">En la Biblia:</text:span> Jesús decía <text:span text:style-name="Emphasis">"El reino de los cielos es semejante a..."</text:span> o <text:span text:style-name="Emphasis">"es como..."</text:span>. No decía "esto es el reino", sino que usaba características de algo físico para describir algo espiritual. </text:p>
        </text:list-item>
      </text:list>
      <text:p text:style-name="Horizontal_20_Line"/>
      <text:h text:style-name="Heading_20_2" text:outline-level="2">🎭 5. ¿Por qué Jesús Hablaba en Parábolas? (Los Dos Propósitos)</text:h>
      <text:p text:style-name="Text_20_body">Dependiendo del contexto, las parábolas tienen dos propósitos completamente opuestos:</text:p>
      <text:h text:style-name="Heading_20_3" text:outline-level="3">1️⃣ En Contexto de Historia y Enseñanzas Morales: <text:span text:style-name="Strong_20_Emphasis">Para ayudar a comprender.</text:span></text:h>
      <text:p text:style-name="Text_20_body">El reino de los cielos es espiritual y no lo podemos ver. Para explicarlo, Jesús usaba cosas físicas que sí podemos ver (un árbol, una red, un campo). Ayuda a la mente humana a captar conceptos espirituales.</text:p>
      <text:h text:style-name="Heading_20_3" text:outline-level="3">2️⃣ En Contexto de Profecía: <text:span text:style-name="Strong_20_Emphasis">Para esconder los misterios.</text:span></text:h>
      <text:list text:style-name="L6">
        <text:list-item>
          <text:p text:style-name="P12"><text:span text:style-name="Emphasis">Pregunta:</text:span> ¿Por qué Dios escondería la verdad si quiere que todos se salven? </text:p>
        </text:list-item>
        <text:list-item>
          <text:p text:style-name="P12"><text:span text:style-name="Emphasis">Respuesta:</text:span> <text:span text:style-name="Strong_20_Emphasis">Porque hay una guerra espiritual.</text:span> Satanás y sus espíritus malignos estaban escuchando. </text:p>
        </text:list-item>
        <text:list-item>
          <text:p text:style-name="P12"><text:span text:style-name="Emphasis">Analogía de la Guerra:</text:span> En las guerras físicas, los ejércitos usan códigos (como el código Morse) para que el enemigo intercepte el mensaje pero no lo entienda y no pueda sabotearlos. </text:p>
        </text:list-item>
        <text:list-item>
          <text:p text:style-name="P11">Dios esconde los misterios del reino en parábolas para que <text:span text:style-name="Strong_20_Emphasis">Satanás y los enemigos de la verdad no entiendan el plan de Dios</text:span>, pero se lo revela a Su verdadero pueblo (aquellos que, como los discípulos, se acercan con corazón humilde a preguntar: <text:span text:style-name="Emphasis">"Jesús, ¿qué significa esto?"</text:span>). </text:p>
        </text:list-item>
      </text:list>
      <text:p text:style-name="Horizontal_20_Line"/>
      <text:h text:style-name="Heading_20_2" text:outline-level="2">📜 6. Las Dos Razones Principales de las Parábolas Proféticas</text:h>
      <text:h text:style-name="Heading_20_3" text:outline-level="3">Razón 1: Para Cumplir la Profecía del Antiguo Testamento</text:h>
      <text:p text:style-name="Text_20_body"><text:span text:style-name="Strong_20_Emphasis">Salmos 78:1-2 (Profecía)</text:span></text:p>
      <text:p text:style-name="Quotations"><text:span text:style-name="Emphasis">"Abriré mi boca en proverbios [parábolas]; hablaré cosas escondidas desde tiempos antiguos".</text:span></text:p>
      <text:p text:style-name="Text_20_body"><text:span text:style-name="Strong_20_Emphasis">Mateo 13:34-35 (Cumplimiento)</text:span></text:p>
      <text:p text:style-name="Quotations"><text:soft-page-break/><text:span text:style-name="Emphasis">"Todo esto habló Jesús por parábolas a la gente, y sin parábolas no les hablaba. Para que se cumpliese lo dicho por el profeta..."</text:span></text:p>
      <text:p text:style-name="Text_20_body">Jesús <text:span text:style-name="Emphasis">tuvo</text:span> que hablar en parábolas. Si no lo hubiera hecho, no estaría cumpliendo la voluntad de Dios ni las promesas del Padre.</text:p>
      <text:h text:style-name="Heading_20_3" text:outline-level="3">Razón 2: Para Separar a los Buscadores de la Verdad de los Superficiales</text:h>
      <text:p text:style-name="Text_20_body">Cuando Jesús multiplicó los panes, la multitud lo siguió, pero solo querían más comida física. Cuando Jesús empezó a hablar de "comer su carne y beber su sangre" (en parábolas espirituales), la gente se escandalizó y se fue.</text:p>
      <text:list text:style-name="L7">
        <text:list-item>
          <text:p text:style-name="P14"><text:span text:style-name="Strong_20_Emphasis">Los superficiales:</text:span> Se iban porque solo buscaban beneficios terrenales ("¡Qué rico estaba el pan!"). </text:p>
        </text:list-item>
        <text:list-item>
          <text:p text:style-name="P14"><text:span text:style-name="Strong_20_Emphasis">Los verdaderos buscadores:</text:span> Se quedaban y preguntaban a Jesús el significado. </text:p>
        </text:list-item>
        <text:list-item>
          <text:p text:style-name="P13"><text:span text:style-name="Emphasis">Lección:</text:span> Dios revela sus secretos solo a los que tienen hambre espiritual y hacen el esfuerzo de buscarlo. </text:p>
        </text:list-item>
      </text:list>
      <text:p text:style-name="Horizontal_20_Line"/>
      <text:h text:style-name="Heading_20_2" text:outline-level="2">⚖️ 7. Consecuencias Eternas: Entender vs. No Entender</text:h>
      <text:p text:style-name="Text_20_body">¿Es opcional entender las parábolas? El mundo dice: <text:span text:style-name="Emphasis">"Solo cree en Jesús, no importa si no entiendes"</text:span>. Pero, ¿qué dijo Jesús?</text:p>
      <text:h text:style-name="Heading_20_3" text:outline-level="3">✅ Los que ENTIENDEN las parábolas:</text:h>
      <text:list text:style-name="L8">
        <text:list-item>
          <text:p text:style-name="P16"><text:span text:style-name="Strong_20_Emphasis">Conocen la voluntad de Dios.</text:span> </text:p>
        </text:list-item>
        <text:list-item>
          <text:p text:style-name="P16"><text:span text:style-name="Strong_20_Emphasis">Pueden hacer la voluntad de Dios.</text:span> </text:p>
        </text:list-item>
        <text:list-item>
          <text:p text:style-name="P16"><text:span text:style-name="Strong_20_Emphasis">Reciben el perdón de pecados.</text:span> </text:p>
        </text:list-item>
        <text:list-item>
          <text:p text:style-name="P15"><text:span text:style-name="Strong_20_Emphasis">Obtienen la Salvación.</text:span> </text:p>
        </text:list-item>
      </text:list>
      <text:h text:style-name="Heading_20_3" text:outline-level="3">❌ Los que NO ENTIENDEN las parábolas:</text:h>
      <text:list text:style-name="L9">
        <text:list-item>
          <text:p text:style-name="P18">No conocen la voluntad de Dios. </text:p>
        </text:list-item>
        <text:list-item>
          <text:p text:style-name="P18">No pueden hacerla (Es como si te enviaran un documento en un idioma que no hablas; no puedes cumplirlo). </text:p>
        </text:list-item>
        <text:list-item>
          <text:p text:style-name="P18"><text:span text:style-name="Strong_20_Emphasis">No reciben el perdón de pecados.</text:span> </text:p>
        </text:list-item>
        <text:list-item>
          <text:p text:style-name="P17"><text:span text:style-name="Strong_20_Emphasis">No tienen salvación.</text:span> </text:p>
        </text:list-item>
      </text:list>
      <text:p text:style-name="Quotations"><text:span text:style-name="Emphasis">"No todo el que me dice: Señor, Señor, entrará en el reino de los cielos, sino el que hace la voluntad de mi Padre que está en los cielos".</text:span> — <text:span text:style-name="Strong_20_Emphasis">Mateo 7:21</text:span></text:p>
      <text:p text:style-name="Text_20_body"><text:span text:style-name="Emphasis">Reflexión:</text:span> No basta con decir "creo". Hay que entender la voluntad de Dios (que está en las parábolas y profecías) para poder hacerla.</text:p>
      <text:p text:style-name="Horizontal_20_Line"/>
      <text:h text:style-name="Heading_20_2" text:outline-level="2">⏳ 8. ¿Cuándo se Pueden Entender las Parábolas?</text:h>
      <text:p text:style-name="Text_20_body">¿Se pueden entender en cualquier época? No. Hay un tiempo específico designado por Dios.</text:p>
      <text:p text:style-name="Text_20_body"><text:soft-page-break/><text:span text:style-name="Strong_20_Emphasis">Juan 16:25</text:span></text:p>
      <text:p text:style-name="Quotations"><text:span text:style-name="Emphasis">"Estas cosas os he hablado en alegorías [parábolas]. La hora viene cuando ya no os hablaré por alegorías, sino que claramente os anunciaré acerca del Padre".</text:span></text:p>
      <text:p text:style-name="Text_20_body"><text:span text:style-name="Strong_20_Emphasis">Jeremías 23:20</text:span></text:p>
      <text:p text:style-name="Quotations"><text:span text:style-name="Emphasis">"No se apartará el furor de Jehová hasta que lo haya hecho... en los postreros días lo entenderéis cumplidamente".</text:span></text:p>
      <text:list text:style-name="L10">
        <text:list-item>
          <text:p text:style-name="P20"><text:span text:style-name="Strong_20_Emphasis">El Tiempo Específico:</text:span> En los "postreros días", el <text:span text:style-name="Strong_20_Emphasis">tiempo del cumplimiento de la profecía</text:span>. </text:p>
        </text:list-item>
        <text:list-item>
          <text:p text:style-name="P20">Solo cuando la profecía se cumple y aparece la <text:span text:style-name="Strong_20_Emphasis">Realidad</text:span>, podemos entender "cumplidamente" (con claridad) el misterio. </text:p>
        </text:list-item>
        <text:list-item>
          <text:p text:style-name="P20"><text:span text:style-name="Emphasis">Ejemplo de la Primera Venida:</text:span> Los profetas hablaron de una "gran luz". Nadie sabía qué era. Pero cuando llegó la Realidad (Jesús) y dijo "Yo soy la luz", ya no hubo que asumir; se entendió cumplidamente. </text:p>
        </text:list-item>
        <text:list-item>
          <text:p text:style-name="P19"><text:span text:style-name="Emphasis">Nuestro Tiempo:</text:span> Hoy vivimos en los tiempos de la Segunda Venida (tiempos de recreación). ¡Es el momento exacto en que Dios va a revelar y aclarar todas las parábolas de Apocalipsis! </text:p>
        </text:list-item>
      </text:list>
      <text:p text:style-name="Horizontal_20_Line"/>
      <text:h text:style-name="Heading_20_2" text:outline-level="2">🗂️ 9. Los 5 Tipos de Parábolas en la Biblia</text:h>
      <text:p text:style-name="Text_20_body">Para que reconozcamos cuando Dios nos está hablando en parábolas, veamos los 5 tipos principales que utiliza:</text:p>
      <text:h text:style-name="Heading_20_3" text:outline-level="3">1️⃣ Parábolas a través de OBJETOS (La Naturaleza)</text:h>
      <text:p text:style-name="Text_20_body">Dios usa características de la naturaleza para explicar cosas espirituales (Romanos 1:20).</text:p>
      <text:list text:style-name="L11">
        <text:list-item>
          <text:p text:style-name="P22"><text:span text:style-name="Strong_20_Emphasis">Ejemplo:</text:span> La Piedra.</text:p>
          <text:list>
            <text:list-item>
              <text:p text:style-name="P22"><text:span text:style-name="Emphasis">Profecía (Isaías 28:16):</text:span> <text:span text:style-name="Emphasis">"He aquí que yo he puesto en Sion por fundamento una piedra..."</text:span> (Los judíos pensaban en una piedra literal o un edificio). </text:p>
            </text:list-item>
            <text:list-item>
              <text:p text:style-name="P21"><text:span text:style-name="Emphasis">Cumplimiento (1 Pedro 2:4):</text:span> Pedro entiende por revelación que la "piedra viva" no es un objeto, sino <text:span text:style-name="Strong_20_Emphasis">Jesucristo</text:span>, el fundamento escogido por Dios, en quien estaba la ley (como tablas de piedra) y quien juzga con la verdad. </text:p>
            </text:list-item>
          </text:list>
        </text:list-item>
      </text:list>
      <text:h text:style-name="Heading_20_3" text:outline-level="3">2️⃣ Parábolas a través de PROFETAS</text:h>
      <text:p text:style-name="Text_20_body">Los profetas mismos son usados figurativamente para referirse a otra persona (generalmente al Mesías).</text:p>
      <text:list text:style-name="L12">
        <text:list-item>
          <text:p text:style-name="P24"><text:span text:style-name="Strong_20_Emphasis">Ejemplo:</text:span> Isaías 61:1.</text:p>
          <text:list>
            <text:list-item>
              <text:p text:style-name="P24"><text:span text:style-name="Emphasis">Profecía:</text:span> <text:span text:style-name="Emphasis">"El espíritu de Jehová... está sobre mí, porque me ungió Jehová. Me ha enviado a predicar buenas nuevas..."</text:span> (Parece que Isaías habla de sí mismo). </text:p>
            </text:list-item>
            <text:list-item>
              <text:p text:style-name="P23"><text:span text:style-name="Emphasis">Cumplimiento (Lucas 4:17-21):</text:span> Jesús lee esto en la sinagoga y dice: <text:span text:style-name="Emphasis">"Hoy se ha cumplido esta escritura"</text:span>. Isaías era la parábola; la Realidad era Jesús. </text:p>
            </text:list-item>
          </text:list>
        </text:list-item>
      </text:list>
      <text:h text:style-name="Heading_20_3" text:outline-level="3">3️⃣ Parábolas a través de BESTIAS (Animales)</text:h>
      <text:list text:style-name="L13">
        <text:list-item>
          <text:p text:style-name="P26"><text:span text:style-name="Strong_20_Emphasis">Ejemplo 1: El Buey.</text:span></text:p>
          <text:list>
            <text:list-item>
              <text:p text:style-name="P26"><text:soft-page-break/><text:span text:style-name="Emphasis">Ley (Deuteronomio 25:4):</text:span> <text:span text:style-name="Emphasis">"No pondrás bozal al buey cuando trillare"</text:span>. (Parece que a Dios le importan los animales). </text:p>
            </text:list-item>
            <text:list-item>
              <text:p text:style-name="P26"><text:span text:style-name="Emphasis">Cumplimiento (1 Corintios 9:9-10):</text:span> Pablo aclara que Dios dijo esto por nosotros. El "buey" que trilla representa a los <text:span text:style-name="Strong_20_Emphasis">pastores y trabajadores</text:span> de la palabra; no se les debe prohibir vivir de su obra. </text:p>
            </text:list-item>
          </text:list>
        </text:list-item>
        <text:list-item>
          <text:p text:style-name="P26"><text:span text:style-name="Strong_20_Emphasis">Ejemplo 2: Los Zorros.</text:span></text:p>
          <text:list>
            <text:list-item>
              <text:p text:style-name="P25"><text:span text:style-name="Emphasis">Profecía (Cantares 2:15 / Ezequiel 13:4):</text:span> Los "zorritos" que destruyen las viñas representan a los <text:span text:style-name="Strong_20_Emphasis">falsos profetas</text:span>, que son astutos y dañan el reino. </text:p>
            </text:list-item>
          </text:list>
        </text:list-item>
      </text:list>
      <text:h text:style-name="Heading_20_3" text:outline-level="3">4️⃣ Parábolas a través de ACONTECIMIENTOS HISTÓRICOS</text:h>
      <text:p text:style-name="Text_20_body">Eventos reales que esconden un misterio espiritual.</text:p>
      <text:list text:style-name="L14">
        <text:list-item>
          <text:p text:style-name="P28"><text:span text:style-name="Strong_20_Emphasis">Ejemplo:</text:span> Abraham, Sara y Agar (Génesis 16-17).</text:p>
          <text:list>
            <text:list-item>
              <text:p text:style-name="P28"><text:span text:style-name="Emphasis">Historia:</text:span> Abraham tuvo dos hijos, uno de la esclava (Agar) y uno de la libre (Sara). </text:p>
            </text:list-item>
            <text:list-item>
              <text:p text:style-name="P27"><text:span text:style-name="Emphasis">Cumplimiento / Misterio (Gálatas 4:21-24):</text:span> Pablo dice que esto es una <text:span text:style-name="Strong_20_Emphasis">alegoría</text:span>. Las dos mujeres representan <text:span text:style-name="Strong_20_Emphasis">los dos pactos</text:span>: el del Monte Sinaí (esclavitud/ley) y el de la promesa (libertad/gracia). </text:p>
            </text:list-item>
          </text:list>
        </text:list-item>
      </text:list>
      <text:h text:style-name="Heading_20_3" text:outline-level="3">5️⃣ Parábolas a través de NOMBRES DE LUGARES Y PAÍSES</text:h>
      <text:list text:style-name="L15">
        <text:list-item>
          <text:p text:style-name="P30"><text:span text:style-name="Strong_20_Emphasis">Ejemplo:</text:span> Sodoma, Egipto y Gólgota.</text:p>
          <text:list>
            <text:list-item>
              <text:p text:style-name="P30"><text:span text:style-name="Emphasis">Profecía (Apocalipsis 11:8):</text:span> <text:span text:style-name="Emphasis">"Y sus cadáveres estarán en la plaza de la grande ciudad que en sentido espiritual se llama Sodoma y Egipto, donde también nuestro Señor fue crucificado".</text:span> </text:p>
            </text:list-item>
            <text:list-item>
              <text:p text:style-name="P29"><text:span text:style-name="Emphasis">Significado:</text:span> No se refiere a las ciudades geográficas literales, sino a un lugar espiritual que tiene las <text:span text:style-name="Emphasis">características</text:span> de pecado (Sodoma), esclavitud (Egipto) y donde se crucifica la verdad (Gólgota). </text:p>
            </text:list-item>
          </text:list>
        </text:list-item>
      </text:list>
      <text:p text:style-name="Horizontal_20_Line"/>
      <text:h text:style-name="Heading_20_2" text:outline-level="2">🎯 10. Conclusión de la Lección</text:h>
      <text:list text:style-name="L16">
        <text:list-item>
          <text:p text:style-name="P32"><text:span text:style-name="Strong_20_Emphasis">Los misterios del reino están escritos en parábolas.</text:span> Si no los entiendes, no serás perdonado de tus pecados ni serás salvo. </text:p>
        </text:list-item>
        <text:list-item>
          <text:p text:style-name="P32"><text:span text:style-name="Strong_20_Emphasis">El verdadero significado se conoce al ver la Realidad.</text:span> Cuando la profecía se cumple, Dios revela el significado exacto. </text:p>
        </text:list-item>
        <text:list-item>
          <text:p text:style-name="P31"><text:span text:style-name="Strong_20_Emphasis">Nuestro deber hoy:</text:span> Entender el verdadero significado de las parábolas de los libros proféticos y tener fe en las profecías y su cumplimiento (la realidad). </text:p>
        </text:list-item>
      </text:list>
      <text:p text:style-name="Text_20_body"><text:span text:style-name="Strong_20_Emphasis">📢 Anuncio para la Próxima Lección:</text:span> Empezaremos a estudiar el <text:span text:style-name="Strong_20_Emphasis">Lenguaje Figurativo Básico</text:span>: El significado espiritual de <text:span text:style-name="Emphasis">Semilla, Campo, Árbol y Ave</text:span>. Jesús dijo que esta es la parábola más básica; si no entendemos esta, no podremos entender el resto. ¡Es tiempo de crear cimientos fuertes!</text:p>
      <text:p text:style-name="Horizontal_20_Line"/>
      <text:h text:style-name="Heading_20_2" text:outline-level="2">🔄 11.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17">
        <text:list-item>
          <text:p text:style-name="P34"><text:soft-page-break/><text:span text:style-name="Strong_20_Emphasis">¿Qué es una parábola?</text:span> Usar frases como "es como..." para comparar algo físico con algo espiritual. </text:p>
        </text:list-item>
        <text:list-item>
          <text:p text:style-name="P34"><text:span text:style-name="Strong_20_Emphasis">¿Cuál es el propósito de las parábolas en Historia/Moral?</text:span> Ayudar al entendimiento. </text:p>
        </text:list-item>
        <text:list-item>
          <text:p text:style-name="P34"><text:span text:style-name="Strong_20_Emphasis">¿Cuál es el propósito de las parábolas en Profecía?</text:span> Esconder los secretos del reino de Satanás/enemigos. </text:p>
        </text:list-item>
        <text:list-item>
          <text:p text:style-name="P34"><text:span text:style-name="Strong_20_Emphasis">¿Por qué Jesús habló en parábolas?</text:span> 1) Para esconder los secretos del enemigo. 2) Porque estaba profetizado (Salmos 78). </text:p>
        </text:list-item>
        <text:list-item>
          <text:p text:style-name="P34"><text:span text:style-name="Strong_20_Emphasis">¿Cuál es la diferencia entre los que saben y los que no?</text:span> Los que saben hacen la voluntad de Dios, son perdonados y salvos. Los que no, perecen. </text:p>
        </text:list-item>
        <text:list-item>
          <text:p text:style-name="P34"><text:span text:style-name="Strong_20_Emphasis">¿Cuándo se pueden entender?</text:span> En el último tiempo, cuando la profecía se cumple. </text:p>
        </text:list-item>
        <text:list-item>
          <text:p text:style-name="P33"><text:span text:style-name="Strong_20_Emphasis">¿Cuáles son los 5 tipos de parábolas?</text:span> Objetos, Profetas, Animales/Bestias, Acontecimientos Históricos, Lugares/Países. </text:p>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p>
      <text:p text:style-name="Text_20_body">¡Gracias a todos! Cuídense y que Dios los bendiga. Nos vemos en la próxima lección donde veremos la semilla, el campo, el árbol y el ave. ¡Adió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41:30.326601374</meta:creation-date>
    <dc:date>2026-06-11T15:01:37.305642487</dc:date>
    <meta:editing-duration>PT20M7S</meta:editing-duration>
    <meta:editing-cycles>1</meta:editing-cycles>
    <meta:document-statistic meta:table-count="0" meta:image-count="0" meta:object-count="0" meta:page-count="7" meta:paragraph-count="136" meta:word-count="2349" meta:character-count="13876" meta:non-whitespace-character-count="11672"/>
    <meta:generator>LibreOffice/24.2.7.2$Linux_X86_64 LibreOffice_project/420$Build-2</meta:generator>
  </office:meta>
</office:document-meta>
</file>