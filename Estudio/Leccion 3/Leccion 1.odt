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Standard">
      <style:text-properties style:font-name="Padauk Book"/>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text-properties style:font-name="Padauk Book"/>
    </style:style>
    <style:style style:name="P41" style:family="paragraph" style:parent-style-name="Text_20_body" style:list-style-name="L4">
      <style:paragraph-properties fo:margin-top="0cm" fo:margin-bottom="0cm" style:contextual-spacing="false"/>
      <style:text-properties style:font-name="Padauk Book"/>
    </style:style>
    <style:style style:name="P42" style:family="paragraph" style:parent-style-name="Text_20_body" style:list-style-name="L9">
      <style:paragraph-properties fo:margin-top="0cm" fo:margin-bottom="0cm" style:contextual-spacing="false"/>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3 (PARTE 1)</text:h>
      <text:h text:style-name="P2" text:outline-level="2">Las Parábolas de los Misterios del Reino de los Cielos</text:h>
      <text:p text:style-name="P4"/>
      <text:h text:style-name="P2" text:outline-level="2">🔄 1. Repaso Inicial: Profecía, Cumplimiento y Fe</text:h>
      <text:p text:style-name="Text_20_body"><text:span text:style-name="Emphasis"><text:span text:style-name="T1">(A cargo del Evangelista Christian Howard)</text:span></text:span></text:p>
      <text:p text:style-name="P40">Antes de comenzar la nueva lección, ponemos a prueba lo aprendido sobre la metodología de Dios y Su plan:</text:p>
      <text:p text:style-name="Text_20_body"><text:span text:style-name="Strong_20_Emphasis"><text:span text:style-name="T1">Preguntas de Reflexión y Respuestas:</text:span></text:span></text:p>
      <text:list text:style-name="L1">
        <text:list-item>
          <text:p text:style-name="P7"><text:span text:style-name="Strong_20_Emphasis"><text:span text:style-name="T1">¿Qué demuestra que la palabra de Dios es verdadera?</text:span></text:span></text:p>
          <text:list>
            <text:list-item>
              <text:p text:style-name="P7"><text:span text:style-name="Emphasis"><text:span text:style-name="T1">Respuesta:</text:span></text:span><text:span text:style-name="T1"> </text:span><text:span text:style-name="Strong_20_Emphasis"><text:span text:style-name="T1">Que las profecías se cumplen.</text:span></text:span><text:span text:style-name="T1"> (Si todo lo que se cumplió antes fue verdad, todo lo que profetizó para el futuro también se cumplirá). </text:span></text:p>
            </text:list-item>
          </text:list>
        </text:list-item>
        <text:list-item>
          <text:p text:style-name="P7"><text:span text:style-name="Strong_20_Emphasis"><text:span text:style-name="T1">Según 2 Tesalonicenses 2:1-3, ¿cuál es el orden correcto de las profecías?</text:span></text:span></text:p>
          <text:list>
            <text:list-item>
              <text:p text:style-name="P7"><text:span text:style-name="Emphasis"><text:span text:style-name="T1">Respuesta:</text:span></text:span><text:span text:style-name="T1"> </text:span><text:span text:style-name="Strong_20_Emphasis"><text:span text:style-name="T1">Traición, destrucción y salvación.</text:span></text:span><text:span text:style-name="T1"> </text:span></text:p>
            </text:list-item>
          </text:list>
        </text:list-item>
        <text:list-item>
          <text:p text:style-name="P7"><text:span text:style-name="Strong_20_Emphasis"><text:span text:style-name="T1">Según 1 Timoteo 2:4, ¿qué desea Dios para toda la humanidad?</text:span></text:span></text:p>
          <text:list>
            <text:list-item>
              <text:p text:style-name="P7"><text:span text:style-name="Emphasis"><text:span text:style-name="T1">Respuesta:</text:span></text:span><text:span text:style-name="T1"> </text:span><text:span text:style-name="Strong_20_Emphasis"><text:span text:style-name="T1">Que todos sean salvos y lleguen al conocimiento de la verdad</text:span></text:span><text:span text:style-name="T1"> (la verdad de Dios, no la del hombre). </text:span></text:p>
            </text:list-item>
          </text:list>
        </text:list-item>
        <text:list-item>
          <text:p text:style-name="P7"><text:span text:style-name="Strong_20_Emphasis"><text:span text:style-name="T1">Según Oseas 4:6, ¿por qué es importante estudiar y comprender la Biblia?</text:span></text:span></text:p>
          <text:list>
            <text:list-item>
              <text:p text:style-name="P7"><text:span text:style-name="Emphasis"><text:span text:style-name="T1">Respuesta:</text:span></text:span><text:span text:style-name="T1"> Porque </text:span><text:span text:style-name="Strong_20_Emphasis"><text:span text:style-name="T1">la falta de conocimiento nos manda a la destrucción</text:span></text:span><text:span text:style-name="T1">. El conocimiento nos ayuda a hacer la voluntad de Dios. </text:span></text:p>
            </text:list-item>
          </text:list>
        </text:list-item>
        <text:list-item>
          <text:p text:style-name="P7"><text:span text:style-name="Strong_20_Emphasis"><text:span text:style-name="T1">¿Qué significa tener una "fe completa" según la lección anterior?</text:span></text:span></text:p>
          <text:list>
            <text:list-item>
              <text:p text:style-name="P7"><text:span text:style-name="Emphasis"><text:span text:style-name="T1">Respuesta:</text:span></text:span><text:span text:style-name="T1"> </text:span><text:span text:style-name="Strong_20_Emphasis"><text:span text:style-name="T1">Creer tanto en la profecía como en su cumplimiento.</text:span></text:span><text:span text:style-name="T1"> (Los judíos creyeron en la profecía, pero no en el cumplimiento; nosotros debemos entender ambas). </text:span></text:p>
            </text:list-item>
          </text:list>
        </text:list-item>
        <text:list-item>
          <text:p text:style-name="P7"><text:span text:style-name="Strong_20_Emphasis"><text:span text:style-name="T1">¿Qué se cumplió durante la era de los Evangelios del Reino?</text:span></text:span></text:p>
          <text:list>
            <text:list-item>
              <text:p text:style-name="P6"><text:span text:style-name="Emphasis"><text:span text:style-name="T1">Respuesta:</text:span></text:span><text:span text:style-name="T1"> </text:span><text:span text:style-name="Strong_20_Emphasis"><text:span text:style-name="T1">Todas las profecías del Antiguo Testamento.</text:span></text:span><text:span text:style-name="T1"> (Jesús testificó que Él era el cumplimiento exacto de lo escrito en la Ley, los Salmos y los Profetas). </text:span></text:p>
            </text:list-item>
          </text:list>
        </text:list-item>
      </text:list>
      <text:p text:style-name="Text_20_body"><text:span text:style-name="Strong_20_Emphasis"><text:span text:style-name="T1">Oración de apertura:</text:span></text:span></text:p>
      <text:p text:style-name="Quotations"><text:soft-page-break/><text:span text:style-name="Emphasis"><text:span text:style-name="T1">"Santísimo Padre Dios, gracias por traernos hoy a esta clase. Gracias por enseñar todas estas cosas que, aunque parecen básicas, son cimientos que debemos entender desde el principio. Oramos por todos los estudiantes que tienen ese hambre de aprender de ti. Por los que no han podido venir por circunstancias, tú conoces su corazón; dales la oportunidad de aprender más sobre tu palabra. Manda tu Espíritu Santo al instructor Sibiani para que solo hable tus palabras y no sus propios pensamientos, para que sepamos tu verdad directa de ti, sin corromper por pensamientos humanos. Gracias por darnos esta chance de aprender hoy de las parábolas. Oramos todo esto en tu hijo Jesucristo. Amén."</text:span></text:span></text:p>
      <text:p text:style-name="P4"/>
      <text:h text:style-name="P2" text:outline-level="2">🏫 2. Bienvenida y la Actitud del Corazón</text:h>
      <text:p text:style-name="Text_20_body"><text:span text:style-name="Emphasis"><text:span text:style-name="T1">(A cargo del Instructor Sibiani)</text:span></text:span></text:p>
      <text:h text:style-name="P3" text:outline-level="3">📌 La Actitud ante la Palabra</text:h>
      <text:p text:style-name="P40">Es una alegría ver a todos con las cámaras encendidas y participando. Cuando participamos, nos motivamos unos a otros. </text:p>
      <text:list text:style-name="L2">
        <text:list-item>
          <text:p text:style-name="P9"><text:span text:style-name="Strong_20_Emphasis"><text:span text:style-name="T1">El Peligro de Enfriarse:</text:span></text:span><text:span text:style-name="T1"> Muchas veces, al recibir palabra revelada, las personas se enfrían con el tiempo. ¡Espero que eso no les pase a ustedes! Mantengan ese fuego en sus corazones hasta el final. </text:span></text:p>
        </text:list-item>
        <text:list-item>
          <text:p text:style-name="P8"><text:span text:style-name="Strong_20_Emphasis"><text:span text:style-name="T1">El Propósito de las Preguntas:</text:span></text:span><text:span text:style-name="T1"> Cuando hacemos preguntas interactivas, no lo vean como un examen para avergonzarse si se equivocan. Respóndanlas con fe; es una herramienta para darse cuenta de qué necesitan mejorar. </text:span></text:p>
        </text:list-item>
      </text:list>
      <text:h text:style-name="P3" text:outline-level="3">📖 El Título de la Lección</text:h>
      <text:p text:style-name="P40">Leamos juntos dos veces:</text:p>
      <text:p text:style-name="Quotations"><text:span text:style-name="Strong_20_Emphasis"><text:span text:style-name="T1">"Las parábolas de los misterios del reino de los cielos"</text:span></text:span></text:p>
      <text:p text:style-name="Text_20_body"><text:span text:style-name="T1">Dios tiene muchos misterios en la Biblia y habla en parábolas respecto al </text:span><text:span text:style-name="Strong_20_Emphasis"><text:span text:style-name="T1">reino de los cielos</text:span></text:span><text:span text:style-name="T1">, que es nuestro objetivo final. Pero, ¿qué significa que sea un "misterio"? Significa que hay mucha ambigüedad, que las personas asumen cosas y que, humanamente, es desconocido. Jesús habló de esto hace 2,000 años. ¿Se vuelve menos misterio con el tiempo? No, requiere revelación.</text:span></text:p>
      <text:p text:style-name="P4"/>
      <text:h text:style-name="P2" text:outline-level="2"><text:soft-page-break/>👥 3. El Misterio del Reino y los Dos Grupos de Personas</text:h>
      <text:p text:style-name="Text_20_body"><text:span text:style-name="Strong_20_Emphasis"><text:span text:style-name="T1">Mateo 13:10-11</text:span></text:span></text:p>
      <text:p text:style-name="Quotations"><text:span text:style-name="Emphasis"><text:span text:style-name="T1">"Entonces, acercándose los discípulos, le dijeron: '¿Por qué les hablas por parábolas?'. Él, respondiendo, les dijo: 'Porque a vosotros os es dado saber los misterios del reino de los cielos, mas a ellos no les es dado'."</text:span></text:span></text:p>
      <text:h text:style-name="P3" text:outline-level="3">🧠 "Vosotros" vs. "Ellos"</text:h>
      <text:p text:style-name="P40">Jesús hace una distinción clara entre dos tipos de personas:</text:p>
      <text:list text:style-name="L3">
        <text:list-item>
          <text:p text:style-name="P11"><text:span text:style-name="Strong_20_Emphasis"><text:span text:style-name="T1">"Vosotros" (Los Discípulos):</text:span></text:span><text:span text:style-name="T1"> A ellos sí se les da entender los misterios. </text:span></text:p>
        </text:list-item>
        <text:list-item>
          <text:p text:style-name="P10"><text:span text:style-name="Strong_20_Emphasis"><text:span text:style-name="T1">"Ellos" (La Multitud / Los Cerrados):</text:span></text:span><text:span text:style-name="T1"> A ellos no les es dado. </text:span></text:p>
        </text:list-item>
      </text:list>
      <text:p text:style-name="Text_20_body"><text:span text:style-name="Strong_20_Emphasis"><text:span text:style-name="T1">¿Por qué los 12 discípulos sí entendieron y el resto no?</text:span></text:span><text:span text:style-name="T1"> No fue por inteligencia académica, sino por </text:span><text:span text:style-name="Strong_20_Emphasis"><text:span text:style-name="T1">el corazón que tenían</text:span></text:span><text:span text:style-name="T1">. </text:span></text:p>
      <text:list text:style-name="L4">
        <text:list-item>
          <text:p text:style-name="P41">Vivían en tiempos de incertidumbre, donde todos decían conocer el reino. </text:p>
        </text:list-item>
        <text:list-item>
          <text:p text:style-name="P13"><text:span text:style-name="T1">Pero los discípulos tenían un </text:span><text:span text:style-name="Strong_20_Emphasis"><text:span text:style-name="T1">corazón abierto y humilde</text:span></text:span><text:span text:style-name="T1">. Aunque venían de aprender de fariseos y otros pastores, cuando llegó la Verdad, desecharon sus pensamientos previos y aceptaron la palabra verdadera. </text:span></text:p>
        </text:list-item>
        <text:list-item>
          <text:p text:style-name="P12"><text:span text:style-name="Emphasis"><text:span text:style-name="T1">Reflexión:</text:span></text:span><text:span text:style-name="T1"> ¿Qué clase de corazón tengo yo? Si la palabra de Dios choca con mis pensamientos, ¿los desecho para dar campo a Dios, o me cierro? </text:span></text:p>
        </text:list-item>
      </text:list>
      <text:p text:style-name="P4"/>
      <text:h text:style-name="P2" text:outline-level="2">🔍 4. ¿Qué es una Parábola?</text:h>
      <text:p text:style-name="Text_20_body"><text:span text:style-name="T1">Una parábola es una </text:span><text:span text:style-name="Strong_20_Emphasis"><text:span text:style-name="T1">comparación</text:span></text:span><text:span text:style-name="T1">. En coreano se dice </text:span><text:span text:style-name="Emphasis"><text:span text:style-name="T1">"biu"</text:span></text:span><text:span text:style-name="T1">, que significa comparar y entender.</text:span></text:p>
      <text:list text:style-name="L5">
        <text:list-item>
          <text:p text:style-name="P15"><text:span text:style-name="Strong_20_Emphasis"><text:span text:style-name="T1">No es literal:</text:span></text:span><text:span text:style-name="T1"> Si digo </text:span><text:span text:style-name="Emphasis"><text:span text:style-name="T1">"El evangelista Christian es como una piedra"</text:span></text:span><text:span text:style-name="T1">, no significa que sea una roca literal, sino que tiene características de una piedra (firmeza, etc.). </text:span></text:p>
        </text:list-item>
        <text:list-item>
          <text:p text:style-name="P15"><text:span text:style-name="Strong_20_Emphasis"><text:span text:style-name="T1">Ejemplos:</text:span></text:span><text:span text:style-name="T1"> </text:span><text:span text:style-name="Emphasis"><text:span text:style-name="T1">"Susana es como una flor"</text:span></text:span><text:span text:style-name="T1"> (usa las características de una flor, como la belleza, para describir a Susana). </text:span></text:p>
        </text:list-item>
        <text:list-item>
          <text:p text:style-name="P14"><text:span text:style-name="Strong_20_Emphasis"><text:span text:style-name="T1">En la Biblia:</text:span></text:span><text:span text:style-name="T1"> Jesús decía </text:span><text:span text:style-name="Emphasis"><text:span text:style-name="T1">"El reino de los cielos es semejante a..."</text:span></text:span><text:span text:style-name="T1"> o </text:span><text:span text:style-name="Emphasis"><text:span text:style-name="T1">"es como..."</text:span></text:span><text:span text:style-name="T1">. No decía "esto es el reino", sino que usaba características de algo físico para describir algo espiritual. </text:span></text:p>
        </text:list-item>
      </text:list>
      <text:p text:style-name="P4"/>
      <text:h text:style-name="P2" text:outline-level="2"><text:soft-page-break/>🎭 5. ¿Por qué Jesús Hablaba en Parábolas? (Los Dos Propósitos)</text:h>
      <text:p text:style-name="P40">Dependiendo del contexto, las parábolas tienen dos propósitos completamente opuestos:</text:p>
      <text:h text:style-name="Heading_20_3" text:outline-level="3"><text:span text:style-name="T1">1️⃣ En Contexto de Historia y Enseñanzas Morales: </text:span><text:span text:style-name="Strong_20_Emphasis"><text:span text:style-name="T1">Para ayudar a comprender.</text:span></text:span></text:h>
      <text:p text:style-name="P40">El reino de los cielos es espiritual y no lo podemos ver. Para explicarlo, Jesús usaba cosas físicas que sí podemos ver (un árbol, una red, un campo). Ayuda a la mente humana a captar conceptos espirituales.</text:p>
      <text:h text:style-name="Heading_20_3" text:outline-level="3"><text:span text:style-name="T1">2️⃣ En Contexto de Profecía: </text:span><text:span text:style-name="Strong_20_Emphasis"><text:span text:style-name="T1">Para esconder los misterios.</text:span></text:span></text:h>
      <text:list text:style-name="L6">
        <text:list-item>
          <text:p text:style-name="P17"><text:span text:style-name="Emphasis"><text:span text:style-name="T1">Pregunta:</text:span></text:span><text:span text:style-name="T1"> ¿Por qué Dios escondería la verdad si quiere que todos se salven? </text:span></text:p>
        </text:list-item>
        <text:list-item>
          <text:p text:style-name="P17"><text:span text:style-name="Emphasis"><text:span text:style-name="T1">Respuesta:</text:span></text:span><text:span text:style-name="T1"> </text:span><text:span text:style-name="Strong_20_Emphasis"><text:span text:style-name="T1">Porque hay una guerra espiritual.</text:span></text:span><text:span text:style-name="T1"> Satanás y sus espíritus malignos estaban escuchando. </text:span></text:p>
        </text:list-item>
        <text:list-item>
          <text:p text:style-name="P17"><text:span text:style-name="Emphasis"><text:span text:style-name="T1">Analogía de la Guerra:</text:span></text:span><text:span text:style-name="T1"> En las guerras físicas, los ejércitos usan códigos (como el código Morse) para que el enemigo intercepte el mensaje pero no lo entienda y no pueda sabotearlos. </text:span></text:p>
        </text:list-item>
        <text:list-item>
          <text:p text:style-name="P16"><text:span text:style-name="T1">Dios esconde los misterios del reino en parábolas para que </text:span><text:span text:style-name="Strong_20_Emphasis"><text:span text:style-name="T1">Satanás y los enemigos de la verdad no entiendan el plan de Dios</text:span></text:span><text:span text:style-name="T1">, pero se lo revela a Su verdadero pueblo (aquellos que, como los discípulos, se acercan con corazón humilde a preguntar: </text:span><text:span text:style-name="Emphasis"><text:span text:style-name="T1">"Jesús, ¿qué significa esto?"</text:span></text:span><text:span text:style-name="T1">). </text:span></text:p>
        </text:list-item>
      </text:list>
      <text:p text:style-name="P4"/>
      <text:h text:style-name="P2" text:outline-level="2">📜 6. Las Dos Razones Principales de las Parábolas Proféticas</text:h>
      <text:h text:style-name="P3" text:outline-level="3">Razón 1: Para Cumplir la Profecía del Antiguo Testamento</text:h>
      <text:p text:style-name="Text_20_body"><text:span text:style-name="Strong_20_Emphasis"><text:span text:style-name="T1">Salmos 78:1-2 (Profecía)</text:span></text:span></text:p>
      <text:p text:style-name="Quotations"><text:span text:style-name="Emphasis"><text:span text:style-name="T1">"Abriré mi boca en proverbios [parábolas]; hablaré cosas escondidas desde tiempos antiguos".</text:span></text:span></text:p>
      <text:p text:style-name="Text_20_body"><text:span text:style-name="Strong_20_Emphasis"><text:span text:style-name="T1">Mateo 13:34-35 (Cumplimiento)</text:span></text:span></text:p>
      <text:p text:style-name="Quotations"><text:span text:style-name="Emphasis"><text:span text:style-name="T1">"Todo esto habló Jesús por parábolas a la gente, y sin parábolas no les hablaba. Para que se cumpliese lo dicho por el profeta..."</text:span></text:span></text:p>
      <text:p text:style-name="Text_20_body"><text:soft-page-break/><text:span text:style-name="T1">Jesús </text:span><text:span text:style-name="Emphasis"><text:span text:style-name="T1">tuvo</text:span></text:span><text:span text:style-name="T1"> que hablar en parábolas. Si no lo hubiera hecho, no estaría cumpliendo la voluntad de Dios ni las promesas del Padre.</text:span></text:p>
      <text:h text:style-name="P3" text:outline-level="3">Razón 2: Para Separar a los Buscadores de la Verdad de los Superficiales</text:h>
      <text:p text:style-name="P40">Cuando Jesús multiplicó los panes, la multitud lo siguió, pero solo querían más comida física. Cuando Jesús empezó a hablar de "comer su carne y beber su sangre" (en parábolas espirituales), la gente se escandalizó y se fue.</text:p>
      <text:list text:style-name="L7">
        <text:list-item>
          <text:p text:style-name="P19"><text:span text:style-name="Strong_20_Emphasis"><text:span text:style-name="T1">Los superficiales:</text:span></text:span><text:span text:style-name="T1"> Se iban porque solo buscaban beneficios terrenales ("¡Qué rico estaba el pan!"). </text:span></text:p>
        </text:list-item>
        <text:list-item>
          <text:p text:style-name="P19"><text:span text:style-name="Strong_20_Emphasis"><text:span text:style-name="T1">Los verdaderos buscadores:</text:span></text:span><text:span text:style-name="T1"> Se quedaban y preguntaban a Jesús el significado. </text:span></text:p>
        </text:list-item>
        <text:list-item>
          <text:p text:style-name="P18"><text:span text:style-name="Emphasis"><text:span text:style-name="T1">Lección:</text:span></text:span><text:span text:style-name="T1"> Dios revela sus secretos solo a los que tienen hambre espiritual y hacen el esfuerzo de buscarlo. </text:span></text:p>
        </text:list-item>
      </text:list>
      <text:p text:style-name="P4"/>
      <text:h text:style-name="P2" text:outline-level="2">⚖️ 7. Consecuencias Eternas: Entender vs. No Entender</text:h>
      <text:p text:style-name="Text_20_body"><text:span text:style-name="T1">¿Es opcional entender las parábolas? El mundo dice: </text:span><text:span text:style-name="Emphasis"><text:span text:style-name="T1">"Solo cree en Jesús, no importa si no entiendes"</text:span></text:span><text:span text:style-name="T1">. Pero, ¿qué dijo Jesús?</text:span></text:p>
      <text:h text:style-name="P3" text:outline-level="3">✅ Los que ENTIENDEN las parábolas:</text:h>
      <text:list text:style-name="L8">
        <text:list-item>
          <text:p text:style-name="P21"><text:span text:style-name="Strong_20_Emphasis"><text:span text:style-name="T1">Conocen la voluntad de Dios.</text:span></text:span><text:span text:style-name="T1"> </text:span></text:p>
        </text:list-item>
        <text:list-item>
          <text:p text:style-name="P21"><text:span text:style-name="Strong_20_Emphasis"><text:span text:style-name="T1">Pueden hacer la voluntad de Dios.</text:span></text:span><text:span text:style-name="T1"> </text:span></text:p>
        </text:list-item>
        <text:list-item>
          <text:p text:style-name="P21"><text:span text:style-name="Strong_20_Emphasis"><text:span text:style-name="T1">Reciben el perdón de pecados.</text:span></text:span><text:span text:style-name="T1"> </text:span></text:p>
        </text:list-item>
        <text:list-item>
          <text:p text:style-name="P20"><text:span text:style-name="Strong_20_Emphasis"><text:span text:style-name="T1">Obtienen la Salvación.</text:span></text:span><text:span text:style-name="T1"> </text:span></text:p>
        </text:list-item>
      </text:list>
      <text:h text:style-name="P3" text:outline-level="3">❌ Los que NO ENTIENDEN las parábolas:</text:h>
      <text:list text:style-name="L9">
        <text:list-item>
          <text:p text:style-name="P42">No conocen la voluntad de Dios. </text:p>
        </text:list-item>
        <text:list-item>
          <text:p text:style-name="P42">No pueden hacerla (Es como si te enviaran un documento en un idioma que no hablas; no puedes cumplirlo). </text:p>
        </text:list-item>
        <text:list-item>
          <text:p text:style-name="P23"><text:span text:style-name="Strong_20_Emphasis"><text:span text:style-name="T1">No reciben el perdón de pecados.</text:span></text:span><text:span text:style-name="T1"> </text:span></text:p>
        </text:list-item>
        <text:list-item>
          <text:p text:style-name="P22"><text:span text:style-name="Strong_20_Emphasis"><text:span text:style-name="T1">No tienen salvación.</text:span></text:span><text:span text:style-name="T1"> </text:span></text:p>
        </text:list-item>
      </text:list>
      <text:p text:style-name="Quotations"><text:span text:style-name="Emphasis"><text:span text:style-name="T1">"No todo el que me dice: Señor, Señor, entrará en el reino de los cielos, sino el que hace la voluntad de mi Padre que está en los cielos".</text:span></text:span><text:span text:style-name="T1"> — </text:span><text:span text:style-name="Strong_20_Emphasis"><text:span text:style-name="T1">Mateo 7:21</text:span></text:span></text:p>
      <text:p text:style-name="Text_20_body"><text:span text:style-name="Emphasis"><text:span text:style-name="T1">Reflexión:</text:span></text:span><text:span text:style-name="T1"> No basta con decir "creo". Hay que entender la voluntad de Dios (que está en las parábolas y profecías) para poder hacerla.</text:span></text:p>
      <text:p text:style-name="P4"><text:soft-page-break/></text:p>
      <text:h text:style-name="P2" text:outline-level="2">⏳ 8. ¿Cuándo se Pueden Entender las Parábolas?</text:h>
      <text:p text:style-name="P40">¿Se pueden entender en cualquier época? No. Hay un tiempo específico designado por Dios.</text:p>
      <text:p text:style-name="Text_20_body"><text:span text:style-name="Strong_20_Emphasis"><text:span text:style-name="T1">Juan 16:25</text:span></text:span></text:p>
      <text:p text:style-name="Quotations"><text:span text:style-name="Emphasis"><text:span text:style-name="T1">"Estas cosas os he hablado en alegorías [parábolas]. La hora viene cuando ya no os hablaré por alegorías, sino que claramente os anunciaré acerca del Padre".</text:span></text:span></text:p>
      <text:p text:style-name="Text_20_body"><text:span text:style-name="Strong_20_Emphasis"><text:span text:style-name="T1">Jeremías 23:20</text:span></text:span></text:p>
      <text:p text:style-name="Quotations"><text:span text:style-name="Emphasis"><text:span text:style-name="T1">"No se apartará el furor de Jehová hasta que lo haya hecho... en los postreros días lo entenderéis cumplidamente".</text:span></text:span></text:p>
      <text:list text:style-name="L10">
        <text:list-item>
          <text:p text:style-name="P25"><text:span text:style-name="Strong_20_Emphasis"><text:span text:style-name="T1">El Tiempo Específico:</text:span></text:span><text:span text:style-name="T1"> En los "postreros días", el </text:span><text:span text:style-name="Strong_20_Emphasis"><text:span text:style-name="T1">tiempo del cumplimiento de la profecía</text:span></text:span><text:span text:style-name="T1">. </text:span></text:p>
        </text:list-item>
        <text:list-item>
          <text:p text:style-name="P25"><text:span text:style-name="T1">Solo cuando la profecía se cumple y aparece la </text:span><text:span text:style-name="Strong_20_Emphasis"><text:span text:style-name="T1">Realidad</text:span></text:span><text:span text:style-name="T1">, podemos entender "cumplidamente" (con claridad) el misterio. </text:span></text:p>
        </text:list-item>
        <text:list-item>
          <text:p text:style-name="P25"><text:span text:style-name="Emphasis"><text:span text:style-name="T1">Ejemplo de la Primera Venida:</text:span></text:span><text:span text:style-name="T1"> Los profetas hablaron de una "gran luz". Nadie sabía qué era. Pero cuando llegó la Realidad (Jesús) y dijo "Yo soy la luz", ya no hubo que asumir; se entendió cumplidamente. </text:span></text:p>
        </text:list-item>
        <text:list-item>
          <text:p text:style-name="P24"><text:span text:style-name="Emphasis"><text:span text:style-name="T1">Nuestro Tiempo:</text:span></text:span><text:span text:style-name="T1"> Hoy vivimos en los tiempos de la Segunda Venida (tiempos de recreación). ¡Es el momento exacto en que Dios va a revelar y aclarar todas las parábolas de Apocalipsis! </text:span></text:p>
        </text:list-item>
      </text:list>
      <text:p text:style-name="P4"/>
      <text:h text:style-name="P2" text:outline-level="2">🗂️ 9. Los 5 Tipos de Parábolas en la Biblia</text:h>
      <text:p text:style-name="P40">Para que reconozcamos cuando Dios nos está hablando en parábolas, veamos los 5 tipos principales que utiliza:</text:p>
      <text:h text:style-name="P3" text:outline-level="3">1️⃣ Parábolas a través de OBJETOS (La Naturaleza)</text:h>
      <text:p text:style-name="P40">Dios usa características de la naturaleza para explicar cosas espirituales (Romanos 1:20).</text:p>
      <text:list text:style-name="L11">
        <text:list-item>
          <text:p text:style-name="P27"><text:span text:style-name="Strong_20_Emphasis"><text:span text:style-name="T1">Ejemplo:</text:span></text:span><text:span text:style-name="T1"> La Piedra.</text:span></text:p>
          <text:list>
            <text:list-item>
              <text:p text:style-name="P27"><text:span text:style-name="Emphasis"><text:span text:style-name="T1">Profecía (Isaías 28:16):</text:span></text:span><text:span text:style-name="T1"> </text:span><text:span text:style-name="Emphasis"><text:span text:style-name="T1">"He aquí que yo he puesto en Sion por fundamento una piedra..."</text:span></text:span><text:span text:style-name="T1"> (Los judíos pensaban en una piedra literal o un edificio). </text:span></text:p>
            </text:list-item>
            <text:list-item>
              <text:p text:style-name="P26"><text:soft-page-break/><text:span text:style-name="Emphasis"><text:span text:style-name="T1">Cumplimiento (1 Pedro 2:4):</text:span></text:span><text:span text:style-name="T1"> Pedro entiende por revelación que la "piedra viva" no es un objeto, sino </text:span><text:span text:style-name="Strong_20_Emphasis"><text:span text:style-name="T1">Jesucristo</text:span></text:span><text:span text:style-name="T1">, el fundamento escogido por Dios, en quien estaba la ley (como tablas de piedra) y quien juzga con la verdad. </text:span></text:p>
            </text:list-item>
          </text:list>
        </text:list-item>
      </text:list>
      <text:h text:style-name="P3" text:outline-level="3">2️⃣ Parábolas a través de PROFETAS</text:h>
      <text:p text:style-name="P40">Los profetas mismos son usados figurativamente para referirse a otra persona (generalmente al Mesías).</text:p>
      <text:list text:style-name="L12">
        <text:list-item>
          <text:p text:style-name="P29"><text:span text:style-name="Strong_20_Emphasis"><text:span text:style-name="T1">Ejemplo:</text:span></text:span><text:span text:style-name="T1"> Isaías 61:1.</text:span></text:p>
          <text:list>
            <text:list-item>
              <text:p text:style-name="P29"><text:span text:style-name="Emphasis"><text:span text:style-name="T1">Profecía:</text:span></text:span><text:span text:style-name="T1"> </text:span><text:span text:style-name="Emphasis"><text:span text:style-name="T1">"El espíritu de Jehová... está sobre mí, porque me ungió Jehová. Me ha enviado a predicar buenas nuevas..."</text:span></text:span><text:span text:style-name="T1"> (Parece que Isaías habla de sí mismo). </text:span></text:p>
            </text:list-item>
            <text:list-item>
              <text:p text:style-name="P28"><text:span text:style-name="Emphasis"><text:span text:style-name="T1">Cumplimiento (Lucas 4:17-21):</text:span></text:span><text:span text:style-name="T1"> Jesús lee esto en la sinagoga y dice: </text:span><text:span text:style-name="Emphasis"><text:span text:style-name="T1">"Hoy se ha cumplido esta escritura"</text:span></text:span><text:span text:style-name="T1">. Isaías era la parábola; la Realidad era Jesús. </text:span></text:p>
            </text:list-item>
          </text:list>
        </text:list-item>
      </text:list>
      <text:h text:style-name="P3" text:outline-level="3">3️⃣ Parábolas a través de BESTIAS (Animales)</text:h>
      <text:list text:style-name="L13">
        <text:list-item>
          <text:p text:style-name="P31"><text:span text:style-name="Strong_20_Emphasis"><text:span text:style-name="T1">Ejemplo 1: El Buey.</text:span></text:span></text:p>
          <text:list>
            <text:list-item>
              <text:p text:style-name="P31"><text:span text:style-name="Emphasis"><text:span text:style-name="T1">Ley (Deuteronomio 25:4):</text:span></text:span><text:span text:style-name="T1"> </text:span><text:span text:style-name="Emphasis"><text:span text:style-name="T1">"No pondrás bozal al buey cuando trillare"</text:span></text:span><text:span text:style-name="T1">. (Parece que a Dios le importan los animales). </text:span></text:p>
            </text:list-item>
            <text:list-item>
              <text:p text:style-name="P31"><text:span text:style-name="Emphasis"><text:span text:style-name="T1">Cumplimiento (1 Corintios 9:9-10):</text:span></text:span><text:span text:style-name="T1"> Pablo aclara que Dios dijo esto por nosotros. El "buey" que trilla representa a los </text:span><text:span text:style-name="Strong_20_Emphasis"><text:span text:style-name="T1">pastores y trabajadores</text:span></text:span><text:span text:style-name="T1"> de la palabra; no se les debe prohibir vivir de su obra. </text:span></text:p>
            </text:list-item>
          </text:list>
        </text:list-item>
        <text:list-item>
          <text:p text:style-name="P31"><text:span text:style-name="Strong_20_Emphasis"><text:span text:style-name="T1">Ejemplo 2: Los Zorros.</text:span></text:span></text:p>
          <text:list>
            <text:list-item>
              <text:p text:style-name="P30"><text:span text:style-name="Emphasis"><text:span text:style-name="T1">Profecía (Cantares 2:15 / Ezequiel 13:4):</text:span></text:span><text:span text:style-name="T1"> Los "zorritos" que destruyen las viñas representan a los </text:span><text:span text:style-name="Strong_20_Emphasis"><text:span text:style-name="T1">falsos profetas</text:span></text:span><text:span text:style-name="T1">, que son astutos y dañan el reino. </text:span></text:p>
            </text:list-item>
          </text:list>
        </text:list-item>
      </text:list>
      <text:h text:style-name="P3" text:outline-level="3">4️⃣ Parábolas a través de ACONTECIMIENTOS HISTÓRICOS</text:h>
      <text:p text:style-name="P40">Eventos reales que esconden un misterio espiritual.</text:p>
      <text:list text:style-name="L14">
        <text:list-item>
          <text:p text:style-name="P33"><text:span text:style-name="Strong_20_Emphasis"><text:span text:style-name="T1">Ejemplo:</text:span></text:span><text:span text:style-name="T1"> Abraham, Sara y Agar (Génesis 16-17).</text:span></text:p>
          <text:list>
            <text:list-item>
              <text:p text:style-name="P33"><text:span text:style-name="Emphasis"><text:span text:style-name="T1">Historia:</text:span></text:span><text:span text:style-name="T1"> Abraham tuvo dos hijos, uno de la esclava (Agar) y uno de la libre (Sara). </text:span></text:p>
            </text:list-item>
            <text:list-item>
              <text:p text:style-name="P32"><text:span text:style-name="Emphasis"><text:span text:style-name="T1">Cumplimiento / Misterio (Gálatas 4:21-24):</text:span></text:span><text:span text:style-name="T1"> Pablo dice que esto es una </text:span><text:span text:style-name="Strong_20_Emphasis"><text:span text:style-name="T1">alegoría</text:span></text:span><text:span text:style-name="T1">. Las dos mujeres representan </text:span><text:span text:style-name="Strong_20_Emphasis"><text:span text:style-name="T1">los dos pactos</text:span></text:span><text:span text:style-name="T1">: el del Monte Sinaí (esclavitud/ley) y el de la promesa (libertad/gracia). </text:span></text:p>
            </text:list-item>
          </text:list>
        </text:list-item>
      </text:list>
      <text:h text:style-name="P3" text:outline-level="3">5️⃣ Parábolas a través de NOMBRES DE LUGARES Y PAÍSES</text:h>
      <text:list text:style-name="L15">
        <text:list-item>
          <text:p text:style-name="P35"><text:span text:style-name="Strong_20_Emphasis"><text:span text:style-name="T1">Ejemplo:</text:span></text:span><text:span text:style-name="T1"> Sodoma, Egipto y Gólgota.</text:span></text:p>
          <text:list>
            <text:list-item>
              <text:p text:style-name="P35"><text:soft-page-break/><text:span text:style-name="Emphasis"><text:span text:style-name="T1">Profecía (Apocalipsis 11:8):</text:span></text:span><text:span text:style-name="T1"> </text:span><text:span text:style-name="Emphasis"><text:span text:style-name="T1">"Y sus cadáveres estarán en la plaza de la grande ciudad que en sentido espiritual se llama Sodoma y Egipto, donde también nuestro Señor fue crucificado".</text:span></text:span><text:span text:style-name="T1"> </text:span></text:p>
            </text:list-item>
            <text:list-item>
              <text:p text:style-name="P34"><text:span text:style-name="Emphasis"><text:span text:style-name="T1">Significado:</text:span></text:span><text:span text:style-name="T1"> No se refiere a las ciudades geográficas literales, sino a un lugar espiritual que tiene las </text:span><text:span text:style-name="Emphasis"><text:span text:style-name="T1">características</text:span></text:span><text:span text:style-name="T1"> de pecado (Sodoma), esclavitud (Egipto) y donde se crucifica la verdad (Gólgota). </text:span></text:p>
            </text:list-item>
          </text:list>
        </text:list-item>
      </text:list>
      <text:p text:style-name="P4"/>
      <text:h text:style-name="P2" text:outline-level="2">🎯 10. Conclusión de la Lección</text:h>
      <text:list text:style-name="L16">
        <text:list-item>
          <text:p text:style-name="P37"><text:span text:style-name="Strong_20_Emphasis"><text:span text:style-name="T1">Los misterios del reino están escritos en parábolas.</text:span></text:span><text:span text:style-name="T1"> Si no los entiendes, no serás perdonado de tus pecados ni serás salvo. </text:span></text:p>
        </text:list-item>
        <text:list-item>
          <text:p text:style-name="P37"><text:span text:style-name="Strong_20_Emphasis"><text:span text:style-name="T1">El verdadero significado se conoce al ver la Realidad.</text:span></text:span><text:span text:style-name="T1"> Cuando la profecía se cumple, Dios revela el significado exacto. </text:span></text:p>
        </text:list-item>
        <text:list-item>
          <text:p text:style-name="P36"><text:span text:style-name="Strong_20_Emphasis"><text:span text:style-name="T1">Nuestro deber hoy:</text:span></text:span><text:span text:style-name="T1"> Entender el verdadero significado de las parábolas de los libros proféticos y tener fe en las profecías y su cumplimiento (la realidad). </text:span></text:p>
        </text:list-item>
      </text:list>
      <text:p text:style-name="Text_20_body"><text:span text:style-name="Strong_20_Emphasis"><text:span text:style-name="T1">📢 Anuncio para la Próxima Lección:</text:span></text:span><text:span text:style-name="T1"> Empezaremos a estudiar el </text:span><text:span text:style-name="Strong_20_Emphasis"><text:span text:style-name="T1">Lenguaje Figurativo Básico</text:span></text:span><text:span text:style-name="T1">: El significado espiritual de </text:span><text:span text:style-name="Emphasis"><text:span text:style-name="T1">Semilla, Campo, Árbol y Ave</text:span></text:span><text:span text:style-name="T1">. Jesús dijo que esta es la parábola más básica; si no entendemos esta, no podremos entender el resto. ¡Es tiempo de crear cimientos fuertes!</text:span></text:p>
      <text:p text:style-name="P4"/>
      <text:h text:style-name="P2" text:outline-level="2">🔄 11.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7">
        <text:list-item>
          <text:p text:style-name="P39"><text:span text:style-name="Strong_20_Emphasis"><text:span text:style-name="T1">¿Qué es una parábola?</text:span></text:span><text:span text:style-name="T1"> Usar frases como "es como..." para comparar algo físico con algo espiritual. </text:span></text:p>
        </text:list-item>
        <text:list-item>
          <text:p text:style-name="P39"><text:span text:style-name="Strong_20_Emphasis"><text:span text:style-name="T1">¿Cuál es el propósito de las parábolas en Historia/Moral?</text:span></text:span><text:span text:style-name="T1"> Ayudar al entendimiento. </text:span></text:p>
        </text:list-item>
        <text:list-item>
          <text:p text:style-name="P39"><text:span text:style-name="Strong_20_Emphasis"><text:span text:style-name="T1">¿Cuál es el propósito de las parábolas en Profecía?</text:span></text:span><text:span text:style-name="T1"> Esconder los secretos del reino de Satanás/enemigos. </text:span></text:p>
        </text:list-item>
        <text:list-item>
          <text:p text:style-name="P39"><text:span text:style-name="Strong_20_Emphasis"><text:span text:style-name="T1">¿Por qué Jesús habló en parábolas?</text:span></text:span><text:span text:style-name="T1"> 1) Para esconder los secretos del enemigo. 2) Porque estaba profetizado (Salmos 78). </text:span></text:p>
        </text:list-item>
        <text:list-item>
          <text:p text:style-name="P39"><text:span text:style-name="Strong_20_Emphasis"><text:span text:style-name="T1">¿Cuál es la diferencia entre los que saben y los que no?</text:span></text:span><text:span text:style-name="T1"> Los que saben hacen la voluntad de Dios, son perdonados y salvos. Los que no, perecen. </text:span></text:p>
        </text:list-item>
        <text:list-item>
          <text:p text:style-name="P39"><text:soft-page-break/><text:span text:style-name="Strong_20_Emphasis"><text:span text:style-name="T1">¿Cuándo se pueden entender?</text:span></text:span><text:span text:style-name="T1"> En el último tiempo, cuando la profecía se cumple. </text:span></text:p>
        </text:list-item>
        <text:list-item>
          <text:p text:style-name="P38"><text:span text:style-name="Strong_20_Emphasis"><text:span text:style-name="T1">¿Cuáles son los 5 tipos de parábolas?</text:span></text:span><text:span text:style-name="T1"> Objetos, Profetas, Animales/Bestias, Acontecimientos Históricos, Lugares/Países. </text:span></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span></text:p>
      <text:p text:style-name="P40">¡Gracias a todos! Cuídense y que Dios los bendiga. Nos vemos en la próxima lección donde veremos la semilla, el campo, el árbol y el ave. ¡Adiós!</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41:30.326601374</meta:creation-date>
    <dc:date>2026-07-02T08:57:57.630164928</dc:date>
    <meta:editing-duration>PT20M17S</meta:editing-duration>
    <meta:editing-cycles>2</meta:editing-cycles>
    <meta:generator>LibreOffice/24.2.7.2$Linux_X86_64 LibreOffice_project/420$Build-2</meta:generator>
    <meta:document-statistic meta:table-count="0" meta:image-count="0" meta:object-count="0" meta:page-count="9" meta:paragraph-count="136" meta:word-count="2349" meta:character-count="13876" meta:non-whitespace-character-count="11672"/>
  </office:meta>
</office:document-meta>
</file>