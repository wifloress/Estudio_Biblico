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ilanka" svg:font-family="Chilanka" style:font-pitch="variable"/>
    <style:font-face style:name="Karumbi" svg:font-family="Karumb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2">
      <style:text-properties style:font-name="Padauk Book"/>
    </style:style>
    <style:style style:name="P2" style:family="paragraph" style:parent-style-name="Heading_20_3">
      <style:text-properties style:font-name="Padauk Book"/>
    </style:style>
    <style:style style:name="P3" style:family="paragraph" style:parent-style-name="Horizontal_20_Line">
      <style:text-properties style:font-name="Padauk Book"/>
    </style:style>
    <style:style style:name="P4" style:family="paragraph" style:parent-style-name="Text_20_body">
      <style:text-properties style:font-name="Padauk Book"/>
    </style:style>
    <style:style style:name="P5" style:family="paragraph" style:parent-style-name="Horizontal_20_Line">
      <style:text-properties style:font-name="Padauk Book"/>
    </style:style>
    <style:style style:name="P6" style:family="paragraph" style:parent-style-name="Heading_20_1">
      <style:text-properties style:font-name="Padauk Book"/>
    </style:style>
    <style:style style:name="P7" style:family="paragraph" style:parent-style-name="Heading_20_2">
      <style:text-properties style:font-name="Padauk Book"/>
    </style:style>
    <style:style style:name="P8" style:family="paragraph" style:parent-style-name="Heading_20_3">
      <style:text-properties style:font-name="Padauk Book"/>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list-style-name="L14"/>
    <style:style style:name="P33" style:family="paragraph" style:parent-style-name="Text_20_body" style:list-style-name="L14">
      <style:paragraph-properties fo:margin-top="0cm" fo:margin-bottom="0cm" style:contextual-spacing="false"/>
    </style:style>
    <style:style style:name="P34" style:family="paragraph" style:parent-style-name="Text_20_body" style:list-style-name="L15"/>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style style:name="P37" style:family="paragraph" style:parent-style-name="Text_20_body" style:list-style-name="L16">
      <style:paragraph-properties fo:margin-top="0cm" fo:margin-bottom="0cm" style:contextual-spacing="false"/>
    </style:style>
    <style:style style:name="P38" style:family="paragraph" style:parent-style-name="Text_20_body" style:list-style-name="L17"/>
    <style:style style:name="P39" style:family="paragraph" style:parent-style-name="Text_20_body" style:list-style-name="L17">
      <style:paragraph-properties fo:margin-top="0cm" fo:margin-bottom="0cm" style:contextual-spacing="false"/>
    </style:style>
    <style:style style:name="P40" style:family="paragraph" style:parent-style-name="Text_20_body" style:list-style-name="L18"/>
    <style:style style:name="P41" style:family="paragraph" style:parent-style-name="Text_20_body" style:list-style-name="L18">
      <style:paragraph-properties fo:margin-top="0cm" fo:margin-bottom="0cm" style:contextual-spacing="false"/>
    </style:style>
    <style:style style:name="P42" style:family="paragraph" style:parent-style-name="Text_20_body" style:list-style-name="L19"/>
    <style:style style:name="P43" style:family="paragraph" style:parent-style-name="Text_20_body" style:list-style-name="L19">
      <style:paragraph-properties fo:margin-top="0cm" fo:margin-bottom="0cm" style:contextual-spacing="false"/>
    </style:style>
    <style:style style:name="P44" style:family="paragraph" style:parent-style-name="Text_20_body" style:list-style-name="L20"/>
    <style:style style:name="P45" style:family="paragraph" style:parent-style-name="Text_20_body" style:list-style-name="L20">
      <style:paragraph-properties fo:margin-top="0cm" fo:margin-bottom="0cm" style:contextual-spacing="false"/>
    </style:style>
    <style:style style:name="P46" style:family="paragraph" style:parent-style-name="Text_20_body" style:list-style-name="L21"/>
    <style:style style:name="P47" style:family="paragraph" style:parent-style-name="Text_20_body" style:list-style-name="L21">
      <style:paragraph-properties fo:margin-top="0cm" fo:margin-bottom="0cm" style:contextual-spacing="false"/>
    </style:style>
    <style:style style:name="P48" style:family="paragraph" style:parent-style-name="Text_20_body" style:list-style-name="L22"/>
    <style:style style:name="P49" style:family="paragraph" style:parent-style-name="Text_20_body" style:list-style-name="L22">
      <style:paragraph-properties fo:margin-top="0cm" fo:margin-bottom="0cm" style:contextual-spacing="false"/>
    </style:style>
    <style:style style:name="P50" style:family="paragraph" style:parent-style-name="Text_20_body" style:list-style-name="L23"/>
    <style:style style:name="P51" style:family="paragraph" style:parent-style-name="Text_20_body" style:list-style-name="L23">
      <style:paragraph-properties fo:margin-top="0cm" fo:margin-bottom="0cm" style:contextual-spacing="false"/>
    </style:style>
    <style:style style:name="P52" style:family="paragraph" style:parent-style-name="Text_20_body" style:list-style-name="L24"/>
    <style:style style:name="P53" style:family="paragraph" style:parent-style-name="Text_20_body" style:list-style-name="L24">
      <style:paragraph-properties fo:margin-top="0cm" fo:margin-bottom="0cm" style:contextual-spacing="false"/>
    </style:style>
    <style:style style:name="P54" style:family="paragraph" style:parent-style-name="Text_20_body">
      <style:text-properties style:font-name="Padauk Book"/>
    </style:style>
    <style:style style:name="T1" style:family="text">
      <style:text-properties style:font-name="Padauk Book"/>
    </style:style>
    <style:style style:name="T2"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CUADERNO DE ESTUDIO: LECCIÓN 8 (PARTE 2)</text:h>
      <text:h text:style-name="P1" text:outline-level="2">Luz, Candelero, Ciegos, Sordos y Vestido de Boda en Lenguaje Figurativo</text:h>
      <text:p text:style-name="P3"/>
      <text:h text:style-name="P1" text:outline-level="2">🔄 1. Repaso Inicial: Luz, Tinieblas y el Candelero</text:h>
      <text:p text:style-name="Text_20_body"><text:span text:style-name="Emphasis"><text:span text:style-name="T1">(A cargo del Evangelista Christian Howard)</text:span></text:span></text:p>
      <text:p text:style-name="P4">Antes de continuar con la segunda parte de la lección, repasamos los conceptos fundamentales que vimos en la Parte 1 sobre la luz y el candelero:</text:p>
      <text:p text:style-name="Text_20_body"><text:span text:style-name="Strong_20_Emphasis"><text:span text:style-name="T1">Preguntas de Reflexión y Respuestas:</text:span></text:span></text:p>
      <text:list text:style-name="L13">
        <text:list-item>
          <text:p text:style-name="P31"><text:span text:style-name="Strong_20_Emphasis"><text:span text:style-name="T1">¿Qué es la luz?</text:span></text:span><text:span text:style-name="T1"> </text:span></text:p>
          <text:list>
            <text:list-item>
              <text:p text:style-name="P31"><text:span text:style-name="Emphasis"><text:span text:style-name="T1">Respuesta:</text:span></text:span><text:span text:style-name="T1"> Es la </text:span><text:span text:style-name="Strong_20_Emphasis"><text:span text:style-name="T1">palabra de vida</text:span></text:span><text:span text:style-name="T1">, pero también es la </text:span><text:span text:style-name="Strong_20_Emphasis"><text:span text:style-name="T1">persona que tiene la palabra de vida</text:span></text:span><text:span text:style-name="T1"> (como Jesús y los discípulos). </text:span></text:p>
            </text:list-item>
          </text:list>
        </text:list-item>
        <text:list-item>
          <text:p text:style-name="P31"><text:span text:style-name="Strong_20_Emphasis"><text:span text:style-name="T1">¿Qué son las tinieblas o la oscuridad?</text:span></text:span><text:span text:style-name="T1"> </text:span></text:p>
          <text:list>
            <text:list-item>
              <text:p text:style-name="P31"><text:span text:style-name="Emphasis"><text:span text:style-name="T1">Respuesta:</text:span></text:span><text:span text:style-name="T1"> Es la </text:span><text:span text:style-name="Strong_20_Emphasis"><text:span text:style-name="T1">ausencia de la palabra</text:span></text:span><text:span text:style-name="T1"> o la </text:span><text:span text:style-name="Strong_20_Emphasis"><text:span text:style-name="T1">ignorancia</text:span></text:span><text:span text:style-name="T1"> de la palabra. </text:span></text:p>
            </text:list-item>
          </text:list>
        </text:list-item>
        <text:list-item>
          <text:p text:style-name="P31"><text:span text:style-name="Strong_20_Emphasis"><text:span text:style-name="T1">¿Qué sucede cuando viene la luz?</text:span></text:span><text:span text:style-name="T1"> </text:span></text:p>
          <text:list>
            <text:list-item>
              <text:p text:style-name="P31"><text:span text:style-name="Emphasis"><text:span text:style-name="T1">Respuesta:</text:span></text:span><text:span text:style-name="T1"> Hay una </text:span><text:span text:style-name="Strong_20_Emphasis"><text:span text:style-name="T1">separación</text:span></text:span><text:span text:style-name="T1">. La luz se convierte en el </text:span><text:span text:style-name="Strong_20_Emphasis"><text:span text:style-name="T1">estándar</text:span></text:span><text:span text:style-name="T1"> que distingue las tinieblas de la luz. </text:span></text:p>
            </text:list-item>
          </text:list>
        </text:list-item>
        <text:list-item>
          <text:p text:style-name="P31"><text:span text:style-name="Strong_20_Emphasis"><text:span text:style-name="T1">¿Qué significa la "exposición" de la palabra?</text:span></text:span><text:span text:style-name="T1"> </text:span></text:p>
          <text:list>
            <text:list-item>
              <text:p text:style-name="P31"><text:span text:style-name="Emphasis"><text:span text:style-name="T1">Respuesta:</text:span></text:span><text:span text:style-name="T1"> Significa que la palabra está </text:span><text:span text:style-name="Strong_20_Emphasis"><text:span text:style-name="T1">abierta, revelada y se puede entender</text:span></text:span><text:span text:style-name="T1"> (el cumplimiento de las profecías). </text:span></text:p>
            </text:list-item>
          </text:list>
        </text:list-item>
        <text:list-item>
          <text:p text:style-name="P31"><text:span text:style-name="Strong_20_Emphasis"><text:span text:style-name="T1">¿Qué es el candelero o la lámpara en figurativo?</text:span></text:span><text:span text:style-name="T1"> </text:span></text:p>
          <text:list>
            <text:list-item>
              <text:p text:style-name="P30"><text:span text:style-name="Emphasis"><text:span text:style-name="T1">Respuesta:</text:span></text:span><text:span text:style-name="T1"> Es el </text:span><text:span text:style-name="Strong_20_Emphasis"><text:span text:style-name="T1">espíritu y el trabajador</text:span></text:span><text:span text:style-name="T1"> (la persona con quien el espíritu trabaja).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gracias por darnos esta luz. Gracias por abrir nuestros ojos y guiarnos a ti, para aprender más y más de ti. Dios, estamos aprendiendo muchísimo y estamos muy agradecidos de que nos estés revelando todo esto para entender tu voluntad. Dios, por favor, manda a tus Espíritus Santos a </text:span></text:span><text:soft-page-break/><text:span text:style-name="Emphasis"><text:span text:style-name="T1">ayudarnos a abrir nuestros corazones más y más para sacar esos sedimentos que tenemos, esos pensamientos que creíamos que venían de ti, pero que no son de ti. Ya lo estamos viendo más y más a medida que revisamos y escudriñamos la Biblia. Y Dios, oramos por los estudiantes que no han podido venir. Sabemos que tú estás con ellos, tratando de guiarlos de nuevo a venir a escuchar tu palabra. Te oramos todo esto en el nombre de tu hijo Jesucristo. Amén."</text:span></text:span></text:p>
      <text:p text:style-name="P3"/>
      <text:h text:style-name="P1" text:outline-level="2">🕯️ 2. El Candelero en la Segunda Venida</text:h>
      <text:p text:style-name="Text_20_body"><text:span text:style-name="Emphasis"><text:span text:style-name="T1">(A cargo del Instructor Sibiani)</text:span></text:span></text:p>
      <text:h text:style-name="P2" text:outline-level="3">🌟 Los Siete Candeleros de Oro</text:h>
      <text:p text:style-name="Text_20_body"><text:span text:style-name="T1">Así como en la Primera Venida Juan el Bautista fue como una antorcha o candelero que preparó el camino para Jesús (la gran luz), en la </text:span><text:span text:style-name="Strong_20_Emphasis"><text:span text:style-name="T1">Segunda Venida</text:span></text:span><text:span text:style-name="T1"> también aparece esta figura. </text:span></text:p>
      <text:list text:style-name="L14">
        <text:list-item>
          <text:p text:style-name="P33"><text:span text:style-name="Strong_20_Emphasis"><text:span text:style-name="T1">Apocalipsis 1:20</text:span></text:span><text:span text:style-name="T1"> nos habla del misterio de las </text:span><text:span text:style-name="Strong_20_Emphasis"><text:span text:style-name="T1">siete estrellas y los siete candeleros de oro</text:span></text:span><text:span text:style-name="T1">. </text:span></text:p>
        </text:list-item>
        <text:list-item>
          <text:p text:style-name="P33"><text:span text:style-name="Strong_20_Emphasis"><text:span text:style-name="T1">Zacarías 4</text:span></text:span><text:span text:style-name="T1"> y </text:span><text:span text:style-name="Strong_20_Emphasis"><text:span text:style-name="T1">Apocalipsis 4</text:span></text:span><text:span text:style-name="T1"> mencionan que estas siete lámparas son los </text:span><text:span text:style-name="Strong_20_Emphasis"><text:span text:style-name="T1">siete ojos de Dios</text:span></text:span><text:span text:style-name="T1"> y los </text:span><text:span text:style-name="Strong_20_Emphasis"><text:span text:style-name="T1">siete espíritus de Dios</text:span></text:span><text:span text:style-name="T1"> enviados por toda la tierra. </text:span></text:p>
        </text:list-item>
        <text:list-item>
          <text:p text:style-name="P32"><text:span text:style-name="Strong_20_Emphasis"><text:span text:style-name="T1">Significado:</text:span></text:span><text:span text:style-name="T1"> Los espíritus no actúan por su propia cuenta; necesitan la carne (personas). Por lo tanto, los candeleros representan a los </text:span><text:span text:style-name="Strong_20_Emphasis"><text:span text:style-name="T1">mensajeros, pastores o trabajadores</text:span></text:span><text:span text:style-name="T1"> con quienes el espíritu de Dios está trabajando para preparar el camino para la luz de la Segunda Venida. </text:span></text:p>
        </text:list-item>
      </text:list>
      <text:h text:style-name="P2" text:outline-level="3">🌑 El Estado Espiritual del Mundo</text:h>
      <text:p text:style-name="Text_20_body"><text:span text:style-name="T1">Cuando aparecen estos siete candeleros de oro, es la evidencia de que el mundo religioso está en </text:span><text:span text:style-name="Strong_20_Emphasis"><text:span text:style-name="T1">tinieblas</text:span></text:span><text:span text:style-name="T1">. Al igual que en la Primera Venida, donde el judaísmo estaba en oscuridad espiritual hasta que llegó Jesús, hoy en día la aparición de la luz revelada (el cumplimiento de Apocalipsis) nos indica que es tiempo de salir de las tinieblas y correr hacia la luz.</text:span></text:p>
      <text:p text:style-name="P3"/>
      <text:h text:style-name="P1" text:outline-level="2">👁️👂 3. Ciegos y Sordos en Figurativo</text:h>
      <text:h text:style-name="P2" text:outline-level="3">📜 La Ceguera y Sordera Espiritual</text:h>
      <text:p text:style-name="Text_20_body"><text:span text:style-name="Strong_20_Emphasis"><text:span text:style-name="T1">Apocalipsis 3:17-18</text:span></text:span></text:p>
      <text:p text:style-name="Quotations"><text:soft-page-break/><text:span text:style-name="Emphasis"><text:span text:style-name="T1">"Porque tú dices: 'Yo soy rico y me he enriquecido, y de ninguna cosa tengo necesidad'. Y no sabes que tú eres un desventurado, miserable, pobre, ciego y desnudo. Por tanto, yo te aconsejo que de mí compres oro refinado en fuego... y unge tus ojos con colirio para que veas".</text:span></text:span></text:p>
      <text:p text:style-name="Text_20_body"><text:span text:style-name="T1">Jesús le habla a los creyentes (a las iglesias). Hay personas que se creen ricas espiritualmente, pero en realidad están </text:span><text:span text:style-name="Strong_20_Emphasis"><text:span text:style-name="T1">ciegas y desnudas</text:span></text:span><text:span text:style-name="T1"> ante los ojos de Dios. </text:span></text:p>
      <text:list text:style-name="L15">
        <text:list-item>
          <text:p text:style-name="P35"><text:span text:style-name="Strong_20_Emphasis"><text:span text:style-name="T1">¿Qué es ser ciego o sordo espiritualmente?</text:span></text:span><text:span text:style-name="T1"> No es una condición física. Son aquellos que </text:span><text:span text:style-name="Strong_20_Emphasis"><text:span text:style-name="T1">tienen ojos y oídos, ven y oyen la palabra, pero no la entienden</text:span></text:span><text:span text:style-name="T1">. </text:span></text:p>
        </text:list-item>
        <text:list-item>
          <text:p text:style-name="P34"><text:span text:style-name="Strong_20_Emphasis"><text:span text:style-name="T1">Isaías 43:8</text:span></text:span><text:span text:style-name="T1"> y </text:span><text:span text:style-name="Strong_20_Emphasis"><text:span text:style-name="T1">Isaías 42:18-20</text:span></text:span><text:span text:style-name="T1">: Dios se refiere a su propio pueblo, a sus siervos y mensajeros (pastores), como ciegos y sordos. Tienen la Biblia, la leen, pero no comprenden su verdadero significado. </text:span></text:p>
        </text:list-item>
      </text:list>
      <text:h text:style-name="P2" text:outline-level="3">📕 El Libro Sellado y las Parábolas</text:h>
      <text:p text:style-name="Text_20_body"><text:span text:style-name="Strong_20_Emphasis"><text:span text:style-name="T1">Isaías 29:9-13</text:span></text:span></text:p>
      <text:p text:style-name="Quotations"><text:span text:style-name="Emphasis"><text:span text:style-name="T1">"Porque Jehová derramó sobre vosotros espíritu de sueño, y cerró los ojos de vuestros profetas, y puso velo sobre la cabeza de vuestros videntes... Y os será toda visión como palabra de libro sellado..."</text:span></text:span></text:p>
      <text:list text:style-name="L16">
        <text:list-item>
          <text:p text:style-name="P37"><text:span text:style-name="Strong_20_Emphasis"><text:span text:style-name="T1">¿Por qué Dios cerró los ojos de los profetas?</text:span></text:span><text:span text:style-name="T1"> Porque la palabra de Dios fue escrita en </text:span><text:span text:style-name="Strong_20_Emphasis"><text:span text:style-name="T1">parábolas y lenguaje figurativo</text:span></text:span><text:span text:style-name="T1">. Para los que no tienen revelación, la Biblia es como un "libro sellado". </text:span></text:p>
        </text:list-item>
        <text:list-item>
          <text:p text:style-name="P36"><text:span text:style-name="Strong_20_Emphasis"><text:span text:style-name="T1">El peligro de los líderes ciegos:</text:span></text:span><text:span text:style-name="T1"> Los pastores y líderes religiosos leían este libro sellado, pero en lugar de admitir que no entendían, enseñaban como si supieran. Llenaban sus enseñanzas de </text:span><text:span text:style-name="Strong_20_Emphasis"><text:span text:style-name="T1">mandamientos de hombres</text:span></text:span><text:span text:style-name="T1"> y tradiciones, alejando su corazón de Dios. </text:span></text:p>
        </text:list-item>
      </text:list>
      <text:h text:style-name="P2" text:outline-level="3">🕳️ Ciegos Guías de Ciegos</text:h>
      <text:p text:style-name="Text_20_body"><text:span text:style-name="Strong_20_Emphasis"><text:span text:style-name="T1">Mateo 15:14</text:span></text:span></text:p>
      <text:p text:style-name="Quotations"><text:span text:style-name="Emphasis"><text:span text:style-name="T1">"Dejadlos; son ciegos guías de ciegos. Y si el ciego guiare al ciego, ambos caerán en el hoyo".</text:span></text:span></text:p>
      <text:list text:style-name="L17">
        <text:list-item>
          <text:p text:style-name="P39"><text:span text:style-name="Strong_20_Emphasis"><text:span text:style-name="T1">El primer ciego:</text:span></text:span><text:span text:style-name="T1"> Los líderes o pastores que no entienden la palabra revelada. </text:span></text:p>
        </text:list-item>
        <text:list-item>
          <text:p text:style-name="P39"><text:span text:style-name="Strong_20_Emphasis"><text:span text:style-name="T1">El segundo ciego:</text:span></text:span><text:span text:style-name="T1"> Los miembros de la congregación que siguen ciegamente a estos líderes. </text:span></text:p>
        </text:list-item>
        <text:list-item>
          <text:p text:style-name="P38"><text:soft-page-break/><text:span text:style-name="Strong_20_Emphasis"><text:span text:style-name="T1">El resultado:</text:span></text:span><text:span text:style-name="T1"> Ambos caen en el abismo (infierno espiritual), un lugar donde no hay luz. </text:span></text:p>
        </text:list-item>
      </text:list>
      <text:p text:style-name="Text_20_body"><text:span text:style-name="Strong_20_Emphasis"><text:span text:style-name="T1">Juan 9:39-41</text:span></text:span></text:p>
      <text:p text:style-name="Quotations"><text:span text:style-name="Emphasis"><text:span text:style-name="T1">"Para juicio he venido yo a este mundo; para que los que no ven, vean, y los que ven, sean cegados... Si fuerais ciegos, no tendríais pecado; mas ahora, porque decís: Vemos, vuestro pecado permanece".</text:span></text:span></text:p>
      <text:list text:style-name="L18">
        <text:list-item>
          <text:p text:style-name="P41"><text:span text:style-name="Strong_20_Emphasis"><text:span text:style-name="T1">Los que "no ven" (humildes):</text:span></text:span><text:span text:style-name="T1"> Los que reconocen que no entienden las parábolas, se acercan a Jesús (la luz) y Él les abre los ojos espirituales. Estos son salvos. </text:span></text:p>
        </text:list-item>
        <text:list-item>
          <text:p text:style-name="P40"><text:span text:style-name="Strong_20_Emphasis"><text:span text:style-name="T1">Los que "ven" (arrogantes):</text:span></text:span><text:span text:style-name="T1"> Los fariseos que decían "nosotros ya lo sabemos todo, tenemos la ley". Al negarse a reconocer su ceguera, rechazan la verdad y su pecado permanece. </text:span><text:span text:style-name="Strong_20_Emphasis"><text:span text:style-name="T1">No hay vergüenza en aceptar que no entendemos</text:span></text:span><text:span text:style-name="T1">; al contrario, esa humildad es la que nos permite recibir la luz. </text:span></text:p>
        </text:list-item>
      </text:list>
      <text:p text:style-name="P3"/>
      <text:h text:style-name="P1" text:outline-level="2">👗 4. El Vestido de Boda y las Ropas Espirituales</text:h>
      <text:h text:style-name="P2" text:outline-level="3">🩸 Lavar las Ropas en la Sangre del Cordero</text:h>
      <text:p text:style-name="Text_20_body"><text:span text:style-name="Strong_20_Emphasis"><text:span text:style-name="T1">Apocalipsis 7:14</text:span></text:span></text:p>
      <text:p text:style-name="Quotations"><text:span text:style-name="Emphasis"><text:span text:style-name="T1">"Estos son los que han salido de la gran tribulación y han lavado sus ropas y las han emblanquecido en la sangre del Cordero".</text:span></text:span></text:p>
      <text:p text:style-name="Text_20_body"><text:span text:style-name="Strong_20_Emphasis"><text:span text:style-name="T1">Apocalipsis 22:14</text:span></text:span></text:p>
      <text:p text:style-name="Quotations"><text:span text:style-name="Emphasis"><text:span text:style-name="T1">"Bienaventurados los que lavan sus ropas, para tener derecho al árbol de la vida y para entrar por las puertas en la ciudad".</text:span></text:span></text:p>
      <text:list text:style-name="L19">
        <text:list-item>
          <text:p text:style-name="P43"><text:span text:style-name="Strong_20_Emphasis"><text:span text:style-name="T1">¿Qué significa lavar las ropas?</text:span></text:span><text:span text:style-name="T1"> No es un lavado físico con agua y jabón. Espiritualmente, significa </text:span><text:span text:style-name="Strong_20_Emphasis"><text:span text:style-name="T1">limpiar nuestro corazón, nuestras acciones y nuestras doctrinas</text:span></text:span><text:span text:style-name="T1"> mediante la palabra de Dios (la sangre del Cordero). </text:span></text:p>
        </text:list-item>
        <text:list-item>
          <text:p text:style-name="P42"><text:span text:style-name="Strong_20_Emphasis"><text:span text:style-name="T1">El requisito para el cielo:</text:span></text:span><text:span text:style-name="T1"> Para entrar por las puertas de la ciudad santa y tener derecho al árbol de la vida, es obligatorio lavar nuestras vestimentas espirituales. </text:span></text:p>
        </text:list-item>
      </text:list>
      <text:h text:style-name="P2" text:outline-level="3">👔 ¿Qué Representa la Ropa?</text:h>
      <text:p text:style-name="P4">La ropa en figurativo representa tres cosas íntimamente ligadas:</text:p>
      <text:list text:style-name="L20">
        <text:list-item>
          <text:p text:style-name="P45"><text:span text:style-name="Strong_20_Emphasis"><text:span text:style-name="T1">El Corazón:</text:span></text:span><text:span text:style-name="T1"> Lo que realmente somos por dentro. </text:span></text:p>
        </text:list-item>
        <text:list-item>
          <text:p text:style-name="P45"><text:soft-page-break/><text:span text:style-name="Strong_20_Emphasis"><text:span text:style-name="T1">Las Acciones:</text:span></text:span><text:span text:style-name="T1"> Lo que sale de nuestro corazón y hacemos en la vida diaria. </text:span></text:p>
        </text:list-item>
        <text:list-item>
          <text:p text:style-name="P44"><text:span text:style-name="Strong_20_Emphasis"><text:span text:style-name="T1">Las Doctrinas:</text:span></text:span><text:span text:style-name="T1"> La palabra o enseñanzas que hemos recibido y retenido. </text:span></text:p>
        </text:list-item>
      </text:list>
      <text:h text:style-name="P2" text:outline-level="3">🤵 La Ropa Teñida en Sangre (Jesús)</text:h>
      <text:p text:style-name="Text_20_body"><text:span text:style-name="Strong_20_Emphasis"><text:span text:style-name="T1">Apocalipsis 19:13</text:span></text:span></text:p>
      <text:p text:style-name="Quotations"><text:span text:style-name="Emphasis"><text:span text:style-name="T1">"Estaba vestido de una ropa teñida en sangre; y su nombre es: EL VERBO DE DIOS".</text:span></text:span></text:p>
      <text:p text:style-name="P4">Jesús es el ejemplo perfecto. Su ropa teñida en sangre representa que Él está completamente lleno de la palabra de Dios (el Verbo).</text:p>
      <text:h text:style-name="P2" text:outline-level="3">👿 La Ropa de la Ramera (Falsos Pastores)</text:h>
      <text:p text:style-name="Text_20_body"><text:span text:style-name="Strong_20_Emphasis"><text:span text:style-name="T1">Apocalipsis 17:4</text:span></text:span></text:p>
      <text:p text:style-name="Quotations"><text:span text:style-name="Emphasis"><text:span text:style-name="T1">"Y la mujer estaba vestida de púrpura y escarlata, y adornada de oro de piedras preciosas y de perlas, y tenía en la mano un cáliz de oro lleno de abominaciones..."</text:span></text:span></text:p>
      <text:list text:style-name="L21">
        <text:list-item>
          <text:p text:style-name="P47"><text:span text:style-name="Strong_20_Emphasis"><text:span text:style-name="T1">La mujer (Ramera):</text:span></text:span><text:span text:style-name="T1"> En las parábolas, una mujer representa a un pastor o entidad que engendra hijos espirituales. Esta es una </text:span><text:span text:style-name="Strong_20_Emphasis"><text:span text:style-name="T1">falsa pastora</text:span></text:span><text:span text:style-name="T1"> (organización religiosa falsa). </text:span></text:p>
        </text:list-item>
        <text:list-item>
          <text:p text:style-name="P46"><text:span text:style-name="Strong_20_Emphasis"><text:span text:style-name="T1">Su vestimenta:</text:span></text:span><text:span text:style-name="T1"> Está adornada con púrpura, escarlata, oro y piedras preciosas. Representa doctrinas humanas, tradiciones y enseñanzas de Satanás, mezcladas con abominaciones. No tiene el vestido de boda (la verdad pura). </text:span></text:p>
        </text:list-item>
      </text:list>
      <text:h text:style-name="P2" text:outline-level="3">💍 La Parábola de las Bodas</text:h>
      <text:p text:style-name="Text_20_body"><text:span text:style-name="Strong_20_Emphasis"><text:span text:style-name="T1">Mateo 22:1-14</text:span></text:span><text:span text:style-name="T1"> En esta parábola, un rey prepara una fiesta de bodas para su hijo. Todos son invitados, pero cuando el rey entra a ver a los huéspedes, encuentra a un hombre que </text:span><text:span text:style-name="Strong_20_Emphasis"><text:span text:style-name="T1">no estaba vestido con ropa de boda</text:span></text:span><text:span text:style-name="T1">. </text:span></text:p>
      <text:list text:style-name="L22">
        <text:list-item>
          <text:p text:style-name="P49"><text:span text:style-name="Strong_20_Emphasis"><text:span text:style-name="T1">La consecuencia:</text:span></text:span><text:span text:style-name="T1"> El rey ordena atarlo y echarlo en las tinieblas de afuera. </text:span></text:p>
        </text:list-item>
        <text:list-item>
          <text:p text:style-name="P48"><text:span text:style-name="Strong_20_Emphasis"><text:span text:style-name="T1">La lección:</text:span></text:span><text:span text:style-name="T1"> No basta con "entrar" a la iglesia o decir que somos creyentes. Si no nos preocupamos por lavar nuestras ropas (cambiar nuestro corazón y doctrinas a la verdad de Dios), seremos echados fuera del reino de los cielos. </text:span></text:p>
        </text:list-item>
      </text:list>
      <text:h text:style-name="P2" text:outline-level="3">✨ El Lino Fino (Acciones Justas)</text:h>
      <text:p text:style-name="Text_20_body"><text:span text:style-name="Strong_20_Emphasis"><text:span text:style-name="T1">Apocalipsis 19:8</text:span></text:span></text:p>
      <text:p text:style-name="Quotations"><text:soft-page-break/><text:span text:style-name="Emphasis"><text:span text:style-name="T1">"Y a ella se le ha concedido que se vista de lino fino, limpio y resplandeciente; porque el lino fino es las acciones justas de los santos".</text:span></text:span></text:p>
      <text:p text:style-name="Text_20_body"><text:span text:style-name="T1">El vestido de boda, el lino fino, representa las </text:span><text:span text:style-name="Strong_20_Emphasis"><text:span text:style-name="T1">acciones justas</text:span></text:span><text:span text:style-name="T1"> ante los ojos de Dios. Pero, ¿cómo podemos tener acciones justas si no sabemos qué es lo que Dios considera justo? Es imposible. Por eso, primero debemos </text:span><text:span text:style-name="Strong_20_Emphasis"><text:span text:style-name="T1">entender la palabra de Dios</text:span></text:span><text:span text:style-name="T1">, y naturalmente, nuestra vida se vestirá de esas acciones justas.</text:span></text:p>
      <text:p text:style-name="P3"/>
      <text:h text:style-name="P1" text:outline-level="2">🎯 5. Conclusiones de la Lección</text:h>
      <text:list text:style-name="L23">
        <text:list-item>
          <text:p text:style-name="P51"><text:span text:style-name="Strong_20_Emphasis"><text:span text:style-name="T1">La luz es la palabra de Dios</text:span></text:span><text:span text:style-name="T1"> que da vida. Quienes nacen de la palabra de Dios (la verdad) se convierten en </text:span><text:span text:style-name="Strong_20_Emphasis"><text:span text:style-name="T1">hijos de la luz</text:span></text:span><text:span text:style-name="T1">. Quienes nacen de las mentiras se convierten en hijos de las tinieblas. </text:span></text:p>
        </text:list-item>
        <text:list-item>
          <text:p text:style-name="P51"><text:span text:style-name="Strong_20_Emphasis"><text:span text:style-name="T1">Abrir los ojos y oídos:</text:span></text:span><text:span text:style-name="T1"> Por medio de la palabra revelada, los ojos de los espiritualmente ciegos son abiertos, y los oídos de los sordos son destapados. </text:span></text:p>
        </text:list-item>
        <text:list-item>
          <text:p text:style-name="P51"><text:span text:style-name="Strong_20_Emphasis"><text:span text:style-name="T1">Lavar las ropas:</text:span></text:span><text:span text:style-name="T1"> Debemos examinar nuestro corazón, desechar las doctrinas falsas (sedimentos) y lavarnos con la sangre del Cordero (la palabra). </text:span></text:p>
        </text:list-item>
        <text:list-item>
          <text:p text:style-name="P50"><text:span text:style-name="Strong_20_Emphasis"><text:span text:style-name="T1">Ponerse el vestido de boda:</text:span></text:span><text:span text:style-name="T1"> Al entender la voluntad de Dios, nos vestimos de acciones justas y lino fino, preparándonos para entrar por las puertas de la ciudad santa. </text:span></text:p>
        </text:list-item>
      </text:list>
      <text:p text:style-name="Text_20_body"><text:span text:style-name="Strong_20_Emphasis"><text:span text:style-name="T1">📢 Anuncio para la Próxima Lección:</text:span></text:span><text:span text:style-name="T1"> La próxima vez aprenderemos sobre el </text:span><text:span text:style-name="Strong_20_Emphasis"><text:span text:style-name="T1">Tesoro y el Hombre Rico</text:span></text:span><text:span text:style-name="T1"> en figurativo. ¿Qué significa ser rico ante los ojos de Dios? ¿Por qué Jesús dijo que es más fácil que un camello pase por el ojo de una aguja que un rico entre al cielo? ¡Prepárense para seguir descubriendo los secretos del reino!</text:span></text:p>
      <text:p text:style-name="P3"/>
      <text:h text:style-name="P1" text:outline-level="2">🔄 6. Repaso Final Interactivo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24">
        <text:list-item>
          <text:p text:style-name="P53"><text:span text:style-name="Strong_20_Emphasis"><text:span text:style-name="T1">¿Qué es el candelero?</text:span></text:span><text:span text:style-name="T1"> El espíritu y el trabajador (mensajeros que preparan el camino). </text:span></text:p>
        </text:list-item>
        <text:list-item>
          <text:p text:style-name="P53"><text:span text:style-name="Strong_20_Emphasis"><text:span text:style-name="T1">¿Qué son los sordos y ciegos espiritualmente?</text:span></text:span><text:span text:style-name="T1"> Los que oyen y ven la palabra, pero no la entienden. </text:span></text:p>
        </text:list-item>
        <text:list-item>
          <text:p text:style-name="P53"><text:soft-page-break/><text:span text:style-name="Strong_20_Emphasis"><text:span text:style-name="T1">¿Quiénes son los "ciegos guías de ciegos"?</text:span></text:span><text:span text:style-name="T1"> Los pastores que no entienden la verdad guiando a los miembros que los siguen ciegamente. </text:span></text:p>
        </text:list-item>
        <text:list-item>
          <text:p text:style-name="P53"><text:span text:style-name="Strong_20_Emphasis"><text:span text:style-name="T1">¿Qué es la ropa en figurativo?</text:span></text:span><text:span text:style-name="T1"> El corazón, las acciones y las doctrinas. </text:span></text:p>
        </text:list-item>
        <text:list-item>
          <text:p text:style-name="P52"><text:span text:style-name="Strong_20_Emphasis"><text:span text:style-name="T1">¿Qué es la ropa de boda o el lino fino?</text:span></text:span><text:span text:style-name="T1"> Las acciones justas ante los ojos de Dios, logradas al entender y practicar su palabra. </text:span></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span></text:p>
      <text:p text:style-name="P4">¡Gracias a todos! Cuídense, sigan estudiando y no olviden lavar nuestras ropas espirituales esta semana. ¡Nos vemos en la próxima lecció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ilanka" svg:font-family="Chilanka" style:font-pitch="variable"/>
    <style:font-face style:name="Karumbi" svg:font-family="Karumb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05T09:10:52.754556430</dc:date>
    <meta:editing-duration>PT1H43M24S</meta:editing-duration>
    <meta:editing-cycles>10</meta:editing-cycles>
    <meta:generator>LibreOffice/24.2.7.2$Linux_X86_64 LibreOffice_project/420$Build-2</meta:generator>
    <meta:document-statistic meta:table-count="0" meta:image-count="0" meta:object-count="0" meta:page-count="7" meta:paragraph-count="96" meta:word-count="1927" meta:character-count="10930" meta:non-whitespace-character-count="9096"/>
  </office:meta>
</office:document-meta>
</file>