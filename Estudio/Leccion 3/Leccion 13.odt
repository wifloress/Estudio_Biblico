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dauk Book" svg:font-family="'Padauk Book'" style:font-pitch="variable"/>
  </office:font-face-decls>
  <office:automatic-styles>
    <style:style style:name="P1" style:family="paragraph" style:parent-style-name="Heading_20_2">
      <style:text-properties style:font-name="Padauk Book"/>
    </style:style>
    <style:style style:name="P2" style:family="paragraph" style:parent-style-name="Heading_20_3">
      <style:text-properties style:font-name="Padauk Book"/>
    </style:style>
    <style:style style:name="P3" style:family="paragraph" style:parent-style-name="Horizontal_20_Line">
      <style:text-properties style:font-name="Padauk Book"/>
    </style:style>
    <style:style style:name="P4" style:family="paragraph" style:parent-style-name="Text_20_body">
      <style:text-properties style:font-name="Padauk Book"/>
    </style:style>
    <style:style style:name="P5" style:family="paragraph" style:parent-style-name="Heading_20_4">
      <style:text-properties style:font-name="Padauk Book"/>
    </style:style>
    <style:style style:name="P6" style:family="paragraph" style:parent-style-name="Horizontal_20_Line">
      <style:text-properties style:font-name="Padauk Book"/>
    </style:style>
    <style:style style:name="P7" style:family="paragraph" style:parent-style-name="Heading_20_1">
      <style:text-properties style:font-name="Padauk Book"/>
    </style:style>
    <style:style style:name="P8" style:family="paragraph" style:parent-style-name="Heading_20_2">
      <style:text-properties style:font-name="Padauk Book"/>
    </style:style>
    <style:style style:name="P9" style:family="paragraph" style:parent-style-name="Heading_20_3">
      <style:text-properties style:font-name="Padauk Book"/>
    </style:style>
    <style:style style:name="P10" style:family="paragraph" style:parent-style-name="Text_20_body" style:list-style-name="L1"/>
    <style:style style:name="P11" style:family="paragraph" style:parent-style-name="Text_20_body" style:list-style-name="L1">
      <style:paragraph-properties fo:margin-top="0cm" fo:margin-bottom="0cm" style:contextual-spacing="false"/>
    </style:style>
    <style:style style:name="P12" style:family="paragraph" style:parent-style-name="Text_20_body" style:list-style-name="L2"/>
    <style:style style:name="P13" style:family="paragraph" style:parent-style-name="Text_20_body" style:list-style-name="L2">
      <style:paragraph-properties fo:margin-top="0cm" fo:margin-bottom="0cm" style:contextual-spacing="false"/>
    </style:style>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5">
      <style:paragraph-properties fo:margin-top="0cm" fo:margin-bottom="0cm" style:contextual-spacing="false"/>
    </style:style>
    <style:style style:name="P18" style:family="paragraph" style:parent-style-name="Text_20_body" style:list-style-name="L6"/>
    <style:style style:name="P19" style:family="paragraph" style:parent-style-name="Text_20_body" style:list-style-name="L6">
      <style:paragraph-properties fo:margin-top="0cm" fo:margin-bottom="0cm" style:contextual-spacing="false"/>
    </style:style>
    <style:style style:name="P20" style:family="paragraph" style:parent-style-name="Text_20_body" style:list-style-name="L7"/>
    <style:style style:name="P21" style:family="paragraph" style:parent-style-name="Text_20_body" style:list-style-name="L7">
      <style:paragraph-properties fo:margin-top="0cm" fo:margin-bottom="0cm" style:contextual-spacing="false"/>
    </style:style>
    <style:style style:name="P22" style:family="paragraph" style:parent-style-name="Text_20_body" style:list-style-name="L8"/>
    <style:style style:name="P23" style:family="paragraph" style:parent-style-name="Text_20_body" style:list-style-name="L8">
      <style:paragraph-properties fo:margin-top="0cm" fo:margin-bottom="0cm" style:contextual-spacing="false"/>
    </style:style>
    <style:style style:name="P24" style:family="paragraph" style:parent-style-name="Text_20_body" style:list-style-name="L9"/>
    <style:style style:name="P25" style:family="paragraph" style:parent-style-name="Text_20_body" style:list-style-name="L9">
      <style:paragraph-properties fo:margin-top="0cm" fo:margin-bottom="0cm" style:contextual-spacing="false"/>
    </style:style>
    <style:style style:name="P26" style:family="paragraph" style:parent-style-name="Text_20_body" style:list-style-name="L10"/>
    <style:style style:name="P27" style:family="paragraph" style:parent-style-name="Text_20_body" style:list-style-name="L10">
      <style:paragraph-properties fo:margin-top="0cm" fo:margin-bottom="0cm" style:contextual-spacing="false"/>
    </style:style>
    <style:style style:name="P28" style:family="paragraph" style:parent-style-name="Text_20_body" style:list-style-name="L11"/>
    <style:style style:name="P29" style:family="paragraph" style:parent-style-name="Text_20_body" style:list-style-name="L11">
      <style:paragraph-properties fo:margin-top="0cm" fo:margin-bottom="0cm" style:contextual-spacing="false"/>
    </style:style>
    <style:style style:name="P30" style:family="paragraph" style:parent-style-name="Text_20_body" style:list-style-name="L12"/>
    <style:style style:name="P31" style:family="paragraph" style:parent-style-name="Text_20_body" style:list-style-name="L12">
      <style:paragraph-properties fo:margin-top="0cm" fo:margin-bottom="0cm" style:contextual-spacing="false"/>
    </style:style>
    <style:style style:name="P32" style:family="paragraph" style:parent-style-name="Text_20_body" style:list-style-name="L13"/>
    <style:style style:name="P33" style:family="paragraph" style:parent-style-name="Text_20_body" style:list-style-name="L13">
      <style:paragraph-properties fo:margin-top="0cm" fo:margin-bottom="0cm" style:contextual-spacing="false"/>
    </style:style>
    <style:style style:name="P34" style:family="paragraph" style:parent-style-name="Text_20_body" style:list-style-name="L14"/>
    <style:style style:name="P35" style:family="paragraph" style:parent-style-name="Text_20_body" style:list-style-name="L14">
      <style:paragraph-properties fo:margin-top="0cm" fo:margin-bottom="0cm" style:contextual-spacing="false"/>
    </style:style>
    <style:style style:name="P36" style:family="paragraph" style:parent-style-name="Text_20_body" style:list-style-name="L15"/>
    <style:style style:name="P37" style:family="paragraph" style:parent-style-name="Text_20_body" style:list-style-name="L15">
      <style:paragraph-properties fo:margin-top="0cm" fo:margin-bottom="0cm" style:contextual-spacing="false"/>
    </style:style>
    <style:style style:name="P38" style:family="paragraph" style:parent-style-name="Text_20_body" style:list-style-name="L16"/>
    <style:style style:name="P39" style:family="paragraph" style:parent-style-name="Text_20_body" style:list-style-name="L16">
      <style:paragraph-properties fo:margin-top="0cm" fo:margin-bottom="0cm" style:contextual-spacing="false"/>
    </style:style>
    <style:style style:name="P40" style:family="paragraph" style:parent-style-name="Text_20_body" style:list-style-name="L17"/>
    <style:style style:name="P41" style:family="paragraph" style:parent-style-name="Text_20_body" style:list-style-name="L17">
      <style:paragraph-properties fo:margin-top="0cm" fo:margin-bottom="0cm" style:contextual-spacing="false"/>
    </style:style>
    <style:style style:name="P42" style:family="paragraph" style:parent-style-name="Text_20_body" style:list-style-name="L18"/>
    <style:style style:name="P43" style:family="paragraph" style:parent-style-name="Text_20_body" style:list-style-name="L18">
      <style:paragraph-properties fo:margin-top="0cm" fo:margin-bottom="0cm" style:contextual-spacing="false"/>
    </style:style>
    <style:style style:name="P44" style:family="paragraph" style:parent-style-name="Text_20_body" style:list-style-name="L19"/>
    <style:style style:name="P45" style:family="paragraph" style:parent-style-name="Text_20_body" style:list-style-name="L19">
      <style:paragraph-properties fo:margin-top="0cm" fo:margin-bottom="0cm" style:contextual-spacing="false"/>
    </style:style>
    <style:style style:name="P46" style:family="paragraph" style:parent-style-name="Text_20_body" style:list-style-name="L20"/>
    <style:style style:name="P47" style:family="paragraph" style:parent-style-name="Text_20_body" style:list-style-name="L20">
      <style:paragraph-properties fo:margin-top="0cm" fo:margin-bottom="0cm" style:contextual-spacing="false"/>
    </style:style>
    <style:style style:name="P48" style:family="paragraph" style:parent-style-name="Text_20_body" style:list-style-name="L21"/>
    <style:style style:name="P49" style:family="paragraph" style:parent-style-name="Text_20_body" style:list-style-name="L21">
      <style:paragraph-properties fo:margin-top="0cm" fo:margin-bottom="0cm" style:contextual-spacing="false"/>
    </style:style>
    <style:style style:name="P50" style:family="paragraph" style:parent-style-name="Text_20_body" style:list-style-name="L22"/>
    <style:style style:name="P51" style:family="paragraph" style:parent-style-name="Text_20_body" style:list-style-name="L22">
      <style:paragraph-properties fo:margin-top="0cm" fo:margin-bottom="0cm" style:contextual-spacing="false"/>
    </style:style>
    <style:style style:name="P52" style:family="paragraph" style:parent-style-name="Text_20_body" style:list-style-name="L23"/>
    <style:style style:name="P53" style:family="paragraph" style:parent-style-name="Text_20_body" style:list-style-name="L23">
      <style:paragraph-properties fo:margin-top="0cm" fo:margin-bottom="0cm" style:contextual-spacing="false"/>
    </style:style>
    <style:style style:name="P54" style:family="paragraph" style:parent-style-name="Text_20_body" style:list-style-name="L24"/>
    <style:style style:name="P55" style:family="paragraph" style:parent-style-name="Text_20_body" style:list-style-name="L24">
      <style:paragraph-properties fo:margin-top="0cm" fo:margin-bottom="0cm" style:contextual-spacing="false"/>
    </style:style>
    <style:style style:name="P56" style:family="paragraph" style:parent-style-name="Text_20_body" style:list-style-name="L25"/>
    <style:style style:name="P57" style:family="paragraph" style:parent-style-name="Text_20_body" style:list-style-name="L25">
      <style:paragraph-properties fo:margin-top="0cm" fo:margin-bottom="0cm" style:contextual-spacing="false"/>
    </style:style>
    <style:style style:name="P58" style:family="paragraph" style:parent-style-name="Text_20_body" style:list-style-name="L26"/>
    <style:style style:name="P59" style:family="paragraph" style:parent-style-name="Text_20_body" style:list-style-name="L26">
      <style:paragraph-properties fo:margin-top="0cm" fo:margin-bottom="0cm" style:contextual-spacing="false"/>
    </style:style>
    <style:style style:name="P60" style:family="paragraph" style:parent-style-name="Text_20_body" style:list-style-name="L27">
      <style:paragraph-properties fo:margin-top="0cm" fo:margin-bottom="0cm" style:contextual-spacing="false"/>
      <style:text-properties style:font-name="Padauk Book"/>
    </style:style>
    <style:style style:name="P61" style:family="paragraph" style:parent-style-name="Text_20_body" style:list-style-name="L27">
      <style:text-properties style:font-name="Padauk Book"/>
    </style:style>
    <style:style style:name="P62" style:family="paragraph" style:parent-style-name="Text_20_body" style:list-style-name="L28"/>
    <style:style style:name="P63" style:family="paragraph" style:parent-style-name="Text_20_body" style:list-style-name="L28">
      <style:paragraph-properties fo:margin-top="0cm" fo:margin-bottom="0cm" style:contextual-spacing="false"/>
    </style:style>
    <style:style style:name="P64" style:family="paragraph" style:parent-style-name="Text_20_body" style:list-style-name="L29"/>
    <style:style style:name="P65" style:family="paragraph" style:parent-style-name="Text_20_body" style:list-style-name="L29">
      <style:paragraph-properties fo:margin-top="0cm" fo:margin-bottom="0cm" style:contextual-spacing="false"/>
    </style:style>
    <style:style style:name="P66" style:family="paragraph" style:parent-style-name="Text_20_body" style:list-style-name="L30"/>
    <style:style style:name="P67" style:family="paragraph" style:parent-style-name="Text_20_body" style:list-style-name="L30">
      <style:paragraph-properties fo:margin-top="0cm" fo:margin-bottom="0cm" style:contextual-spacing="false"/>
    </style:style>
    <style:style style:name="P68" style:family="paragraph" style:parent-style-name="Text_20_body" style:list-style-name="L31"/>
    <style:style style:name="P69" style:family="paragraph" style:parent-style-name="Text_20_body" style:list-style-name="L31">
      <style:paragraph-properties fo:margin-top="0cm" fo:margin-bottom="0cm" style:contextual-spacing="false"/>
    </style:style>
    <style:style style:name="P70" style:family="paragraph" style:parent-style-name="Text_20_body" style:list-style-name="L32"/>
    <style:style style:name="P71" style:family="paragraph" style:parent-style-name="Text_20_body" style:list-style-name="L32">
      <style:paragraph-properties fo:margin-top="0cm" fo:margin-bottom="0cm" style:contextual-spacing="false"/>
    </style:style>
    <style:style style:name="P72" style:family="paragraph" style:parent-style-name="Text_20_body" style:list-style-name="L33"/>
    <style:style style:name="P73" style:family="paragraph" style:parent-style-name="Text_20_body" style:list-style-name="L33">
      <style:paragraph-properties fo:margin-top="0cm" fo:margin-bottom="0cm" style:contextual-spacing="false"/>
    </style:style>
    <style:style style:name="P74" style:family="paragraph" style:parent-style-name="Text_20_body" style:list-style-name="L36"/>
    <style:style style:name="P75" style:family="paragraph" style:parent-style-name="Text_20_body" style:list-style-name="L36">
      <style:paragraph-properties fo:margin-top="0cm" fo:margin-bottom="0cm" style:contextual-spacing="false"/>
    </style:style>
    <style:style style:name="P76" style:family="paragraph" style:parent-style-name="Text_20_body" style:list-style-name="L37">
      <style:paragraph-properties fo:margin-top="0cm" fo:margin-bottom="0cm" style:contextual-spacing="false"/>
    </style:style>
    <style:style style:name="P77" style:family="paragraph" style:parent-style-name="Text_20_body" style:list-style-name="L38"/>
    <style:style style:name="P78" style:family="paragraph" style:parent-style-name="Text_20_body" style:list-style-name="L39"/>
    <style:style style:name="P79" style:family="paragraph" style:parent-style-name="Text_20_body" style:list-style-name="L39">
      <style:paragraph-properties fo:margin-top="0cm" fo:margin-bottom="0cm" style:contextual-spacing="false"/>
    </style:style>
    <style:style style:name="P80" style:family="paragraph" style:parent-style-name="Text_20_body" style:list-style-name="L40">
      <style:paragraph-properties fo:margin-top="0cm" fo:margin-bottom="0cm" style:contextual-spacing="false"/>
    </style:style>
    <style:style style:name="P81" style:family="paragraph" style:parent-style-name="Text_20_body" style:list-style-name="L41"/>
    <style:style style:name="P82" style:family="paragraph" style:parent-style-name="Text_20_body" style:list-style-name="L41">
      <style:paragraph-properties fo:margin-top="0cm" fo:margin-bottom="0cm" style:contextual-spacing="false"/>
    </style:style>
    <style:style style:name="P83" style:family="paragraph" style:parent-style-name="Text_20_body" style:list-style-name="L42"/>
    <style:style style:name="P84" style:family="paragraph" style:parent-style-name="Text_20_body" style:list-style-name="L42">
      <style:paragraph-properties fo:margin-top="0cm" fo:margin-bottom="0cm" style:contextual-spacing="false"/>
    </style:style>
    <style:style style:name="P85" style:family="paragraph" style:parent-style-name="Text_20_body" style:list-style-name="L43"/>
    <style:style style:name="P86" style:family="paragraph" style:parent-style-name="Text_20_body" style:list-style-name="L43">
      <style:paragraph-properties fo:margin-top="0cm" fo:margin-bottom="0cm" style:contextual-spacing="false"/>
    </style:style>
    <style:style style:name="P87" style:family="paragraph" style:parent-style-name="Text_20_body" style:list-style-name="L44"/>
    <style:style style:name="P88" style:family="paragraph" style:parent-style-name="Text_20_body" style:list-style-name="L45"/>
    <style:style style:name="P89" style:family="paragraph" style:parent-style-name="Text_20_body" style:list-style-name="L45">
      <style:paragraph-properties fo:margin-top="0cm" fo:margin-bottom="0cm" style:contextual-spacing="false"/>
    </style:style>
    <style:style style:name="P90" style:family="paragraph" style:parent-style-name="Text_20_body">
      <style:text-properties style:font-name="Padauk Book"/>
    </style:style>
    <style:style style:name="P91" style:family="paragraph" style:parent-style-name="Text_20_body" style:list-style-name="L34">
      <style:paragraph-properties fo:margin-top="0cm" fo:margin-bottom="0cm" style:contextual-spacing="false"/>
      <style:text-properties style:font-name="Padauk Book"/>
    </style:style>
    <style:style style:name="P92" style:family="paragraph" style:parent-style-name="Text_20_body" style:list-style-name="L34">
      <style:text-properties style:font-name="Padauk Book"/>
    </style:style>
    <style:style style:name="P93" style:family="paragraph" style:parent-style-name="Text_20_body" style:list-style-name="L35">
      <style:paragraph-properties fo:margin-top="0cm" fo:margin-bottom="0cm" style:contextual-spacing="false"/>
      <style:text-properties style:font-name="Padauk Book"/>
    </style:style>
    <style:style style:name="P94" style:family="paragraph" style:parent-style-name="Text_20_body" style:list-style-name="L35">
      <style:text-properties style:font-name="Padauk Book"/>
    </style:style>
    <style:style style:name="P95" style:family="paragraph" style:parent-style-name="Text_20_body" style:list-style-name="L37">
      <style:paragraph-properties fo:margin-top="0cm" fo:margin-bottom="0cm" style:contextual-spacing="false"/>
      <style:text-properties style:font-name="Padauk Book"/>
    </style:style>
    <style:style style:name="P96" style:family="paragraph" style:parent-style-name="Text_20_body" style:list-style-name="L37">
      <style:text-properties style:font-name="Padauk Book"/>
    </style:style>
    <style:style style:name="P97" style:family="paragraph" style:parent-style-name="Text_20_body" style:list-style-name="L40">
      <style:paragraph-properties fo:margin-top="0cm" fo:margin-bottom="0cm" style:contextual-spacing="false"/>
      <style:text-properties style:font-name="Padauk Book"/>
    </style:style>
    <style:style style:name="P98" style:family="paragraph" style:parent-style-name="Text_20_body" style:list-style-name="L40">
      <style:text-properties style:font-name="Padauk Book"/>
    </style:style>
    <style:style style:name="P99" style:family="paragraph" style:parent-style-name="Text_20_body" style:list-style-name="L46">
      <style:paragraph-properties fo:margin-top="0cm" fo:margin-bottom="0cm" style:contextual-spacing="false"/>
      <style:text-properties style:font-name="Padauk Book"/>
    </style:style>
    <style:style style:name="P100" style:family="paragraph" style:parent-style-name="Text_20_body" style:list-style-name="L46">
      <style:text-properties style:font-name="Padauk Book"/>
    </style:style>
    <style:style style:name="T1" style:family="text">
      <style:text-properties style:font-name="Padauk Book"/>
    </style:style>
    <style:style style:name="T2" style:family="text">
      <style:text-properties style:font-name="Padauk Book"/>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 CUADERNO DE ESTUDIO: LECCIÓN 9 (PARTE 2)</text:h>
      <text:h text:style-name="P1" text:outline-level="2">Tesoro y Hombre Rico en Lenguaje Figurativo</text:h>
      <text:p text:style-name="P3"/>
      <text:h text:style-name="P1" text:outline-level="2">🔄 1. Repaso Inicial: El Significado del Tesoro</text:h>
      <text:p text:style-name="Text_20_body"><text:span text:style-name="Emphasis"><text:span text:style-name="T1">(A cargo del Evangelista Christian Howard)</text:span></text:span></text:p>
      <text:p text:style-name="P4">Antes de continuar con la segunda parte de la lección, repasamos los conceptos fundamentales sobre el tesoro espiritual que vimos en la Parte 1:</text:p>
      <text:p text:style-name="Text_20_body"><text:span text:style-name="Strong_20_Emphasis"><text:span text:style-name="T1">Preguntas de Reflexión y Respuestas:</text:span></text:span></text:p>
      <text:list text:style-name="L28">
        <text:list-item>
          <text:p text:style-name="P63"><text:span text:style-name="Strong_20_Emphasis"><text:span text:style-name="T1">¿Cuál es el significado figurativo de tesoro?</text:span></text:span></text:p>
          <text:list>
            <text:list-item>
              <text:p text:style-name="P63"><text:span text:style-name="Emphasis"><text:span text:style-name="T1">Respuesta:</text:span></text:span><text:span text:style-name="T1"> Son las </text:span><text:span text:style-name="Strong_20_Emphasis"><text:span text:style-name="T1">palabras de Dios</text:span></text:span><text:span text:style-name="T1"> (la verdad) y también las </text:span><text:span text:style-name="Strong_20_Emphasis"><text:span text:style-name="T1">personas que tienen esa palabra</text:span></text:span><text:span text:style-name="T1"> en su corazón. </text:span></text:p>
            </text:list-item>
          </text:list>
        </text:list-item>
        <text:list-item>
          <text:p text:style-name="P63"><text:span text:style-name="Strong_20_Emphasis"><text:span text:style-name="T1">¿Qué representa cada tipo de tesoro?</text:span></text:span></text:p>
          <text:list>
            <text:list-item>
              <text:p text:style-name="P63"><text:span text:style-name="Strong_20_Emphasis"><text:span text:style-name="T1">Tesoro de Dios:</text:span></text:span><text:span text:style-name="T1"> La palabra de verdad y las personas (pastores verdaderos) que la tienen y la comparten. </text:span></text:p>
            </text:list-item>
            <text:list-item>
              <text:p text:style-name="P63"><text:span text:style-name="Strong_20_Emphasis"><text:span text:style-name="T1">Tesoro de Satanás:</text:span></text:span><text:span text:style-name="T1"> Las mentiras (falsedades que mezclan la palabra de Dios con pensamientos humanos) y los pastores falsos que las enseñan. </text:span></text:p>
            </text:list-item>
          </text:list>
        </text:list-item>
        <text:list-item>
          <text:p text:style-name="P63"><text:span text:style-name="Strong_20_Emphasis"><text:span text:style-name="T1">¿De qué está formada la Ciudad Santa Nueva Jerusalén (oro, perlas y cristal)?</text:span></text:span></text:p>
          <text:list>
            <text:list-item>
              <text:p text:style-name="P62"><text:span text:style-name="Emphasis"><text:span text:style-name="T1">Respuesta:</text:span></text:span><text:span text:style-name="T1"> No es una ciudad física. Es una </text:span><text:span text:style-name="Strong_20_Emphasis"><text:span text:style-name="T1">organización celestial</text:span></text:span><text:span text:style-name="T1"> formada por la palabra de la verdad y la gente (los hijos de Dios) que tiene y entiende esa palabra. Las perlas representan a las personas preciosas ante los ojos de Dios. </text:span></text:p>
            </text:list-item>
          </text:list>
        </text:list-item>
      </text:list>
      <text:p text:style-name="Text_20_body"><text:span text:style-name="Strong_20_Emphasis"><text:span text:style-name="T1">Oración de apertura:</text:span></text:span></text:p>
      <text:p text:style-name="Quotations"><text:span text:style-name="Emphasis"><text:span text:style-name="T1">"Santísimo Padre Dios, creador de toda la creación, gracias por darnos esta palabra, Dios. Gracias por enseñarnos qué significan estas riquezas, qué significa este oro y plata, Dios. Muchas veces pensamos muy físico, y cuando alguna gente se imagina los cielos, se imagina calles de oro y que se verá tan lindo, pero ya podemos entender que este oro es tu palabra verdadera, Dios. Está significando que tu lugar es donde está tu palabra. Dios, gracias por esta oportunidad, por darnos tu palabra y estar sellados con tu palabra para entenderte más y más cada día. Estamos tan agradecidos. Y siempre oramos que </text:span></text:span><text:soft-page-break/><text:span text:style-name="Emphasis"><text:span text:style-name="T1">mandes tus espíritus santos a nosotros, que abras nuestros corazones y que abras nuestra mente para que podamos entender lo que tú quieres que aprendamos, que no seamos arrogantes, que no seamos necios en tratar de entender tu palabra, Dios. Sabemos ya que tenemos muchos sedimentos y poco a poco los estamos quitando y vaciando de nuestra copa para que tú puedas poner más y más tu palabra dentro de nosotros. Y también oramos por los hermanos y hermanas que no han podido venir por problemas de conexión o de salud. Por favor, cuídalos y guíalos, Dios, para que ellos puedan venir y escuchar tu palabra y refrescar su mente con ella y que puedan comer y alimentarse con esta palabra suya, Dios. Oramos todo esto en tu hijo perfecto, Jesucristo. Amén."</text:span></text:span></text:p>
      <text:p text:style-name="P3"/>
      <text:h text:style-name="P1" text:outline-level="2">💰 2. Introducción: ¿Qué es un Hombre Rico?</text:h>
      <text:p text:style-name="Text_20_body"><text:span text:style-name="Emphasis"><text:span text:style-name="T1">(A cargo del Instructor Sibiani)</text:span></text:span></text:p>
      <text:h text:style-name="P2" text:outline-level="3">📌 La Actitud ante la Palabra</text:h>
      <text:p text:style-name="Text_20_body"><text:span text:style-name="T1">Hoy vamos a ver un poco más sobre el </text:span><text:span text:style-name="Strong_20_Emphasis"><text:span text:style-name="T1">hombre rico</text:span></text:span><text:span text:style-name="T1">. Ya ustedes saben qué es tesoro (palabra). Si un hombre rico es uno que tiene tesoro, entonces podemos conectar esas ideas.</text:span></text:p>
      <text:h text:style-name="P2" text:outline-level="3">🤔 Pregunta Existencial: ¿A Dios no le gustan los ricos?</text:h>
      <text:p text:style-name="P4">Jesús dijo muchas cosas que nos hacen pensar esto:</text:p>
      <text:list text:style-name="L29">
        <text:list-item>
          <text:p text:style-name="P65"><text:span text:style-name="Emphasis"><text:span text:style-name="T1">"No hagan tesoros aquí en la tierra"</text:span></text:span><text:span text:style-name="T1"> (Mateo 6:19). </text:span></text:p>
        </text:list-item>
        <text:list-item>
          <text:p text:style-name="P64"><text:span text:style-name="Emphasis"><text:span text:style-name="T1">"El dinero es la raíz de todos los males"</text:span></text:span><text:span text:style-name="T1"> (1 Timoteo 6:10). </text:span></text:p>
        </text:list-item>
      </text:list>
      <text:p text:style-name="Text_20_body"><text:span text:style-name="T1">Entonces, ¿cuando llega un rico al cielo, Dios le dice </text:span><text:span text:style-name="Emphasis"><text:span text:style-name="T1">"¡Uh! No, tienes mucho dinero. Adiós. Fuera"</text:span></text:span><text:span text:style-name="T1">? ¿Como así? Claramente hay algo más profundo y espiritual que debemos entender.</text:span></text:p>
      <text:h text:style-name="P2" text:outline-level="3">📊 Características de un Hombre Rico</text:h>
      <text:list text:style-name="L30">
        <text:list-item>
          <text:p text:style-name="P67"><text:span text:style-name="Strong_20_Emphasis"><text:span text:style-name="T1">Físicamente:</text:span></text:span><text:span text:style-name="T1"> Es una persona que tiene abundancia de dinero, oro, plata, propiedades. </text:span></text:p>
        </text:list-item>
        <text:list-item>
          <text:p text:style-name="P66"><text:span text:style-name="Strong_20_Emphasis"><text:span text:style-name="T1">Espiritualmente:</text:span></text:span><text:span text:style-name="T1"> Ante los ojos de Dios, una persona rica es aquella que tiene </text:span><text:span text:style-name="Strong_20_Emphasis"><text:span text:style-name="T1">muchas palabras</text:span></text:span><text:span text:style-name="T1"> (tesoros espirituales) en su corazón. </text:span></text:p>
        </text:list-item>
      </text:list>
      <text:p text:style-name="Text_20_body"><text:span text:style-name="Emphasis"><text:span text:style-name="T1">Nota:</text:span></text:span><text:span text:style-name="T1"> En la Biblia vemos ricos físicos como Abraham, Isaac, Jacob y José. El dinero no es malo en sí mismo, pero lo que Dios quiere que entendamos hoy es qué clase de persona es una </text:span><text:span text:style-name="Strong_20_Emphasis"><text:span text:style-name="T1">persona rica espiritualmente hablando</text:span></text:span><text:span text:style-name="T1">.</text:span></text:p>
      <text:p text:style-name="P3"/>
      <text:h text:style-name="P1" text:outline-level="2"><text:soft-page-break/>📜 3. El Consejo de Jesús a Laodicea</text:h>
      <text:p text:style-name="Text_20_body"><text:span text:style-name="Strong_20_Emphasis"><text:span text:style-name="T1">Apocalipsis 3:17-18</text:span></text:span></text:p>
      <text:p text:style-name="Quotations"><text:span text:style-name="Emphasis"><text:span text:style-name="T1">"Porque tú dices: 'Yo soy rico y me he enriquecido, y de ninguna cosa tengo necesidad'. Y no sabes que tú eres un desventurado, miserable, pobre, ciego y desnudo. Por tanto, yo te aconsejo que de mí compres oro refinado en fuego para que seas rico..."</text:span></text:span></text:p>
      <text:h text:style-name="P2" text:outline-level="3">🔍 Análisis del Pasaje</text:h>
      <text:list text:style-name="L31">
        <text:list-item>
          <text:p text:style-name="P69"><text:span text:style-name="Strong_20_Emphasis"><text:span text:style-name="T1">El Mensajero de Laodicea:</text:span></text:span><text:span text:style-name="T1"> Dice </text:span><text:span text:style-name="Emphasis"><text:span text:style-name="T1">"Yo soy rico"</text:span></text:span><text:span text:style-name="T1">. Él cree que tiene muchas riquezas (palabras, enseñanzas, tradiciones). </text:span></text:p>
        </text:list-item>
        <text:list-item>
          <text:p text:style-name="P69"><text:span text:style-name="Strong_20_Emphasis"><text:span text:style-name="T1">La Realidad de Jesús:</text:span></text:span><text:span text:style-name="T1"> </text:span><text:span text:style-name="Emphasis"><text:span text:style-name="T1">"No, no eres rico. Eres pobre, miserable, ciego y desnudo"</text:span></text:span><text:span text:style-name="T1">. </text:span></text:p>
        </text:list-item>
        <text:list-item>
          <text:p text:style-name="P69"><text:span text:style-name="Strong_20_Emphasis"><text:span text:style-name="T1">El Consejo Divino:</text:span></text:span><text:span text:style-name="T1"> </text:span><text:span text:style-name="Emphasis"><text:span text:style-name="T1">"Compra oro refinado en fuego de mí"</text:span></text:span><text:span text:style-name="T1">.</text:span></text:p>
          <text:list>
            <text:list-item>
              <text:p text:style-name="P69"><text:span text:style-name="Emphasis"><text:span text:style-name="T1">Pregunta:</text:span></text:span><text:span text:style-name="T1"> Si esta persona es pobre, ¿cómo va a comprar algo? </text:span></text:p>
            </text:list-item>
            <text:list-item>
              <text:p text:style-name="P68"><text:span text:style-name="Emphasis"><text:span text:style-name="T1">Respuesta:</text:span></text:span><text:span text:style-name="T1"> No está hablando de dinero físico. Está hablando de recibir la </text:span><text:span text:style-name="Strong_20_Emphasis"><text:span text:style-name="T1">palabra verdadera</text:span></text:span><text:span text:style-name="T1"> (el oro refinado) que solo Jesús puede dar. </text:span></text:p>
            </text:list-item>
          </text:list>
        </text:list-item>
      </text:list>
      <text:p text:style-name="P3"/>
      <text:h text:style-name="P1" text:outline-level="2">💎 4. Parábolas del Reino: La Perla y el Tesoro Escondido</text:h>
      <text:h text:style-name="P2" text:outline-level="3">🦪 El Mercader y la Perla de Gran Precio</text:h>
      <text:p text:style-name="Text_20_body"><text:span text:style-name="Strong_20_Emphasis"><text:span text:style-name="T1">Mateo 13:45-46</text:span></text:span></text:p>
      <text:p text:style-name="Quotations"><text:span text:style-name="Emphasis"><text:span text:style-name="T1">"También el reino de los cielos es semejante a un mercader que busca buenas perlas, que habiendo hallado una perla preciosa, fue y vendió todo lo que tenía y la compró".</text:span></text:span></text:p>
      <text:list text:style-name="L32">
        <text:list-item>
          <text:p text:style-name="P71"><text:span text:style-name="Strong_20_Emphasis"><text:span text:style-name="T1">El Mercader:</text:span></text:span><text:span text:style-name="T1"> Una persona que busca la verdad por todos lados. </text:span></text:p>
        </text:list-item>
        <text:list-item>
          <text:p text:style-name="P71"><text:span text:style-name="Strong_20_Emphasis"><text:span text:style-name="T1">La Perla Preciosa:</text:span></text:span><text:span text:style-name="T1"> La palabra abierta y revelada de Dios. </text:span></text:p>
        </text:list-item>
        <text:list-item>
          <text:p text:style-name="P71"><text:span text:style-name="Strong_20_Emphasis"><text:span text:style-name="T1">Vender todo lo que tenía:</text:span></text:span><text:span text:style-name="T1"> No significa literalmente vender tu casa o tu carro. Significa </text:span><text:span text:style-name="Strong_20_Emphasis"><text:span text:style-name="T1">priorizar la palabra de Dios</text:span></text:span><text:span text:style-name="T1"> más que cualquier otra cosa. Significa desechar todo lo que creíamos que era verdad (nuestros propios pensamientos, tradiciones humanas) para aceptar completamente la verdad revelada.</text:span></text:p>
          <text:list>
            <text:list-item>
              <text:p text:style-name="P70"><text:span text:style-name="Emphasis"><text:span text:style-name="T1">Analogía:</text:span></text:span><text:span text:style-name="T1"> Pablo dijo que todo lo que aprendió antes lo consideraba </text:span><text:span text:style-name="Emphasis"><text:span text:style-name="T1">"estiércol"</text:span></text:span><text:span text:style-name="T1"> comparado con el conocimiento de Cristo (Filipenses 3:8). </text:span></text:p>
            </text:list-item>
          </text:list>
        </text:list-item>
      </text:list>
      <text:h text:style-name="P2" text:outline-level="3"><text:soft-page-break/>🗺️ El Tesoro Escondido en el Campo</text:h>
      <text:p text:style-name="Text_20_body"><text:span text:style-name="Strong_20_Emphasis"><text:span text:style-name="T1">Mateo 13:44</text:span></text:span></text:p>
      <text:p text:style-name="Quotations"><text:span text:style-name="Emphasis"><text:span text:style-name="T1">"Además, el reino de los cielos es semejante a un tesoro escondido en un campo, el cual un hombre halla y lo esconde de nuevo, y gozoso por ello va y vende todo lo que tiene y compra aquel campo".</text:span></text:span></text:p>
      <text:list text:style-name="L33">
        <text:list-item>
          <text:p text:style-name="P73"><text:span text:style-name="Strong_20_Emphasis"><text:span text:style-name="T1">El Tesoro:</text:span></text:span><text:span text:style-name="T1"> La palabra abierta (la verdad revelada). </text:span></text:p>
        </text:list-item>
        <text:list-item>
          <text:p text:style-name="P73"><text:span text:style-name="Strong_20_Emphasis"><text:span text:style-name="T1">El Campo:</text:span></text:span><text:span text:style-name="T1"> El corazón de la persona. </text:span></text:p>
        </text:list-item>
        <text:list-item>
          <text:p text:style-name="P73"><text:span text:style-name="Strong_20_Emphasis"><text:span text:style-name="T1">Halla el tesoro:</text:span></text:span><text:span text:style-name="T1"> La persona encuentra la palabra de verdad después de buscarla. </text:span></text:p>
        </text:list-item>
        <text:list-item>
          <text:p text:style-name="P73"><text:span text:style-name="Strong_20_Emphasis"><text:span text:style-name="T1">Lo esconde de nuevo:</text:span></text:span><text:span text:style-name="T1"> Lo pone en su corazón (el campo). No lo deja ir. </text:span></text:p>
        </text:list-item>
        <text:list-item>
          <text:p text:style-name="P72"><text:span text:style-name="Strong_20_Emphasis"><text:span text:style-name="T1">Vende todo y compra el campo:</text:span></text:span><text:span text:style-name="T1"> La persona acepta completamente la palabra, limpiando su corazón de todo lo que no era acorde a la verdad. </text:span></text:p>
        </text:list-item>
      </text:list>
      <text:p text:style-name="P3"/>
      <text:h text:style-name="P1" text:outline-level="2">☁️ 5. Hacer Tesoros en el Cielo vs. en la Tierra</text:h>
      <text:p text:style-name="Text_20_body"><text:span text:style-name="Strong_20_Emphasis"><text:span text:style-name="T1">Mateo 6:19-20</text:span></text:span></text:p>
      <text:p text:style-name="Quotations"><text:span text:style-name="Emphasis"><text:span text:style-name="T1">"No os hagáis tesoros en la tierra, donde la polilla y el orín corrompen y donde ladrones minan y hurtan, sino haceos tesoros en el cielo, donde ni la polilla ni el orín corrompen y donde ladrones no minan ni hurtan".</text:span></text:span></text:p>
      <text:h text:style-name="P2" text:outline-level="3">🌍 Tesoros en la Tierra (Físicos)</text:h>
      <text:list text:style-name="L34">
        <text:list-item>
          <text:p text:style-name="P91">Dinero, inversiones, propiedades. </text:p>
        </text:list-item>
        <text:list-item>
          <text:p text:style-name="P91">Son corruptibles: la polilla y el orín los corrompen, los ladrones los roban. </text:p>
        </text:list-item>
        <text:list-item>
          <text:p text:style-name="P92">No pueden darnos vida eterna. </text:p>
        </text:list-item>
      </text:list>
      <text:h text:style-name="P2" text:outline-level="3">☁️ Tesoros en el Cielo (Espirituales)</text:h>
      <text:list text:style-name="L35">
        <text:list-item>
          <text:p text:style-name="P93">La palabra de Dios, la verdad revelada. </text:p>
        </text:list-item>
        <text:list-item>
          <text:p text:style-name="P93">Son incorruptibles: nadie puede robártelos. </text:p>
        </text:list-item>
        <text:list-item>
          <text:p text:style-name="P94">Son lo único que nos puede llevar al cielo y darnos vida eterna. </text:p>
        </text:list-item>
      </text:list>
      <text:p text:style-name="P3"/>
      <text:h text:style-name="P1" text:outline-level="2">🐫 6. El Hombre Rico que no Pudo Seguir a Jesús</text:h>
      <text:p text:style-name="Text_20_body"><text:span text:style-name="Strong_20_Emphasis"><text:span text:style-name="T1">Mateo 19:21</text:span></text:span></text:p>
      <text:p text:style-name="Quotations"><text:soft-page-break/><text:span text:style-name="Emphasis"><text:span text:style-name="T1">"Jesús le dijo: 'Si quieres ser perfecto, anda, vende todo lo que tienes, dalo a los pobres, y tendrás tesoro en el cielo. Y ven y sígueme'".</text:span></text:span></text:p>
      <text:list text:style-name="L36">
        <text:list-item>
          <text:p text:style-name="P75"><text:span text:style-name="Strong_20_Emphasis"><text:span text:style-name="T1">La Situación:</text:span></text:span><text:span text:style-name="T1"> Llega un hombre rico preguntando cómo obtener la vida eterna. Dice que ya ha cumplido la ley. </text:span></text:p>
        </text:list-item>
        <text:list-item>
          <text:p text:style-name="P75"><text:span text:style-name="Strong_20_Emphasis"><text:span text:style-name="T1">La Prueba:</text:span></text:span><text:span text:style-name="T1"> Jesús le pide que venda todo y lo siga. </text:span></text:p>
        </text:list-item>
        <text:list-item>
          <text:p text:style-name="P75"><text:span text:style-name="Strong_20_Emphasis"><text:span text:style-name="T1">El Resultado:</text:span></text:span><text:span text:style-name="T1"> El hombre se fue cabizbajo y triste porque tenía muchas posesiones. No pudo priorizar a Jesús sobre sus riquezas. </text:span></text:p>
        </text:list-item>
        <text:list-item>
          <text:p text:style-name="P74"><text:span text:style-name="Strong_20_Emphasis"><text:span text:style-name="T1">La Lección:</text:span></text:span><text:span text:style-name="T1"> No significa que tengamos que vivir en pobreza extrema, pero significa que </text:span><text:span text:style-name="Strong_20_Emphasis"><text:span text:style-name="T1">la palabra de Dios debe tener la prioridad absoluta</text:span></text:span><text:span text:style-name="T1"> en nuestro corazón. Si el dinero, los negocios o los afanes nos quitan el tiempo para seguir a Jesús y recibir Su palabra, nos estamos perdiendo el tesoro en el cielo. </text:span></text:p>
        </text:list-item>
      </text:list>
      <text:p text:style-name="P3"/>
      <text:h text:style-name="P1" text:outline-level="2">⚠️ 7. El Peligro del Amor al Dinero y los Espinos</text:h>
      <text:p text:style-name="Text_20_body"><text:span text:style-name="Strong_20_Emphasis"><text:span text:style-name="T1">Mateo 6:24</text:span></text:span></text:p>
      <text:p text:style-name="Quotations"><text:span text:style-name="Emphasis"><text:span text:style-name="T1">"Ninguno puede servir a dos señores... No podéis servir a Dios y a las riquezas".</text:span></text:span></text:p>
      <text:p text:style-name="Text_20_body"><text:span text:style-name="Strong_20_Emphasis"><text:span text:style-name="T1">1 Timoteo 6:10</text:span></text:span></text:p>
      <text:p text:style-name="Quotations"><text:span text:style-name="Emphasis"><text:span text:style-name="T1">"Porque raíz de todos los males es el amor al dinero, el cual codiciando algunos, se extraviaron de la fe y fueron traspasados de muchos dolores".</text:span></text:span></text:p>
      <text:h text:style-name="P2" text:outline-level="3">🌵 La Conexión con la Parábola de los Campos</text:h>
      <text:list text:style-name="L37">
        <text:list-item>
          <text:p text:style-name="P76"><text:span text:style-name="T1">El amor al dinero es como los </text:span><text:span text:style-name="Strong_20_Emphasis"><text:span text:style-name="T1">espinos</text:span></text:span><text:span text:style-name="T1"> de la parábola del sembrador (Mateo 13). </text:span></text:p>
        </text:list-item>
        <text:list-item>
          <text:p text:style-name="P95">Los afanes de la vida y el engaño de las riquezas ahogan la palabra, haciéndola infructuosa. </text:p>
        </text:list-item>
        <text:list-item>
          <text:p text:style-name="P96">Si nuestro corazón está lleno de espinos (priorizando el dinero sobre Dios), no hay espacio para la perla preciosa. </text:p>
        </text:list-item>
      </text:list>
      <text:p text:style-name="Text_20_body"><text:span text:style-name="Strong_20_Emphasis"><text:span text:style-name="T1">Mateo 5:6</text:span></text:span></text:p>
      <text:p text:style-name="Quotations"><text:span text:style-name="Emphasis"><text:span text:style-name="T1">"Bienaventurados los que tienen hambre y sed de justicia, porque ellos serán saciados".</text:span></text:span></text:p>
      <text:list text:style-name="L38">
        <text:list-item>
          <text:p text:style-name="P77"><text:span text:style-name="T1">Debemos tener un </text:span><text:span text:style-name="Strong_20_Emphasis"><text:span text:style-name="T1">corazón hambriento</text:span></text:span><text:span text:style-name="T1"> de la palabra de Dios. Si decimos </text:span><text:span text:style-name="Emphasis"><text:span text:style-name="T1">"yo ya soy rico, no necesito más"</text:span></text:span><text:span text:style-name="T1">, nos perderemos de la gran bendición, tal como les pasó a los fariseos. </text:span></text:p>
        </text:list-item>
      </text:list>
      <text:p text:style-name="P3"><text:soft-page-break/></text:p>
      <text:h text:style-name="P1" text:outline-level="2">🔥 8. Las Riquezas Podridas de los Días Postreros</text:h>
      <text:p text:style-name="Text_20_body"><text:span text:style-name="Strong_20_Emphasis"><text:span text:style-name="T1">Santiago 5:1-3</text:span></text:span></text:p>
      <text:p text:style-name="Quotations"><text:span text:style-name="Emphasis"><text:span text:style-name="T1">"Vamos ahora, ricos, llorad y aullad por las miserias que os vendrán. Vuestras riquezas están podridas y vuestras ropas están comidas de polilla. Vuestro oro y plata están enmohecidos, y su moho testificará contra vosotros y devorará del todo vuestras carnes como fuego. Habéis acumulado tesoros para los días postreros".</text:span></text:span></text:p>
      <text:h text:style-name="P2" text:outline-level="3">🏚️ El Moho y los Sedimentos</text:h>
      <text:list text:style-name="L39">
        <text:list-item>
          <text:p text:style-name="P79"><text:span text:style-name="Strong_20_Emphasis"><text:span text:style-name="T1">El Moho:</text:span></text:span><text:span text:style-name="T1"> Representa las impurezas, los sedimentos, las mentiras y los pensamientos humanos mezclados con la palabra de Dios. </text:span></text:p>
        </text:list-item>
        <text:list-item>
          <text:p text:style-name="P78"><text:span text:style-name="Strong_20_Emphasis"><text:span text:style-name="T1">Acumular tesoros podridos:</text:span></text:span><text:span text:style-name="T1"> Es llenar nuestro corazón de enseñanzas falsas que, en el día del juicio (los días postreros), serán expuestas y nos condenarán. </text:span></text:p>
        </text:list-item>
      </text:list>
      <text:h text:style-name="P2" text:outline-level="3">🏙️ Babilonia y sus Mercaderes</text:h>
      <text:p text:style-name="Text_20_body"><text:span text:style-name="Strong_20_Emphasis"><text:span text:style-name="T1">Apocalipsis 18:15-17</text:span></text:span></text:p>
      <text:list text:style-name="L40">
        <text:list-item>
          <text:p text:style-name="P80"><text:span text:style-name="T1">En los tiempos de Apocalipsis, vemos </text:span><text:span text:style-name="Strong_20_Emphasis"><text:span text:style-name="T1">mercaderes</text:span></text:span><text:span text:style-name="T1"> que se han enriquecido a costa de Babilonia (el reino de Satanás). </text:span></text:p>
        </text:list-item>
        <text:list-item>
          <text:p text:style-name="P97">Están adornados de oro, piedras preciosas y perlas, pero son tesoros falsos, palabras de Satanás. </text:p>
        </text:list-item>
        <text:list-item>
          <text:p text:style-name="P98">En una hora han sido consumidas tantas riquezas. Esto nos muestra que los tesoros de Satanás, aunque parezcan valiosos, son temporales y llevan a la destrucción. </text:p>
        </text:list-item>
      </text:list>
      <text:p text:style-name="P3"/>
      <text:h text:style-name="P1" text:outline-level="2">⚔️ 9. La Realidad en la Primera Venida: Los Ricos de Dios vs. Los Ricos de Satanás</text:h>
      <text:h text:style-name="P2" text:outline-level="3">✅ Los Ricos de Dios (Lado de la Verdad)</text:h>
      <text:list text:style-name="L41">
        <text:list-item>
          <text:p text:style-name="P82"><text:span text:style-name="Strong_20_Emphasis"><text:span text:style-name="T1">¿Quiénes eran?</text:span></text:span><text:span text:style-name="T1"> </text:span><text:span text:style-name="Strong_20_Emphasis"><text:span text:style-name="T1">Jesús y los 12 discípulos.</text:span></text:span><text:span text:style-name="T1"> </text:span></text:p>
        </text:list-item>
        <text:list-item>
          <text:p text:style-name="P82"><text:span text:style-name="Strong_20_Emphasis"><text:span text:style-name="T1">¿Cuál era su tesoro?</text:span></text:span><text:span text:style-name="T1"> La </text:span><text:span text:style-name="Strong_20_Emphasis"><text:span text:style-name="T1">palabra abierta y revelada</text:span></text:span><text:span text:style-name="T1"> (el cumplimiento de las profecías del Antiguo Testamento). </text:span></text:p>
        </text:list-item>
        <text:list-item>
          <text:p text:style-name="P82"><text:soft-page-break/><text:span text:style-name="Strong_20_Emphasis"><text:span text:style-name="T1">¿Cómo se veían físicamente?</text:span></text:span><text:span text:style-name="T1"> Jesús era un nazareno pobre, hijo de carpintero, sin títulos, sin iglesia grande. Ante los ojos humanos, no parecía el Mesías. </text:span></text:p>
        </text:list-item>
        <text:list-item>
          <text:p text:style-name="P82"><text:span text:style-name="Strong_20_Emphasis"><text:span text:style-name="T1">¿Cuál era la evidencia de su riqueza?</text:span></text:span><text:span text:style-name="T1"> Las palabras que salían de Su boca. Él podía explicar todas las profecías, algo que ningún otro pastor podía hacer. </text:span></text:p>
        </text:list-item>
        <text:list-item>
          <text:p text:style-name="P81"><text:span text:style-name="Strong_20_Emphasis"><text:span text:style-name="T1">El proceso:</text:span></text:span><text:span text:style-name="T1"> Los 12 discípulos no entendieron todo de la noche a la mañana. Siguieron a Jesús durante tres años y medio, preguntándole, escuchándolo y almacenando ese tesoro en su corazón. </text:span></text:p>
        </text:list-item>
      </text:list>
      <text:h text:style-name="P2" text:outline-level="3">❌ Los Ricos de Satanás (Lado de la Falsedad)</text:h>
      <text:list text:style-name="L42">
        <text:list-item>
          <text:p text:style-name="P84"><text:span text:style-name="Strong_20_Emphasis"><text:span text:style-name="T1">¿Quiénes eran?</text:span></text:span><text:span text:style-name="T1"> </text:span><text:span text:style-name="Strong_20_Emphasis"><text:span text:style-name="T1">Los fariseos, los saduceos, los escribas y los maestros de la ley.</text:span></text:span><text:span text:style-name="T1"> </text:span></text:p>
        </text:list-item>
        <text:list-item>
          <text:p text:style-name="P84"><text:span text:style-name="Strong_20_Emphasis"><text:span text:style-name="T1">¿Cuál era su tesoro?</text:span></text:span><text:span text:style-name="T1"> La palabra de Dios </text:span><text:span text:style-name="Strong_20_Emphasis"><text:span text:style-name="T1">mezclada con tradiciones humanas y mandamientos de hombres</text:span></text:span><text:span text:style-name="T1"> (falsedad). </text:span></text:p>
        </text:list-item>
        <text:list-item>
          <text:p text:style-name="P84"><text:span text:style-name="Strong_20_Emphasis"><text:span text:style-name="T1">¿Cómo se veían físicamente?</text:span></text:span><text:span text:style-name="T1"> Se veían muy bien, bien vestidos, con sinagogas grandes y hermosas. Tenían muchos títulos, reconocimientos y estatus social. Memorizaban toda la Biblia (el Antiguo Testamento). </text:span></text:p>
        </text:list-item>
        <text:list-item>
          <text:p text:style-name="P84"><text:span text:style-name="Strong_20_Emphasis"><text:span text:style-name="T1">¿Cómo se distinguían?</text:span></text:span><text:span text:style-name="T1"> Antes de que llegara Jesús (la luz), nadie podía distinguir si eran de Dios o de Satanás. Todos los seguían porque parecían los correctos. </text:span></text:p>
        </text:list-item>
        <text:list-item>
          <text:p text:style-name="P83"><text:span text:style-name="Strong_20_Emphasis"><text:span text:style-name="T1">El estándar:</text:span></text:span><text:span text:style-name="T1"> Cuando llegó Jesús (la luz), las personas pudieron comparar las palabras de los fariseos con las palabras de Jesús. Los fariseos no podían explicar el cumplimiento de las profecías; solo podían decir </text:span><text:span text:style-name="Emphasis"><text:span text:style-name="T1">"está endemoniado"</text:span></text:span><text:span text:style-name="T1">. </text:span></text:p>
        </text:list-item>
      </text:list>
      <text:p text:style-name="P3"/>
      <text:h text:style-name="P1" text:outline-level="2">🎯 10. Conclusiones Finales de la Lección</text:h>
      <text:list text:style-name="L43">
        <text:list-item>
          <text:p text:style-name="P86"><text:span text:style-name="Strong_20_Emphasis"><text:span text:style-name="T1">El oro, la plata y las perlas de la Tierra</text:span></text:span><text:span text:style-name="T1"> eran símbolos de la palabra inmutable y preciosa de Dios. </text:span></text:p>
        </text:list-item>
        <text:list-item>
          <text:p text:style-name="P86"><text:span text:style-name="Strong_20_Emphasis"><text:span text:style-name="T1">Las riquezas físicas</text:span></text:span><text:span text:style-name="T1"> no pueden perdonar los pecados, salvarnos, darnos vida eterna ni el cielo. </text:span></text:p>
        </text:list-item>
        <text:list-item>
          <text:p text:style-name="P86"><text:span text:style-name="Strong_20_Emphasis"><text:span text:style-name="T1">La palabra de Dios (la verdad)</text:span></text:span><text:span text:style-name="T1"> es lo único que puede liberarnos del pecado y darnos la salvación. Por lo tanto, </text:span><text:span text:style-name="Strong_20_Emphasis"><text:span text:style-name="T1">no hay tesoro mayor</text:span></text:span><text:span text:style-name="T1">. </text:span></text:p>
        </text:list-item>
        <text:list-item>
          <text:p text:style-name="P86"><text:span text:style-name="Strong_20_Emphasis"><text:span text:style-name="T1">La palabra de Dios y Su pueblo</text:span></text:span><text:span text:style-name="T1"> fueron comparados con tesoros terrenales, pero en realidad son </text:span><text:span text:style-name="Strong_20_Emphasis"><text:span text:style-name="T1">mayores y más preciosos que el universo</text:span></text:span><text:span text:style-name="T1">. </text:span></text:p>
        </text:list-item>
        <text:list-item>
          <text:p text:style-name="P85"><text:span text:style-name="Strong_20_Emphasis"><text:span text:style-name="T1">Para Dios, tú eres lo más precioso que hay</text:span></text:span><text:span text:style-name="T1">, pero Él quiere que tú también tengas Su tesoro (Su palabra) en tu corazón para poder entrar al reino de los cielos. </text:span></text:p>
        </text:list-item>
      </text:list>
      <text:p text:style-name="Text_20_body"><text:span text:style-name="Strong_20_Emphasis"><text:span text:style-name="T1">📢 Anuncio para la Próxima Lección:</text:span></text:span><text:span text:style-name="T1"> La próxima vez aprenderemos sobre </text:span><text:span text:style-name="Strong_20_Emphasis"><text:span text:style-name="T1">Agua, Fuente y Río en figurativo</text:span></text:span><text:span text:style-name="T1">.</text:span></text:p>
      <text:list text:style-name="L44">
        <text:list-item>
          <text:p text:style-name="P87"><text:soft-page-break/><text:span text:style-name="Emphasis"><text:span text:style-name="T1">Pista para reflexionar:</text:span></text:span><text:span text:style-name="T1"> ¿De dónde viene el agua en la naturaleza? Si sigues un río hacia arriba, eventualmente llegarás a una fuente, que es donde mana el agua. ¿Qué significará esto espiritualmente en la Biblia? ¡Prepárense para seguir descubriendo los secretos del reino! </text:span></text:p>
        </text:list-item>
      </text:list>
      <text:p text:style-name="P3"/>
      <text:h text:style-name="P1" text:outline-level="2">🔄 11. Repaso Final y Oración de Cierre</text:h>
      <text:p text:style-name="Text_20_body"><text:span text:style-name="Emphasis"><text:span text:style-name="T1">(A cargo del Evangelista Christian Howard)</text:span></text:span></text:p>
      <text:p text:style-name="Text_20_body"><text:span text:style-name="Strong_20_Emphasis"><text:span text:style-name="T1">Resumen Interactivo con los Estudiantes:</text:span></text:span></text:p>
      <text:list text:style-name="L45">
        <text:list-item>
          <text:p text:style-name="P89"><text:span text:style-name="Strong_20_Emphasis"><text:span text:style-name="T1">¿Qué representa un hombre rico en sentido figurado?</text:span></text:span></text:p>
          <text:list>
            <text:list-item>
              <text:p text:style-name="P89"><text:span text:style-name="Emphasis"><text:span text:style-name="T1">Respuesta:</text:span></text:span><text:span text:style-name="T1"> Una persona que tiene </text:span><text:span text:style-name="Strong_20_Emphasis"><text:span text:style-name="T1">mucha palabra</text:span></text:span><text:span text:style-name="T1"> en su corazón. </text:span></text:p>
            </text:list-item>
          </text:list>
        </text:list-item>
        <text:list-item>
          <text:p text:style-name="P89"><text:span text:style-name="Strong_20_Emphasis"><text:span text:style-name="T1">¿Cuáles son los dos tipos de ricos?</text:span></text:span></text:p>
          <text:list>
            <text:list-item>
              <text:p text:style-name="P89"><text:span text:style-name="Emphasis"><text:span text:style-name="T1">Respuesta:</text:span></text:span><text:span text:style-name="T1"> Los que tienen la </text:span><text:span text:style-name="Strong_20_Emphasis"><text:span text:style-name="T1">palabra de Dios</text:span></text:span><text:span text:style-name="T1"> (la verdad, profecía y cumplimiento) y los que tienen las </text:span><text:span text:style-name="Strong_20_Emphasis"><text:span text:style-name="T1">mentiras de Satanás</text:span></text:span><text:span text:style-name="T1"> (palabras mezcladas con pensamientos humanos). </text:span></text:p>
            </text:list-item>
          </text:list>
        </text:list-item>
        <text:list-item>
          <text:p text:style-name="P89"><text:span text:style-name="Strong_20_Emphasis"><text:span text:style-name="T1">¿Qué dice Apocalipsis 3:18 que debemos comprar?</text:span></text:span></text:p>
          <text:list>
            <text:list-item>
              <text:p text:style-name="P89"><text:span text:style-name="Emphasis"><text:span text:style-name="T1">Respuesta:</text:span></text:span><text:span text:style-name="T1"> </text:span><text:span text:style-name="Strong_20_Emphasis"><text:span text:style-name="T1">Oro refinado en fuego</text:span></text:span><text:span text:style-name="T1"> de Jesús, que representa la verdadera palabra. </text:span></text:p>
            </text:list-item>
          </text:list>
        </text:list-item>
        <text:list-item>
          <text:p text:style-name="P89"><text:span text:style-name="Strong_20_Emphasis"><text:span text:style-name="T1">¿Qué hizo el mercader cuando encontró la perla preciosa?</text:span></text:span></text:p>
          <text:list>
            <text:list-item>
              <text:p text:style-name="P89"><text:span text:style-name="Emphasis"><text:span text:style-name="T1">Respuesta:</text:span></text:span><text:span text:style-name="T1"> </text:span><text:span text:style-name="Strong_20_Emphasis"><text:span text:style-name="T1">Vendió todo lo que tenía</text:span></text:span><text:span text:style-name="T1"> (desechó todo lo que creía que era verdad) para comprarla (aceptar la palabra de verdad). </text:span></text:p>
            </text:list-item>
          </text:list>
        </text:list-item>
        <text:list-item>
          <text:p text:style-name="P89"><text:span text:style-name="Strong_20_Emphasis"><text:span text:style-name="T1">¿Por qué es importante no ser orgullosos como el mensajero de Laodicea?</text:span></text:span></text:p>
          <text:list>
            <text:list-item>
              <text:p text:style-name="P88"><text:span text:style-name="Emphasis"><text:span text:style-name="T1">Respuesta:</text:span></text:span><text:span text:style-name="T1"> Porque podemos creer que tenemos la palabra, pero en realidad tener otros pensamientos mezclados. Siempre debemos escuchar las palabras y </text:span><text:span text:style-name="Strong_20_Emphasis"><text:span text:style-name="T1">compararlas con la Biblia</text:span></text:span><text:span text:style-name="T1"> para verificar si vienen de Dios. </text:span></text:p>
            </text:list-item>
          </text:list>
        </text:list-item>
      </text:list>
      <text:p text:style-name="Text_20_body"><text:span text:style-name="Strong_20_Emphasis"><text:span text:style-name="T1">📢 Anuncios:</text:span></text:span></text:p>
      <text:list text:style-name="L46">
        <text:list-item>
          <text:p text:style-name="P99">La próxima semana (lunes en la noche / martes en Corea) habrá una reunión especial con los pastores para conversar sobre las lecciones. </text:p>
        </text:list-item>
        <text:list-item>
          <text:p text:style-name="P100">La semana siguiente será la reunión general con todos los estudiantes. </text:p>
        </text:list-item>
      </text:list>
      <text:p text:style-name="Text_20_body"><text:span text:style-name="Strong_20_Emphasis"><text:span text:style-name="T1">Oración de Cierre (El Padre Nuestro):</text:span></text:span></text:p>
      <text:p text:style-name="Quotations"><text:span text:style-name="Emphasis"><text:span text:style-name="T1">"Padre nuestro que estás en los cielos, santificado sea tu nombre. Venga a nos su reino, hágase su voluntad en la Tierra como en el cielo. Danos hoy nuestro pan de cada día. Perdona nuestras ofensas como también nosotros perdonamos a </text:span></text:span><text:soft-page-break/><text:span text:style-name="Emphasis"><text:span text:style-name="T1">los que nos ofenden. No nos dejes caer en la tentación, mas líbranos del mal. Porque tuyo es el reino, el poder y la gloria por los siglos de los siglos. Amén."</text:span></text:span></text:p>
      <text:p text:style-name="P4">¡Gracias a todos por estar aquí! Sabemos que no es fácil tener que conseguir datos, electricidad y tiempo en medio de nuestras ocupaciones, pero Dios mira los esfuerzos que todos están haciendo. Dios está feliz de estar compartiendo estos secretos de los cielos con ustedes. Cuídense, que tengan una buena noche y que Dios los bendiga. ¡Adiós!</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dauk Book" svg:font-family="'Padauk Book'"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7T10:07:57.002700876</meta:creation-date>
    <dc:date>2026-07-09T20:28:31.110441135</dc:date>
    <meta:editing-duration>PT1H44M10S</meta:editing-duration>
    <meta:editing-cycles>12</meta:editing-cycles>
    <meta:generator>LibreOffice/24.2.7.2$Linux_X86_64 LibreOffice_project/420$Build-2</meta:generator>
    <meta:document-statistic meta:table-count="0" meta:image-count="0" meta:object-count="0" meta:page-count="9" meta:paragraph-count="134" meta:word-count="2460" meta:character-count="14048" meta:non-whitespace-character-count="11732"/>
  </office:meta>
</office:document-meta>
</file>