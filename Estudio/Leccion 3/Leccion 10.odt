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andas" svg:font-family="Chandas" style:font-pitch="variable"/>
    <style:font-face style:name="Chilanka" svg:font-family="Chilanka" style:font-pitch="variable"/>
    <style:font-face style:name="Karumbi" svg:font-family="Karum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4">
      <style:paragraph-properties fo:margin-top="0cm" fo:margin-bottom="0cm" style:contextual-spacing="false"/>
    </style:style>
    <style:style style:name="P47" style:family="paragraph" style:parent-style-name="Text_20_body" style:list-style-name="L25"/>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8">
      <style:paragraph-properties fo:margin-top="0cm" fo:margin-bottom="0cm" style:contextual-spacing="false"/>
    </style:style>
    <style:style style:name="P54" style:family="paragraph" style:parent-style-name="Text_20_body" style:list-style-name="L29"/>
    <style:style style:name="P55" style:family="paragraph" style:parent-style-name="Text_20_body" style:list-style-name="L29">
      <style:paragraph-properties fo:margin-top="0cm" fo:margin-bottom="0cm" style:contextual-spacing="false"/>
    </style:style>
    <style:style style:name="P56" style:family="paragraph" style:parent-style-name="Text_20_body">
      <style:text-properties style:font-name="Padauk Book"/>
    </style:style>
    <style:style style:name="T1" style:family="text">
      <style:text-properties style:font-name="Noto Sans"/>
    </style:style>
    <style:style style:name="T2" style:family="text">
      <style:text-properties style:font-name="Chilanka"/>
    </style:style>
    <style:style style:name="T3" style:family="text">
      <style:text-properties style:font-name="Karumbi"/>
    </style:style>
    <style:style style:name="T4"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8 (PARTE 1)</text:h>
      <text:h text:style-name="P2" text:outline-level="2">Luz, Candelero, Ciegos, Sordos y Vestido de Boda en Lenguaje Figurativo</text:h>
      <text:p text:style-name="P4"/>
      <text:h text:style-name="P2" text:outline-level="2">🔄 1. Repaso Inicial: Fuego, Incensario y Olla</text:h>
      <text:p text:style-name="Text_20_body"><text:span text:style-name="Emphasis"><text:span text:style-name="T4">(A cargo del Evangelista Christian Howard)</text:span></text:span></text:p>
      <text:p text:style-name="Text_20_body"><text:span text:style-name="T4">Antes de comenzar la nueva lección, repasamos los conceptos fundamentales de la lección anterior sobre el fuego espiritual y realizamos un </text:span><text:span text:style-name="Strong_20_Emphasis"><text:span text:style-name="T4">mini-quiz</text:span></text:span><text:span text:style-name="T4"> para evaluar nuestra retención:</text:span></text:p>
      <text:p text:style-name="Text_20_body"><text:span text:style-name="Strong_20_Emphasis"><text:span text:style-name="T4">Preguntas de Reflexión y Respuestas:</text:span></text:span></text:p>
      <text:list text:style-name="L18">
        <text:list-item>
          <text:p text:style-name="P36"><text:span text:style-name="Strong_20_Emphasis"><text:span text:style-name="T4">¿Qué representa el fuego?</text:span></text:span></text:p>
          <text:list>
            <text:list-item>
              <text:p text:style-name="P36"><text:span text:style-name="Emphasis"><text:span text:style-name="T4">Respuesta:</text:span></text:span><text:span text:style-name="T4"> </text:span><text:span text:style-name="Strong_20_Emphasis"><text:span text:style-name="T4">La Palabra.</text:span></text:span><text:span text:style-name="T4"> (Hay dos tipos: el fuego de Dios que limpia y juzga, y el fuego de Satanás que mata el espíritu). </text:span></text:p>
            </text:list-item>
          </text:list>
        </text:list-item>
        <text:list-item>
          <text:p text:style-name="P36"><text:span text:style-name="Strong_20_Emphasis"><text:span text:style-name="T4">¿Qué es el incienso y el incensario?</text:span></text:span></text:p>
          <text:list>
            <text:list-item>
              <text:p text:style-name="P36"><text:span text:style-name="Emphasis"><text:span text:style-name="T4">Incienso:</text:span></text:span><text:span text:style-name="T4"> Las </text:span><text:span text:style-name="Strong_20_Emphasis"><text:span text:style-name="T4">oraciones de los santos</text:span></text:span><text:span text:style-name="T4">. </text:span></text:p>
            </text:list-item>
            <text:list-item>
              <text:p text:style-name="P36"><text:span text:style-name="Emphasis"><text:span text:style-name="T4">Incensario:</text:span></text:span><text:span text:style-name="T4"> </text:span><text:span text:style-name="Strong_20_Emphasis"><text:span text:style-name="T4">Una persona</text:span></text:span><text:span text:style-name="T4"> (específicamente el corazón de una persona, que es el recipiente donde se pone el fuego/palabra). </text:span></text:p>
            </text:list-item>
          </text:list>
        </text:list-item>
        <text:list-item>
          <text:p text:style-name="P36"><text:span text:style-name="Strong_20_Emphasis"><text:span text:style-name="T4">¿Qué es el humo?</text:span></text:span></text:p>
          <text:list>
            <text:list-item>
              <text:p text:style-name="P36"><text:span text:style-name="Emphasis"><text:span text:style-name="T4">Respuesta:</text:span></text:span><text:span text:style-name="T4"> Las </text:span><text:span text:style-name="Strong_20_Emphasis"><text:span text:style-name="T4">oraciones que suben a la presencia de Dios</text:span></text:span><text:span text:style-name="T4">. (El humo físico sube; espiritualmente, cuando combinamos la Palabra de Dios con nuestras oraciones, estas suben y Dios las escucha). </text:span></text:p>
            </text:list-item>
          </text:list>
        </text:list-item>
        <text:list-item>
          <text:p text:style-name="P36"><text:span text:style-name="Strong_20_Emphasis"><text:span text:style-name="T4">¿Qué es la olla?</text:span></text:span></text:p>
          <text:list>
            <text:list-item>
              <text:p text:style-name="P35"><text:span text:style-name="Emphasis"><text:span text:style-name="T4">Respuesta:</text:span></text:span><text:span text:style-name="T4"> </text:span><text:span text:style-name="Strong_20_Emphasis"><text:span text:style-name="T4">La Iglesia</text:span></text:span><text:span text:style-name="T4"> (un contenedor grande que reúne a muchas "carnes" o personas para ser cocinadas por el fuego de la palabra). </text:span></text:p>
            </text:list-item>
          </text:list>
        </text:list-item>
      </text:list>
      <text:h text:style-name="P3" text:outline-level="3">✅ Mini-Quiz (Verdadero o Falso):</text:h>
      <text:list text:style-name="L19">
        <text:list-item>
          <text:p text:style-name="P38"><text:span text:style-name="Strong_20_Emphasis"><text:span text:style-name="T4">En la parábola de los cuatro campos, cada uno de nosotros pertenecemos a uno solo de ellos, para siempre.</text:span></text:span><text:span text:style-name="T4"> ➡️ </text:span><text:span text:style-name="Strong_20_Emphasis"><text:span text:style-name="T4">FALSO.</text:span></text:span><text:span text:style-name="T4"> (No estamos estancados; en un solo día </text:span><text:soft-page-break/><text:span text:style-name="T4">podemos pasar por los cuatro campos dependiendo de nuestras decisiones y prioridades). </text:span></text:p>
        </text:list-item>
        <text:list-item>
          <text:p text:style-name="P38"><text:span text:style-name="Strong_20_Emphasis"><text:span text:style-name="T4">El buen campo es aquel que recibe la semilla, la retiene, persevera y produce frutos.</text:span></text:span><text:span text:style-name="T4"> ➡️ </text:span><text:span text:style-name="Strong_20_Emphasis"><text:span text:style-name="T4">VERDADERO.</text:span></text:span><text:span text:style-name="T4"> </text:span></text:p>
        </text:list-item>
        <text:list-item>
          <text:p text:style-name="P38"><text:span text:style-name="Strong_20_Emphasis"><text:span text:style-name="T4">Mateo 24 nos habla de un siervo fiel y prudente que da alimento a su tiempo. Este siervo es Jesús.</text:span></text:span><text:span text:style-name="T4"> ➡️ </text:span><text:span text:style-name="Strong_20_Emphasis"><text:span text:style-name="T4">FALSO.</text:span></text:span><text:span text:style-name="T4"> (Jesús fue el siervo en la Primera Venida, pero en la Segunda Venida, Jesús pasa la antorcha a otra persona, el vencedor/pastor verdadero de estos tiempos). </text:span></text:p>
        </text:list-item>
        <text:list-item>
          <text:p text:style-name="P38"><text:span text:style-name="Strong_20_Emphasis"><text:span text:style-name="T4">La hambruna espiritual del Antiguo Testamento ya no se repite en la segunda venida.</text:span></text:span><text:span text:style-name="T4"> ➡️ </text:span><text:span text:style-name="Strong_20_Emphasis"><text:span text:style-name="T4">FALSO.</text:span></text:span><text:span text:style-name="T4"> (Dios es consistente; así como hubo hambruna en la Primera Venida, habrá una en la Segunda Venida). </text:span></text:p>
        </text:list-item>
        <text:list-item>
          <text:p text:style-name="P38"><text:span text:style-name="Strong_20_Emphasis"><text:span text:style-name="T4">La palabra de la verdad es esa palabra que nos permite entender los misterios del reino de los cielos y las parábolas.</text:span></text:span><text:span text:style-name="T4"> ➡️ </text:span><text:span text:style-name="Strong_20_Emphasis"><text:span text:style-name="T4">VERDADERO.</text:span></text:span><text:span text:style-name="T4"> (Es la profecía y su cumplimiento). </text:span></text:p>
        </text:list-item>
        <text:list-item>
          <text:p text:style-name="P37"><text:span text:style-name="Strong_20_Emphasis"><text:span text:style-name="T4">Mateo 13:33 (la parábola de la levadura) nos enseña que las mujeres deben empoderarse y tomar la iniciativa.</text:span></text:span><text:span text:style-name="T4"> ➡️ </text:span><text:span text:style-name="Strong_20_Emphasis"><text:span text:style-name="T4">FALSO.</text:span></text:span><text:span text:style-name="T4"> (La "mujer" en las parábolas representa a un </text:span><text:span text:style-name="Strong_20_Emphasis"><text:span text:style-name="T4">pastor</text:span></text:span><text:span text:style-name="T4"> que crea hijos espirituales, no a una mujer física). </text:span></text:p>
        </text:list-item>
      </text:list>
      <text:p text:style-name="Text_20_body"><text:span text:style-name="Strong_20_Emphasis"><text:span text:style-name="T4">Oración de apertura:</text:span></text:span></text:p>
      <text:p text:style-name="Quotations"><text:span text:style-name="Emphasis"><text:span text:style-name="T4">"Santísimo Padre Dios, gracias por enseñarnos todo esto. Gracias por abrir nuestros ojos espiritualmente y hacernos entender lo que tú has querido enseñarnos. Muchas veces creímos que te entendíamos, pero ya estamos viendo que los pensamientos que teníamos no venían directo de ti. Por eso tenemos que quitar estas enseñanzas incorrectas y pensamientos del hombre. Aunque es difícil, estamos tratando de perseverar para ser ese campo bueno para tu semilla, para que entre en nuestro corazón y nos cambie como esa levadura. Dios, por favor, abre nuestros corazones y dejemos que escuchemos tu palabra. Oramos todo esto en tu hijo Jesucristo. Amén."</text:span></text:span></text:p>
      <text:p text:style-name="P4"/>
      <text:h text:style-name="P2" text:outline-level="2">💡 2. Introducción a la Lección: Luz y Candelero</text:h>
      <text:p text:style-name="Text_20_body"><text:span text:style-name="Emphasis"><text:span text:style-name="T4">(A cargo del Instructor Sibiani)</text:span></text:span></text:p>
      <text:h text:style-name="P3" text:outline-level="3">📖 El Título de la Lección</text:h>
      <text:p text:style-name="P56">Leamos juntos dos veces:</text:p>
      <text:p text:style-name="Quotations"><text:span text:style-name="Strong_20_Emphasis"><text:span text:style-name="T4">"Luz, candelero, ciego, sordo y vestido de bodas en figurativo"</text:span></text:span></text:p>
      <text:p text:style-name="Text_20_body"><text:soft-page-break/><text:span text:style-name="T4">Hoy vamos a ver sobre la </text:span><text:span text:style-name="Strong_20_Emphasis"><text:span text:style-name="T4">luz</text:span></text:span><text:span text:style-name="T4"> y el </text:span><text:span text:style-name="Strong_20_Emphasis"><text:span text:style-name="T4">candelero</text:span></text:span><text:span text:style-name="T4">. Todos hemos experimentado la falta de luz (cortes de electricidad). Cuando se va la luz de noche, todo se vuelve incómodo, no podemos ver ni distinguir las cosas, y dependemos de velas o linternas. </text:span></text:p>
      <text:list text:style-name="L20">
        <text:list-item>
          <text:p text:style-name="P39"><text:span text:style-name="Emphasis"><text:span text:style-name="T4">Reflexión:</text:span></text:span><text:span text:style-name="T4"> ¿Qué será lo que Dios me quiere decir con esa luz espiritual? ¿Y qué es un candelero? ¿Cuál es su propósito? </text:span></text:p>
        </text:list-item>
      </text:list>
      <text:h text:style-name="P3" text:outline-level="3">🌟 Características Físicas y Espirituales de la Luz</text:h>
      <text:p text:style-name="P56">Para entender el significado espiritual, veamos las características físicas de la luz:</text:p>
      <text:list text:style-name="L21">
        <text:list-item>
          <text:p text:style-name="P41"><text:span text:style-name="Strong_20_Emphasis"><text:span text:style-name="T4">Alumbra las tinieblas:</text:span></text:span><text:span text:style-name="T4"> Nos permite ver y </text:span><text:span text:style-name="Strong_20_Emphasis"><text:span text:style-name="T4">distinguir</text:span></text:span><text:span text:style-name="T4"> las cosas. </text:span></text:p>
        </text:list-item>
        <text:list-item>
          <text:p text:style-name="P41"><text:span text:style-name="Strong_20_Emphasis"><text:span text:style-name="T4">Origen de la vida:</text:span></text:span><text:span text:style-name="T4"> Sin luz (como la del sol), las plantas no hacen fotosíntesis, los animales mueren y eventualmente nosotros también. </text:span></text:p>
        </text:list-item>
        <text:list-item>
          <text:p text:style-name="P41"><text:span text:style-name="Strong_20_Emphasis"><text:span text:style-name="T4">Sabiduría y entendimiento:</text:span></text:span><text:span text:style-name="T4"> Denota inteligencia (como el "bombillito" que se enciende en las caricaturas cuando alguien tiene una idea). </text:span></text:p>
        </text:list-item>
        <text:list-item>
          <text:p text:style-name="P40"><text:span text:style-name="Strong_20_Emphasis"><text:span text:style-name="T4">Lo opuesto (Tinieblas):</text:span></text:span><text:span text:style-name="T4"> Oscuridad, ignorancia, incapacidad de discernir, y muerte espiritual. </text:span></text:p>
        </text:list-item>
      </text:list>
      <text:p text:style-name="P4"/>
      <text:h text:style-name="P2" text:outline-level="2">📜 3. La Palabra de Dios es Luz</text:h>
      <text:p text:style-name="Text_20_body"><text:span text:style-name="Strong_20_Emphasis"><text:span text:style-name="T4">Juan 1:1-4</text:span></text:span></text:p>
      <text:p text:style-name="Quotations"><text:span text:style-name="Emphasis"><text:span text:style-name="T4">"En el principio era el Verbo, y el Verbo era con Dios, y el Verbo era Dios... En él estaba la vida, y la vida era la luz de los hombres."</text:span></text:span></text:p>
      <text:list text:style-name="L22">
        <text:list-item>
          <text:p text:style-name="P43"><text:span text:style-name="Strong_20_Emphasis"><text:span text:style-name="T4">El Verbo (La Palabra):</text:span></text:span><text:span text:style-name="T4"> Es Dios mismo. Cuando escuchamos la palabra de Dios, Dios está ahí. </text:span></text:p>
        </text:list-item>
        <text:list-item>
          <text:p text:style-name="P43"><text:span text:style-name="Strong_20_Emphasis"><text:span text:style-name="T4">Vida y Luz:</text:span></text:span><text:span text:style-name="T4"> En las palabras de Dios encontramos vida para nuestro espíritu y luz para entender. </text:span></text:p>
        </text:list-item>
        <text:list-item>
          <text:p text:style-name="P43"><text:span text:style-name="Strong_20_Emphasis"><text:span text:style-name="T4">Juan 1:5:</text:span></text:span><text:span text:style-name="T4"> </text:span><text:span text:style-name="Emphasis"><text:span text:style-name="T4">"La luz en las tinieblas resplandece, y las tinieblas no prevalecieron contra ella [no la entendieron]."</text:span></text:span></text:p>
          <text:list>
            <text:list-item>
              <text:p text:style-name="P42"><text:span text:style-name="Emphasis"><text:span text:style-name="T4">Significado:</text:span></text:span><text:span text:style-name="T4"> Las "tinieblas" son un estado de ignorancia espiritual. En la Primera Venida, los fariseos tenían la Biblia (Antiguo Testamento), pero estaban en tinieblas porque no entendían la </text:span><text:span text:style-name="Strong_20_Emphasis"><text:span text:style-name="T4">palabra revelada</text:span></text:span><text:span text:style-name="T4"> (el cumplimiento de las profecías). </text:span></text:p>
            </text:list-item>
          </text:list>
        </text:list-item>
      </text:list>
      <text:h text:style-name="P3" text:outline-level="3"><text:soft-page-break/>🔦 La Luz como Estándar</text:h>
      <text:p text:style-name="Text_20_body"><text:span text:style-name="T4">Imagina que estás en una habitación completamente oscura y escuchas un ruido. Todos empiezan a asumir qué es: "¿Un gato?", "¿Un bebé?", "¿Una zarigüeya?". Cada uno tiene su propio estándar. Pero cuando </text:span><text:span text:style-name="Strong_20_Emphasis"><text:span text:style-name="T4">enciendes la luz</text:span></text:span><text:span text:style-name="T4">, todos ven la verdad: "¡Es un mapache!". </text:span></text:p>
      <text:list text:style-name="L23">
        <text:list-item>
          <text:p text:style-name="P44"><text:span text:style-name="Emphasis"><text:span text:style-name="T4">Lección:</text:span></text:span><text:span text:style-name="T4"> En un mundo religioso de "tinieblas" (ignorancia), cada denominación tiene su propio estándar. Pero cuando llega la </text:span><text:span text:style-name="Strong_20_Emphasis"><text:span text:style-name="T4">luz (la palabra revelada)</text:span></text:span><text:span text:style-name="T4">, esta se convierte en el único estándar para distinguir la verdad. </text:span></text:p>
        </text:list-item>
      </text:list>
      <text:p text:style-name="P4"/>
      <text:h text:style-name="P2" text:outline-level="2">🌗 4. Hijos de Luz e Hijos de Tinieblas</text:h>
      <text:p text:style-name="Text_20_body"><text:span text:style-name="Strong_20_Emphasis"><text:span text:style-name="T4">1 Tesalonicenses 5:1-5</text:span></text:span></text:p>
      <text:p text:style-name="Quotations"><text:span text:style-name="Emphasis"><text:span text:style-name="T4">"...el día del Señor vendrá así como ladrón en la noche... Mas vosotros, hermanos, no estáis en tinieblas, para que aquel día os sorprenda como ladrón. Porque todos vosotros sois hijos de luz e hijos del día; no somos de la noche ni de las tinieblas".</text:span></text:span></text:p>
      <text:list text:style-name="L24">
        <text:list-item>
          <text:p text:style-name="P46"><text:span text:style-name="Strong_20_Emphasis"><text:span text:style-name="T4">El Día del Señor:</text:span></text:span><text:span text:style-name="T4"> Habla de los tiempos de cumplimiento (Segunda Venida). </text:span></text:p>
        </text:list-item>
        <text:list-item>
          <text:p text:style-name="P46"><text:span text:style-name="Strong_20_Emphasis"><text:span text:style-name="T4">El Ladrón en la Noche:</text:span></text:span><text:span text:style-name="T4"> Jesús vendrá cuando el mundo esté espiritualmente en tinieblas, diciendo "Paz y seguridad". </text:span></text:p>
        </text:list-item>
        <text:list-item>
          <text:p text:style-name="P46"><text:span text:style-name="Strong_20_Emphasis"><text:span text:style-name="T4">La Separación:</text:span></text:span><text:span text:style-name="T4"> Habrá dos tipos de creyentes:</text:span></text:p>
          <text:list>
            <text:list-item>
              <text:p text:style-name="P46"><text:span text:style-name="Strong_20_Emphasis"><text:span text:style-name="T4">Hijos de Tinieblas (La Noche):</text:span></text:span><text:span text:style-name="T4"> Creyentes que permanecen ignorantes, sin la palabra revelada. Serán sorprendidos. </text:span></text:p>
            </text:list-item>
            <text:list-item>
              <text:p text:style-name="P45"><text:span text:style-name="Strong_20_Emphasis"><text:span text:style-name="T4">Hijos de Luz (El Día):</text:span></text:span><text:span text:style-name="T4"> Creyentes que reciben la palabra revelada (el cumplimiento de las profecías). No serán sorprendidos. </text:span></text:p>
            </text:list-item>
          </text:list>
        </text:list-item>
      </text:list>
      <text:p text:style-name="Text_20_body"><text:span text:style-name="Strong_20_Emphasis"><text:span text:style-name="T4">Juan 3:18-21:</text:span></text:span><text:span text:style-name="T4"> Los que hacen la verdad vienen a la luz (aman entender las profecías cumplidas), mientras que los que hacen el mal aman las tinieblas (prefieren no entender para no ser corregidos).</text:span></text:p>
      <text:p text:style-name="P4"/>
      <text:h text:style-name="P2" text:outline-level="2">🕯️ 5. El Candelero en el Tabernáculo</text:h>
      <text:p text:style-name="Text_20_body"><text:span text:style-name="Strong_20_Emphasis"><text:span text:style-name="T4">Éxodo 27:20-21</text:span></text:span></text:p>
      <text:p text:style-name="Quotations"><text:span text:style-name="Emphasis"><text:span text:style-name="T4">"Y mandarás a los hijos de Israel que te traigan aceite puro de olivas machacadas para el alumbrado, para hacer arder continuamente las lámparas... desde la tarde hasta la mañana".</text:span></text:span></text:p>
      <text:h text:style-name="P3" text:outline-level="3"><text:soft-page-break/>🏛️ La Estructura del Tabernáculo</text:h>
      <text:p text:style-name="P56">El tabernáculo de Moisés era una "figura y sombra" de las cosas celestiales (Hebreos 8:5). Se dividía en dos partes:</text:p>
      <text:list text:style-name="L25">
        <text:list-item>
          <text:p text:style-name="P48"><text:span text:style-name="Strong_20_Emphasis"><text:span text:style-name="T4">Lugar Santo:</text:span></text:span><text:span text:style-name="T4"> Donde estaba el </text:span><text:span text:style-name="Strong_20_Emphasis"><text:span text:style-name="T4">Candelero de Oro</text:span></text:span><text:span text:style-name="T4"> (Menorá). Su propósito era alumbrar durante la noche para guiar a los sacerdotes hacia el Lugar Santísimo. </text:span></text:p>
        </text:list-item>
        <text:list-item>
          <text:p text:style-name="P47"><text:span text:style-name="Strong_20_Emphasis"><text:span text:style-name="T4">Lugar Santísimo:</text:span></text:span><text:span text:style-name="T4"> Donde moraba Dios (sobre el Arca del Pacto). </text:span></text:p>
        </text:list-item>
      </text:list>
      <text:h text:style-name="P3" text:outline-level="3">👁️ Los Siete Candeleros de Oro (Espíritus y Trabajadores)</text:h>
      <text:p text:style-name="Text_20_body"><text:span text:style-name="Strong_20_Emphasis"><text:span text:style-name="T4">Apocalipsis 4:5 / Zacarías 4:2-10</text:span></text:span></text:p>
      <text:list text:style-name="L26">
        <text:list-item>
          <text:p text:style-name="P50"><text:span text:style-name="T4">Las siete lámparas de fuego son los </text:span><text:span text:style-name="Strong_20_Emphasis"><text:span text:style-name="T4">siete espíritus de Dios</text:span></text:span><text:span text:style-name="T4"> enviados por toda la tierra. </text:span></text:p>
        </text:list-item>
        <text:list-item>
          <text:p text:style-name="P50"><text:span text:style-name="T4">También se les llama </text:span><text:span text:style-name="Strong_20_Emphasis"><text:span text:style-name="T4">"los siete ojos de Jehová"</text:span></text:span><text:span text:style-name="T4">. </text:span></text:p>
        </text:list-item>
        <text:list-item>
          <text:p text:style-name="P49"><text:span text:style-name="Emphasis"><text:span text:style-name="T4">Significado:</text:span></text:span><text:span text:style-name="T4"> Los espíritus no actúan solos; necesitan la carne (personas). Por lo tanto, el candelero representa </text:span><text:span text:style-name="Strong_20_Emphasis"><text:span text:style-name="T4">los espíritus de Dios y los trabajadores (pastores/profetas)</text:span></text:span><text:span text:style-name="T4"> con quienes el espíritu trabaja. </text:span></text:p>
        </text:list-item>
      </text:list>
      <text:p text:style-name="P4"/>
      <text:h text:style-name="P2" text:outline-level="2">🕊️ 6. La Realidad en la Primera Venida: Juan el Bautista</text:h>
      <text:p text:style-name="Text_20_body"><text:span text:style-name="Strong_20_Emphasis"><text:span text:style-name="T4">Juan 5:35</text:span></text:span></text:p>
      <text:p text:style-name="Quotations"><text:span text:style-name="Emphasis"><text:span text:style-name="T4">"Él [Juan el Bautista] era antorcha que ardía y alumbraba; y vosotros quisisteis regocijaros por un tiempo en su luz".</text:span></text:span></text:p>
      <text:p text:style-name="Text_20_body"><text:span text:style-name="Strong_20_Emphasis"><text:span text:style-name="T4">Juan 1:6-8</text:span></text:span></text:p>
      <text:p text:style-name="Quotations"><text:span text:style-name="Emphasis"><text:span text:style-name="T4">"Hubo un hombre enviado de Dios... Este vino por testimonio, para que diese testimonio de la luz... No era él la luz, sino para que diese testimonio de la luz".</text:span></text:span></text:p>
      <text:h text:style-name="P3" text:outline-level="3">🗺️ El Croquis Espiritual de la Primera Venida</text:h>
      <text:p text:style-name="P56">Imagina el tabernáculo en medio de la noche espiritual de Israel:</text:p>
      <text:list text:style-name="L27">
        <text:list-item>
          <text:p text:style-name="P51"><text:span text:style-name="Strong_20_Emphasis"><text:span text:style-name="T4">Afuera (Tinieblas):</text:span></text:span><text:span text:style-name="T4"> Los fariseos, maestros de la ley y el mundo religioso ignorante.</text:span></text:p>
        </text:list-item>
        <text:list-item>
          <text:p text:style-name="P51"><text:span text:style-name="Strong_20_Emphasis"><text:span text:style-name="T4">Lugar Santo (El Candelero):</text:span></text:span><text:span text:style-name="T4"> </text:span><text:span text:style-name="Strong_20_Emphasis"><text:span text:style-name="T4">Juan el Bautista</text:span></text:span><text:span text:style-name="T4">. Él era la antorcha/candelero que tenía el testimonio (palabras) para </text:span><text:span text:style-name="Strong_20_Emphasis"><text:span text:style-name="T4">alumbrar el camino</text:span></text:span><text:span text:style-name="T4"> y guiar a las personas hacia el Lugar Santísimo.</text:span></text:p>
        </text:list-item>
        <text:list-item>
          <text:p text:style-name="P51"><text:soft-page-break/><text:span text:style-name="Strong_20_Emphasis"><text:span text:style-name="T4">Lugar Santísimo (La Luz / Dios morando):</text:span></text:span><text:span text:style-name="T4"> </text:span><text:span text:style-name="Strong_20_Emphasis"><text:span text:style-name="T4">Jesucristo</text:span></text:span><text:span text:style-name="T4">. Él era la gran luz del día, la realidad del cumplimiento de las profecías.</text:span></text:p>
        </text:list-item>
        <text:list-item>
          <text:p text:style-name="P51"><text:span text:style-name="Emphasis"><text:span text:style-name="T4">Lección:</text:span></text:span><text:span text:style-name="T4"> Juan no era la luz, pero su trabajo era señalar hacia Jesús. De la misma manera, en la Segunda Venida, el candelero (el pastor con el espíritu) tiene la misión de guiar a los creyentes hacia la luz (la realidad del cumplimiento de Apocalipsis).</text:span></text:p>
        </text:list-item>
      </text:list>
      <text:p text:style-name="P4"/>
      <text:h text:style-name="P2" text:outline-level="2">🎯 7. Conclusiones de la Primera Parte</text:h>
      <text:list text:style-name="L28">
        <text:list-item>
          <text:p text:style-name="P53"><text:span text:style-name="Strong_20_Emphasis"><text:span text:style-name="T4">La Luz es la Palabra de Vida:</text:span></text:span><text:span text:style-name="T4"> Pero también es la </text:span><text:span text:style-name="Strong_20_Emphasis"><text:span text:style-name="T4">persona que tiene la palabra</text:span></text:span><text:span text:style-name="T4"> (como Jesús y los 12 discípulos). </text:span></text:p>
        </text:list-item>
        <text:list-item>
          <text:p text:style-name="P53"><text:span text:style-name="Strong_20_Emphasis"><text:span text:style-name="T4">Las Tinieblas son la Ausencia de la Palabra:</text:span></text:span><text:span text:style-name="T4"> Es ignorancia espiritual. No distingue entre creyentes y no creyentes, sino entre los que tienen la palabra revelada y los que no. </text:span></text:p>
        </text:list-item>
        <text:list-item>
          <text:p text:style-name="P53"><text:span text:style-name="Strong_20_Emphasis"><text:span text:style-name="T4">La Exposición de la Palabra:</text:span></text:span><text:span text:style-name="T4"> Salmos 119:130 dice que </text:span><text:span text:style-name="Emphasis"><text:span text:style-name="T4">"la exposición de tus palabras alumbra"</text:span></text:span><text:span text:style-name="T4">. No basta con tener la Biblia cerrada; debe ser </text:span><text:span text:style-name="Strong_20_Emphasis"><text:span text:style-name="T4">abierta y revelada</text:span></text:span><text:span text:style-name="T4"> (cumplimiento de profecías) para dar entendimiento a los simples. </text:span></text:p>
        </text:list-item>
        <text:list-item>
          <text:p text:style-name="P52"><text:span text:style-name="Strong_20_Emphasis"><text:span text:style-name="T4">El Candelero es Espíritu y Trabajador:</text:span></text:span><text:span text:style-name="T4"> Los espíritus de Dios usan a personas (pastores) para alumbrar el camino hacia la presencia de Dios en estos tiempos. </text:span></text:p>
        </text:list-item>
      </text:list>
      <text:p text:style-name="Text_20_body"><text:span text:style-name="Strong_20_Emphasis"><text:span text:style-name="T4">📢 Anuncio para la Próxima Lección:</text:span></text:span><text:span text:style-name="T4"> Continuaremos con la segunda parte de esta lección, viendo sobre </text:span><text:span text:style-name="Strong_20_Emphasis"><text:span text:style-name="T4">ciegos, sordos y los vestidos de boda en figurativo</text:span></text:span><text:span text:style-name="T4">. ¡Prepárense para seguir descubriendo los secretos del reino!</text:span></text:p>
      <text:p text:style-name="P4"/>
      <text:h text:style-name="P2" text:outline-level="2">🔄 8. Repaso Final y Oración de Cierre</text:h>
      <text:p text:style-name="Text_20_body"><text:span text:style-name="Emphasis"><text:span text:style-name="T4">(A cargo del Evangelista Christian Howard)</text:span></text:span></text:p>
      <text:p text:style-name="Text_20_body"><text:span text:style-name="Strong_20_Emphasis"><text:span text:style-name="T4">Resumen Interactivo con los Estudiantes:</text:span></text:span></text:p>
      <text:list text:style-name="L29">
        <text:list-item>
          <text:p text:style-name="P55"><text:span text:style-name="Strong_20_Emphasis"><text:span text:style-name="T4">¿Qué es la luz?</text:span></text:span><text:span text:style-name="T4"> La palabra de vida y la persona que tiene la palabra. </text:span></text:p>
        </text:list-item>
        <text:list-item>
          <text:p text:style-name="P55"><text:span text:style-name="Strong_20_Emphasis"><text:span text:style-name="T4">¿Qué son las tinieblas?</text:span></text:span><text:span text:style-name="T4"> La ausencia de la palabra o ignorancia de ella. </text:span></text:p>
        </text:list-item>
        <text:list-item>
          <text:p text:style-name="P55"><text:span text:style-name="Strong_20_Emphasis"><text:span text:style-name="T4">¿Qué pasa cuando viene la luz?</text:span></text:span><text:span text:style-name="T4"> Hay una </text:span><text:span text:style-name="Strong_20_Emphasis"><text:span text:style-name="T4">separación</text:span></text:span><text:span text:style-name="T4"> (entre hijos de luz e hijos de tinieblas). La luz se convierte en el estándar. </text:span></text:p>
        </text:list-item>
        <text:list-item>
          <text:p text:style-name="P55"><text:span text:style-name="Strong_20_Emphasis"><text:span text:style-name="T4">¿Qué es la "exposición" de la palabra?</text:span></text:span><text:span text:style-name="T4"> La palabra abierta, revelada, que se puede entender (profecía y cumplimiento). </text:span></text:p>
        </text:list-item>
        <text:list-item>
          <text:p text:style-name="P55"><text:span text:style-name="Strong_20_Emphasis"><text:span text:style-name="T4">¿Qué representa el candelero?</text:span></text:span><text:span text:style-name="T4"> Espíritu y trabajador (pastor). </text:span></text:p>
        </text:list-item>
        <text:list-item>
          <text:p text:style-name="P55"><text:soft-page-break/><text:span text:style-name="Strong_20_Emphasis"><text:span text:style-name="T4">¿Dónde estaba el candelero en el tabernáculo?</text:span></text:span><text:span text:style-name="T4"> En el Lugar Santo, guiando hacia el Lugar Santísimo. </text:span></text:p>
        </text:list-item>
        <text:list-item>
          <text:p text:style-name="P54"><text:span text:style-name="Strong_20_Emphasis"><text:span text:style-name="T4">¿Quién fue el candelero/antorcha en la Primera Venida?</text:span></text:span><text:span text:style-name="T4"> Juan el Bautista, quien guió a la gente hacia Jesús (la Luz). </text:span></text:p>
        </text:list-item>
      </text:list>
      <text:p text:style-name="Text_20_body"><text:span text:style-name="Strong_20_Emphasis"><text:span text:style-name="T4">Oración de Cierre (El Padre Nuestro):</text:span></text:span></text:p>
      <text:p text:style-name="Quotations"><text:span text:style-name="Emphasis"><text:span text:style-name="T4">"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56">¡Gracias a todos! Cuídense, sigan estudiando y repasando el video de esta lección porque tiene mucha información espiritual. ¡Nos vemos en la próxima clase para la parte 2!</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andas" svg:font-family="Chandas" style:font-pitch="variable"/>
    <style:font-face style:name="Chilanka" svg:font-family="Chilanka" style:font-pitch="variable"/>
    <style:font-face style:name="Karumbi" svg:font-family="Karum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5:38.188757865</dc:date>
    <meta:editing-duration>PT1H42M7S</meta:editing-duration>
    <meta:editing-cycles>9</meta:editing-cycles>
    <meta:generator>LibreOffice/24.2.7.2$Linux_X86_64 LibreOffice_project/420$Build-2</meta:generator>
    <meta:document-statistic meta:table-count="0" meta:image-count="0" meta:object-count="0" meta:page-count="7" meta:paragraph-count="98" meta:word-count="1853" meta:character-count="10847" meta:non-whitespace-character-count="9100"/>
  </office:meta>
</office:document-meta>
</file>